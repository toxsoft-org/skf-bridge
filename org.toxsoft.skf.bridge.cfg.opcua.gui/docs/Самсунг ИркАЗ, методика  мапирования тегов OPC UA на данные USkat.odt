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2937"/>
    </style:style>
    <style:style style:name="P2" style:family="paragraph" style:parent-style-name="Standard">
      <style:paragraph-properties fo:text-align="start" style:justify-single-word="false"/>
      <style:text-properties officeooo:paragraph-rsid="00032937"/>
    </style:style>
    <style:style style:name="P3" style:family="paragraph" style:parent-style-name="Standard">
      <style:paragraph-properties fo:text-align="start" style:justify-single-word="false"/>
      <style:text-properties officeooo:paragraph-rsid="0004b87d"/>
    </style:style>
    <style:style style:name="P4" style:family="paragraph" style:parent-style-name="Standard">
      <style:paragraph-properties fo:text-align="start" style:justify-single-word="false"/>
      <style:text-properties officeooo:paragraph-rsid="0009c98a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0e4705"/>
    </style:style>
    <style:style style:name="P6" style:family="paragraph" style:parent-style-name="Standard">
      <style:paragraph-properties fo:text-align="start" style:justify-single-word="false"/>
      <style:text-properties officeooo:paragraph-rsid="000e4705"/>
    </style:style>
    <style:style style:name="P7" style:family="paragraph" style:parent-style-name="Standard">
      <style:paragraph-properties fo:text-align="start" style:justify-single-word="false"/>
      <style:text-properties officeooo:rsid="0004b87d" officeooo:paragraph-rsid="0004b87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b87d" officeooo:paragraph-rsid="0004b87d"/>
    </style:style>
    <style:style style:name="P9" style:family="paragraph" style:parent-style-name="Standard">
      <style:paragraph-properties fo:text-align="start" style:justify-single-word="false"/>
      <style:text-properties officeooo:rsid="0004dac6" officeooo:paragraph-rsid="0004dac6"/>
    </style:style>
    <style:style style:name="P10" style:family="paragraph" style:parent-style-name="Standard">
      <style:paragraph-properties fo:text-align="start" style:justify-single-word="false"/>
      <style:text-properties officeooo:rsid="00060e1d" officeooo:paragraph-rsid="00060e1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60e1d" officeooo:paragraph-rsid="00060e1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6f0ce" officeooo:paragraph-rsid="0006f0ce"/>
    </style:style>
    <style:style style:name="P13" style:family="paragraph" style:parent-style-name="Standard">
      <style:paragraph-properties fo:text-align="start" style:justify-single-word="false"/>
      <style:text-properties officeooo:rsid="0006f0ce" officeooo:paragraph-rsid="0006f0ce"/>
    </style:style>
    <style:style style:name="P14" style:family="paragraph" style:parent-style-name="Standard">
      <style:paragraph-properties fo:text-align="start" style:justify-single-word="false"/>
      <style:text-properties officeooo:rsid="0007a02f" officeooo:paragraph-rsid="0007a02f"/>
    </style:style>
    <style:style style:name="P15" style:family="paragraph" style:parent-style-name="Standard">
      <style:paragraph-properties fo:text-align="start" style:justify-single-word="false"/>
      <style:text-properties officeooo:rsid="0007a02f" officeooo:paragraph-rsid="0008a126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07a02f" officeooo:paragraph-rsid="0008a126"/>
    </style:style>
    <style:style style:name="P17" style:family="paragraph" style:parent-style-name="Standard">
      <style:paragraph-properties fo:text-align="start" style:justify-single-word="false"/>
      <style:text-properties officeooo:rsid="0009c98a" officeooo:paragraph-rsid="0009c98a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09c98a" officeooo:paragraph-rsid="0009c98a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09c98a" officeooo:paragraph-rsid="000d52a2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0d52a2" officeooo:paragraph-rsid="000d52a2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0b0661" officeooo:paragraph-rsid="000b0661"/>
    </style:style>
    <style:style style:name="P22" style:family="paragraph" style:parent-style-name="Standard">
      <style:paragraph-properties fo:text-align="start" style:justify-single-word="false"/>
      <style:text-properties officeooo:rsid="000b0661" officeooo:paragraph-rsid="000c6936"/>
    </style:style>
    <style:style style:name="P23" style:family="paragraph" style:parent-style-name="Standard">
      <style:paragraph-properties fo:text-align="start" style:justify-single-word="false"/>
      <style:text-properties officeooo:rsid="000b0661" officeooo:paragraph-rsid="000d52a2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0b0661" officeooo:paragraph-rsid="000b066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0d52a2" officeooo:paragraph-rsid="000d52a2"/>
    </style:style>
    <style:style style:name="P26" style:family="paragraph" style:parent-style-name="Standard">
      <style:paragraph-properties fo:text-align="start" style:justify-single-word="false"/>
      <style:text-properties officeooo:rsid="000d52a2" officeooo:paragraph-rsid="000e4705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0e4705" officeooo:paragraph-rsid="000e4705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0e4705" officeooo:paragraph-rsid="000e4705"/>
    </style:style>
    <style:style style:name="P29" style:family="paragraph" style:parent-style-name="Standard">
      <style:paragraph-properties fo:text-align="start" style:justify-single-word="false"/>
      <style:text-properties officeooo:rsid="000e4705" officeooo:paragraph-rsid="00130fae"/>
    </style:style>
    <style:style style:name="P30" style:family="paragraph" style:parent-style-name="Standard">
      <style:paragraph-properties fo:text-align="start" style:justify-single-word="false"/>
      <style:text-properties officeooo:rsid="000ff8a8" officeooo:paragraph-rsid="000ff8a8"/>
    </style:style>
    <style:style style:name="P31" style:family="paragraph" style:parent-style-name="Standard">
      <style:paragraph-properties fo:text-align="start" style:justify-single-word="false"/>
      <style:text-properties officeooo:rsid="00115d67" officeooo:paragraph-rsid="00115d67"/>
    </style:style>
    <style:style style:name="P32" style:family="paragraph" style:parent-style-name="Standard">
      <style:paragraph-properties fo:text-align="start" style:justify-single-word="false"/>
      <style:text-properties officeooo:rsid="0014d42c" officeooo:paragraph-rsid="0014d42c"/>
    </style:style>
    <style:style style:name="P33" style:family="paragraph" style:parent-style-name="Standard">
      <style:paragraph-properties fo:text-align="start" style:justify-single-word="false" fo:break-before="page"/>
      <style:text-properties officeooo:rsid="0014d42c" officeooo:paragraph-rsid="0014d42c"/>
    </style:style>
    <style:style style:name="T1" style:family="text">
      <style:text-properties officeooo:rsid="00032937"/>
    </style:style>
    <style:style style:name="T2" style:family="text">
      <style:text-properties officeooo:rsid="00060e1d"/>
    </style:style>
    <style:style style:name="T3" style:family="text">
      <style:text-properties officeooo:rsid="0006f0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f0ce" style:font-weight-asian="bold" style:font-weight-complex="bold"/>
    </style:style>
    <style:style style:name="T6" style:family="text">
      <style:text-properties officeooo:rsid="0007a02f"/>
    </style:style>
    <style:style style:name="T7" style:family="text">
      <style:text-properties officeooo:rsid="0008a126"/>
    </style:style>
    <style:style style:name="T8" style:family="text">
      <style:text-properties officeooo:rsid="0009c98a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0b0661"/>
    </style:style>
    <style:style style:name="T11" style:family="text">
      <style:text-properties officeooo:rsid="000c6936"/>
    </style:style>
    <style:style style:name="T12" style:family="text">
      <style:text-properties officeooo:rsid="000d52a2"/>
    </style:style>
    <style:style style:name="T13" style:family="text">
      <style:text-properties officeooo:rsid="000e4705"/>
    </style:style>
    <style:style style:name="T14" style:family="text">
      <style:text-properties officeooo:rsid="00115d67"/>
    </style:style>
    <style:style style:name="T15" style:family="text">
      <style:text-properties officeooo:rsid="00130f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амсунг ИркАЗ, методика <text:s/>мапирования тегов OPC UA на данные USkat</text:span></text:p>
      <text:p text:style-name="P2"/>
      <text:p text:style-name="P7">Вводная часть.</text:p>
      <text:p text:style-name="P3"><text:s text:c="3"/>Данное описание служит нескольким целям:</text:p>
      <text:list xml:id="list30917314" text:style-name="L1">
        <text:list-item>
          <text:p text:style-name="P8">спроектировать как данные из <text:s/><text:span text:style-name="T1">OPC UA </text:span>попадут в сервер <text:span text:style-name="T1">USkat</text:span></text:p>
        </text:list-item>
        <text:list-item>
          <text:p text:style-name="P8">проверить предложенную модель на целостность, полноту и непротиворечивость</text:p>
        </text:list-item>
        <text:list-item>
          <text:p text:style-name="P8">проинформировать дургих членов команды как создается системное описание и конфигурация моста</text:p>
        </text:list-item>
        <text:list-item>
          <text:p text:style-name="P8">оставить себе поминалку как все работает, чтобы потом быстро восстановить контекст</text:p>
        </text:list-item>
      </text:list>
      <text:p text:style-name="P7"/>
      <text:p text:style-name="P9">Постановка задачи.</text:p>
      <text:p text:style-name="P10">Есть дерево тегов OPC UA, надо читать/писать <text:s/>из/в него. </text:p>
      <text:p text:style-name="P10">В проекте Самсунг будем читать данные тремя разными способами:</text:p>
      <text:list xml:id="list3307363275" text:style-name="L2">
        <text:list-item>
          <text:p text:style-name="P11">считал значение с тега OPC, записал на сервер. </text:p>
        </text:list-item>
        <text:list-item>
          <text:p text:style-name="P11">считал зн<text:span text:style-name="T3">а</text:span>чение из тега int который является битовым регистром <text:span text:style-name="T3">(слово состояние)</text:span>, выделил знач<text:span text:style-name="T3">е</text:span>ние нужных битов, записал на сервер. <text:span text:style-name="T3">Важно! И слово и битовый флаг это данные </text:span><text:span text:style-name="T5">одного</text:span><text:span text:style-name="T3"> класса.</text:span></text:p>
        </text:list-item>
        <text:list-item>
          <text:p text:style-name="P12">Считал значение из тега <text:s/><text:span text:style-name="T2">int который является битовым регистром, </text:span>выделил все нужные значения и записал их на сервер. Важно! Слово и битовый флаг это данные <text:span text:style-name="T4">разных</text:span> классов.</text:p>
        </text:list-item>
      </text:list>
      <text:p text:style-name="P13"/>
      <text:p text:style-name="P14">Теперь подробно про кажд<text:span text:style-name="T8">ый</text:span> <text:span text:style-name="T8">способ</text:span>, начнем с №3</text:p>
      <text:p text:style-name="P18">Способ 3.</text:p>
      <text:p text:style-name="P14">Прямо по коду проекта. </text:p>
      <text:p text:style-name="P14">Файл «Дерево тегов», закладка «Маски». Описывает карту мапирования из тегов группы AnalogInputControls на данные класса AnalogInput. </text:p>
      <text:p text:style-name="P14">Пример (строка 1 в электронной таблице):</text:p>
      <text:p text:style-name="P14">AnalogInputControls::AI_Enable3<text:span text:style-name="T11">[</text:span>bit0<text:span text:style-name="T11">]</text:span> → AnalogInput::ai1_IGVposition::Enable</text:p>
      <text:p text:style-name="P14"><text:s text:c="2"/></text:p>
      <text:p text:style-name="P14">Решение.</text:p>
      <text:p text:style-name="P15"><text:s text:c="3"/>Реализуем через механизм виртуальных данных в скатлете сервера. Создается справочник Samsung.AnalogInput.BitMasks <text:span text:style-name="T7">который считывает код скатлета, создает нужные каналы данных, слушает изменения этих данных и пишет их на сервер. </text:span></text:p>
      <text:p text:style-name="P15"><text:span text:style-name="T7">Задача стандартная, есть пример. Методика реализации описана в файле «Самсунг, что дальше». TODO перенести сюда как приложение.</text:span></text:p>
      <text:p text:style-name="P15"><text:span text:style-name="T7">Важно помнить! Для корректной работы необходимо чтобы в классе <text:s text:c="4"/></text:span>AnalogInput <text:span text:style-name="T7">были следуюшие поля:</text:span></text:p>
      <text:list xml:id="list1824660862" text:style-name="L3">
        <text:list-item>
          <text:p text:style-name="P16">Enable</text:p>
        </text:list-item>
        <text:list-item>
          <text:p text:style-name="P16">WarnUse</text:p>
        </text:list-item>
        <text:list-item>
          <text:p text:style-name="P16">AlarmUse</text:p>
        </text:list-item>
      </text:list>
      <text:p text:style-name="P17">Их нет в обычном поддереве аналогового входа, надо брать их из описания класса выделенного поддерева</text:p>
      <text:p text:style-name="P17"/>
      <text:p text:style-name="P17"><text:span text:style-name="T9">Способ 2.</text:span></text:p>
      <text:p text:style-name="P24">На примере обработки предупреждений.</text:p>
      <text:p text:style-name="P4"><text:span text:style-name="T6">Файл «Дерево тегов», закладк</text:span><text:span text:style-name="T10">а</text:span><text:span text:style-name="T6"> «</text:span><text:span text:style-name="T10">Предупреждения</text:span><text:span text:style-name="T6">». Описывает карту мапирования из тегов группы </text:span><text:span text:style-name="T10">Warnings</text:span><text:span text:style-name="T6"> на данные класса Warnings. </text:span></text:p>
      <text:p text:style-name="P4"/>
      <text:p text:style-name="P21">Реализация.</text:p>
      <text:p text:style-name="P21">Создаем (с помощью импорта из ods файла SamsungIrkAZ_bits.ods, который в свою очередь создается на основе инфы из файла дерево тегов, закладка «Предупреждения») справочник битовых масок BitMask. </text:p>
      <text:p text:style-name="P21"><text:soft-page-break/>На этапе создания описания класса в SkIDE (то есть из дерева OPC UA), программа считывает инфу из этого справочника, находит все элементы с id у которых префикс совпадает с именем класса (Warnings) и добавляет их в описание класса. <text:s/>Далее, на этапе генерации файлов конфигурации моста, программа генератора, используя тот же справочник, создает нужно описание.</text:p>
      <text:p text:style-name="P22">Пример <text:span text:style-name="T11">(строка 3)</text:span>.</text:p>
      <text:p text:style-name="P22">Warnings::Warnings::WarningMessGroupFlag1<text:span text:style-name="T11">[bit8] → Warnings::Warnings::</text:span>SurgeWarning</text:p>
      <text:p text:style-name="P23">Важно помнить! Для корректной работы необходимо чтобы в классе <text:s/>Warnings были следуюшие <text:span text:style-name="T12">все нужные данные из справочника масок.</text:span></text:p>
      <text:p text:style-name="P23"/>
      <text:p text:style-name="P20">Проверить!</text:p>
      <text:p text:style-name="P25"/>
      <text:p text:style-name="P19">Способ <text:span text:style-name="T12">1</text:span>.</text:p>
      <text:p text:style-name="P26">Для класса AnalogInput берем поддерево AnalogInputs1/AnalogInput и создаем все прописаные там узлы. При этом <text:span text:style-name="T13">вот эти узлы:</text:span></text:p>
      <text:list xml:id="list770233857" text:style-name="L4">
        <text:list-item>
          <text:p text:style-name="P27">AlarmValue</text:p>
        </text:list-item>
        <text:list-item>
          <text:p text:style-name="P27">CV</text:p>
        </text:list-item>
        <text:list-item>
          <text:p text:style-name="P27">CVInt</text:p>
        </text:list-item>
        <text:list-item>
          <text:p text:style-name="P27">Graduate</text:p>
        </text:list-item>
        <text:list-item>
          <text:p text:style-name="P5"><text:span text:style-name="T13">WarnValue</text:span></text:p>
        </text:list-item>
      </text:list>
      <text:p text:style-name="P26"><text:span text:style-name="T13">мапируются стандартно (тег → </text:span><text:span text:style-name="T15">данное </text:span><text:span text:style-name="T13">), </text:span><text:span text:style-name="T14">нет вопросов</text:span></text:p>
      <text:p text:style-name="P26"><text:span text:style-name="T13">Вот эти :</text:span></text:p>
      <text:p text:style-name="P26"><text:s text:c="4"/>• Enable</text:p>
      <text:p text:style-name="P26"><text:s text:c="4"/>• WarnUse</text:p>
      <text:p text:style-name="P26"><text:s text:c="4"/>• AlarmUse</text:p>
      <text:p text:style-name="P30">мапируются через описание в файле «Дерево тегов», закладка «Предупреждения»</text:p>
      <text:p text:style-name="P31">Правильно?</text:p>
      <text:p text:style-name="P31"/>
      <text:p text:style-name="P29">А вот эти <text:span text:style-name="T15">вызывали вопрос.</text:span></text:p>
      <text:p text:style-name="P29"><text:span text:style-name="T15"><text:s/>Ц</text:span><text:span text:style-name="T14">итата из твоего письма</text:span>:</text:p>
      <text:list xml:id="list2683394210" text:style-name="L5">
        <text:list-item>
          <text:p text:style-name="P28">AlarmExist лежат в Alarms\AlarmMessGroupFlag.</text:p>
        </text:list-item>
        <text:list-item>
          <text:p text:style-name="P28">WarnExist лежат в Warinings\WarningMessGroupFlag.</text:p>
        </text:list-item>
        <text:list-item>
          <text:p text:style-name="P28">OutRange лежат в Warnings\EventMessGroupFlag.</text:p>
        </text:list-item>
      </text:list>
      <text:p text:style-name="P6"><text:span text:style-name="T13">Но я их там не нашел, </text:span><text:span text:style-name="T14">а потому вопрос.</text:span><text:span text:style-name="T13"> </text:span></text:p>
      <text:p text:style-name="P31"/>
      <text:p text:style-name="P30">Насколько я помню у нас была договоренность что я создам отдельный класс Warning и <text:s/><text:span text:style-name="T13">Alarms </text:span>и по раскладке описанной <text:s/>в файле «Дерево тегов», закладка «Предупреждения» раскидаю их на них описанные там теги ( <text:span text:style-name="T13">WarningMessGroupFlag</text:span>[1-2]<text:span text:style-name="T13">, <text:s/>EventMessGroupFlag</text:span><text:span text:style-name="T14">[</text:span><text:span text:style-name="T13">1-</text:span><text:span text:style-name="T14">3], MaintenanceGroupFlag</text:span></text:p>
      <text:p text:style-name="P31">Тоже самое с авариями с одноименной закладки. <text:s/></text:p>
      <text:p text:style-name="P31">Что тут не правильно?</text:p>
      <text:p text:style-name="P31"/>
      <text:p text:style-name="P32"/>
      <text:p text:style-name="P33">Приложение 1. Методика реализации производных данных. </text:p>
      <text:p text:style-name="P32">ТЗ на функционал виртуальных данных.</text:p>
      <text:p text:style-name="P32">Пункт 1.</text:p>
      <text:p text:style-name="P32">Создаем справочник Samsung.AnalogInput.BitMasks, его поля:</text:p>
      <text:p text:style-name="P32"><text:s text:c="4"/>• srcClassId — класс источник</text:p>
      <text:p text:style-name="P32"><text:s text:c="4"/>• srcObjId — объект источник</text:p>
      <text:p text:style-name="P32"><text:s text:c="4"/>• srcWordDataId — слово состояния источник</text:p>
      <text:p text:style-name="P32"><text:s text:c="4"/>• bitN — индекс бита <text:s/></text:p>
      <text:p text:style-name="P32"><text:s text:c="4"/>• drvClassId — класс производного данного </text:p>
      <text:p text:style-name="P32"><text:s text:c="4"/>• drvObjId — объект <text:s/>производного данного</text:p>
      <text:p text:style-name="P32"><text:s text:c="4"/>• drvFlagDataId — флаг производного данного</text:p>
      <text:p text:style-name="P32"><text:s text:c="6"/></text:p>
      <text:p text:style-name="P32">Пункт 2.</text:p>
      <text:p text:style-name="P32">Пишем скатлет со следующим функционалом:</text:p>
      <text:p text:style-name="P32">0. создаем класс DerivativeDataFlagController( Gwid <text:s/>aSrcRegister), c методами</text:p>
      <text:p text:style-name="P32">addDataFlag( <text:s/>Gwid <text:s/>aDrvBit, int aBitIndex)</text:p>
      <text:p text:style-name="P32">в этом методе создаем канал на запись текущего данного. </text:p>
      <text:p text:style-name="P32"/>
      <text:p text:style-name="P32">Объект этого класса создает канал данных и регистрируется слушателем его изменения</text:p>
      <text:p text:style-name="P32">В слушателе пробегаемся в цикле по всем своим производным updateFlagValue( Gwid <text:s/>aDrvBit, int aBitIndex) </text:p>
      <text:p text:style-name="P32">в котором тупо: а) выцеживаем свое значение; б) <text:s/>проверяем что оно изменилось и записываем его на сервер </text:p>
      <text:p text:style-name="P32"/>
      <text:p text:style-name="P32">1. при старте читаем справочник и создаем набор <text:s/>DerivativeDataFlagController &amp; <text:s/>DerivativeEventFlagController</text:p>
      <text:p text:style-name="P32">2. <text:s/>по окончании работы в цикле проходим по всем Derivative*FlagController::close()</text:p>
      <text:p text:style-name="P32"/>
      <text:p text:style-name="P32">Пример работы с производными данными написан Максимом и лежит тут : </text:p>
      <text:p text:style-name="P32">ru.toxsoft.nm.lib.workers.chains.impl.DerivativeDataFormer1</text:p>
      <text:p text:style-name="P32"/>
      <text:p text:style-name="P32">Пункт 3.</text:p>
      <text:p text:style-name="P32">Пишем скатлет со следующим функционалом:</text:p>
      <text:p text:style-name="P32">0. создаем класс DerivativeEventFlagController(Gwid <text:s/>aSrc), c методами</text:p>
      <text:p text:style-name="P32">addEventFlag( <text:s/>Gwid <text:s/>aDrvFlag, boolean isFront, boolean isFall )</text:p>
      <text:p text:style-name="P32">в этом методе выполняем следующее:</text:p>
      <text:p text:style-name="P32"><text:s text:c="4"/>• создаем канал текущих данных с <text:s/>aDrvFlag и слушаем его изменение</text:p>
      <text:p text:style-name="P32"><text:s text:c="4"/>• читаем описание класса и ищем в нем событие которое у которого evtId совпадает с rtdId если отрезать превые три символа («rtd» , «evt»)</text:p>
      <text:p text:style-name="P32"><text:s text:c="4"/>• если не находим, генерим исключение</text:p>
      <text:p text:style-name="P32"><text:s text:c="4"/>• сохранем описание события</text:p>
      <text:p text:style-name="P32"><text:s text:c="4"/>• читаем начальное значение совего данного</text:p>
      <text:p text:style-name="P32"><text:s text:c="4"/>• подписываемся на изменение своего данного</text:p>
      <text:p text:style-name="P32">В методе обработчике нотификации об изменении данного проверяем что случилось (isFront or isFall) и если выставлен соотв. флаг, то генерим событие с аргментом on = <text:s/>isFront ? True : false</text:p>
      <text:p text:style-name="P32"/>
      <text:p text:style-name="P32">Пример генерации событий тут:</text:p>
      <text:p text:style-name="P32">ru.toxsoft.nm.lib.workers.events.impl.NmEventWorker</text:p>
      <text:p text:style-name="P32">Итак, ТЗ на завтра по разработке Самсунг проекта.</text:p>
      <text:p text:style-name="P32">1. создаем справочник программно при старте плагина Самсунг, пример org.toxsoft.skf.bridge.cfg.opcua.gui.utils. RefbookGenerator</text:p>
      <text:p text:style-name="P32"><text:soft-page-break/>1.1 создание описания справочника REFBOOK_BITMASK_OPCUA строка 217</text:p>
      <text:p text:style-name="P32">1.2 наполнение справочника RefbookGenerator::createPoligonBitMaskRefboo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mitry  Egorov</meta:initial-creator>
    <meta:creation-date>2026-05-13T08:05:11.764490274</meta:creation-date>
    <dc:date>2026-05-13T10:41:07.764108647</dc:date>
    <dc:creator>Dmitry  Egorov</dc:creator>
    <meta:editing-duration>PT37M3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103" meta:word-count="833" meta:character-count="6257" meta:non-whitespace-character-count="5412"/>
  </office:meta>
</office:document-meta>
</file>