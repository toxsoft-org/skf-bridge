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굴림" svg:font-family="굴림" style:font-family-generic="modern" style:font-pitch="fixed"/>
    <style:font-face style:name="굴림체" svg:font-family="굴림체" style:font-family-generic="modern" style:font-pitch="fixed"/>
    <style:font-face style:name="돋움" svg:font-family="돋움" style:font-family-generic="modern" style:font-pitch="fixed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3cm"/>
    </style:style>
    <style:style style:name="co3" style:family="table-column">
      <style:table-column-properties fo:break-before="auto" style:column-width="8.114cm"/>
    </style:style>
    <style:style style:name="co4" style:family="table-column">
      <style:table-column-properties fo:break-before="auto" style:column-width="3.457cm"/>
    </style:style>
    <style:style style:name="co5" style:family="table-column">
      <style:table-column-properties fo:break-before="auto" style:column-width="2.949cm"/>
    </style:style>
    <style:style style:name="co6" style:family="table-column">
      <style:table-column-properties fo:break-before="auto" style:column-width="5.073cm"/>
    </style:style>
    <style:style style:name="co7" style:family="table-column">
      <style:table-column-properties fo:break-before="auto" style:column-width="3.902cm"/>
    </style:style>
    <style:style style:name="co8" style:family="table-column">
      <style:table-column-properties fo:break-before="auto" style:column-width="4.357cm"/>
    </style:style>
    <style:style style:name="co9" style:family="table-column">
      <style:table-column-properties fo:break-before="auto" style:column-width="4.611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6.699cm"/>
    </style:style>
    <style:style style:name="co12" style:family="table-column">
      <style:table-column-properties fo:break-before="auto" style:column-width="3.212cm"/>
    </style:style>
    <style:style style:name="co13" style:family="table-column">
      <style:table-column-properties fo:break-before="auto" style:column-width="5.99cm"/>
    </style:style>
    <style:style style:name="co14" style:family="table-column">
      <style:table-column-properties fo:break-before="auto" style:column-width="8.177cm"/>
    </style:style>
    <style:style style:name="co15" style:family="table-column">
      <style:table-column-properties fo:break-before="auto" style:column-width="5.8cm"/>
    </style:style>
    <style:style style:name="co16" style:family="table-column">
      <style:table-column-properties fo:break-before="auto" style:column-width="4.637cm"/>
    </style:style>
    <style:style style:name="co17" style:family="table-column">
      <style:table-column-properties fo:break-before="auto" style:column-width="5.046cm"/>
    </style:style>
    <style:style style:name="co18" style:family="table-column">
      <style:table-column-properties fo:break-before="auto" style:column-width="5.509cm"/>
    </style:style>
    <style:style style:name="co19" style:family="table-column">
      <style:table-column-properties fo:break-before="auto" style:column-width="6.435cm"/>
    </style:style>
    <style:style style:name="co20" style:family="table-column">
      <style:table-column-properties fo:break-before="auto" style:column-width="7.415cm"/>
    </style:style>
    <style:style style:name="co21" style:family="table-column">
      <style:table-column-properties fo:break-before="auto" style:column-width="4.909cm"/>
    </style:style>
    <style:style style:name="co22" style:family="table-column">
      <style:table-column-properties fo:break-before="auto" style:column-width="3.411cm"/>
    </style:style>
    <style:style style:name="co23" style:family="table-column">
      <style:table-column-properties fo:break-before="auto" style:column-width="5.209cm"/>
    </style:style>
    <style:style style:name="co24" style:family="table-column">
      <style:table-column-properties fo:break-before="auto" style:column-width="2.531cm"/>
    </style:style>
    <style:style style:name="co25" style:family="table-column">
      <style:table-column-properties fo:break-before="auto" style:column-width="12.947cm"/>
    </style:style>
    <style:style style:name="co26" style:family="table-column">
      <style:table-column-properties fo:break-before="auto" style:column-width="3.14cm"/>
    </style:style>
    <style:style style:name="co27" style:family="table-column">
      <style:table-column-properties fo:break-before="auto" style:column-width="3.076cm"/>
    </style:style>
    <style:style style:name="co28" style:family="table-column">
      <style:table-column-properties fo:break-before="auto" style:column-width="10.005cm"/>
    </style:style>
    <style:style style:name="co29" style:family="table-column">
      <style:table-column-properties fo:break-before="auto" style:column-width="5.009cm"/>
    </style:style>
    <style:style style:name="co30" style:family="table-column">
      <style:table-column-properties fo:break-before="auto" style:column-width="5.2cm"/>
    </style:style>
    <style:style style:name="co31" style:family="table-column">
      <style:table-column-properties fo:break-before="auto" style:column-width="8.714cm"/>
    </style:style>
    <style:style style:name="co32" style:family="table-column">
      <style:table-column-properties fo:break-before="auto" style:column-width="4.547cm"/>
    </style:style>
    <style:style style:name="co33" style:family="table-column">
      <style:table-column-properties fo:break-before="auto" style:column-width="2.424cm"/>
    </style:style>
    <style:style style:name="co34" style:family="table-column">
      <style:table-column-properties fo:break-before="auto" style:column-width="5.676cm"/>
    </style:style>
    <style:style style:name="co35" style:family="table-column">
      <style:table-column-properties fo:break-before="auto" style:column-width="3.35cm"/>
    </style:style>
    <style:style style:name="co36" style:family="table-column">
      <style:table-column-properties fo:break-before="auto" style:column-width="2.914cm"/>
    </style:style>
    <style:style style:name="co37" style:family="table-column">
      <style:table-column-properties fo:break-before="auto" style:column-width="3.157cm"/>
    </style:style>
    <style:style style:name="co38" style:family="table-column">
      <style:table-column-properties fo:break-before="auto" style:column-width="4.12cm"/>
    </style:style>
    <style:style style:name="co39" style:family="table-column">
      <style:table-column-properties fo:break-before="auto" style:column-width="3.739cm"/>
    </style:style>
    <style:style style:name="co40" style:family="table-column">
      <style:table-column-properties fo:break-before="auto" style:column-width="2.514cm"/>
    </style:style>
    <style:style style:name="co41" style:family="table-column">
      <style:table-column-properties fo:break-before="auto" style:column-width="4.884cm"/>
    </style:style>
    <style:style style:name="co42" style:family="table-column">
      <style:table-column-properties fo:break-before="auto" style:column-width="8.033cm"/>
    </style:style>
    <style:style style:name="co43" style:family="table-column">
      <style:table-column-properties fo:break-before="auto" style:column-width="5.826cm"/>
    </style:style>
    <style:style style:name="co44" style:family="table-column">
      <style:table-column-properties fo:break-before="auto" style:column-width="10.866cm"/>
    </style:style>
    <style:style style:name="co45" style:family="table-column">
      <style:table-column-properties fo:break-before="auto" style:column-width="2.805cm"/>
    </style:style>
    <style:style style:name="co46" style:family="table-column">
      <style:table-column-properties fo:break-before="auto" style:column-width="6.025cm"/>
    </style:style>
    <style:style style:name="co47" style:family="table-column">
      <style:table-column-properties fo:break-before="auto" style:column-width="6.126cm"/>
    </style:style>
    <style:style style:name="co48" style:family="table-column">
      <style:table-column-properties fo:break-before="auto" style:column-width="7.052cm"/>
    </style:style>
    <style:style style:name="co49" style:family="table-column">
      <style:table-column-properties fo:break-before="auto" style:column-width="5.473cm"/>
    </style:style>
    <style:style style:name="co50" style:family="table-column">
      <style:table-column-properties fo:break-before="auto" style:column-width="12.127cm"/>
    </style:style>
    <style:style style:name="co51" style:family="table-column">
      <style:table-column-properties fo:break-before="auto" style:column-width="4.928cm"/>
    </style:style>
    <style:style style:name="co52" style:family="table-column">
      <style:table-column-properties fo:break-before="auto" style:column-width="5.68cm"/>
    </style:style>
    <style:style style:name="co53" style:family="table-column">
      <style:table-column-properties fo:break-before="auto" style:column-width="7.202cm"/>
    </style:style>
    <style:style style:name="co54" style:family="table-column">
      <style:table-column-properties fo:break-before="auto" style:column-width="2.614cm"/>
    </style:style>
    <style:style style:name="co55" style:family="table-column">
      <style:table-column-properties fo:break-before="auto" style:column-width="8.659cm"/>
    </style:style>
    <style:style style:name="co56" style:family="table-column">
      <style:table-column-properties fo:break-before="auto" style:column-width="2.559cm"/>
    </style:style>
    <style:style style:name="co57" style:family="table-column">
      <style:table-column-properties fo:break-before="auto" style:column-width="5.935cm"/>
    </style:style>
    <style:style style:name="co58" style:family="table-column">
      <style:table-column-properties fo:break-before="auto" style:column-width="5.773cm"/>
    </style:style>
    <style:style style:name="co59" style:family="table-column">
      <style:table-column-properties fo:break-before="auto" style:column-width="6.209cm"/>
    </style:style>
    <style:style style:name="co60" style:family="table-column">
      <style:table-column-properties fo:break-before="auto" style:column-width="5.309cm"/>
    </style:style>
    <style:style style:name="co61" style:family="table-column">
      <style:table-column-properties fo:break-before="auto" style:column-width="7.116cm"/>
    </style:style>
    <style:style style:name="co62" style:family="table-column">
      <style:table-column-properties fo:break-before="auto" style:column-width="4.983cm"/>
    </style:style>
    <style:style style:name="co63" style:family="table-column">
      <style:table-column-properties fo:break-before="auto" style:column-width="2.341cm"/>
    </style:style>
    <style:style style:name="co64" style:family="table-column">
      <style:table-column-properties fo:break-before="auto" style:column-width="5.93cm"/>
    </style:style>
    <style:style style:name="co65" style:family="table-column">
      <style:table-column-properties fo:break-before="auto" style:column-width="3.602cm"/>
    </style:style>
    <style:style style:name="co66" style:family="table-column">
      <style:table-column-properties fo:break-before="auto" style:column-width="2.487cm"/>
    </style:style>
    <style:style style:name="co67" style:family="table-column">
      <style:table-column-properties fo:break-before="auto" style:column-width="0.924cm"/>
    </style:style>
    <style:style style:name="co68" style:family="table-column">
      <style:table-column-properties fo:break-before="auto" style:column-width="2.676cm"/>
    </style:style>
    <style:style style:name="co69" style:family="table-column">
      <style:table-column-properties fo:break-before="auto" style:column-width="7.516cm"/>
    </style:style>
    <style:style style:name="co70" style:family="table-column">
      <style:table-column-properties fo:break-before="auto" style:column-width="2.912cm"/>
    </style:style>
    <style:style style:name="co71" style:family="table-column">
      <style:table-column-properties fo:break-before="auto" style:column-width="2.505cm"/>
    </style:style>
    <style:style style:name="co72" style:family="table-column">
      <style:table-column-properties fo:break-before="auto" style:column-width="6.045cm"/>
    </style:style>
    <style:style style:name="co73" style:family="table-column">
      <style:table-column-properties fo:break-before="auto" style:column-width="5.554cm"/>
    </style:style>
    <style:style style:name="co74" style:family="table-column">
      <style:table-column-properties fo:break-before="auto" style:column-width="7.978cm"/>
    </style:style>
    <style:style style:name="co75" style:family="table-column">
      <style:table-column-properties fo:break-before="auto" style:column-width="2.695cm"/>
    </style:style>
    <style:style style:name="co76" style:family="table-column">
      <style:table-column-properties fo:break-before="auto" style:column-width="2.104cm"/>
    </style:style>
    <style:style style:name="co77" style:family="table-column">
      <style:table-column-properties fo:break-before="auto" style:column-width="2.813cm"/>
    </style:style>
    <style:style style:name="co78" style:family="table-column">
      <style:table-column-properties fo:break-before="auto" style:column-width="2.831cm"/>
    </style:style>
    <style:style style:name="co79" style:family="table-column">
      <style:table-column-properties fo:break-before="auto" style:column-width="3.558cm"/>
    </style:style>
    <style:style style:name="co80" style:family="table-column">
      <style:table-column-properties fo:break-before="auto" style:column-width="1.462cm"/>
    </style:style>
    <style:style style:name="co81" style:family="table-column">
      <style:table-column-properties fo:break-before="auto" style:column-width="5.955cm"/>
    </style:style>
    <style:style style:name="co82" style:family="table-column">
      <style:table-column-properties fo:break-before="auto" style:column-width="5.353cm"/>
    </style:style>
    <style:style style:name="co83" style:family="table-column">
      <style:table-column-properties fo:break-before="auto" style:column-width="7.713cm"/>
    </style:style>
    <style:style style:name="co84" style:family="table-column">
      <style:table-column-properties fo:break-before="auto" style:column-width="7.902cm"/>
    </style:style>
    <style:style style:name="co85" style:family="table-column">
      <style:table-column-properties fo:break-before="auto" style:column-width="2.122cm"/>
    </style:style>
    <style:style style:name="co86" style:family="table-column">
      <style:table-column-properties fo:break-before="auto" style:column-width="3.089cm"/>
    </style:style>
    <style:style style:name="co87" style:family="table-column">
      <style:table-column-properties fo:break-before="auto" style:column-width="5.024cm"/>
    </style:style>
    <style:style style:name="co88" style:family="table-column">
      <style:table-column-properties fo:break-before="auto" style:column-width="1.169cm"/>
    </style:style>
    <style:style style:name="co89" style:family="table-column">
      <style:table-column-properties fo:break-before="auto" style:column-width="3.092cm"/>
    </style:style>
    <style:style style:name="co90" style:family="table-column">
      <style:table-column-properties fo:break-before="auto" style:column-width="7.006cm"/>
    </style:style>
    <style:style style:name="co91" style:family="table-column">
      <style:table-column-properties fo:break-before="auto" style:column-width="4.256cm"/>
    </style:style>
    <style:style style:name="co92" style:family="table-column">
      <style:table-column-properties fo:break-before="auto" style:column-width="1.178cm"/>
    </style:style>
    <style:style style:name="co93" style:family="table-column">
      <style:table-column-properties fo:break-before="auto" style:column-width="5.613cm"/>
    </style:style>
    <style:style style:name="co94" style:family="table-column">
      <style:table-column-properties fo:break-before="auto" style:column-width="8.869cm"/>
    </style:style>
    <style:style style:name="co95" style:family="table-column">
      <style:table-column-properties fo:break-before="auto" style:column-width="7.832cm"/>
    </style:style>
    <style:style style:name="co96" style:family="table-column">
      <style:table-column-properties fo:break-before="auto" style:column-width="5.131cm"/>
    </style:style>
    <style:style style:name="co97" style:family="table-column">
      <style:table-column-properties fo:break-before="auto" style:column-width="1.626cm"/>
    </style:style>
    <style:style style:name="co98" style:family="table-column">
      <style:table-column-properties fo:break-before="auto" style:column-width="3.353cm"/>
    </style:style>
    <style:style style:name="co99" style:family="table-column">
      <style:table-column-properties fo:break-before="auto" style:column-width="5.475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104cm" fo:break-before="auto" style:use-optimal-row-height="true"/>
    </style:style>
    <style:style style:name="ro7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80" style:family="table-cell" style:parent-style-name="Default">
      <style:table-cell-properties fo:background-color="transparent"/>
    </style:style>
    <style:style style:name="ce82" style:family="table-cell" style:parent-style-name="Default">
      <style:table-cell-properties fo:background-color="transparent" fo:border="0.74pt solid #000000"/>
    </style:style>
    <style:style style:name="ce4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6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85" style:family="table-cell" style:parent-style-name="Default">
      <style:table-cell-properties fo:background-color="transparent"/>
      <style:text-properties fo:font-size="10pt" fo:language="none" fo:country="none" style:font-size-asian="10pt" style:language-asian="none" style:country-asian="none" style:font-size-complex="10pt" style:language-complex="none" style:country-complex="none"/>
    </style:style>
    <style:style style:name="ce130" style:family="table-cell" style:parent-style-name="Default">
      <style:table-cell-properties fo:background-color="transparent"/>
      <style:text-properties style:font-name="Liberation Sans" fo:font-size="10pt" fo:language="none" fo:country="none" style:font-name-asian="Arial" style:font-size-asian="10pt" style:language-asian="none" style:country-asian="none" style:font-name-complex="Arial" style:font-size-complex="10pt" style:language-complex="none" style:country-complex="none"/>
    </style:style>
    <style:style style:name="ce94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able-cell-properties fo:background-color="transparent"/>
      <style:text-properties style:font-name="Arial" fo:font-size="10pt" fo:language="none" fo:country="none" style:font-name-asian="Arial" style:font-size-asian="10pt" style:language-asian="none" style:country-asian="none" style:font-name-complex="Arial" style:font-size-complex="10pt" style:language-complex="none" style:country-complex="none"/>
    </style:style>
    <style:style style:name="ce96" style:family="table-cell" style:parent-style-name="Default">
      <style:table-cell-properties fo:wrap-option="wrap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/>
    <style:style style:name="ce54" style:family="table-cell" style:parent-style-name="Default" style:data-style-name="N115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2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#dddddd" fo:border="0.74pt solid #000000"/>
    </style:style>
    <style:style style:name="ce17" style:family="table-cell" style:parent-style-name="Default">
      <style:table-cell-properties fo:background-color="#dddddd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language="en" fo:country="U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order="none"/>
    </style:style>
    <style:style style:name="ce65" style:family="table-cell" style:parent-style-name="Default">
      <style:table-cell-properties style:diagonal-tl-br="none"/>
    </style:style>
    <style:style style:name="ce153" style:family="table-cell" style:parent-style-name="Default">
      <style:table-cell-properties fo:background-color="transparent" fo:border="0.74pt solid #000000"/>
      <style:text-properties style:text-outline="false" style:text-line-through-style="none" style:text-line-through-type="none" style:font-name="돋움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돋움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="0.74pt solid #000000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wrap-option="wrap" fo:border="none"/>
    </style:style>
    <style:style style:name="ce7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fo:background-color="#ffff00"/>
    </style:style>
    <style:style style:name="ce129" style:family="table-cell" style:parent-style-name="Default">
      <style:table-cell-properties fo:background-color="#ffff00" fo:border="0.74pt solid #000000"/>
    </style:style>
    <style:style style:name="ce134" style:family="table-cell" style:parent-style-name="Default">
      <style:table-cell-properties fo:background-color="#f6f9d4"/>
    </style:style>
    <style:style style:name="ce135" style:family="table-cell" style:parent-style-name="Default">
      <style:text-properties style:font-name="Liberation Sans1" fo:font-size="14pt" fo:font-weight="bold" style:font-name-asian="Noto Sans CJK SC" style:font-size-asian="14pt" style:font-weight-asian="bold" style:font-size-complex="14pt" style:font-weight-complex="bold"/>
    </style:style>
    <style:style style:name="ce136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fo:background-color="#ffff00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>
      <style:table-cell-properties fo:border="0.74pt solid #000000"/>
      <style:text-properties fo:language="en" fo:country="US"/>
    </style:style>
    <style:style style:name="ce139" style:family="table-cell" style:parent-style-name="Default">
      <style:table-cell-properties fo:border="0.74pt solid #000000"/>
      <style:text-properties fo:language="ia" fo:country="none"/>
    </style:style>
    <style:style style:name="ce140" style:family="table-cell" style:parent-style-name="Default">
      <style:table-cell-properties fo:background-color="#ffff00" fo:border="0.74pt solid #000000"/>
      <style:text-properties fo:language="en" fo:country="US"/>
    </style:style>
    <style:style style:name="ce142" style:family="table-cell" style:parent-style-name="Default">
      <style:table-cell-properties fo:background-color="transparent" fo:border="0.74pt solid #000000"/>
      <style:text-properties fo:language="en" fo:country="US"/>
    </style:style>
    <style:style style:name="ce143" style:family="table-cell" style:parent-style-name="Default">
      <style:table-cell-properties fo:background-color="transparent" fo:border="0.74pt solid #000000"/>
      <style:text-properties style:text-outline="false" style:text-line-through-style="none" style:text-line-through-type="none" style:font-name="굴림체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굴림체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>
      <style:text-properties fo:language="en" fo:country="US"/>
    </style:style>
    <style:style style:name="ce149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>
      <style:table-cell-properties fo:background-color="transparent" fo:border="none"/>
    </style:style>
    <style:style style:name="ce15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굴림체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굴림체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9" style:family="table-cell" style:parent-style-name="Default">
      <style:table-cell-properties fo:background-color="#e0ffff"/>
    </style:style>
    <style:style style:name="ce161" style:family="table-cell" style:parent-style-name="Default">
      <style:text-properties fo:color="#999999"/>
    </style:style>
    <style:style style:name="ce91" style:family="table-cell" style:parent-style-name="Default">
      <style:table-cell-properties fo:background-color="transparent"/>
      <style:text-properties fo:color="#666666" fo:font-style="italic" style:font-style-asian="italic" style:font-style-complex="italic"/>
    </style:style>
    <style:style style:name="ce92" style:family="table-cell" style:parent-style-name="Default">
      <style:table-cell-properties fo:background-color="transparent"/>
      <style:text-properties fo:color="#666666" fo:font-style="italic" style:text-underline-style="none" fo:font-weight="normal" style:font-style-asian="italic" style:font-weight-asian="normal" style:font-style-complex="italic" style:font-weight-complex="normal"/>
    </style:style>
    <style:style style:name="ce166" style:family="table-cell" style:parent-style-name="Default">
      <style:table-cell-properties fo:background-color="#cccccc"/>
    </style:style>
    <style:style style:name="ce167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>
      <style:table-cell-properties fo:background-color="#cccccc" fo:border="0.74pt solid #000000"/>
    </style:style>
    <style:style style:name="ce170" style:family="table-cell" style:parent-style-name="Default">
      <style:table-cell-properties fo:border="0.74pt solid #000000"/>
      <style:text-properties style:use-window-font-color="true"/>
    </style:style>
    <style:style style:name="ce18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>
      <style:table-cell-properties fo:background-color="#ffff00" fo:border="none"/>
    </style:style>
    <style:style style:name="ce188" style:family="table-cell" style:parent-style-name="Default">
      <style:table-cell-properties fo:background-color="#cccccc" fo:border="none"/>
    </style:style>
    <style:style style:name="ce1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>
      <style:table-cell-properties fo:background-color="#ccffcc"/>
    </style:style>
    <style:style style:name="ce192" style:family="table-cell" style:parent-style-name="Default">
      <style:table-cell-properties fo:background-color="transparent" fo:border="none"/>
      <style:text-properties style:use-window-font-color="true"/>
    </style:style>
    <style:style style:name="ce193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bold" style:font-name-asian="굴림체" style:font-size-asian="10pt" style:font-style-asian="normal" style:font-weight-asian="bold" style:font-size-complex="10pt" style:font-style-complex="normal" style:font-weight-complex="bold"/>
    </style:style>
    <style:style style:name="ce198" style:family="table-cell" style:parent-style-name="Default">
      <style:table-cell-properties fo:background-color="transparent"/>
      <style:text-properties fo:color="#999999"/>
    </style:style>
    <style:style style:name="ce199" style:family="table-cell" style:parent-style-name="Default">
      <style:text-properties style:text-line-through-style="solid" style:text-line-through-type="single"/>
    </style:style>
    <style:style style:name="ce200" style:family="table-cell" style:parent-style-name="Default">
      <style:table-cell-properties fo:background-color="#dde8cb"/>
    </style:style>
    <style:style style:name="ce201" style:family="table-cell" style:parent-style-name="Default">
      <style:table-cell-properties fo:background-color="#ffd7d7"/>
    </style:style>
    <style:style style:name="ce208" style:family="table-cell" style:parent-style-name="Default">
      <style:text-properties fo:language="en" fo:country="US" style:font-name-asian="Segoe UI" style:language-asian="none" style:country-asian="none" style:font-name-complex="Tahoma" style:language-complex="none" style:country-complex="none"/>
    </style:style>
    <style:style style:name="ce209" style:family="table-cell" style:parent-style-name="Default">
      <style:table-cell-properties fo:border="none"/>
      <style:text-properties fo:color="#ff0000"/>
    </style:style>
    <style:style style:name="ce103" style:family="table-cell" style:parent-style-name="Default" style:data-style-name="N0">
      <style:table-cell-properties fo:background-color="transparent"/>
    </style:style>
    <style:style style:name="ce104" style:family="table-cell" style:parent-style-name="Default">
      <style:table-cell-properties fo:background-color="transparent" fo:wrap-option="wrap"/>
    </style:style>
    <style:style style:name="ce105" style:family="table-cell" style:parent-style-name="Default" style:data-style-name="N100">
      <style:table-cell-properties fo:background-color="transparent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5.53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_20_1" draw:marker-start-width="0.2cm" draw:marker-start-center="false" draw:fill="solid" draw:fill-color="#ffffc0" draw:auto-grow-height="true" draw:auto-grow-width="false" fo:min-height="9.8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_20_1" draw:marker-start-width="0.2cm" draw:marker-start-center="false" draw:fill="solid" draw:fill-color="#ffffc0" draw:auto-grow-height="true" draw:auto-grow-width="false" fo:min-height="6.32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Arrowhead_20_1" draw:marker-start-width="0.2cm" draw:marker-start-center="false" draw:fill="solid" draw:fill-color="#ffffc0" draw:auto-grow-height="true" draw:auto-grow-width="false" fo:min-height="2.60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="Arrowhead_20_1" draw:marker-start-width="0.2cm" draw:marker-start-center="false" draw:fill="solid" draw:fill-color="#ffffc0" draw:auto-grow-height="true" draw:auto-grow-width="false" fo:min-height="2.14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marker-start="Arrowhead_20_1" draw:marker-start-width="0.2cm" draw:marker-start-center="false" draw:fill="solid" draw:fill-color="#ffffc0" draw:auto-grow-height="true" draw:auto-grow-width="false" fo:min-height="5.885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marker-start="Arrowhead_20_1" draw:marker-start-width="0.2cm" draw:marker-start-center="false" draw:fill="solid" draw:fill-color="#ffffc0" draw:auto-grow-height="true" draw:auto-grow-width="false" fo:min-height="1.67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fo:font-weight="bold" style:font-name-asian="Noto Sans CJK SC" style:font-size-asian="14pt" style:font-size-complex="14pt" style:font-weight-asian="bold" style:font-weight-complex="bold"/>
    </style:style>
    <style:style style:name="T3" style:family="text">
      <style:text-properties fo:font-size="14pt" fo:font-weight="bold" style:font-name-asian="Noto Sans CJK SC" style:font-size-asian="14pt" style:font-size-complex="14pt" style:font-weight-asian="bold" style:font-weight-complex="bold" style:font-name-complex="Lohit Devanagari"/>
    </style:style>
    <style:style style:name="T4" style:family="text">
      <style:text-properties style:font-name="굴림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굴림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-complex="Lohit Devanagari"/>
    </style:style>
    <style:style style:name="T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Arial Unicode MS" style:font-name-asian="Microsoft YaHei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7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Arial Unicode MS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굴림체" fo:language="ru" fo:country="RU" style:font-name-asian="굴림체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language="en" fo:country="US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Microsoft YaHei" style:language-complex="hi" style:country-complex="IN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12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fo:language="en" fo:country="US" style:language-asian="none" style:country-asian="none" style:language-complex="none" style:country-complex="none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АналогВход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24" table:default-cell-style-name="Default"/>
        <table:table-column table:style-name="co1" table:number-columns-repeated="3" table:default-cell-style-name="Default"/>
        <table:table-column table:style-name="co25" table:default-cell-style-name="Default"/>
        <table:table-row table:style-name="ro1">
          <table:table-cell/>
          <table:table-cell office:value-type="string" calcext:value-type="string">
            <text:p><text:span text:style-name="T2">Класс ***.</text:span><text:span text:style-name="T3">AnalogChannel</text:span></text:p>
          </table:table-cell>
          <table:table-cell table:number-columns-repeated="33"/>
        </table:table-row>
        <table:table-row table:style-name="ro2">
          <table:table-cell/>
          <table:table-cell office:value-type="string" calcext:value-type="string">
            <text:p>Название: Канал аналогового ввода</text:p>
          </table:table-cell>
          <table:table-cell table:number-columns-repeated="3"/>
          <table:table-cell table:formula="of:=CELL(&quot;col&quot;)-5" office:value-type="float" office:value="1" calcext:value-type="float">
            <text:p>1</text:p>
          </table:table-cell>
          <table:table-cell table:formula="of:=CELL(&quot;col&quot;)-5" office:value-type="float" office:value="2" calcext:value-type="float">
            <text:p>2</text:p>
          </table:table-cell>
          <table:table-cell table:formula="of:=CELL(&quot;col&quot;)-5" office:value-type="float" office:value="3" calcext:value-type="float">
            <text:p>3</text:p>
          </table:table-cell>
          <table:table-cell table:formula="of:=CELL(&quot;col&quot;)-5" office:value-type="float" office:value="4" calcext:value-type="float">
            <text:p>4</text:p>
          </table:table-cell>
          <table:table-cell table:formula="of:=CELL(&quot;col&quot;)-5" office:value-type="float" office:value="5" calcext:value-type="float">
            <text:p>5</text:p>
          </table:table-cell>
          <table:table-cell table:formula="of:=CELL(&quot;col&quot;)-5" office:value-type="float" office:value="6" calcext:value-type="float">
            <text:p>6</text:p>
          </table:table-cell>
          <table:table-cell table:formula="of:=CELL(&quot;col&quot;)-5" office:value-type="float" office:value="7" calcext:value-type="float">
            <text:p>7</text:p>
          </table:table-cell>
          <table:table-cell table:formula="of:=CELL(&quot;col&quot;)-5" office:value-type="float" office:value="8" calcext:value-type="float">
            <text:p>8</text:p>
          </table:table-cell>
          <table:table-cell table:formula="of:=CELL(&quot;col&quot;)-5" office:value-type="float" office:value="9" calcext:value-type="float">
            <text:p>9</text:p>
          </table:table-cell>
          <table:table-cell table:formula="of:=CELL(&quot;col&quot;)-5" office:value-type="float" office:value="10" calcext:value-type="float">
            <text:p>10</text:p>
          </table:table-cell>
          <table:table-cell table:formula="of:=CELL(&quot;col&quot;)-5" office:value-type="float" office:value="11" calcext:value-type="float">
            <text:p>11</text:p>
          </table:table-cell>
          <table:table-cell table:formula="of:=CELL(&quot;col&quot;)-5" office:value-type="float" office:value="12" calcext:value-type="float">
            <text:p>12</text:p>
          </table:table-cell>
          <table:table-cell table:formula="of:=CELL(&quot;col&quot;)-5" office:value-type="float" office:value="13" calcext:value-type="float">
            <text:p>13</text:p>
          </table:table-cell>
          <table:table-cell table:formula="of:=CELL(&quot;col&quot;)-5" office:value-type="float" office:value="14" calcext:value-type="float">
            <text:p>14</text:p>
          </table:table-cell>
          <table:table-cell table:formula="of:=CELL(&quot;col&quot;)-5" office:value-type="float" office:value="15" calcext:value-type="float">
            <text:p>15</text:p>
          </table:table-cell>
          <table:table-cell table:formula="of:=CELL(&quot;col&quot;)-5" office:value-type="float" office:value="16" calcext:value-type="float">
            <text:p>16</text:p>
          </table:table-cell>
          <table:table-cell table:formula="of:=CELL(&quot;col&quot;)-5" office:value-type="float" office:value="17" calcext:value-type="float">
            <text:p>17</text:p>
          </table:table-cell>
          <table:table-cell table:formula="of:=CELL(&quot;col&quot;)-5" office:value-type="float" office:value="18" calcext:value-type="float">
            <text:p>18</text:p>
          </table:table-cell>
          <table:table-cell table:formula="of:=CELL(&quot;col&quot;)-5" office:value-type="float" office:value="19" calcext:value-type="float">
            <text:p>19</text:p>
          </table:table-cell>
          <table:table-cell table:formula="of:=CELL(&quot;col&quot;)-5" office:value-type="float" office:value="20" calcext:value-type="float">
            <text:p>20</text:p>
          </table:table-cell>
          <table:table-cell table:formula="of:=CELL(&quot;col&quot;)-5" office:value-type="float" office:value="21" calcext:value-type="float">
            <text:p>21</text:p>
          </table:table-cell>
          <table:table-cell table:formula="of:=CELL(&quot;col&quot;)-5" office:value-type="float" office:value="22" calcext:value-type="float">
            <text:p>22</text:p>
          </table:table-cell>
          <table:table-cell table:formula="of:=CELL(&quot;col&quot;)-5" office:value-type="float" office:value="23" calcext:value-type="float">
            <text:p>23</text:p>
          </table:table-cell>
          <table:table-cell table:formula="of:=CELL(&quot;col&quot;)-5" office:value-type="float" office:value="24" calcext:value-type="float">
            <text:p>24</text:p>
          </table:table-cell>
          <table:table-cell table:formula="of:=CELL(&quot;col&quot;)-5"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Поля</text:p>
          </table:table-cell>
          <table:table-cell table:number-columns-repeated="33"/>
        </table:table-row>
        <table:table-row table:style-name="ro2">
          <table:table-cell table:number-columns-repeated="2"/>
          <table:table-cell office:value-type="string" calcext:value-type="string">
            <text:p>Название рус.</text:p>
          </table:table-cell>
          <table:table-cell table:number-columns-repeated="2"/>
          <table:table-cell office:value-type="string" calcext:value-type="string">
            <text:p>ПоложениеНапрАпп</text:p>
          </table:table-cell>
          <table:table-cell office:value-type="string" calcext:value-type="string">
            <text:p>ПоложениеППК</text:p>
          </table:table-cell>
          <table:table-cell office:value-type="string" calcext:value-type="string">
            <text:p>СистемнДавл</text:p>
          </table:table-cell>
          <table:table-cell office:value-type="string" calcext:value-type="string">
            <text:p>Давл3Ступени</text:p>
          </table:table-cell>
          <table:table-cell office:value-type="string" calcext:value-type="string">
            <text:p>ДавлМасла</text:p>
          </table:table-cell>
          <table:table-cell office:value-type="string" calcext:value-type="string">
            <text:p>Вибр1Ступени</text:p>
          </table:table-cell>
          <table:table-cell office:value-type="string" calcext:value-type="string">
            <text:p>Вибр2Ступени</text:p>
          </table:table-cell>
          <table:table-cell office:value-type="string" calcext:value-type="string">
            <text:p>Вибр3Ступени</text:p>
          </table:table-cell>
          <table:table-cell office:value-type="string" calcext:value-type="string">
            <text:p>ПерепадФильтрМасла</text:p>
          </table:table-cell>
          <table:table-cell office:value-type="string" calcext:value-type="string">
            <text:p>ТокДвигателя</text:p>
          </table:table-cell>
          <table:table-cell office:value-type="string" calcext:value-type="string">
            <text:p>ДавлОхлаждВоды</text:p>
          </table:table-cell>
          <table:table-cell office:value-type="string" calcext:value-type="string">
            <text:p>ВибрПриводнПодшипнДвиг</text:p>
          </table:table-cell>
          <table:table-cell office:value-type="string" calcext:value-type="string">
            <text:p>ВибрНеприводнПодшипнДвиг</text:p>
          </table:table-cell>
          <table:table-cell office:value-type="string" calcext:value-type="string">
            <text:p>ТемпМасла</text:p>
          </table:table-cell>
          <table:table-cell office:value-type="string" calcext:value-type="string">
            <text:p>ТемпНаВходе3Ступени</text:p>
          </table:table-cell>
          <table:table-cell office:value-type="string" calcext:value-type="string">
            <text:p>ТемпМаслобак</text:p>
          </table:table-cell>
          <table:table-cell office:value-type="string" calcext:value-type="string">
            <text:p>ТемпОбмоткиR</text:p>
          </table:table-cell>
          <table:table-cell office:value-type="string" calcext:value-type="string">
            <text:p>ТемпПриводнПодшипнДвиг</text:p>
          </table:table-cell>
          <table:table-cell office:value-type="string" calcext:value-type="string">
            <text:p>ТемпНеприводнПодшипнДвиг</text:p>
          </table:table-cell>
          <table:table-cell office:value-type="string" calcext:value-type="string">
            <text:p>ТемпНаВходе2Ступени</text:p>
          </table:table-cell>
          <table:table-cell office:value-type="string" calcext:value-type="string">
            <text:p>ТемпНаВыходеСтуп1</text:p>
          </table:table-cell>
          <table:table-cell office:value-type="string" calcext:value-type="string">
            <text:p>ТемпНаВыходеСтуп2</text:p>
          </table:table-cell>
          <table:table-cell office:value-type="string" calcext:value-type="string">
            <text:p>ТемпНаВыходеСтуп3</text:p>
          </table:table-cell>
          <table:table-cell office:value-type="string" calcext:value-type="string">
            <text:p>ТемпОхлаждВоды</text:p>
          </table:table-cell>
          <table:table-cell office:value-type="string" calcext:value-type="string">
            <text:p>ТемпОбратнойВоды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Название анг.</text:p>
          </table:table-cell>
          <table:table-cell table:number-columns-repeated="2"/>
          <table:table-cell table:formula="of:=CONCATENATE(&quot;ai&quot;;[.F2];&quot;_&quot;;OFFSET([.F5];CELL(&quot;COL&quot;)+22;24-CELL(&quot;COL&quot;)))" office:value-type="string" office:string-value="ai1_IGVPosition" calcext:value-type="string">
            <text:p>ai1_IGVPosition</text:p>
          </table:table-cell>
          <table:table-cell table:formula="of:=CONCATENATE(&quot;ai&quot;;[.G2];&quot;_&quot;;OFFSET([.G5];CELL(&quot;COL&quot;)+22;24-CELL(&quot;COL&quot;)))" office:value-type="string" office:string-value="ai2_BOVPosition" calcext:value-type="string">
            <text:p>ai2_BOVPosition</text:p>
          </table:table-cell>
          <table:table-cell table:formula="of:=CONCATENATE(&quot;ai&quot;;[.H2];&quot;_&quot;;OFFSET([.H5];CELL(&quot;COL&quot;)+22;24-CELL(&quot;COL&quot;)))" office:value-type="string" office:string-value="ai3_SystemPressure" calcext:value-type="string">
            <text:p>ai3_SystemPressure</text:p>
          </table:table-cell>
          <table:table-cell table:formula="of:=CONCATENATE(&quot;ai&quot;;[.I2];&quot;_&quot;;OFFSET([.I5];CELL(&quot;COL&quot;)+22;24-CELL(&quot;COL&quot;)))" office:value-type="string" office:string-value="ai4_Stage3DischargePressure" calcext:value-type="string">
            <text:p>ai4_Stage3DischargePressure</text:p>
          </table:table-cell>
          <table:table-cell table:formula="of:=CONCATENATE(&quot;ai&quot;;[.J2];&quot;_&quot;;OFFSET([.J5];CELL(&quot;COL&quot;)+22;24-CELL(&quot;COL&quot;)))" office:value-type="string" office:string-value="ai5_OilSupplyPressure" calcext:value-type="string">
            <text:p>ai5_OilSupplyPressure</text:p>
          </table:table-cell>
          <table:table-cell table:formula="of:=CONCATENATE(&quot;ai&quot;;[.K2];&quot;_&quot;;OFFSET([.K5];CELL(&quot;COL&quot;)+22;24-CELL(&quot;COL&quot;)))" office:value-type="string" office:string-value="ai6_Stage1Vibration" calcext:value-type="string">
            <text:p>ai6_Stage1Vibration</text:p>
          </table:table-cell>
          <table:table-cell table:formula="of:=CONCATENATE(&quot;ai&quot;;[.L2];&quot;_&quot;;OFFSET([.L5];CELL(&quot;COL&quot;)+22;24-CELL(&quot;COL&quot;)))" office:value-type="string" office:string-value="ai7_Stage2Vibration" calcext:value-type="string">
            <text:p>ai7_Stage2Vibration</text:p>
          </table:table-cell>
          <table:table-cell table:formula="of:=CONCATENATE(&quot;ai&quot;;[.M2];&quot;_&quot;;OFFSET([.M5];CELL(&quot;COL&quot;)+22;24-CELL(&quot;COL&quot;)))" office:value-type="string" office:string-value="ai8_Stage3Vibration" calcext:value-type="string">
            <text:p>ai8_Stage3Vibration</text:p>
          </table:table-cell>
          <table:table-cell table:formula="of:=CONCATENATE(&quot;ai&quot;;[.N2];&quot;_&quot;;OFFSET([.N5];CELL(&quot;COL&quot;)+22;24-CELL(&quot;COL&quot;)))" office:value-type="string" office:string-value="ai9_OilFilterDiffPressure" calcext:value-type="string">
            <text:p>ai9_OilFilterDiffPressure</text:p>
          </table:table-cell>
          <table:table-cell table:formula="of:=CONCATENATE(&quot;ai&quot;;[.O2];&quot;_&quot;;OFFSET([.O5];CELL(&quot;COL&quot;)+22;24-CELL(&quot;COL&quot;)))" office:value-type="string" office:string-value="ai10_MotorCurrent" calcext:value-type="string">
            <text:p>ai10_MotorCurrent</text:p>
          </table:table-cell>
          <table:table-cell table:formula="of:=CONCATENATE(&quot;ai&quot;;[.P2];&quot;_&quot;;OFFSET([.P5];CELL(&quot;COL&quot;)+22;24-CELL(&quot;COL&quot;)))" office:value-type="string" office:string-value="ai11_CoolingWaterSupplyPressure" calcext:value-type="string">
            <text:p>ai11_CoolingWaterSupplyPressure</text:p>
          </table:table-cell>
          <table:table-cell table:formula="of:=CONCATENATE(&quot;ai&quot;;[.Q2];&quot;_&quot;;OFFSET([.Q5];CELL(&quot;COL&quot;)+22;24-CELL(&quot;COL&quot;)))" office:value-type="string" office:string-value="ai12_MotorBearingDEVibration" calcext:value-type="string">
            <text:p>ai12_MotorBearingDEVibration</text:p>
          </table:table-cell>
          <table:table-cell table:formula="of:=CONCATENATE(&quot;ai&quot;;[.R2];&quot;_&quot;;OFFSET([.R5];CELL(&quot;COL&quot;)+22;24-CELL(&quot;COL&quot;)))" office:value-type="string" office:string-value="ai13_MotorBearingNDEVibration" calcext:value-type="string">
            <text:p>ai13_MotorBearingNDEVibration</text:p>
          </table:table-cell>
          <table:table-cell table:formula="of:=CONCATENATE(&quot;ai&quot;;[.S2];&quot;_&quot;;OFFSET([.S5];CELL(&quot;COL&quot;)+22;24-CELL(&quot;COL&quot;)))" office:value-type="string" office:string-value="ai14_OilSupplyTemperature" calcext:value-type="string">
            <text:p>ai14_OilSupplyTemperature</text:p>
          </table:table-cell>
          <table:table-cell table:formula="of:=CONCATENATE(&quot;ai&quot;;[.T2];&quot;_&quot;;OFFSET([.T5];CELL(&quot;COL&quot;)+22;24-CELL(&quot;COL&quot;)))" office:value-type="string" office:string-value="ai15_Stage3InletTemperature" calcext:value-type="string">
            <text:p>ai15_Stage3InletTemperature</text:p>
          </table:table-cell>
          <table:table-cell table:formula="of:=CONCATENATE(&quot;ai&quot;;[.U2];&quot;_&quot;;OFFSET([.U5];CELL(&quot;COL&quot;)+22;24-CELL(&quot;COL&quot;)))" office:value-type="string" office:string-value="ai16_OilReservoirTemperature" calcext:value-type="string">
            <text:p>ai16_OilReservoirTemperature</text:p>
          </table:table-cell>
          <table:table-cell table:formula="of:=CONCATENATE(&quot;ai&quot;;[.V2];&quot;_&quot;;OFFSET([.V5];CELL(&quot;COL&quot;)+22;24-CELL(&quot;COL&quot;)))" office:value-type="string" office:string-value="ai17_MotorWindingRTemperature" calcext:value-type="string">
            <text:p>ai17_MotorWindingRTemperature</text:p>
          </table:table-cell>
          <table:table-cell table:formula="of:=CONCATENATE(&quot;ai&quot;;[.W2];&quot;_&quot;;OFFSET([.W5];CELL(&quot;COL&quot;)+22;24-CELL(&quot;COL&quot;)))" office:value-type="string" office:string-value="ai18_MotorBearingDETemperature" calcext:value-type="string">
            <text:p>ai18_MotorBearingDETemperature</text:p>
          </table:table-cell>
          <table:table-cell table:formula="of:=CONCATENATE(&quot;ai&quot;;[.X2];&quot;_&quot;;OFFSET([.X5];CELL(&quot;COL&quot;)+22;24-CELL(&quot;COL&quot;)))" office:value-type="string" office:string-value="ai19_MotorBearingNDETemperature" calcext:value-type="string">
            <text:p>ai19_MotorBearingNDETemperature</text:p>
          </table:table-cell>
          <table:table-cell table:formula="of:=CONCATENATE(&quot;ai&quot;;[.Y2];&quot;_&quot;;OFFSET([.Y5];CELL(&quot;COL&quot;)+22;24-CELL(&quot;COL&quot;)))" office:value-type="string" office:string-value="ai20_Stage2InletTemperature" calcext:value-type="string">
            <text:p>ai20_Stage2InletTemperature</text:p>
          </table:table-cell>
          <table:table-cell table:formula="of:=CONCATENATE(&quot;ai&quot;;[.Z2];&quot;_&quot;;OFFSET([.Z5];CELL(&quot;COL&quot;)+22;24-CELL(&quot;COL&quot;)))" office:value-type="string" office:string-value="ai21_N1OutletTemp" calcext:value-type="string">
            <text:p>ai21_N1OutletTemp</text:p>
          </table:table-cell>
          <table:table-cell table:formula="of:=CONCATENATE(&quot;ai&quot;;[.AA2];&quot;_&quot;;OFFSET([.AA5];CELL(&quot;COL&quot;)+22;24-CELL(&quot;COL&quot;)))" office:value-type="string" office:string-value="ai22_N2OutletTemp" calcext:value-type="string">
            <text:p>ai22_N2OutletTemp</text:p>
          </table:table-cell>
          <table:table-cell table:formula="of:=CONCATENATE(&quot;ai&quot;;[.AB2];&quot;_&quot;;OFFSET([.AB5];CELL(&quot;COL&quot;)+22;24-CELL(&quot;COL&quot;)))" office:value-type="string" office:string-value="ai23_N3OutletTemp" calcext:value-type="string">
            <text:p>ai23_N3OutletTemp</text:p>
          </table:table-cell>
          <table:table-cell table:formula="of:=CONCATENATE(&quot;ai&quot;;[.AC2];&quot;_&quot;;OFFSET([.AC5];CELL(&quot;COL&quot;)+22;24-CELL(&quot;COL&quot;)))" office:value-type="string" office:string-value="ai24_CoolingWaterSupplyTemp" calcext:value-type="string">
            <text:p>ai24_CoolingWaterSupplyTemp</text:p>
          </table:table-cell>
          <table:table-cell table:formula="of:=CONCATENATE(&quot;ai&quot;;[.AD2];&quot;_&quot;;OFFSET([.AD5];CELL(&quot;COL&quot;)+22;24-CELL(&quot;COL&quot;)))" office:value-type="string" office:string-value="ai25_CoolingWateReturnTemp" calcext:value-type="string">
            <text:p>ai25_CoolingWateReturnTemp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Описание рус.</text:p>
          </table:table-cell>
          <table:table-cell table:number-columns-repeated="2"/>
          <table:table-cell office:value-type="string" calcext:value-type="string">
            <text:p>Положение направляющего аппарата</text:p>
          </table:table-cell>
          <table:table-cell office:value-type="string" calcext:value-type="string">
            <text:p>Положение противопомпажного клапана</text:p>
          </table:table-cell>
          <table:table-cell office:value-type="string" calcext:value-type="string">
            <text:p>Давление на выходе компрессора</text:p>
          </table:table-cell>
          <table:table-cell office:value-type="string" calcext:value-type="string">
            <text:p>Давление на выходе 3 ступени</text:p>
          </table:table-cell>
          <table:table-cell office:value-type="string" calcext:value-type="string">
            <text:p>Давление подачи масла</text:p>
          </table:table-cell>
          <table:table-cell office:value-type="string" calcext:value-type="string">
            <text:p>Вибрация на 1 ступени</text:p>
          </table:table-cell>
          <table:table-cell office:value-type="string" calcext:value-type="string">
            <text:p>Вибрация на 2 ступени</text:p>
          </table:table-cell>
          <table:table-cell office:value-type="string" calcext:value-type="string">
            <text:p>Вибрация на 3 ступени</text:p>
          </table:table-cell>
          <table:table-cell office:value-type="string" calcext:value-type="string">
            <text:p>Перепад давления на фильтре масла</text:p>
          </table:table-cell>
          <table:table-cell office:value-type="string" calcext:value-type="string">
            <text:p>Ток двигателя</text:p>
          </table:table-cell>
          <table:table-cell office:value-type="string" calcext:value-type="string">
            <text:p>Давление охлаждающей воды</text:p>
          </table:table-cell>
          <table:table-cell office:value-type="string" calcext:value-type="string">
            <text:p>Вибрация подшипника приводного конца двигателя</text:p>
          </table:table-cell>
          <table:table-cell office:value-type="string" calcext:value-type="string">
            <text:p>Вибрация подшипника неприводного конца двигателя</text:p>
          </table:table-cell>
          <table:table-cell office:value-type="string" calcext:value-type="string">
            <text:p>Температура масла в редукторе</text:p>
          </table:table-cell>
          <table:table-cell office:value-type="string" calcext:value-type="string">
            <text:p>Температура на входе 3-ей ступени</text:p>
          </table:table-cell>
          <table:table-cell office:value-type="string" calcext:value-type="string">
            <text:p>Температура в маслобаке</text:p>
          </table:table-cell>
          <table:table-cell office:value-type="string" calcext:value-type="string">
            <text:p>Температура обмотки R</text:p>
          </table:table-cell>
          <table:table-cell office:value-type="string" calcext:value-type="string">
            <text:p>Температура подшипника приводного конца двигателя</text:p>
          </table:table-cell>
          <table:table-cell office:value-type="string" calcext:value-type="string">
            <text:p>Температура подшипника неприводного конца двигателя</text:p>
          </table:table-cell>
          <table:table-cell office:value-type="string" calcext:value-type="string">
            <text:p>Температура на входе 2-ой ступени</text:p>
          </table:table-cell>
          <table:table-cell office:value-type="string" calcext:value-type="string">
            <text:p>Температура на выходе 1-ой ступени</text:p>
          </table:table-cell>
          <table:table-cell office:value-type="string" calcext:value-type="string">
            <text:p>Температура на выходе 2-ой ступени</text:p>
          </table:table-cell>
          <table:table-cell office:value-type="string" calcext:value-type="string">
            <text:p>Температура на выходе 3-ей ступени</text:p>
          </table:table-cell>
          <table:table-cell office:value-type="string" calcext:value-type="string">
            <text:p>Температура подаваемой охлаждающей воды</text:p>
          </table:table-cell>
          <table:table-cell office:value-type="string" calcext:value-type="string">
            <text:p>Температура обратной охлаждающей воды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Имя</text:p>
          </table:table-cell>
          <table:table-cell office:value-type="string" calcext:value-type="string">
            <text:p>Описание анг.</text:p>
          </table:table-cell>
          <table:table-cell office:value-type="string" calcext:value-type="string">
            <text:p>Тип</text:p>
          </table:table-cell>
          <table:table-cell office:value-type="string" calcext:value-type="string">
            <text:p>Права</text:p>
          </table:table-cell>
          <table:table-cell table:formula="of:=OFFSET([.F7];CELL(&quot;COL&quot;)+20;3-CELL(&quot;COL&quot;))" office:value-type="string" office:string-value="IGV position (Inlet Guide Vane)" calcext:value-type="string">
            <text:p>IGV position (Inlet Guide Vane)</text:p>
          </table:table-cell>
          <table:table-cell table:formula="of:=OFFSET([.G7];CELL(&quot;COL&quot;)+20;3-CELL(&quot;COL&quot;))" office:value-type="string" office:string-value="BOV Position (Blow Off Valve)" calcext:value-type="string">
            <text:p>BOV Position (Blow Off Valve)</text:p>
          </table:table-cell>
          <table:table-cell table:formula="of:=OFFSET([.H7];CELL(&quot;COL&quot;)+20;3-CELL(&quot;COL&quot;))" office:value-type="string" office:string-value="System pressure " calcext:value-type="string">
            <text:p>System pressure </text:p>
          </table:table-cell>
          <table:table-cell table:formula="of:=OFFSET([.I7];CELL(&quot;COL&quot;)+20;3-CELL(&quot;COL&quot;))" office:value-type="string" office:string-value="Stage 3 discharge pressure" calcext:value-type="string">
            <text:p>Stage 3 discharge pressure</text:p>
          </table:table-cell>
          <table:table-cell table:formula="of:=OFFSET([.J7];CELL(&quot;COL&quot;)+20;3-CELL(&quot;COL&quot;))" office:value-type="string" office:string-value="Oil supply pressure" calcext:value-type="string">
            <text:p>Oil supply pressure</text:p>
          </table:table-cell>
          <table:table-cell table:formula="of:=OFFSET([.K7];CELL(&quot;COL&quot;)+20;3-CELL(&quot;COL&quot;))" office:value-type="string" office:string-value="Stage 1 Vibration" calcext:value-type="string">
            <text:p>Stage 1 Vibration</text:p>
          </table:table-cell>
          <table:table-cell table:formula="of:=OFFSET([.L7];CELL(&quot;COL&quot;)+20;3-CELL(&quot;COL&quot;))" office:value-type="string" office:string-value="Stage 2 Vibration" calcext:value-type="string">
            <text:p>Stage 2 Vibration</text:p>
          </table:table-cell>
          <table:table-cell table:formula="of:=OFFSET([.M7];CELL(&quot;COL&quot;)+20;3-CELL(&quot;COL&quot;))" office:value-type="string" office:string-value="Stage 3 Vibration" calcext:value-type="string">
            <text:p>Stage 3 Vibration</text:p>
          </table:table-cell>
          <table:table-cell table:formula="of:=OFFSET([.N7];CELL(&quot;COL&quot;)+20;3-CELL(&quot;COL&quot;))" office:value-type="string" office:string-value="Oil filter diff pressure  " calcext:value-type="string">
            <text:p>Oil filter diff pressure <text:s/></text:p>
          </table:table-cell>
          <table:table-cell table:formula="of:=OFFSET([.O7];CELL(&quot;COL&quot;)+20;3-CELL(&quot;COL&quot;))" office:value-type="string" office:string-value="Motor current" calcext:value-type="string">
            <text:p>Motor current</text:p>
          </table:table-cell>
          <table:table-cell table:formula="of:=OFFSET([.P7];CELL(&quot;COL&quot;)+20;3-CELL(&quot;COL&quot;))" office:value-type="string" office:string-value="Cooling water supply pressure" calcext:value-type="string">
            <text:p>Cooling water supply pressure</text:p>
          </table:table-cell>
          <table:table-cell table:formula="of:=OFFSET([.Q7];CELL(&quot;COL&quot;)+20;3-CELL(&quot;COL&quot;))" office:value-type="string" office:string-value="Motor bearing Drive End (DE) vibration" calcext:value-type="string">
            <text:p>Motor bearing Drive End (DE) vibration</text:p>
          </table:table-cell>
          <table:table-cell table:formula="of:=OFFSET([.R7];CELL(&quot;COL&quot;)+20;3-CELL(&quot;COL&quot;))" office:value-type="string" office:string-value="Motor bearing Non-Drive End (NDE) vibration" calcext:value-type="string">
            <text:p>Motor bearing Non-Drive End (NDE) vibration</text:p>
          </table:table-cell>
          <table:table-cell table:formula="of:=OFFSET([.S7];CELL(&quot;COL&quot;)+20;3-CELL(&quot;COL&quot;))" office:value-type="string" office:string-value="Oil supply temperature" calcext:value-type="string">
            <text:p>Oil supply temperature</text:p>
          </table:table-cell>
          <table:table-cell table:formula="of:=OFFSET([.T7];CELL(&quot;COL&quot;)+20;3-CELL(&quot;COL&quot;))" office:value-type="string" office:string-value="Stage 3 inlet temperature" calcext:value-type="string">
            <text:p>Stage 3 inlet temperature</text:p>
          </table:table-cell>
          <table:table-cell table:formula="of:=OFFSET([.U7];CELL(&quot;COL&quot;)+20;3-CELL(&quot;COL&quot;))" office:value-type="string" office:string-value="Oil reservoir temperature" calcext:value-type="string">
            <text:p>Oil reservoir temperature</text:p>
          </table:table-cell>
          <table:table-cell table:formula="of:=OFFSET([.V7];CELL(&quot;COL&quot;)+20;3-CELL(&quot;COL&quot;))" office:value-type="string" office:string-value="Motor winding &quot;R&quot; temperature" calcext:value-type="string">
            <text:p>Motor winding "R" temperature</text:p>
          </table:table-cell>
          <table:table-cell table:formula="of:=OFFSET([.W7];CELL(&quot;COL&quot;)+20;3-CELL(&quot;COL&quot;))" office:value-type="string" office:string-value="Motor bearing &quot;DE&quot; temperature" calcext:value-type="string">
            <text:p>Motor bearing "DE" temperature</text:p>
          </table:table-cell>
          <table:table-cell table:formula="of:=OFFSET([.X7];CELL(&quot;COL&quot;)+20;3-CELL(&quot;COL&quot;))" office:value-type="string" office:string-value="Motor bearing &quot;NDE&quot; temperature" calcext:value-type="string">
            <text:p>Motor bearing "NDE" temperature</text:p>
          </table:table-cell>
          <table:table-cell table:formula="of:=OFFSET([.Y7];CELL(&quot;COL&quot;)+20;3-CELL(&quot;COL&quot;))" office:value-type="string" office:string-value="Stage 2 inlet temperature" calcext:value-type="string">
            <text:p>Stage 2 inlet temperature</text:p>
          </table:table-cell>
          <table:table-cell table:formula="of:=OFFSET([.Z7];CELL(&quot;COL&quot;)+20;3-CELL(&quot;COL&quot;))" office:value-type="string" office:string-value="#1 outlet temp" calcext:value-type="string">
            <text:p>#1 outlet temp</text:p>
          </table:table-cell>
          <table:table-cell table:formula="of:=OFFSET([.AA7];CELL(&quot;COL&quot;)+20;3-CELL(&quot;COL&quot;))" office:value-type="string" office:string-value="#2 outlet temp" calcext:value-type="string">
            <text:p>#2 outlet temp</text:p>
          </table:table-cell>
          <table:table-cell table:formula="of:=OFFSET([.AB7];CELL(&quot;COL&quot;)+20;3-CELL(&quot;COL&quot;))" office:value-type="string" office:string-value="#3 outlet temp" calcext:value-type="string">
            <text:p>#3 outlet temp</text:p>
          </table:table-cell>
          <table:table-cell table:formula="of:=OFFSET([.AC7];CELL(&quot;COL&quot;)+20;3-CELL(&quot;COL&quot;))" office:value-type="string" office:string-value="Cooling water supply temp" calcext:value-type="string">
            <text:p>Cooling water supply temp</text:p>
          </table:table-cell>
          <table:table-cell table:formula="of:=OFFSET([.AD7];CELL(&quot;COL&quot;)+20;3-CELL(&quot;COL&quot;))" office:value-type="string" office:string-value="Cooling water return temp" calcext:value-type="string">
            <text:p>Cooling water return temp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V</text:p>
          </table:table-cell>
          <table:table-cell office:value-type="string" calcext:value-type="string">
            <text:p>Текущее значение</text:p>
          </table:table-cell>
          <table:table-cell office:value-type="string" calcext:value-type="string">
            <text:p>FLT</text:p>
          </table:table-cell>
          <table:table-cell office:value-type="string" calcext:value-type="string">
            <text:p>R</text:p>
          </table:table-cell>
          <table:table-cell table:style-name="ce52" table:formula="of:=OFFSET([.F8];CELL(&quot;COL&quot;)+19;2-CELL(&quot;COL&quot;))" office:value-type="string" office:string-value="DB6.DBD20" calcext:value-type="string">
            <text:p>DB6.DBD20</text:p>
          </table:table-cell>
          <table:table-cell table:style-name="ce52" table:formula="of:=OFFSET([.G8];CELL(&quot;COL&quot;)+19;2-CELL(&quot;COL&quot;))" office:value-type="string" office:string-value="DB6.DBD408" calcext:value-type="string">
            <text:p>DB6.DBD408</text:p>
          </table:table-cell>
          <table:table-cell table:style-name="ce52" table:formula="of:=OFFSET([.H8];CELL(&quot;COL&quot;)+19;2-CELL(&quot;COL&quot;))" office:value-type="string" office:string-value="DB6.DBD28" calcext:value-type="string">
            <text:p>DB6.DBD28</text:p>
          </table:table-cell>
          <table:table-cell table:style-name="ce52" table:formula="of:=OFFSET([.I8];CELL(&quot;COL&quot;)+19;2-CELL(&quot;COL&quot;))" office:value-type="string" office:string-value="DB6.DBD32" calcext:value-type="string">
            <text:p>DB6.DBD32</text:p>
          </table:table-cell>
          <table:table-cell table:style-name="ce52" table:formula="of:=OFFSET([.J8];CELL(&quot;COL&quot;)+19;2-CELL(&quot;COL&quot;))" office:value-type="string" office:string-value="DB6.DBD36" calcext:value-type="string">
            <text:p>DB6.DBD36</text:p>
          </table:table-cell>
          <table:table-cell table:style-name="ce52" table:formula="of:=OFFSET([.K8];CELL(&quot;COL&quot;)+19;2-CELL(&quot;COL&quot;))" office:value-type="string" office:string-value="DB6.DBD40" calcext:value-type="string">
            <text:p>DB6.DBD40</text:p>
          </table:table-cell>
          <table:table-cell table:style-name="ce52" table:formula="of:=OFFSET([.L8];CELL(&quot;COL&quot;)+19;2-CELL(&quot;COL&quot;))" office:value-type="string" office:string-value="DB6.DBD44" calcext:value-type="string">
            <text:p>DB6.DBD44</text:p>
          </table:table-cell>
          <table:table-cell table:formula="of:=OFFSET([.M8];CELL(&quot;COL&quot;)+19;2-CELL(&quot;COL&quot;))" office:value-type="string" office:string-value="DB6.DBD48" calcext:value-type="string">
            <text:p>DB6.DBD48</text:p>
          </table:table-cell>
          <table:table-cell table:formula="of:=OFFSET([.N8];CELL(&quot;COL&quot;)+19;2-CELL(&quot;COL&quot;))" office:value-type="string" office:string-value="DB6.DBD52" calcext:value-type="string">
            <text:p>DB6.DBD52</text:p>
          </table:table-cell>
          <table:table-cell table:formula="of:=OFFSET([.O8];CELL(&quot;COL&quot;)+19;2-CELL(&quot;COL&quot;))" office:value-type="string" office:string-value="DB6.DBD56" calcext:value-type="string">
            <text:p>DB6.DBD56</text:p>
          </table:table-cell>
          <table:table-cell table:formula="of:=OFFSET([.P8];CELL(&quot;COL&quot;)+19;2-CELL(&quot;COL&quot;))" office:value-type="string" office:string-value="DB6.DBD164" calcext:value-type="string">
            <text:p>DB6.DBD164</text:p>
          </table:table-cell>
          <table:table-cell table:formula="of:=OFFSET([.Q8];CELL(&quot;COL&quot;)+19;2-CELL(&quot;COL&quot;))" office:value-type="string" office:string-value="DB6.DBD76" calcext:value-type="string">
            <text:p>DB6.DBD76</text:p>
          </table:table-cell>
          <table:table-cell table:formula="of:=OFFSET([.R8];CELL(&quot;COL&quot;)+19;2-CELL(&quot;COL&quot;))" office:value-type="string" office:string-value="DB6.DBD160" calcext:value-type="string">
            <text:p>DB6.DBD160</text:p>
          </table:table-cell>
          <table:table-cell table:formula="of:=OFFSET([.S8];CELL(&quot;COL&quot;)+19;2-CELL(&quot;COL&quot;))" office:value-type="string" office:string-value="DB6.DBD80" calcext:value-type="string">
            <text:p>DB6.DBD80</text:p>
          </table:table-cell>
          <table:table-cell table:formula="of:=OFFSET([.T8];CELL(&quot;COL&quot;)+19;2-CELL(&quot;COL&quot;))" office:value-type="string" office:string-value="DB6.DBD84" calcext:value-type="string">
            <text:p>DB6.DBD84</text:p>
          </table:table-cell>
          <table:table-cell table:formula="of:=OFFSET([.U8];CELL(&quot;COL&quot;)+19;2-CELL(&quot;COL&quot;))" office:value-type="string" office:string-value="DB6.DBD88" calcext:value-type="string">
            <text:p>DB6.DBD88</text:p>
          </table:table-cell>
          <table:table-cell table:formula="of:=OFFSET([.V8];CELL(&quot;COL&quot;)+19;2-CELL(&quot;COL&quot;))" office:value-type="string" office:string-value="DB6.DBD92" calcext:value-type="string">
            <text:p>DB6.DBD92</text:p>
          </table:table-cell>
          <table:table-cell table:formula="of:=OFFSET([.W8];CELL(&quot;COL&quot;)+19;2-CELL(&quot;COL&quot;))" office:value-type="string" office:string-value="DB6.DBD96" calcext:value-type="string">
            <text:p>DB6.DBD96</text:p>
          </table:table-cell>
          <table:table-cell table:formula="of:=OFFSET([.X8];CELL(&quot;COL&quot;)+19;2-CELL(&quot;COL&quot;))" office:value-type="string" office:string-value="DB6.DBD100" calcext:value-type="string">
            <text:p>DB6.DBD100</text:p>
          </table:table-cell>
          <table:table-cell table:formula="of:=OFFSET([.Y8];CELL(&quot;COL&quot;)+19;2-CELL(&quot;COL&quot;))" office:value-type="string" office:string-value="DB6.DBD104" calcext:value-type="string">
            <text:p>DB6.DBD104</text:p>
          </table:table-cell>
          <table:table-cell table:formula="of:=OFFSET([.Z8];CELL(&quot;COL&quot;)+19;2-CELL(&quot;COL&quot;))" office:value-type="string" office:string-value="DB6.DBD116" calcext:value-type="string">
            <text:p>DB6.DBD116</text:p>
          </table:table-cell>
          <table:table-cell table:formula="of:=OFFSET([.AA8];CELL(&quot;COL&quot;)+19;2-CELL(&quot;COL&quot;))" office:value-type="string" office:string-value="DB6.DBD120" calcext:value-type="string">
            <text:p>DB6.DBD120</text:p>
          </table:table-cell>
          <table:table-cell table:formula="of:=OFFSET([.AB8];CELL(&quot;COL&quot;)+19;2-CELL(&quot;COL&quot;))" office:value-type="string" office:string-value="DB6.DBD124" calcext:value-type="string">
            <text:p>DB6.DBD124</text:p>
          </table:table-cell>
          <table:table-cell table:formula="of:=OFFSET([.AC8];CELL(&quot;COL&quot;)+19;2-CELL(&quot;COL&quot;))" office:value-type="string" office:string-value="DB6.DBD128" calcext:value-type="string">
            <text:p>DB6.DBD128</text:p>
          </table:table-cell>
          <table:table-cell table:formula="of:=OFFSET([.AD8];CELL(&quot;COL&quot;)+19;2-CELL(&quot;COL&quot;))" office:value-type="string" office:string-value="DB6.DBD132" calcext:value-type="string">
            <text:p>DB6.DBD13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office:annotation draw:style-name="gr1" draw:text-style-name="P2" svg:width="2.899cm" svg:height="5.731cm" svg:x="5.611cm" svg:y="2.265cm" draw:caption-point-x="-0.61cm" draw:caption-point-y="1.51cm">
              <dc:creator>&lt;анонимный&gt;</dc:creator>
              <dc:date>2025-10-30T00:00:00</dc:date>
              <text:p text:style-name="P1"><text:span text:style-name="T1">Размер 16 бит; тип INTn — текущее значение CV умножается на 10^n и округляется: вместо 15,37 получится 154 при n=1 или 1537 при n=2; значение n содержится в поле graduate</text:span></text:p>
            </office:annotation>
            <text:p>CVint</text:p>
          </table:table-cell>
          <table:table-cell office:value-type="string" calcext:value-type="string">
            <text:p>Текущее значение, увеличенное, целое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</text:p>
          </table:table-cell>
          <table:table-cell table:formula="of:=OFFSET([.F9];CELL(&quot;COL&quot;)+18;8-CELL(&quot;COL&quot;))" office:value-type="string" office:string-value="DB58.DBW4" calcext:value-type="string">
            <text:p>DB58.DBW4</text:p>
          </table:table-cell>
          <table:table-cell table:formula="of:=OFFSET([.G9];CELL(&quot;COL&quot;)+18;8-CELL(&quot;COL&quot;))" office:value-type="string" office:string-value="DB58.DBW6" calcext:value-type="string">
            <text:p>DB58.DBW6</text:p>
          </table:table-cell>
          <table:table-cell table:formula="of:=OFFSET([.H9];CELL(&quot;COL&quot;)+18;8-CELL(&quot;COL&quot;))" office:value-type="string" office:string-value="DB58.DBW12" calcext:value-type="string">
            <text:p>DB58.DBW12</text:p>
          </table:table-cell>
          <table:table-cell table:formula="of:=OFFSET([.I9];CELL(&quot;COL&quot;)+18;8-CELL(&quot;COL&quot;))" office:value-type="string" office:string-value="DB58.DBW14" calcext:value-type="string">
            <text:p>DB58.DBW14</text:p>
          </table:table-cell>
          <table:table-cell table:formula="of:=OFFSET([.J9];CELL(&quot;COL&quot;)+18;8-CELL(&quot;COL&quot;))" office:value-type="string" office:string-value="DB58.DBW16" calcext:value-type="string">
            <text:p>DB58.DBW16</text:p>
          </table:table-cell>
          <table:table-cell table:formula="of:=OFFSET([.K9];CELL(&quot;COL&quot;)+18;8-CELL(&quot;COL&quot;))" office:value-type="string" office:string-value="DB58.DBW18" calcext:value-type="string">
            <text:p>DB58.DBW18</text:p>
          </table:table-cell>
          <table:table-cell table:formula="of:=OFFSET([.L9];CELL(&quot;COL&quot;)+18;8-CELL(&quot;COL&quot;))" office:value-type="string" office:string-value="DB58.DBW20" calcext:value-type="string">
            <text:p>DB58.DBW20</text:p>
          </table:table-cell>
          <table:table-cell table:formula="of:=OFFSET([.M9];CELL(&quot;COL&quot;)+18;8-CELL(&quot;COL&quot;))" office:value-type="string" office:string-value="DB58.DBW22" calcext:value-type="string">
            <text:p>DB58.DBW22</text:p>
          </table:table-cell>
          <table:table-cell table:formula="of:=OFFSET([.N9];CELL(&quot;COL&quot;)+18;8-CELL(&quot;COL&quot;))" office:value-type="string" office:string-value="DB58.DBW24" calcext:value-type="string">
            <text:p>DB58.DBW24</text:p>
          </table:table-cell>
          <table:table-cell table:formula="of:=OFFSET([.O9];CELL(&quot;COL&quot;)+18;8-CELL(&quot;COL&quot;))" office:value-type="string" office:string-value="DB58.DBW26" calcext:value-type="string">
            <text:p>DB58.DBW26</text:p>
          </table:table-cell>
          <table:table-cell table:formula="of:=OFFSET([.P9];CELL(&quot;COL&quot;)+18;8-CELL(&quot;COL&quot;))" office:value-type="string" office:string-value="DB58.DBW56" calcext:value-type="string">
            <text:p>DB58.DBW56</text:p>
          </table:table-cell>
          <table:table-cell table:formula="of:=OFFSET([.Q9];CELL(&quot;COL&quot;)+18;8-CELL(&quot;COL&quot;))" office:value-type="string" office:string-value="DB58.DBW52" calcext:value-type="string">
            <text:p>DB58.DBW52</text:p>
          </table:table-cell>
          <table:table-cell table:formula="of:=OFFSET([.R9];CELL(&quot;COL&quot;)+18;8-CELL(&quot;COL&quot;))" office:value-type="string" office:string-value="DB58.DBW54" calcext:value-type="string">
            <text:p>DB58.DBW54</text:p>
          </table:table-cell>
          <table:table-cell table:formula="of:=OFFSET([.S9];CELL(&quot;COL&quot;)+18;8-CELL(&quot;COL&quot;))" office:value-type="string" office:string-value="DB58.DBW28" calcext:value-type="string">
            <text:p>DB58.DBW28</text:p>
          </table:table-cell>
          <table:table-cell table:formula="of:=OFFSET([.T9];CELL(&quot;COL&quot;)+18;8-CELL(&quot;COL&quot;))" office:value-type="string" office:string-value="DB58.DBW30" calcext:value-type="string">
            <text:p>DB58.DBW30</text:p>
          </table:table-cell>
          <table:table-cell table:formula="of:=OFFSET([.U9];CELL(&quot;COL&quot;)+18;8-CELL(&quot;COL&quot;))" office:value-type="string" office:string-value="DB58.DBW32" calcext:value-type="string">
            <text:p>DB58.DBW32</text:p>
          </table:table-cell>
          <table:table-cell table:formula="of:=OFFSET([.V9];CELL(&quot;COL&quot;)+18;8-CELL(&quot;COL&quot;))" office:value-type="string" office:string-value="DB58.DBW34" calcext:value-type="string">
            <text:p>DB58.DBW34</text:p>
          </table:table-cell>
          <table:table-cell table:formula="of:=OFFSET([.W9];CELL(&quot;COL&quot;)+18;8-CELL(&quot;COL&quot;))" office:value-type="string" office:string-value="DB58.DBW36" calcext:value-type="string">
            <text:p>DB58.DBW36</text:p>
          </table:table-cell>
          <table:table-cell table:formula="of:=OFFSET([.X9];CELL(&quot;COL&quot;)+18;8-CELL(&quot;COL&quot;))" office:value-type="string" office:string-value="DB58.DBW38" calcext:value-type="string">
            <text:p>DB58.DBW38</text:p>
          </table:table-cell>
          <table:table-cell table:formula="of:=OFFSET([.Y9];CELL(&quot;COL&quot;)+18;8-CELL(&quot;COL&quot;))" office:value-type="string" office:string-value="DB58.DBW40" calcext:value-type="string">
            <text:p>DB58.DBW40</text:p>
          </table:table-cell>
          <table:table-cell table:formula="of:=OFFSET([.Z9];CELL(&quot;COL&quot;)+18;8-CELL(&quot;COL&quot;))" office:value-type="string" office:string-value="DB58.DBW62" calcext:value-type="string">
            <text:p>DB58.DBW62</text:p>
          </table:table-cell>
          <table:table-cell table:formula="of:=OFFSET([.AA9];CELL(&quot;COL&quot;)+18;8-CELL(&quot;COL&quot;))" office:value-type="string" office:string-value="DB58.DBW64" calcext:value-type="string">
            <text:p>DB58.DBW64</text:p>
          </table:table-cell>
          <table:table-cell table:formula="of:=OFFSET([.AB9];CELL(&quot;COL&quot;)+18;8-CELL(&quot;COL&quot;))" office:value-type="string" office:string-value="DB58.DBW66" calcext:value-type="string">
            <text:p>DB58.DBW66</text:p>
          </table:table-cell>
          <table:table-cell table:formula="of:=OFFSET([.AC9];CELL(&quot;COL&quot;)+18;8-CELL(&quot;COL&quot;))" office:value-type="string" office:string-value="DB58.DBW68" calcext:value-type="string">
            <text:p>DB58.DBW68</text:p>
          </table:table-cell>
          <table:table-cell table:formula="of:=OFFSET([.AD9];CELL(&quot;COL&quot;)+18;8-CELL(&quot;COL&quot;))" office:value-type="string" office:string-value="DB58.DBW70" calcext:value-type="string">
            <text:p>DB58.DBW7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office:annotation draw:style-name="gr2" draw:text-style-name="P2" svg:width="2.899cm" svg:height="10.076cm" svg:x="5.611cm" svg:y="2.718cm" draw:caption-point-x="-0.61cm" draw:caption-point-y="1.509cm">
              <dc:creator>&lt;анонимный&gt;</dc:creator>
              <dc:date>2025-10-30T00:00:00</dc:date>
              <text:p text:style-name="P1"><text:span text:style-name="T1">Размер 16 бит; тип INTn — реальное значение умножается на 10^n и округляется; при n=1 уставка 3 записывается как 30, уставка 6,1 записывается как 61; если уставка не предусмотрена программой ПЛК, то ссылается на специальную переменную, постоянно равную 0, одну для всех каналов без такой уставки</text:span></text:p>
            </office:annotation>
            <text:p>WarnValue</text:p>
          </table:table-cell>
          <table:table-cell office:value-type="string" calcext:value-type="string">
            <text:p>Уставка предупредительного значения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table:formula="of:=OFFSET([.F10];CELL(&quot;COL&quot;)+17;12-CELL(&quot;COL&quot;))" office:value-type="string" office:string-value="DB59.DBW12" calcext:value-type="string">
            <text:p>DB59.DBW12</text:p>
          </table:table-cell>
          <table:table-cell table:formula="of:=OFFSET([.G10];CELL(&quot;COL&quot;)+17;12-CELL(&quot;COL&quot;))" office:value-type="string" office:string-value="DB59.DBW12" calcext:value-type="string">
            <text:p>DB59.DBW12</text:p>
          </table:table-cell>
          <table:table-cell table:formula="of:=OFFSET([.H10];CELL(&quot;COL&quot;)+17;12-CELL(&quot;COL&quot;))" office:value-type="string" office:string-value="DB59.DBW12" calcext:value-type="string">
            <text:p>DB59.DBW12</text:p>
          </table:table-cell>
          <table:table-cell table:formula="of:=OFFSET([.I10];CELL(&quot;COL&quot;)+17;12-CELL(&quot;COL&quot;))" office:value-type="string" office:string-value="DB59.DBW12" calcext:value-type="string">
            <text:p>DB59.DBW12</text:p>
          </table:table-cell>
          <table:table-cell table:formula="of:=OFFSET([.J10];CELL(&quot;COL&quot;)+17;12-CELL(&quot;COL&quot;))" office:value-type="string" office:string-value="DB59.DBW116" calcext:value-type="string">
            <text:p>DB59.DBW116</text:p>
          </table:table-cell>
          <table:table-cell table:formula="of:=OFFSET([.K10];CELL(&quot;COL&quot;)+17;12-CELL(&quot;COL&quot;))" office:value-type="string" office:string-value="DB62.DBW192" calcext:value-type="string">
            <text:p>DB62.DBW192</text:p>
          </table:table-cell>
          <table:table-cell table:formula="of:=OFFSET([.L10];CELL(&quot;COL&quot;)+17;12-CELL(&quot;COL&quot;))" office:value-type="string" office:string-value="DB62.DBW194" calcext:value-type="string">
            <text:p>DB62.DBW194</text:p>
          </table:table-cell>
          <table:table-cell table:formula="of:=OFFSET([.M10];CELL(&quot;COL&quot;)+17;12-CELL(&quot;COL&quot;))" office:value-type="string" office:string-value="DB62.DBW196" calcext:value-type="string">
            <text:p>DB62.DBW196</text:p>
          </table:table-cell>
          <table:table-cell table:formula="of:=OFFSET([.N10];CELL(&quot;COL&quot;)+17;12-CELL(&quot;COL&quot;))" office:value-type="string" office:string-value="DB59.DBW124" calcext:value-type="string">
            <text:p>DB59.DBW124</text:p>
          </table:table-cell>
          <table:table-cell table:formula="of:=OFFSET([.O10];CELL(&quot;COL&quot;)+17;12-CELL(&quot;COL&quot;))" office:value-type="string" office:string-value="DB59.DBW126" calcext:value-type="string">
            <text:p>DB59.DBW126</text:p>
          </table:table-cell>
          <table:table-cell table:formula="of:=OFFSET([.P10];CELL(&quot;COL&quot;)+17;12-CELL(&quot;COL&quot;))" office:value-type="string" office:string-value="DB59.DBW12" calcext:value-type="string">
            <text:p>DB59.DBW12</text:p>
          </table:table-cell>
          <table:table-cell table:formula="of:=OFFSET([.Q10];CELL(&quot;COL&quot;)+17;12-CELL(&quot;COL&quot;))" office:value-type="string" office:string-value="DB59.DBW154" calcext:value-type="string">
            <text:p>DB59.DBW154</text:p>
          </table:table-cell>
          <table:table-cell table:formula="of:=OFFSET([.R10];CELL(&quot;COL&quot;)+17;12-CELL(&quot;COL&quot;))" office:value-type="string" office:string-value="DB59.DBW156" calcext:value-type="string">
            <text:p>DB59.DBW156</text:p>
          </table:table-cell>
          <table:table-cell table:formula="of:=OFFSET([.S10];CELL(&quot;COL&quot;)+17;12-CELL(&quot;COL&quot;))" office:value-type="string" office:string-value="DB59.DBW128" calcext:value-type="string">
            <text:p>DB59.DBW128</text:p>
          </table:table-cell>
          <table:table-cell table:formula="of:=OFFSET([.T10];CELL(&quot;COL&quot;)+17;12-CELL(&quot;COL&quot;))" office:value-type="string" office:string-value="DB59.DBW130" calcext:value-type="string">
            <text:p>DB59.DBW130</text:p>
          </table:table-cell>
          <table:table-cell table:formula="of:=OFFSET([.U10];CELL(&quot;COL&quot;)+17;12-CELL(&quot;COL&quot;))" office:value-type="string" office:string-value="DB59.DBW132" calcext:value-type="string">
            <text:p>DB59.DBW132</text:p>
          </table:table-cell>
          <table:table-cell table:formula="of:=OFFSET([.V10];CELL(&quot;COL&quot;)+17;12-CELL(&quot;COL&quot;))" office:value-type="string" office:string-value="DB59.DBW134" calcext:value-type="string">
            <text:p>DB59.DBW134</text:p>
          </table:table-cell>
          <table:table-cell table:formula="of:=OFFSET([.W10];CELL(&quot;COL&quot;)+17;12-CELL(&quot;COL&quot;))" office:value-type="string" office:string-value="DB59.DBW144" calcext:value-type="string">
            <text:p>DB59.DBW144</text:p>
          </table:table-cell>
          <table:table-cell table:formula="of:=OFFSET([.X10];CELL(&quot;COL&quot;)+17;12-CELL(&quot;COL&quot;))" office:value-type="string" office:string-value="DB59.DBW146" calcext:value-type="string">
            <text:p>DB59.DBW146</text:p>
          </table:table-cell>
          <table:table-cell table:formula="of:=OFFSET([.Y10];CELL(&quot;COL&quot;)+17;12-CELL(&quot;COL&quot;))" office:value-type="string" office:string-value="DB59.DBW140" calcext:value-type="string">
            <text:p>DB59.DBW140</text:p>
          </table:table-cell>
          <table:table-cell table:formula="of:=OFFSET([.Z10];CELL(&quot;COL&quot;)+17;12-CELL(&quot;COL&quot;))" office:value-type="string" office:string-value="DB59.DBW12" calcext:value-type="string">
            <text:p>DB59.DBW12</text:p>
          </table:table-cell>
          <table:table-cell table:formula="of:=OFFSET([.AA10];CELL(&quot;COL&quot;)+17;12-CELL(&quot;COL&quot;))" office:value-type="string" office:string-value="DB59.DBW12" calcext:value-type="string">
            <text:p>DB59.DBW12</text:p>
          </table:table-cell>
          <table:table-cell table:formula="of:=OFFSET([.AB10];CELL(&quot;COL&quot;)+17;12-CELL(&quot;COL&quot;))" office:value-type="string" office:string-value="DB59.DBW12" calcext:value-type="string">
            <text:p>DB59.DBW12</text:p>
          </table:table-cell>
          <table:table-cell table:formula="of:=OFFSET([.AC10];CELL(&quot;COL&quot;)+17;12-CELL(&quot;COL&quot;))" office:value-type="string" office:string-value="DB59.DBW148" calcext:value-type="string">
            <text:p>DB59.DBW148</text:p>
          </table:table-cell>
          <table:table-cell table:formula="of:=OFFSET([.AD10];CELL(&quot;COL&quot;)+17;12-CELL(&quot;COL&quot;))" office:value-type="string" office:string-value="DB59.DBW150" calcext:value-type="string">
            <text:p>DB59.DBW15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office:annotation draw:style-name="gr2" draw:text-style-name="P2" svg:width="2.899cm" svg:height="10.076cm" svg:x="5.611cm" svg:y="3.169cm" draw:caption-point-x="-0.61cm" draw:caption-point-y="1.51cm">
              <dc:creator>&lt;анонимный&gt;</dc:creator>
              <dc:date>2025-10-30T00:00:00</dc:date>
              <text:p text:style-name="P1"><text:span text:style-name="T1">Размер 16 бит; тип INTn — реальное значение умножается на 10^n и округляется; при n=1 уставка 3 записывается как 30, уставка 6,1 записывается как 61; если уставка не предусмотрена программой ПЛК, то ссылается на специальную переменную, постоянно равную 0, одну для всех каналов без такой уставки</text:span></text:p>
            </office:annotation>
            <text:p>AlarmValue</text:p>
          </table:table-cell>
          <table:table-cell office:value-type="string" calcext:value-type="string">
            <text:p>Уставка аварийного значения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table:formula="of:=OFFSET([.F11];CELL(&quot;COL&quot;)+16;15-CELL(&quot;COL&quot;))" office:value-type="string" office:string-value="DB60.DBW6" calcext:value-type="string">
            <text:p>DB60.DBW6</text:p>
          </table:table-cell>
          <table:table-cell table:formula="of:=OFFSET([.G11];CELL(&quot;COL&quot;)+16;15-CELL(&quot;COL&quot;))" office:value-type="string" office:string-value="DB60.DBW6" calcext:value-type="string">
            <text:p>DB60.DBW6</text:p>
          </table:table-cell>
          <table:table-cell table:formula="of:=OFFSET([.H11];CELL(&quot;COL&quot;)+16;15-CELL(&quot;COL&quot;))" office:value-type="string" office:string-value="DB60.DBW6" calcext:value-type="string">
            <text:p>DB60.DBW6</text:p>
          </table:table-cell>
          <table:table-cell table:formula="of:=OFFSET([.I11];CELL(&quot;COL&quot;)+16;15-CELL(&quot;COL&quot;))" office:value-type="string" office:string-value="DB60.DBW6" calcext:value-type="string">
            <text:p>DB60.DBW6</text:p>
          </table:table-cell>
          <table:table-cell table:formula="of:=OFFSET([.J11];CELL(&quot;COL&quot;)+16;15-CELL(&quot;COL&quot;))" office:value-type="string" office:string-value="DB60.DBW16" calcext:value-type="string">
            <text:p>DB60.DBW16</text:p>
          </table:table-cell>
          <table:table-cell table:formula="of:=OFFSET([.K11];CELL(&quot;COL&quot;)+16;15-CELL(&quot;COL&quot;))" office:value-type="string" office:string-value="DB62.DBW198" calcext:value-type="string">
            <text:p>DB62.DBW198</text:p>
          </table:table-cell>
          <table:table-cell table:formula="of:=OFFSET([.L11];CELL(&quot;COL&quot;)+16;15-CELL(&quot;COL&quot;))" office:value-type="string" office:string-value="DB63.DBW0" calcext:value-type="string">
            <text:p>DB63.DBW0</text:p>
          </table:table-cell>
          <table:table-cell table:formula="of:=OFFSET([.M11];CELL(&quot;COL&quot;)+16;15-CELL(&quot;COL&quot;))" office:value-type="string" office:string-value="DB63.DBW2" calcext:value-type="string">
            <text:p>DB63.DBW2</text:p>
          </table:table-cell>
          <table:table-cell table:formula="of:=OFFSET([.N11];CELL(&quot;COL&quot;)+16;15-CELL(&quot;COL&quot;))" office:value-type="string" office:string-value="DB60.DBW6" calcext:value-type="string">
            <text:p>DB60.DBW6</text:p>
          </table:table-cell>
          <table:table-cell table:formula="of:=OFFSET([.O11];CELL(&quot;COL&quot;)+16;15-CELL(&quot;COL&quot;))" office:value-type="string" office:string-value="DB60.DBW26" calcext:value-type="string">
            <text:p>DB60.DBW26</text:p>
          </table:table-cell>
          <table:table-cell table:formula="of:=OFFSET([.P11];CELL(&quot;COL&quot;)+16;15-CELL(&quot;COL&quot;))" office:value-type="string" office:string-value="DB60.DBW6" calcext:value-type="string">
            <text:p>DB60.DBW6</text:p>
          </table:table-cell>
          <table:table-cell table:formula="of:=OFFSET([.Q11];CELL(&quot;COL&quot;)+16;15-CELL(&quot;COL&quot;))" office:value-type="string" office:string-value="DB60.DBW54" calcext:value-type="string">
            <text:p>DB60.DBW54</text:p>
          </table:table-cell>
          <table:table-cell table:formula="of:=OFFSET([.R11];CELL(&quot;COL&quot;)+16;15-CELL(&quot;COL&quot;))" office:value-type="string" office:string-value="DB60.DBW56" calcext:value-type="string">
            <text:p>DB60.DBW56</text:p>
          </table:table-cell>
          <table:table-cell table:formula="of:=OFFSET([.S11];CELL(&quot;COL&quot;)+16;15-CELL(&quot;COL&quot;))" office:value-type="string" office:string-value="DB60.DBW28" calcext:value-type="string">
            <text:p>DB60.DBW28</text:p>
          </table:table-cell>
          <table:table-cell table:formula="of:=OFFSET([.T11];CELL(&quot;COL&quot;)+16;15-CELL(&quot;COL&quot;))" office:value-type="string" office:string-value="DB60.DBW30" calcext:value-type="string">
            <text:p>DB60.DBW30</text:p>
          </table:table-cell>
          <table:table-cell table:formula="of:=OFFSET([.U11];CELL(&quot;COL&quot;)+16;15-CELL(&quot;COL&quot;))" office:value-type="string" office:string-value="DB60.DBW6" calcext:value-type="string">
            <text:p>DB60.DBW6</text:p>
          </table:table-cell>
          <table:table-cell table:formula="of:=OFFSET([.V11];CELL(&quot;COL&quot;)+16;15-CELL(&quot;COL&quot;))" office:value-type="string" office:string-value="DB60.DBW34" calcext:value-type="string">
            <text:p>DB60.DBW34</text:p>
          </table:table-cell>
          <table:table-cell table:formula="of:=OFFSET([.W11];CELL(&quot;COL&quot;)+16;15-CELL(&quot;COL&quot;))" office:value-type="string" office:string-value="DB60.DBW44" calcext:value-type="string">
            <text:p>DB60.DBW44</text:p>
          </table:table-cell>
          <table:table-cell table:formula="of:=OFFSET([.X11];CELL(&quot;COL&quot;)+16;15-CELL(&quot;COL&quot;))" office:value-type="string" office:string-value="DB60.DBW46" calcext:value-type="string">
            <text:p>DB60.DBW46</text:p>
          </table:table-cell>
          <table:table-cell table:formula="of:=OFFSET([.Y11];CELL(&quot;COL&quot;)+16;15-CELL(&quot;COL&quot;))" office:value-type="string" office:string-value="DB60.DBW40" calcext:value-type="string">
            <text:p>DB60.DBW40</text:p>
          </table:table-cell>
          <table:table-cell table:formula="of:=OFFSET([.Z11];CELL(&quot;COL&quot;)+16;15-CELL(&quot;COL&quot;))" office:value-type="string" office:string-value="DB60.DBW6" calcext:value-type="string">
            <text:p>DB60.DBW6</text:p>
          </table:table-cell>
          <table:table-cell table:formula="of:=OFFSET([.AA11];CELL(&quot;COL&quot;)+16;15-CELL(&quot;COL&quot;))" office:value-type="string" office:string-value="DB60.DBW6" calcext:value-type="string">
            <text:p>DB60.DBW6</text:p>
          </table:table-cell>
          <table:table-cell table:formula="of:=OFFSET([.AB11];CELL(&quot;COL&quot;)+16;15-CELL(&quot;COL&quot;))" office:value-type="string" office:string-value="DB60.DBW6" calcext:value-type="string">
            <text:p>DB60.DBW6</text:p>
          </table:table-cell>
          <table:table-cell table:formula="of:=OFFSET([.AC11];CELL(&quot;COL&quot;)+16;15-CELL(&quot;COL&quot;))" office:value-type="string" office:string-value="DB60.DBW6" calcext:value-type="string">
            <text:p>DB60.DBW6</text:p>
          </table:table-cell>
          <table:table-cell table:formula="of:=OFFSET([.AD11];CELL(&quot;COL&quot;)+16;15-CELL(&quot;COL&quot;))" office:value-type="string" office:string-value="DB60.DBW6" calcext:value-type="string">
            <text:p>DB60.DBW6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office:annotation draw:style-name="gr3" draw:text-style-name="P2" svg:width="2.899cm" svg:height="6.521cm" svg:x="5.611cm" svg:y="3.621cm" draw:caption-point-x="-0.61cm" draw:caption-point-y="1.509cm">
              <dc:creator>&lt;анонимный&gt;</dc:creator>
              <dc:date>2025-10-30T00:00:00</dc:date>
              <text:p text:style-name="P1"><text:span text:style-name="T1">Показатель степени десяти при формировании целого значения из вещественного; в каждом объекте класса будет свой узел, но ссылаться они будут на одну из трёх специально сделанных переменных</text:span></text:p>
            </office:annotation>
            <text:p>Graduate</text:p>
          </table:table-cell>
          <table:table-cell office:value-type="string" calcext:value-type="string">
            <text:p>Степень 10 для целых значений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</text:p>
          </table:table-cell>
          <table:table-cell table:style-name="ce52" table:formula="of:=CHOOSE(OFFSET([.F12];CELL(&quot;COL&quot;)+15;9-CELL(&quot;COL&quot;))+1;[.$B$61];[.$B$62];[.$B$63];[.$B$64])" office:value-type="float" office:value="0" calcext:value-type="float">
            <text:p>0</text:p>
          </table:table-cell>
          <table:table-cell table:style-name="ce52" table:formula="of:=CHOOSE(OFFSET([.G12];CELL(&quot;COL&quot;)+15;9-CELL(&quot;COL&quot;))+1;[.$B$61];[.$B$62];[.$B$63];[.$B$64])" office:value-type="float" office:value="0" calcext:value-type="float">
            <text:p>0</text:p>
          </table:table-cell>
          <table:table-cell table:style-name="ce52" table:formula="of:=CHOOSE(OFFSET([.H12];CELL(&quot;COL&quot;)+15;9-CELL(&quot;COL&quot;))+1;[.$B$61];[.$B$62];[.$B$63];[.$B$64])" office:value-type="float" office:value="0" calcext:value-type="float">
            <text:p>0</text:p>
          </table:table-cell>
          <table:table-cell table:style-name="ce52" table:formula="of:=CHOOSE(OFFSET([.I12];CELL(&quot;COL&quot;)+15;9-CELL(&quot;COL&quot;))+1;[.$B$61];[.$B$62];[.$B$63];[.$B$64])" office:value-type="float" office:value="0" calcext:value-type="float">
            <text:p>0</text:p>
          </table:table-cell>
          <table:table-cell table:style-name="ce52" table:formula="of:=CHOOSE(OFFSET([.J12];CELL(&quot;COL&quot;)+15;9-CELL(&quot;COL&quot;))+1;[.$B$61];[.$B$62];[.$B$63];[.$B$64])" office:value-type="float" office:value="0" calcext:value-type="float">
            <text:p>0</text:p>
          </table:table-cell>
          <table:table-cell table:style-name="ce52" table:formula="of:=CHOOSE(OFFSET([.K12];CELL(&quot;COL&quot;)+15;9-CELL(&quot;COL&quot;))+1;[.$B$61];[.$B$62];[.$B$63];[.$B$64])" office:value-type="float" office:value="0" calcext:value-type="float">
            <text:p>0</text:p>
          </table:table-cell>
          <table:table-cell table:style-name="ce52" table:formula="of:=CHOOSE(OFFSET([.L12];CELL(&quot;COL&quot;)+15;9-CELL(&quot;COL&quot;))+1;[.$B$61];[.$B$62];[.$B$63];[.$B$64])" office:value-type="float" office:value="0" calcext:value-type="float">
            <text:p>0</text:p>
          </table:table-cell>
          <table:table-cell table:style-name="ce52" table:formula="of:=CHOOSE(OFFSET([.M12];CELL(&quot;COL&quot;)+15;9-CELL(&quot;COL&quot;))+1;[.$B$61];[.$B$62];[.$B$63];[.$B$64])" office:value-type="float" office:value="0" calcext:value-type="float">
            <text:p>0</text:p>
          </table:table-cell>
          <table:table-cell table:style-name="ce52" table:formula="of:=CHOOSE(OFFSET([.N12];CELL(&quot;COL&quot;)+15;9-CELL(&quot;COL&quot;))+1;[.$B$61];[.$B$62];[.$B$63];[.$B$64])" office:value-type="float" office:value="0" calcext:value-type="float">
            <text:p>0</text:p>
          </table:table-cell>
          <table:table-cell table:style-name="ce52" table:formula="of:=CHOOSE(OFFSET([.O12];CELL(&quot;COL&quot;)+15;9-CELL(&quot;COL&quot;))+1;[.$B$61];[.$B$62];[.$B$63];[.$B$64])" office:value-type="float" office:value="0" calcext:value-type="float">
            <text:p>0</text:p>
          </table:table-cell>
          <table:table-cell table:style-name="ce52" table:formula="of:=CHOOSE(OFFSET([.P12];CELL(&quot;COL&quot;)+15;9-CELL(&quot;COL&quot;))+1;[.$B$61];[.$B$62];[.$B$63];[.$B$64])" office:value-type="float" office:value="0" calcext:value-type="float">
            <text:p>0</text:p>
          </table:table-cell>
          <table:table-cell table:style-name="ce52" table:formula="of:=CHOOSE(OFFSET([.Q12];CELL(&quot;COL&quot;)+15;9-CELL(&quot;COL&quot;))+1;[.$B$61];[.$B$62];[.$B$63];[.$B$64])" office:value-type="float" office:value="0" calcext:value-type="float">
            <text:p>0</text:p>
          </table:table-cell>
          <table:table-cell table:style-name="ce52" table:formula="of:=CHOOSE(OFFSET([.R12];CELL(&quot;COL&quot;)+15;9-CELL(&quot;COL&quot;))+1;[.$B$61];[.$B$62];[.$B$63];[.$B$64])" office:value-type="float" office:value="0" calcext:value-type="float">
            <text:p>0</text:p>
          </table:table-cell>
          <table:table-cell table:style-name="ce52" table:formula="of:=CHOOSE(OFFSET([.S12];CELL(&quot;COL&quot;)+15;9-CELL(&quot;COL&quot;))+1;[.$B$61];[.$B$62];[.$B$63];[.$B$64])" office:value-type="float" office:value="0" calcext:value-type="float">
            <text:p>0</text:p>
          </table:table-cell>
          <table:table-cell table:style-name="ce52" table:formula="of:=CHOOSE(OFFSET([.T12];CELL(&quot;COL&quot;)+15;9-CELL(&quot;COL&quot;))+1;[.$B$61];[.$B$62];[.$B$63];[.$B$64])" office:value-type="float" office:value="0" calcext:value-type="float">
            <text:p>0</text:p>
          </table:table-cell>
          <table:table-cell table:style-name="ce52" table:formula="of:=CHOOSE(OFFSET([.U12];CELL(&quot;COL&quot;)+15;9-CELL(&quot;COL&quot;))+1;[.$B$61];[.$B$62];[.$B$63];[.$B$64])" office:value-type="float" office:value="0" calcext:value-type="float">
            <text:p>0</text:p>
          </table:table-cell>
          <table:table-cell table:style-name="ce52" table:formula="of:=CHOOSE(OFFSET([.V12];CELL(&quot;COL&quot;)+15;9-CELL(&quot;COL&quot;))+1;[.$B$61];[.$B$62];[.$B$63];[.$B$64])" office:value-type="float" office:value="0" calcext:value-type="float">
            <text:p>0</text:p>
          </table:table-cell>
          <table:table-cell table:style-name="ce52" table:formula="of:=CHOOSE(OFFSET([.W12];CELL(&quot;COL&quot;)+15;9-CELL(&quot;COL&quot;))+1;[.$B$61];[.$B$62];[.$B$63];[.$B$64])" office:value-type="float" office:value="0" calcext:value-type="float">
            <text:p>0</text:p>
          </table:table-cell>
          <table:table-cell table:style-name="ce52" table:formula="of:=CHOOSE(OFFSET([.X12];CELL(&quot;COL&quot;)+15;9-CELL(&quot;COL&quot;))+1;[.$B$61];[.$B$62];[.$B$63];[.$B$64])" office:value-type="float" office:value="0" calcext:value-type="float">
            <text:p>0</text:p>
          </table:table-cell>
          <table:table-cell table:style-name="ce52" table:formula="of:=CHOOSE(OFFSET([.Y12];CELL(&quot;COL&quot;)+15;9-CELL(&quot;COL&quot;))+1;[.$B$61];[.$B$62];[.$B$63];[.$B$64])" office:value-type="float" office:value="0" calcext:value-type="float">
            <text:p>0</text:p>
          </table:table-cell>
          <table:table-cell table:style-name="ce52" table:formula="of:=CHOOSE(OFFSET([.Z12];CELL(&quot;COL&quot;)+15;9-CELL(&quot;COL&quot;))+1;[.$B$61];[.$B$62];[.$B$63];[.$B$64])" office:value-type="float" office:value="0" calcext:value-type="float">
            <text:p>0</text:p>
          </table:table-cell>
          <table:table-cell table:style-name="ce52" table:formula="of:=CHOOSE(OFFSET([.AA12];CELL(&quot;COL&quot;)+15;9-CELL(&quot;COL&quot;))+1;[.$B$61];[.$B$62];[.$B$63];[.$B$64])" office:value-type="float" office:value="0" calcext:value-type="float">
            <text:p>0</text:p>
          </table:table-cell>
          <table:table-cell table:style-name="ce52" table:formula="of:=CHOOSE(OFFSET([.AB12];CELL(&quot;COL&quot;)+15;9-CELL(&quot;COL&quot;))+1;[.$B$61];[.$B$62];[.$B$63];[.$B$64])" office:value-type="float" office:value="0" calcext:value-type="float">
            <text:p>0</text:p>
          </table:table-cell>
          <table:table-cell table:style-name="ce52" table:formula="of:=CHOOSE(OFFSET([.AC12];CELL(&quot;COL&quot;)+15;9-CELL(&quot;COL&quot;))+1;[.$B$61];[.$B$62];[.$B$63];[.$B$64])" office:value-type="float" office:value="0" calcext:value-type="float">
            <text:p>0</text:p>
          </table:table-cell>
          <table:table-cell table:style-name="ce52" table:formula="of:=CHOOSE(OFFSET([.AD12];CELL(&quot;COL&quot;)+15;9-CELL(&quot;COL&quot;))+1;[.$B$61];[.$B$62];[.$B$63];[.$B$64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Enable</text:p>
          </table:table-cell>
          <table:table-cell office:value-type="string" calcext:value-type="string">
            <text:p>Разрешить/Блокировать сигнализацию 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80" table:formula="of:=OFFSET([.F13];CELL(&quot;COL&quot;)+14;25-CELL(&quot;COL&quot;))" office:value-type="string" office:string-value="DB1.DBX6.0" calcext:value-type="string">
            <text:p>DB1.DBX6.0</text:p>
          </table:table-cell>
          <table:table-cell table:style-name="ce80" table:formula="of:=OFFSET([.G13];CELL(&quot;COL&quot;)+14;25-CELL(&quot;COL&quot;))" office:value-type="string" office:string-value="M188.1" calcext:value-type="string">
            <text:p>M188.1</text:p>
          </table:table-cell>
          <table:table-cell table:style-name="ce80" table:formula="of:=OFFSET([.H13];CELL(&quot;COL&quot;)+14;25-CELL(&quot;COL&quot;))" office:value-type="string" office:string-value="M188.2" calcext:value-type="string">
            <text:p>M188.2</text:p>
          </table:table-cell>
          <table:table-cell table:style-name="ce80" table:formula="of:=OFFSET([.I13];CELL(&quot;COL&quot;)+14;25-CELL(&quot;COL&quot;))" office:value-type="string" office:string-value="M188.3" calcext:value-type="string">
            <text:p>M188.3</text:p>
          </table:table-cell>
          <table:table-cell table:style-name="ce80" table:formula="of:=OFFSET([.J13];CELL(&quot;COL&quot;)+14;25-CELL(&quot;COL&quot;))" office:value-type="string" office:string-value="M188.4" calcext:value-type="string">
            <text:p>M188.4</text:p>
          </table:table-cell>
          <table:table-cell table:style-name="ce80" table:formula="of:=OFFSET([.K13];CELL(&quot;COL&quot;)+14;25-CELL(&quot;COL&quot;))" office:value-type="string" office:string-value="M188.5" calcext:value-type="string">
            <text:p>M188.5</text:p>
          </table:table-cell>
          <table:table-cell table:style-name="ce80" table:formula="of:=OFFSET([.L13];CELL(&quot;COL&quot;)+14;25-CELL(&quot;COL&quot;))" office:value-type="string" office:string-value="M188.6" calcext:value-type="string">
            <text:p>M188.6</text:p>
          </table:table-cell>
          <table:table-cell table:style-name="ce80" table:formula="of:=OFFSET([.M13];CELL(&quot;COL&quot;)+14;25-CELL(&quot;COL&quot;))" office:value-type="string" office:string-value="M188.7" calcext:value-type="string">
            <text:p>M188.7</text:p>
          </table:table-cell>
          <table:table-cell table:style-name="ce80" table:formula="of:=OFFSET([.N13];CELL(&quot;COL&quot;)+14;25-CELL(&quot;COL&quot;))" office:value-type="string" office:string-value="DB1.DBX0.1" calcext:value-type="string">
            <text:p>DB1.DBX0.1</text:p>
          </table:table-cell>
          <table:table-cell table:style-name="ce80" table:formula="of:=OFFSET([.O13];CELL(&quot;COL&quot;)+14;25-CELL(&quot;COL&quot;))" office:value-type="string" office:string-value="M189.1" calcext:value-type="string">
            <text:p>M189.1</text:p>
          </table:table-cell>
          <table:table-cell table:style-name="ce80" table:formula="of:=OFFSET([.P13];CELL(&quot;COL&quot;)+14;25-CELL(&quot;COL&quot;))" office:value-type="string" office:string-value="DB1.DBX10.2" calcext:value-type="string">
            <text:p>DB1.DBX10.2</text:p>
          </table:table-cell>
          <table:table-cell table:style-name="ce80" table:formula="of:=OFFSET([.Q13];CELL(&quot;COL&quot;)+14;25-CELL(&quot;COL&quot;))" office:value-type="string" office:string-value="DB1.DBX10.0" calcext:value-type="string">
            <text:p>DB1.DBX10.0</text:p>
          </table:table-cell>
          <table:table-cell table:style-name="ce80" table:formula="of:=OFFSET([.R13];CELL(&quot;COL&quot;)+14;25-CELL(&quot;COL&quot;))" office:value-type="string" office:string-value="DB1.DBX10.1" calcext:value-type="string">
            <text:p>DB1.DBX10.1</text:p>
          </table:table-cell>
          <table:table-cell table:style-name="ce80" table:formula="of:=OFFSET([.S13];CELL(&quot;COL&quot;)+14;25-CELL(&quot;COL&quot;))" office:value-type="string" office:string-value="M189.5" calcext:value-type="string">
            <text:p>M189.5</text:p>
          </table:table-cell>
          <table:table-cell table:style-name="ce80" table:formula="of:=OFFSET([.T13];CELL(&quot;COL&quot;)+14;25-CELL(&quot;COL&quot;))" office:value-type="string" office:string-value="M189.6" calcext:value-type="string">
            <text:p>M189.6</text:p>
          </table:table-cell>
          <table:table-cell table:style-name="ce80" table:formula="of:=OFFSET([.U13];CELL(&quot;COL&quot;)+14;25-CELL(&quot;COL&quot;))" office:value-type="string" office:string-value="M189.7" calcext:value-type="string">
            <text:p>M189.7</text:p>
          </table:table-cell>
          <table:table-cell table:style-name="ce80" table:formula="of:=OFFSET([.V13];CELL(&quot;COL&quot;)+14;25-CELL(&quot;COL&quot;))" office:value-type="string" office:string-value="DB1.DBX14.5" calcext:value-type="string">
            <text:p>DB1.DBX14.5</text:p>
          </table:table-cell>
          <table:table-cell table:style-name="ce80" table:formula="of:=OFFSET([.W13];CELL(&quot;COL&quot;)+14;25-CELL(&quot;COL&quot;))" office:value-type="string" office:string-value="DB1.DBX14.6" calcext:value-type="string">
            <text:p>DB1.DBX14.6</text:p>
          </table:table-cell>
          <table:table-cell table:style-name="ce80" table:formula="of:=OFFSET([.X13];CELL(&quot;COL&quot;)+14;25-CELL(&quot;COL&quot;))" office:value-type="string" office:string-value="DB1.DBX14.7" calcext:value-type="string">
            <text:p>DB1.DBX14.7</text:p>
          </table:table-cell>
          <table:table-cell table:style-name="ce80" table:formula="of:=OFFSET([.Y13];CELL(&quot;COL&quot;)+14;25-CELL(&quot;COL&quot;))" office:value-type="string" office:string-value="DB1.DBX0.2" calcext:value-type="string">
            <text:p>DB1.DBX0.2</text:p>
          </table:table-cell>
          <table:table-cell table:style-name="ce80" table:formula="of:=OFFSET([.Z13];CELL(&quot;COL&quot;)+14;25-CELL(&quot;COL&quot;))" office:value-type="string" office:string-value="DB1.DBX1.3" calcext:value-type="string">
            <text:p>DB1.DBX1.3</text:p>
          </table:table-cell>
          <table:table-cell table:style-name="ce80" table:formula="of:=OFFSET([.AA13];CELL(&quot;COL&quot;)+14;25-CELL(&quot;COL&quot;))" office:value-type="string" office:string-value="DB1.DBX1.4" calcext:value-type="string">
            <text:p>DB1.DBX1.4</text:p>
          </table:table-cell>
          <table:table-cell table:style-name="ce80" table:formula="of:=OFFSET([.AB13];CELL(&quot;COL&quot;)+14;25-CELL(&quot;COL&quot;))" office:value-type="string" office:string-value="DB1.DBX1.5" calcext:value-type="string">
            <text:p>DB1.DBX1.5</text:p>
          </table:table-cell>
          <table:table-cell table:style-name="ce80" table:formula="of:=OFFSET([.AC13];CELL(&quot;COL&quot;)+14;25-CELL(&quot;COL&quot;))" office:value-type="string" office:string-value="DB1.DBX1.6" calcext:value-type="string">
            <text:p>DB1.DBX1.6</text:p>
          </table:table-cell>
          <table:table-cell table:style-name="ce80" table:formula="of:=OFFSET([.AD13];CELL(&quot;COL&quot;)+14;25-CELL(&quot;COL&quot;))" office:value-type="string" office:string-value="DB1.DBX5.7" calcext:value-type="string">
            <text:p>DB1.DBX5.7</text:p>
          </table:table-cell>
          <table:table-cell table:style-name="ce80"/>
          <table:table-cell table:number-columns-repeated="4"/>
        </table:table-row>
        <table:table-row table:style-name="ro2">
          <table:table-cell/>
          <table:table-cell office:value-type="string" calcext:value-type="string">
            <text:p>WarnUse</text:p>
          </table:table-cell>
          <table:table-cell office:value-type="string" calcext:value-type="string">
            <text:p>Использовать для предупреждения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formula="of:=OFFSET([.F14];CELL(&quot;COL&quot;)+13;26-CELL(&quot;COL&quot;))" office:value-type="string" office:string-value="M180.0" calcext:value-type="string">
            <text:p>M180.0</text:p>
          </table:table-cell>
          <table:table-cell table:formula="of:=OFFSET([.G14];CELL(&quot;COL&quot;)+13;26-CELL(&quot;COL&quot;))" office:value-type="string" office:string-value="M180.1" calcext:value-type="string">
            <text:p>M180.1</text:p>
          </table:table-cell>
          <table:table-cell table:formula="of:=OFFSET([.H14];CELL(&quot;COL&quot;)+13;26-CELL(&quot;COL&quot;))" office:value-type="string" office:string-value="M180.2" calcext:value-type="string">
            <text:p>M180.2</text:p>
          </table:table-cell>
          <table:table-cell table:formula="of:=OFFSET([.I14];CELL(&quot;COL&quot;)+13;26-CELL(&quot;COL&quot;))" office:value-type="string" office:string-value="M180.3" calcext:value-type="string">
            <text:p>M180.3</text:p>
          </table:table-cell>
          <table:table-cell table:formula="of:=OFFSET([.J14];CELL(&quot;COL&quot;)+13;26-CELL(&quot;COL&quot;))" office:value-type="string" office:string-value="M180.4" calcext:value-type="string">
            <text:p>M180.4</text:p>
          </table:table-cell>
          <table:table-cell table:formula="of:=OFFSET([.K14];CELL(&quot;COL&quot;)+13;26-CELL(&quot;COL&quot;))" office:value-type="string" office:string-value="M180.5" calcext:value-type="string">
            <text:p>M180.5</text:p>
          </table:table-cell>
          <table:table-cell table:formula="of:=OFFSET([.L14];CELL(&quot;COL&quot;)+13;26-CELL(&quot;COL&quot;))" office:value-type="string" office:string-value="M180.6" calcext:value-type="string">
            <text:p>M180.6</text:p>
          </table:table-cell>
          <table:table-cell table:formula="of:=OFFSET([.M14];CELL(&quot;COL&quot;)+13;26-CELL(&quot;COL&quot;))" office:value-type="string" office:string-value="M180.7" calcext:value-type="string">
            <text:p>M180.7</text:p>
          </table:table-cell>
          <table:table-cell table:formula="of:=OFFSET([.N14];CELL(&quot;COL&quot;)+13;26-CELL(&quot;COL&quot;))" office:value-type="string" office:string-value="DB1.DBX14.3" calcext:value-type="string">
            <text:p>DB1.DBX14.3</text:p>
          </table:table-cell>
          <table:table-cell table:formula="of:=OFFSET([.O14];CELL(&quot;COL&quot;)+13;26-CELL(&quot;COL&quot;))" office:value-type="string" office:string-value="M181.1" calcext:value-type="string">
            <text:p>M181.1</text:p>
          </table:table-cell>
          <table:table-cell table:formula="of:=OFFSET([.P14];CELL(&quot;COL&quot;)+13;26-CELL(&quot;COL&quot;))" office:value-type="string" office:string-value="DB1.DBX11.2" calcext:value-type="string">
            <text:p>DB1.DBX11.2</text:p>
          </table:table-cell>
          <table:table-cell table:formula="of:=OFFSET([.Q14];CELL(&quot;COL&quot;)+13;26-CELL(&quot;COL&quot;))" office:value-type="string" office:string-value="DB1.DBX11.0" calcext:value-type="string">
            <text:p>DB1.DBX11.0</text:p>
          </table:table-cell>
          <table:table-cell table:formula="of:=OFFSET([.R14];CELL(&quot;COL&quot;)+13;26-CELL(&quot;COL&quot;))" office:value-type="string" office:string-value="DB1.DBX11.1" calcext:value-type="string">
            <text:p>DB1.DBX11.1</text:p>
          </table:table-cell>
          <table:table-cell table:formula="of:=OFFSET([.S14];CELL(&quot;COL&quot;)+13;26-CELL(&quot;COL&quot;))" office:value-type="string" office:string-value="M181.5" calcext:value-type="string">
            <text:p>M181.5</text:p>
          </table:table-cell>
          <table:table-cell table:formula="of:=OFFSET([.T14];CELL(&quot;COL&quot;)+13;26-CELL(&quot;COL&quot;))" office:value-type="string" office:string-value="M181.6" calcext:value-type="string">
            <text:p>M181.6</text:p>
          </table:table-cell>
          <table:table-cell table:formula="of:=OFFSET([.U14];CELL(&quot;COL&quot;)+13;26-CELL(&quot;COL&quot;))" office:value-type="string" office:string-value="M181.7" calcext:value-type="string">
            <text:p>M181.7</text:p>
          </table:table-cell>
          <table:table-cell table:formula="of:=OFFSET([.V14];CELL(&quot;COL&quot;)+13;26-CELL(&quot;COL&quot;))" office:value-type="string" office:string-value="DB1.DBX15.0" calcext:value-type="string">
            <text:p>DB1.DBX15.0</text:p>
          </table:table-cell>
          <table:table-cell table:formula="of:=OFFSET([.W14];CELL(&quot;COL&quot;)+13;26-CELL(&quot;COL&quot;))" office:value-type="string" office:string-value="DB1.DBX15.2" calcext:value-type="string">
            <text:p>DB1.DBX15.2</text:p>
          </table:table-cell>
          <table:table-cell table:formula="of:=OFFSET([.X14];CELL(&quot;COL&quot;)+13;26-CELL(&quot;COL&quot;))" office:value-type="string" office:string-value="DB1.DBX15.4" calcext:value-type="string">
            <text:p>DB1.DBX15.4</text:p>
          </table:table-cell>
          <table:table-cell table:formula="of:=OFFSET([.Y14];CELL(&quot;COL&quot;)+13;26-CELL(&quot;COL&quot;))" office:value-type="string" office:string-value="M182.3" calcext:value-type="string">
            <text:p>M182.3</text:p>
          </table:table-cell>
          <table:table-cell table:formula="of:=OFFSET([.Z14];CELL(&quot;COL&quot;)+13;26-CELL(&quot;COL&quot;))" office:value-type="string" office:string-value="M182.4" calcext:value-type="string">
            <text:p>M182.4</text:p>
          </table:table-cell>
          <table:table-cell table:formula="of:=OFFSET([.AA14];CELL(&quot;COL&quot;)+13;26-CELL(&quot;COL&quot;))" office:value-type="string" office:string-value="M182.5" calcext:value-type="string">
            <text:p>M182.5</text:p>
          </table:table-cell>
          <table:table-cell table:formula="of:=OFFSET([.AB14];CELL(&quot;COL&quot;)+13;26-CELL(&quot;COL&quot;))" office:value-type="string" office:string-value="M182.6" calcext:value-type="string">
            <text:p>M182.6</text:p>
          </table:table-cell>
          <table:table-cell table:formula="of:=OFFSET([.AC14];CELL(&quot;COL&quot;)+13;26-CELL(&quot;COL&quot;))" office:value-type="string" office:string-value="DB1.DBX16.6" calcext:value-type="string">
            <text:p>DB1.DBX16.6</text:p>
          </table:table-cell>
          <table:table-cell table:formula="of:=OFFSET([.AD14];CELL(&quot;COL&quot;)+13;26-CELL(&quot;COL&quot;))" office:value-type="string" office:string-value="DB1.DBX17.0" calcext:value-type="string">
            <text:p>DB1.DBX17.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larmUse</text:p>
          </table:table-cell>
          <table:table-cell office:value-type="string" calcext:value-type="string">
            <text:p>Использовать для аварии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formula="of:=OFFSET([.F15];CELL(&quot;COL&quot;)+12;27-CELL(&quot;COL&quot;))" office:value-type="string" office:string-value="M184.0" calcext:value-type="string">
            <text:p>M184.0</text:p>
          </table:table-cell>
          <table:table-cell table:formula="of:=OFFSET([.G15];CELL(&quot;COL&quot;)+12;27-CELL(&quot;COL&quot;))" office:value-type="string" office:string-value="M184.1" calcext:value-type="string">
            <text:p>M184.1</text:p>
          </table:table-cell>
          <table:table-cell table:formula="of:=OFFSET([.H15];CELL(&quot;COL&quot;)+12;27-CELL(&quot;COL&quot;))" office:value-type="string" office:string-value="M184.2" calcext:value-type="string">
            <text:p>M184.2</text:p>
          </table:table-cell>
          <table:table-cell table:formula="of:=OFFSET([.I15];CELL(&quot;COL&quot;)+12;27-CELL(&quot;COL&quot;))" office:value-type="string" office:string-value="M184.3" calcext:value-type="string">
            <text:p>M184.3</text:p>
          </table:table-cell>
          <table:table-cell table:formula="of:=OFFSET([.J15];CELL(&quot;COL&quot;)+12;27-CELL(&quot;COL&quot;))" office:value-type="string" office:string-value="M184.4" calcext:value-type="string">
            <text:p>M184.4</text:p>
          </table:table-cell>
          <table:table-cell table:formula="of:=OFFSET([.K15];CELL(&quot;COL&quot;)+12;27-CELL(&quot;COL&quot;))" office:value-type="string" office:string-value="M184.5" calcext:value-type="string">
            <text:p>M184.5</text:p>
          </table:table-cell>
          <table:table-cell table:formula="of:=OFFSET([.L15];CELL(&quot;COL&quot;)+12;27-CELL(&quot;COL&quot;))" office:value-type="string" office:string-value="M184.6" calcext:value-type="string">
            <text:p>M184.6</text:p>
          </table:table-cell>
          <table:table-cell table:formula="of:=OFFSET([.M15];CELL(&quot;COL&quot;)+12;27-CELL(&quot;COL&quot;))" office:value-type="string" office:string-value="M184.7" calcext:value-type="string">
            <text:p>M184.7</text:p>
          </table:table-cell>
          <table:table-cell table:formula="of:=OFFSET([.N15];CELL(&quot;COL&quot;)+12;27-CELL(&quot;COL&quot;))" office:value-type="string" office:string-value="M185.0" calcext:value-type="string">
            <text:p>M185.0</text:p>
          </table:table-cell>
          <table:table-cell table:formula="of:=OFFSET([.O15];CELL(&quot;COL&quot;)+12;27-CELL(&quot;COL&quot;))" office:value-type="string" office:string-value="DB1.DBX14.4" calcext:value-type="string">
            <text:p>DB1.DBX14.4</text:p>
          </table:table-cell>
          <table:table-cell table:formula="of:=OFFSET([.P15];CELL(&quot;COL&quot;)+12;27-CELL(&quot;COL&quot;))" office:value-type="string" office:string-value="M185.2" calcext:value-type="string">
            <text:p>M185.2</text:p>
          </table:table-cell>
          <table:table-cell table:formula="of:=OFFSET([.Q15];CELL(&quot;COL&quot;)+12;27-CELL(&quot;COL&quot;))" office:value-type="string" office:string-value="DB1.DBX12.0" calcext:value-type="string">
            <text:p>DB1.DBX12.0</text:p>
          </table:table-cell>
          <table:table-cell table:formula="of:=OFFSET([.R15];CELL(&quot;COL&quot;)+12;27-CELL(&quot;COL&quot;))" office:value-type="string" office:string-value="DB1.DBX12.1" calcext:value-type="string">
            <text:p>DB1.DBX12.1</text:p>
          </table:table-cell>
          <table:table-cell table:formula="of:=OFFSET([.S15];CELL(&quot;COL&quot;)+12;27-CELL(&quot;COL&quot;))" office:value-type="string" office:string-value="M185.5" calcext:value-type="string">
            <text:p>M185.5</text:p>
          </table:table-cell>
          <table:table-cell table:formula="of:=OFFSET([.T15];CELL(&quot;COL&quot;)+12;27-CELL(&quot;COL&quot;))" office:value-type="string" office:string-value="M185.6" calcext:value-type="string">
            <text:p>M185.6</text:p>
          </table:table-cell>
          <table:table-cell table:formula="of:=OFFSET([.U15];CELL(&quot;COL&quot;)+12;27-CELL(&quot;COL&quot;))" office:value-type="string" office:string-value="M185.7" calcext:value-type="string">
            <text:p>M185.7</text:p>
          </table:table-cell>
          <table:table-cell table:formula="of:=OFFSET([.V15];CELL(&quot;COL&quot;)+12;27-CELL(&quot;COL&quot;))" office:value-type="string" office:string-value="DB1.DBX15.1" calcext:value-type="string">
            <text:p>DB1.DBX15.1</text:p>
          </table:table-cell>
          <table:table-cell table:formula="of:=OFFSET([.W15];CELL(&quot;COL&quot;)+12;27-CELL(&quot;COL&quot;))" office:value-type="string" office:string-value="DB1.DBX15.3" calcext:value-type="string">
            <text:p>DB1.DBX15.3</text:p>
          </table:table-cell>
          <table:table-cell table:formula="of:=OFFSET([.X15];CELL(&quot;COL&quot;)+12;27-CELL(&quot;COL&quot;))" office:value-type="string" office:string-value="DB1.DBX15.5" calcext:value-type="string">
            <text:p>DB1.DBX15.5</text:p>
          </table:table-cell>
          <table:table-cell table:formula="of:=OFFSET([.Y15];CELL(&quot;COL&quot;)+12;27-CELL(&quot;COL&quot;))" office:value-type="string" office:string-value="M186.3" calcext:value-type="string">
            <text:p>M186.3</text:p>
          </table:table-cell>
          <table:table-cell table:formula="of:=OFFSET([.Z15];CELL(&quot;COL&quot;)+12;27-CELL(&quot;COL&quot;))" office:value-type="string" office:string-value="M186.4" calcext:value-type="string">
            <text:p>M186.4</text:p>
          </table:table-cell>
          <table:table-cell table:formula="of:=OFFSET([.AA15];CELL(&quot;COL&quot;)+12;27-CELL(&quot;COL&quot;))" office:value-type="string" office:string-value="M186.5" calcext:value-type="string">
            <text:p>M186.5</text:p>
          </table:table-cell>
          <table:table-cell table:formula="of:=OFFSET([.AB15];CELL(&quot;COL&quot;)+12;27-CELL(&quot;COL&quot;))" office:value-type="string" office:string-value="M186.6" calcext:value-type="string">
            <text:p>M186.6</text:p>
          </table:table-cell>
          <table:table-cell table:formula="of:=OFFSET([.AC15];CELL(&quot;COL&quot;)+12;27-CELL(&quot;COL&quot;))" office:value-type="string" office:string-value="M186.7" calcext:value-type="string">
            <text:p>M186.7</text:p>
          </table:table-cell>
          <table:table-cell table:formula="of:=OFFSET([.AD15];CELL(&quot;COL&quot;)+12;27-CELL(&quot;COL&quot;))" office:value-type="string" office:string-value="M187.0" calcext:value-type="string">
            <text:p>M187.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arnExist</text:p>
          </table:table-cell>
          <table:table-cell office:value-type="string" calcext:value-type="string">
            <text:p>Наличие предупреждения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table:formula="of:=OFFSET([.F16];CELL(&quot;COL&quot;)+11;13-CELL(&quot;COL&quot;))" office:value-type="string" office:string-value="DB6.DBX2.7" calcext:value-type="string">
            <text:p>DB6.DBX2.7</text:p>
          </table:table-cell>
          <table:table-cell table:formula="of:=OFFSET([.G16];CELL(&quot;COL&quot;)+11;13-CELL(&quot;COL&quot;))" office:value-type="string" office:string-value="DB6.DBX2.6" calcext:value-type="string">
            <text:p>DB6.DBX2.6</text:p>
          </table:table-cell>
          <table:table-cell table:formula="of:=OFFSET([.H16];CELL(&quot;COL&quot;)+11;13-CELL(&quot;COL&quot;))" office:value-type="string" office:string-value="DB6.DBX2.6" calcext:value-type="string">
            <text:p>DB6.DBX2.6</text:p>
          </table:table-cell>
          <table:table-cell table:formula="of:=OFFSET([.I16];CELL(&quot;COL&quot;)+11;13-CELL(&quot;COL&quot;))" office:value-type="string" office:string-value="DB6.DBX2.6" calcext:value-type="string">
            <text:p>DB6.DBX2.6</text:p>
          </table:table-cell>
          <table:table-cell table:formula="of:=OFFSET([.J16];CELL(&quot;COL&quot;)+11;13-CELL(&quot;COL&quot;))" office:value-type="string" office:string-value="DB6.DBX5.0" calcext:value-type="string">
            <text:p>DB6.DBX5.0</text:p>
          </table:table-cell>
          <table:table-cell table:formula="of:=OFFSET([.K16];CELL(&quot;COL&quot;)+11;13-CELL(&quot;COL&quot;))" office:value-type="string" office:string-value="DB6.DBX5.1" calcext:value-type="string">
            <text:p>DB6.DBX5.1</text:p>
          </table:table-cell>
          <table:table-cell table:formula="of:=OFFSET([.L16];CELL(&quot;COL&quot;)+11;13-CELL(&quot;COL&quot;))" office:value-type="string" office:string-value="DB6.DBX5.2" calcext:value-type="string">
            <text:p>DB6.DBX5.2</text:p>
          </table:table-cell>
          <table:table-cell table:formula="of:=OFFSET([.M16];CELL(&quot;COL&quot;)+11;13-CELL(&quot;COL&quot;))" office:value-type="string" office:string-value="DB6.DBX5.3" calcext:value-type="string">
            <text:p>DB6.DBX5.3</text:p>
          </table:table-cell>
          <table:table-cell table:formula="of:=OFFSET([.N16];CELL(&quot;COL&quot;)+11;13-CELL(&quot;COL&quot;))" office:value-type="string" office:string-value="DB6.DBX4.5" calcext:value-type="string">
            <text:p>DB6.DBX4.5</text:p>
          </table:table-cell>
          <table:table-cell table:formula="of:=OFFSET([.O16];CELL(&quot;COL&quot;)+11;13-CELL(&quot;COL&quot;))" office:value-type="string" office:string-value="DB6.DBX5.5" calcext:value-type="string">
            <text:p>DB6.DBX5.5</text:p>
          </table:table-cell>
          <table:table-cell table:formula="of:=OFFSET([.P16];CELL(&quot;COL&quot;)+11;13-CELL(&quot;COL&quot;))" office:value-type="string" office:string-value="DB6.DBX2.6" calcext:value-type="string">
            <text:p>DB6.DBX2.6</text:p>
          </table:table-cell>
          <table:table-cell table:formula="of:=OFFSET([.Q16];CELL(&quot;COL&quot;)+11;13-CELL(&quot;COL&quot;))" office:value-type="string" office:string-value="DB6.DBX5.4" calcext:value-type="string">
            <text:p>DB6.DBX5.4</text:p>
          </table:table-cell>
          <table:table-cell table:formula="of:=OFFSET([.R16];CELL(&quot;COL&quot;)+11;13-CELL(&quot;COL&quot;))" office:value-type="string" office:string-value="DB6.DBX7.4" calcext:value-type="string">
            <text:p>DB6.DBX7.4</text:p>
          </table:table-cell>
          <table:table-cell table:formula="of:=OFFSET([.S16];CELL(&quot;COL&quot;)+11;13-CELL(&quot;COL&quot;))" office:value-type="string" office:string-value="DB6.DBX5.6" calcext:value-type="string">
            <text:p>DB6.DBX5.6</text:p>
          </table:table-cell>
          <table:table-cell table:formula="of:=OFFSET([.T16];CELL(&quot;COL&quot;)+11;13-CELL(&quot;COL&quot;))" office:value-type="string" office:string-value="DB6.DBX5.7" calcext:value-type="string">
            <text:p>DB6.DBX5.7</text:p>
          </table:table-cell>
          <table:table-cell table:formula="of:=OFFSET([.U16];CELL(&quot;COL&quot;)+11;13-CELL(&quot;COL&quot;))" office:value-type="string" office:string-value="DB6.DBX6.0" calcext:value-type="string">
            <text:p>DB6.DBX6.0</text:p>
          </table:table-cell>
          <table:table-cell table:formula="of:=OFFSET([.V16];CELL(&quot;COL&quot;)+11;13-CELL(&quot;COL&quot;))" office:value-type="string" office:string-value="DB6.DBX6.1" calcext:value-type="string">
            <text:p>DB6.DBX6.1</text:p>
          </table:table-cell>
          <table:table-cell table:formula="of:=OFFSET([.W16];CELL(&quot;COL&quot;)+11;13-CELL(&quot;COL&quot;))" office:value-type="string" office:string-value="DB6.DBX6.6" calcext:value-type="string">
            <text:p>DB6.DBX6.6</text:p>
          </table:table-cell>
          <table:table-cell table:formula="of:=OFFSET([.X16];CELL(&quot;COL&quot;)+11;13-CELL(&quot;COL&quot;))" office:value-type="string" office:string-value="DB6.DBX6.7" calcext:value-type="string">
            <text:p>DB6.DBX6.7</text:p>
          </table:table-cell>
          <table:table-cell table:formula="of:=OFFSET([.Y16];CELL(&quot;COL&quot;)+11;13-CELL(&quot;COL&quot;))" office:value-type="string" office:string-value="DB6.DBX6.4" calcext:value-type="string">
            <text:p>DB6.DBX6.4</text:p>
          </table:table-cell>
          <table:table-cell table:formula="of:=OFFSET([.Z16];CELL(&quot;COL&quot;)+11;13-CELL(&quot;COL&quot;))" office:value-type="string" office:string-value="DB6.DBX2.6" calcext:value-type="string">
            <text:p>DB6.DBX2.6</text:p>
          </table:table-cell>
          <table:table-cell table:formula="of:=OFFSET([.AA16];CELL(&quot;COL&quot;)+11;13-CELL(&quot;COL&quot;))" office:value-type="string" office:string-value="DB6.DBX2.6" calcext:value-type="string">
            <text:p>DB6.DBX2.6</text:p>
          </table:table-cell>
          <table:table-cell table:formula="of:=OFFSET([.AB16];CELL(&quot;COL&quot;)+11;13-CELL(&quot;COL&quot;))" office:value-type="string" office:string-value="DB6.DBX2.6" calcext:value-type="string">
            <text:p>DB6.DBX2.6</text:p>
          </table:table-cell>
          <table:table-cell table:formula="of:=OFFSET([.AC16];CELL(&quot;COL&quot;)+11;13-CELL(&quot;COL&quot;))" office:value-type="string" office:string-value="DB6.DBX7.0" calcext:value-type="string">
            <text:p>DB6.DBX7.0</text:p>
          </table:table-cell>
          <table:table-cell table:formula="of:=OFFSET([.AD16];CELL(&quot;COL&quot;)+11;13-CELL(&quot;COL&quot;))" office:value-type="string" office:string-value="DB6.DBX7.1" calcext:value-type="string">
            <text:p>DB6.DBX7.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larmExist</text:p>
          </table:table-cell>
          <table:table-cell office:value-type="string" calcext:value-type="string">
            <text:p>Наличие аварии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table:formula="of:=OFFSET([.F17];CELL(&quot;COL&quot;)+10;16-CELL(&quot;COL&quot;))" office:value-type="string" office:string-value="DB6.DBX8.6" calcext:value-type="string">
            <text:p>DB6.DBX8.6</text:p>
          </table:table-cell>
          <table:table-cell table:formula="of:=OFFSET([.G17];CELL(&quot;COL&quot;)+10;16-CELL(&quot;COL&quot;))" office:value-type="string" office:string-value="DB6.DBX8.6" calcext:value-type="string">
            <text:p>DB6.DBX8.6</text:p>
          </table:table-cell>
          <table:table-cell table:formula="of:=OFFSET([.H17];CELL(&quot;COL&quot;)+10;16-CELL(&quot;COL&quot;))" office:value-type="string" office:string-value="DB6.DBX8.6" calcext:value-type="string">
            <text:p>DB6.DBX8.6</text:p>
          </table:table-cell>
          <table:table-cell table:formula="of:=OFFSET([.I17];CELL(&quot;COL&quot;)+10;16-CELL(&quot;COL&quot;))" office:value-type="string" office:string-value="DB6.DBX8.6" calcext:value-type="string">
            <text:p>DB6.DBX8.6</text:p>
          </table:table-cell>
          <table:table-cell table:formula="of:=OFFSET([.J17];CELL(&quot;COL&quot;)+10;16-CELL(&quot;COL&quot;))" office:value-type="string" office:string-value="DB6.DBX9.0" calcext:value-type="string">
            <text:p>DB6.DBX9.0</text:p>
          </table:table-cell>
          <table:table-cell table:formula="of:=OFFSET([.K17];CELL(&quot;COL&quot;)+10;16-CELL(&quot;COL&quot;))" office:value-type="string" office:string-value="DB6.DBX9.1" calcext:value-type="string">
            <text:p>DB6.DBX9.1</text:p>
          </table:table-cell>
          <table:table-cell table:formula="of:=OFFSET([.L17];CELL(&quot;COL&quot;)+10;16-CELL(&quot;COL&quot;))" office:value-type="string" office:string-value="DB6.DBX9.2" calcext:value-type="string">
            <text:p>DB6.DBX9.2</text:p>
          </table:table-cell>
          <table:table-cell table:formula="of:=OFFSET([.M17];CELL(&quot;COL&quot;)+10;16-CELL(&quot;COL&quot;))" office:value-type="string" office:string-value="DB6.DBX9.3" calcext:value-type="string">
            <text:p>DB6.DBX9.3</text:p>
          </table:table-cell>
          <table:table-cell table:formula="of:=OFFSET([.N17];CELL(&quot;COL&quot;)+10;16-CELL(&quot;COL&quot;))" office:value-type="string" office:string-value="DB6.DBX9.4" calcext:value-type="string">
            <text:p>DB6.DBX9.4</text:p>
          </table:table-cell>
          <table:table-cell table:formula="of:=OFFSET([.O17];CELL(&quot;COL&quot;)+10;16-CELL(&quot;COL&quot;))" office:value-type="string" office:string-value="DB6.DBX9.5" calcext:value-type="string">
            <text:p>DB6.DBX9.5</text:p>
          </table:table-cell>
          <table:table-cell table:formula="of:=OFFSET([.P17];CELL(&quot;COL&quot;)+10;16-CELL(&quot;COL&quot;))" office:value-type="string" office:string-value="DB6.DBX8.6" calcext:value-type="string">
            <text:p>DB6.DBX8.6</text:p>
          </table:table-cell>
          <table:table-cell table:formula="of:=OFFSET([.Q17];CELL(&quot;COL&quot;)+10;16-CELL(&quot;COL&quot;))" office:value-type="string" office:string-value="DB6.DBX8.3" calcext:value-type="string">
            <text:p>DB6.DBX8.3</text:p>
          </table:table-cell>
          <table:table-cell table:formula="of:=OFFSET([.R17];CELL(&quot;COL&quot;)+10;16-CELL(&quot;COL&quot;))" office:value-type="string" office:string-value="DB6.DBX8.4" calcext:value-type="string">
            <text:p>DB6.DBX8.4</text:p>
          </table:table-cell>
          <table:table-cell table:formula="of:=OFFSET([.S17];CELL(&quot;COL&quot;)+10;16-CELL(&quot;COL&quot;))" office:value-type="string" office:string-value="DB6.DBX9.6" calcext:value-type="string">
            <text:p>DB6.DBX9.6</text:p>
          </table:table-cell>
          <table:table-cell table:formula="of:=OFFSET([.T17];CELL(&quot;COL&quot;)+10;16-CELL(&quot;COL&quot;))" office:value-type="string" office:string-value="DB6.DBX9.7" calcext:value-type="string">
            <text:p>DB6.DBX9.7</text:p>
          </table:table-cell>
          <table:table-cell table:formula="of:=OFFSET([.U17];CELL(&quot;COL&quot;)+10;16-CELL(&quot;COL&quot;))" office:value-type="string" office:string-value="DB6.DBX8.6" calcext:value-type="string">
            <text:p>DB6.DBX8.6</text:p>
          </table:table-cell>
          <table:table-cell table:formula="of:=OFFSET([.V17];CELL(&quot;COL&quot;)+10;16-CELL(&quot;COL&quot;))" office:value-type="string" office:string-value="DB6.DBX10.1" calcext:value-type="string">
            <text:p>DB6.DBX10.1</text:p>
          </table:table-cell>
          <table:table-cell table:formula="of:=OFFSET([.W17];CELL(&quot;COL&quot;)+10;16-CELL(&quot;COL&quot;))" office:value-type="string" office:string-value="DB6.DBX10.6" calcext:value-type="string">
            <text:p>DB6.DBX10.6</text:p>
          </table:table-cell>
          <table:table-cell table:formula="of:=OFFSET([.X17];CELL(&quot;COL&quot;)+10;16-CELL(&quot;COL&quot;))" office:value-type="string" office:string-value="DB6.DBX10.7" calcext:value-type="string">
            <text:p>DB6.DBX10.7</text:p>
          </table:table-cell>
          <table:table-cell table:formula="of:=OFFSET([.Y17];CELL(&quot;COL&quot;)+10;16-CELL(&quot;COL&quot;))" office:value-type="string" office:string-value="DB6.DBX10.4" calcext:value-type="string">
            <text:p>DB6.DBX10.4</text:p>
          </table:table-cell>
          <table:table-cell table:formula="of:=OFFSET([.Z17];CELL(&quot;COL&quot;)+10;16-CELL(&quot;COL&quot;))" office:value-type="string" office:string-value="DB6.DBX8.6" calcext:value-type="string">
            <text:p>DB6.DBX8.6</text:p>
          </table:table-cell>
          <table:table-cell table:formula="of:=OFFSET([.AA17];CELL(&quot;COL&quot;)+10;16-CELL(&quot;COL&quot;))" office:value-type="string" office:string-value="DB6.DBX8.6" calcext:value-type="string">
            <text:p>DB6.DBX8.6</text:p>
          </table:table-cell>
          <table:table-cell table:formula="of:=OFFSET([.AB17];CELL(&quot;COL&quot;)+10;16-CELL(&quot;COL&quot;))" office:value-type="string" office:string-value="DB6.DBX8.6" calcext:value-type="string">
            <text:p>DB6.DBX8.6</text:p>
          </table:table-cell>
          <table:table-cell table:formula="of:=OFFSET([.AC17];CELL(&quot;COL&quot;)+10;16-CELL(&quot;COL&quot;))" office:value-type="string" office:string-value="DB6.DBX8.6" calcext:value-type="string">
            <text:p>DB6.DBX8.6</text:p>
          </table:table-cell>
          <table:table-cell table:formula="of:=OFFSET([.AD17];CELL(&quot;COL&quot;)+10;16-CELL(&quot;COL&quot;))" office:value-type="string" office:string-value="DB6.DBX8.6" calcext:value-type="string">
            <text:p>DB6.DBX8.6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utRange</text:p>
          </table:table-cell>
          <table:table-cell office:value-type="string" calcext:value-type="string">
            <text:p>Вне диапазона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table:formula="of:=OFFSET([.F18];CELL(&quot;COL&quot;)+9;10-CELL(&quot;COL&quot;))" office:value-type="string" office:string-value="M233.0" calcext:value-type="string">
            <text:p>M233.0</text:p>
          </table:table-cell>
          <table:table-cell table:formula="of:=OFFSET([.G18];CELL(&quot;COL&quot;)+9;10-CELL(&quot;COL&quot;))" office:value-type="float" office:value="0" calcext:value-type="float">
            <text:p>0</text:p>
          </table:table-cell>
          <table:table-cell table:formula="of:=OFFSET([.H18];CELL(&quot;COL&quot;)+9;10-CELL(&quot;COL&quot;))" office:value-type="string" office:string-value="M232.0" calcext:value-type="string">
            <text:p>M232.0</text:p>
          </table:table-cell>
          <table:table-cell table:formula="of:=OFFSET([.I18];CELL(&quot;COL&quot;)+9;10-CELL(&quot;COL&quot;))" office:value-type="string" office:string-value="M232.1" calcext:value-type="string">
            <text:p>M232.1</text:p>
          </table:table-cell>
          <table:table-cell table:formula="of:=OFFSET([.J18];CELL(&quot;COL&quot;)+9;10-CELL(&quot;COL&quot;))" office:value-type="string" office:string-value="M232.2" calcext:value-type="string">
            <text:p>M232.2</text:p>
          </table:table-cell>
          <table:table-cell table:formula="of:=OFFSET([.K18];CELL(&quot;COL&quot;)+9;10-CELL(&quot;COL&quot;))" office:value-type="string" office:string-value="M232.3" calcext:value-type="string">
            <text:p>M232.3</text:p>
          </table:table-cell>
          <table:table-cell table:formula="of:=OFFSET([.L18];CELL(&quot;COL&quot;)+9;10-CELL(&quot;COL&quot;))" office:value-type="string" office:string-value="M232.4" calcext:value-type="string">
            <text:p>M232.4</text:p>
          </table:table-cell>
          <table:table-cell table:formula="of:=OFFSET([.M18];CELL(&quot;COL&quot;)+9;10-CELL(&quot;COL&quot;))" office:value-type="string" office:string-value="M232.5" calcext:value-type="string">
            <text:p>M232.5</text:p>
          </table:table-cell>
          <table:table-cell table:formula="of:=OFFSET([.N18];CELL(&quot;COL&quot;)+9;10-CELL(&quot;COL&quot;))" office:value-type="string" office:string-value="M232.6" calcext:value-type="string">
            <text:p>M232.6</text:p>
          </table:table-cell>
          <table:table-cell table:formula="of:=OFFSET([.O18];CELL(&quot;COL&quot;)+9;10-CELL(&quot;COL&quot;))" office:value-type="string" office:string-value="M232.7" calcext:value-type="string">
            <text:p>M232.7</text:p>
          </table:table-cell>
          <table:table-cell table:formula="of:=OFFSET([.P18];CELL(&quot;COL&quot;)+9;10-CELL(&quot;COL&quot;))" office:value-type="string" office:string-value="M233.6" calcext:value-type="string">
            <text:p>M233.6</text:p>
          </table:table-cell>
          <table:table-cell table:formula="of:=OFFSET([.Q18];CELL(&quot;COL&quot;)+9;10-CELL(&quot;COL&quot;))" office:value-type="string" office:string-value="M233.4" calcext:value-type="string">
            <text:p>M233.4</text:p>
          </table:table-cell>
          <table:table-cell table:formula="of:=OFFSET([.R18];CELL(&quot;COL&quot;)+9;10-CELL(&quot;COL&quot;))" office:value-type="string" office:string-value="M233.5" calcext:value-type="string">
            <text:p>M233.5</text:p>
          </table:table-cell>
          <table:table-cell table:formula="of:=OFFSET([.S18];CELL(&quot;COL&quot;)+9;10-CELL(&quot;COL&quot;))" office:value-type="string" office:string-value="M234.0" calcext:value-type="string">
            <text:p>M234.0</text:p>
          </table:table-cell>
          <table:table-cell table:formula="of:=OFFSET([.T18];CELL(&quot;COL&quot;)+9;10-CELL(&quot;COL&quot;))" office:value-type="string" office:string-value="M234.1" calcext:value-type="string">
            <text:p>M234.1</text:p>
          </table:table-cell>
          <table:table-cell table:formula="of:=OFFSET([.U18];CELL(&quot;COL&quot;)+9;10-CELL(&quot;COL&quot;))" office:value-type="string" office:string-value="M234.2" calcext:value-type="string">
            <text:p>M234.2</text:p>
          </table:table-cell>
          <table:table-cell table:formula="of:=OFFSET([.V18];CELL(&quot;COL&quot;)+9;10-CELL(&quot;COL&quot;))" office:value-type="string" office:string-value="M234.3" calcext:value-type="string">
            <text:p>M234.3</text:p>
          </table:table-cell>
          <table:table-cell table:formula="of:=OFFSET([.W18];CELL(&quot;COL&quot;)+9;10-CELL(&quot;COL&quot;))" office:value-type="string" office:string-value="M234.4" calcext:value-type="string">
            <text:p>M234.4</text:p>
          </table:table-cell>
          <table:table-cell table:formula="of:=OFFSET([.X18];CELL(&quot;COL&quot;)+9;10-CELL(&quot;COL&quot;))" office:value-type="string" office:string-value="M234.5" calcext:value-type="string">
            <text:p>M234.5</text:p>
          </table:table-cell>
          <table:table-cell table:formula="of:=OFFSET([.Y18];CELL(&quot;COL&quot;)+9;10-CELL(&quot;COL&quot;))" office:value-type="string" office:string-value="M234.6" calcext:value-type="string">
            <text:p>M234.6</text:p>
          </table:table-cell>
          <table:table-cell table:formula="of:=OFFSET([.Z18];CELL(&quot;COL&quot;)+9;10-CELL(&quot;COL&quot;))" office:value-type="string" office:string-value="M235.1" calcext:value-type="string">
            <text:p>M235.1</text:p>
          </table:table-cell>
          <table:table-cell table:formula="of:=OFFSET([.AA18];CELL(&quot;COL&quot;)+9;10-CELL(&quot;COL&quot;))" office:value-type="string" office:string-value="M235.2" calcext:value-type="string">
            <text:p>M235.2</text:p>
          </table:table-cell>
          <table:table-cell table:formula="of:=OFFSET([.AB18];CELL(&quot;COL&quot;)+9;10-CELL(&quot;COL&quot;))" office:value-type="string" office:string-value="M235.3" calcext:value-type="string">
            <text:p>M235.3</text:p>
          </table:table-cell>
          <table:table-cell table:formula="of:=OFFSET([.AC18];CELL(&quot;COL&quot;)+9;10-CELL(&quot;COL&quot;))" office:value-type="string" office:string-value="M235.4" calcext:value-type="string">
            <text:p>M235.4</text:p>
          </table:table-cell>
          <table:table-cell table:formula="of:=OFFSET([.AD18];CELL(&quot;COL&quot;)+9;10-CELL(&quot;COL&quot;))" office:value-type="string" office:string-value="M235.5" calcext:value-type="string">
            <text:p>M235.5</text:p>
          </table:table-cell>
          <table:table-cell table:number-columns-repeated="5"/>
        </table:table-row>
        <table:table-row table:style-name="ro2">
          <table:table-cell table:number-columns-repeated="35"/>
        </table:table-row>
        <table:table-row table:style-name="ro2">
          <table:table-cell/>
          <table:table-cell office:value-type="string" calcext:value-type="string">
            <text:p>Поля вне дерева, только в АРМ, для справки</text:p>
          </table:table-cell>
          <table:table-cell table:number-columns-repeated="33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Идентификатор в АРМ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</text:p>
          </table:table-cell>
          <table:table-cell table:number-columns-repeated="30"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Идентификатор в компрессоре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</text:p>
          </table:table-cell>
          <table:table-cell table:number-columns-repeated="30"/>
        </table:table-row>
        <table:table-row table:style-name="ro2">
          <table:table-cell/>
          <table:table-cell office:value-type="string" calcext:value-type="string">
            <text:p>descr</text:p>
          </table:table-cell>
          <table:table-cell office:value-type="string" calcext:value-type="string">
            <text:p>Описание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</text:p>
          </table:table-cell>
          <table:table-cell table:number-columns-repeated="10"/>
          <table:table-cell table:style-name="ce65" table:number-columns-repeated="8"/>
          <table:table-cell table:number-columns-repeated="12"/>
        </table:table-row>
        <table:table-row table:style-name="ro2">
          <table:table-cell table:number-columns-repeated="15"/>
          <table:table-cell table:style-name="ce65" table:number-columns-repeated="8"/>
          <table:table-cell table:number-columns-repeated="12"/>
        </table:table-row>
        <table:table-row table:style-name="ro2">
          <table:table-cell table:style-name="ce80" table:number-columns-repeated="3"/>
          <table:table-cell table:number-columns-repeated="12"/>
          <table:table-cell table:style-name="ce65" table:number-columns-repeated="8"/>
          <table:table-cell table:number-columns-repeated="12"/>
        </table:table-row>
        <table:table-row table:style-name="ro2">
          <table:table-cell table:style-name="ce80"/>
          <table:table-cell table:style-name="ce6" table:number-columns-repeated="2"/>
          <table:table-cell table:number-columns-repeated="12"/>
          <table:table-cell table:style-name="ce65" table:number-columns-repeated="8"/>
          <table:table-cell table:number-columns-repeated="12"/>
        </table:table-row>
        <table:table-row table:style-name="ro2">
          <table:table-cell table:style-name="ce80"/>
          <table:table-cell table:style-name="ce85"/>
          <table:table-cell table:style-name="ce6"/>
          <table:table-cell table:number-columns-repeated="12"/>
          <table:table-cell table:style-name="ce65" table:number-columns-repeated="8"/>
          <table:table-cell table:number-columns-repeated="12"/>
        </table:table-row>
        <table:table-row table:style-name="ro2">
          <table:table-cell table:style-name="ce80"/>
          <table:table-cell table:style-name="ce130"/>
          <table:table-cell table:style-name="ce132"/>
          <table:table-cell table:number-columns-repeated="12"/>
          <table:table-cell table:style-name="ce65" table:number-columns-repeated="8"/>
          <table:table-cell table:number-columns-repeated="12"/>
        </table:table-row>
        <table:table-row table:style-name="ro2">
          <table:table-cell/>
          <table:table-cell office:value-type="string" calcext:value-type="string">
            <text:p>Список входов</text:p>
          </table:table-cell>
          <table:table-cell table:number-columns-repeated="5"/>
          <table:table-cell table:style-name="ce56" office:value-type="string" calcext:value-type="string">
            <text:p>«Значение int» = INT(«Значение» * 10^ «Степень *10»)</text:p>
          </table:table-cell>
          <table:table-cell table:number-columns-repeated="17"/>
          <table:table-cell office:value-type="string" calcext:value-type="string">
            <text:p>unused — не используется для предупреждения/аварии</text:p>
          </table:table-cell>
          <table:table-cell table:number-columns-repeated="9"/>
        </table:table-row>
        <table:table-row table:style-name="ro2">
          <table:table-cell table:number-columns-repeated="11"/>
          <table:table-cell office:value-type="string" calcext:value-type="string">
            <text:p>Warning</text:p>
          </table:table-cell>
          <table:table-cell table:number-columns-repeated="2"/>
          <table:table-cell office:value-type="string" calcext:value-type="string">
            <text:p>Alarm</text:p>
          </table:table-cell>
          <table:table-cell office:value-type="string" calcext:value-type="string">
            <text:p>DE — drive end, NDE - non-drive end;</text:p>
          </table:table-cell>
          <table:table-cell table:number-columns-repeated="9"/>
          <table:table-cell office:value-type="string" calcext:value-type="string">
            <text:p>non-switchable — используется, нельзя отключить</text:p>
          </table:table-cell>
          <table:table-cell table:number-columns-repeated="9"/>
        </table:table-row>
        <table:table-row table:style-name="ro2">
          <table:table-cell table:number-columns-repeated="11"/>
          <table:table-cell office:value-type="string" calcext:value-type="string">
            <text:p>Alarm в исходном проекте</text:p>
          </table:table-cell>
          <table:table-cell table:number-columns-repeated="2"/>
          <table:table-cell office:value-type="string" calcext:value-type="string">
            <text:p>Danger в исх.проекте</text:p>
          </table:table-cell>
          <table:table-cell table:number-columns-repeated="10"/>
          <table:table-cell office:value-type="string" calcext:value-type="string">
            <text:p>mw180</text:p>
          </table:table-cell>
          <table:table-cell office:value-type="string" calcext:value-type="string">
            <text:p>mw184</text:p>
          </table:table-cell>
          <table:table-cell table:number-columns-repeated="6"/>
          <table:table-cell table:style-name="ce128" office:value-type="string" calcext:value-type="string">
            <text:p>Здесь неправильное обозначение — противоречие внутри одного документа</text:p>
          </table:table-cell>
          <table:table-cell/>
        </table:table-row>
        <table:table-row table:style-name="ro3">
          <table:table-cell office:value-type="string" calcext:value-type="string">
            <text:p>Поз.№</text:p>
          </table:table-cell>
          <table:table-cell office:value-type="string" calcext:value-type="string">
            <text:p>Адрес</text:p>
          </table:table-cell>
          <table:table-cell table:style-name="ce96" office:value-type="string" calcext:value-type="string">
            <text:p>Описание («Перевод описания» переехал в столбец AI, где он не будет ломать формулы)</text:p>
          </table:table-cell>
          <table:table-cell office:value-type="string" calcext:value-type="string">
            <text:p>Тип</text:p>
          </table:table-cell>
          <table:table-cell office:value-type="string" calcext:value-type="string">
            <text:p>Группа</text:p>
          </table:table-cell>
          <table:table-cell office:value-type="string" calcext:value-type="string">
            <text:p>Диапазон</text:p>
          </table:table-cell>
          <table:table-cell office:value-type="string" calcext:value-type="string">
            <text:p>Ед.измер.</text:p>
          </table:table-cell>
          <table:table-cell office:value-type="string" calcext:value-type="string">
            <text:p>Значение int</text:p>
          </table:table-cell>
          <table:table-cell office:value-type="string" calcext:value-type="string">
            <text:p>Степень *10</text:p>
          </table:table-cell>
          <table:table-cell table:style-name="ce96" office:value-type="string" calcext:value-type="string">
            <text:p>Флаг «вне диапазона»</text:p>
          </table:table-cell>
          <table:table-cell table:style-name="ce96" office:value-type="string" calcext:value-type="string">
            <text:p>Диапазон, для справки</text:p>
          </table:table-cell>
          <table:table-cell office:value-type="string" calcext:value-type="string">
            <text:p>Знач. предупр.</text:p>
          </table:table-cell>
          <table:table-cell office:value-type="string" calcext:value-type="string">
            <text:p>Есть предупр.</text:p>
          </table:table-cell>
          <table:table-cell office:value-type="string" calcext:value-type="string">
            <text:p>Описание предупреждения</text:p>
          </table:table-cell>
          <table:table-cell office:value-type="string" calcext:value-type="string">
            <text:p>Знач. аварии</text:p>
          </table:table-cell>
          <table:table-cell office:value-type="string" calcext:value-type="string">
            <text:p>Есть авария</text:p>
          </table:table-cell>
          <table:table-cell office:value-type="string" calcext:value-type="string">
            <text:p>Описание аварии</text:p>
          </table:table-cell>
          <table:table-cell office:value-type="string" calcext:value-type="string">
            <text:p>Знач. предупреждения 2</text:p>
          </table:table-cell>
          <table:table-cell office:value-type="string" calcext:value-type="string">
            <text:p>Есть предупреждение 2</text:p>
          </table:table-cell>
          <table:table-cell office:value-type="string" calcext:value-type="string">
            <text:p>Описание предупреждения</text:p>
          </table:table-cell>
          <table:table-cell office:value-type="string" calcext:value-type="string">
            <text:p>Знач. предупреждения 3</text:p>
          </table:table-cell>
          <table:table-cell office:value-type="string" calcext:value-type="string">
            <text:p>Есть предупреждение 3</text:p>
          </table:table-cell>
          <table:table-cell office:value-type="string" calcext:value-type="string">
            <text:p>Описание предупреждения</text:p>
          </table:table-cell>
          <table:table-cell office:value-type="string" calcext:value-type="string">
            <text:p>Обозначение аналогового канала (датчика)</text:p>
          </table:table-cell>
          <table:table-cell table:style-name="ce96" office:value-type="string" calcext:value-type="string">
            <text:p>Выполнять обработку данных по датчику</text:p>
          </table:table-cell>
          <table:table-cell table:style-name="ce96" office:value-type="string" calcext:value-type="string">
            <text:p>Использовать для предупреждения</text:p>
          </table:table-cell>
          <table:table-cell table:style-name="ce96" office:value-type="string" calcext:value-type="string">
            <text:p>Использовать для аварии</text:p>
          </table:table-cell>
          <table:table-cell table:style-name="ce96" office:value-type="string" calcext:value-type="string">
            <text:p>Уставка предупреждения</text:p>
          </table:table-cell>
          <table:table-cell table:number-columns-repeated="2"/>
          <table:table-cell table:style-name="ce96" office:value-type="string" calcext:value-type="string">
            <text:p>Усреднённое значение</text:p>
          </table:table-cell>
          <table:table-cell table:style-name="ce67"/>
          <table:table-cell table:number-columns-repeated="2"/>
          <table:table-cell office:value-type="string" calcext:value-type="string">
            <text:p>Перевод описания</text:p>
          </table:table-cell>
        </table:table-row>
        <table:table-row table:style-name="ro4">
          <table:table-cell table:style-name="ce82" office:value-type="string" calcext:value-type="string">
            <text:p>IGV</text:p>
          </table:table-cell>
          <table:table-cell table:style-name="ce94" office:value-type="string" calcext:value-type="string">
            <text:p>DB6.DBD20</text:p>
          </table:table-cell>
          <table:table-cell table:style-name="ce51" office:value-type="string" calcext:value-type="string">
            <text:p>IGV position (Inlet Guide Vane)</text:p>
          </table:table-cell>
          <table:table-cell table:style-name="ce28" office:value-type="string" calcext:value-type="string">
            <text:p>FLT</text:p>
          </table:table-cell>
          <table:table-cell table:style-name="ce28" office:value-type="string" calcext:value-type="string">
            <text:p>AI</text:p>
          </table:table-cell>
          <table:table-cell table:style-name="ce54" office:value-type="float" office:value="100" calcext:value-type="float">
            <text:p>100,0</text:p>
          </table:table-cell>
          <table:table-cell table:style-name="ce28" office:value-type="string" calcext:value-type="string">
            <text:p>%</text:p>
          </table:table-cell>
          <table:table-cell table:style-name="ce94" office:value-type="string" calcext:value-type="string">
            <text:p>DB58.DBW4</text:p>
          </table:table-cell>
          <table:table-cell table:style-name="ce28" office:value-type="float" office:value="1" calcext:value-type="float">
            <text:p>1</text:p>
          </table:table-cell>
          <table:table-cell table:style-name="ce94" office:value-type="string" calcext:value-type="string">
            <text:p>M233.0</text:p>
          </table:table-cell>
          <table:table-cell table:style-name="ce94"/>
          <table:table-cell table:style-name="ce106" office:value-type="string" calcext:value-type="string">
            <office:annotation draw:style-name="gr4" draw:text-style-name="P4" svg:width="2.899cm" svg:height="2.809cm" svg:x="46.047cm" svg:y="13.493cm" draw:caption-point-x="-0.611cm" draw:caption-point-y="1.51cm">
              <dc:creator>&lt;анонимный&gt;</dc:creator>
              <dc:date>2025-10-23T00:00:00</dc:date>
              <text:p text:style-name="P3"><text:span text:style-name="T1">Значение из переменной не используется, берётся константа в коде</text:span></text:p>
            </office:annotation>
            <text:p>DB59.DBW12</text:p>
          </table:table-cell>
          <table:table-cell table:style-name="ce106" office:value-type="string" calcext:value-type="string">
            <office:annotation draw:style-name="gr5" draw:text-style-name="P4" svg:width="2.899cm" svg:height="2.341cm" svg:x="49.486cm" svg:y="13.493cm" draw:caption-point-x="-0.61cm" draw:caption-point-y="1.51cm">
              <dc:creator>&lt;анонимный&gt;</dc:creator>
              <dc:date>2026-06-22T00:00:00</dc:date>
              <text:p text:style-name="P3">M160.1 — предавария, граница 5,5;</text:p>
              <text:p text:style-name="P3">у аварии граница 6,0</text:p>
            </office:annotation>
            <text:p>DB6.DBX2.7</text:p>
          </table:table-cell>
          <table:table-cell table:style-name="ce82" office:value-type="string" calcext:value-type="string">
            <text:p>IGVpositionNotAt0</text:p>
          </table:table-cell>
          <table:table-cell table:style-name="ce106" office:value-type="string" calcext:value-type="string">
            <text:p>DB60.DBW6</text:p>
          </table:table-cell>
          <table:table-cell table:style-name="ce106" office:value-type="string" calcext:value-type="string">
            <text:p>DB6.DBX8.6</text:p>
          </table:table-cell>
          <table:table-cell table:style-name="ce61" office:value-type="string" calcext:value-type="string">
            <text:p>unused</text:p>
          </table:table-cell>
          <table:table-cell table:style-name="ce106" table:number-columns-repeated="2"/>
          <table:table-cell table:style-name="ce124"/>
          <table:table-cell table:style-name="ce106" table:number-columns-repeated="2"/>
          <table:table-cell table:style-name="ce124"/>
          <table:table-cell table:style-name="ce51" office:value-type="string" calcext:value-type="string">
            <text:p>IGVPosition</text:p>
          </table:table-cell>
          <table:table-cell office:value-type="string" calcext:value-type="string">
            <text:p>DB1.DBX6.0</text:p>
          </table:table-cell>
          <table:table-cell office:value-type="string" calcext:value-type="string">
            <text:p>M180.0</text:p>
          </table:table-cell>
          <table:table-cell office:value-type="string" calcext:value-type="string">
            <text:p>M184.0</text:p>
          </table:table-cell>
          <table:table-cell table:style-name="ce59" office:value-type="string" calcext:value-type="string">
            <office:annotation draw:style-name="gr4" draw:text-style-name="P4" svg:width="2.899cm" svg:height="2.809cm" svg:x="131.773cm" svg:y="13.493cm" draw:caption-point-x="-0.61cm" draw:caption-point-y="1.51cm">
              <dc:creator>&lt;анонимный&gt;</dc:creator>
              <dc:date>2025-10-23T00:00:00</dc:date>
              <text:p text:style-name="P3"><text:span text:style-name="T1">Значение из переменной не используется, берётся константа в коде</text:span></text:p>
            </office:annotation>
            <text:p>DB3.DBW304</text:p>
          </table:table-cell>
          <table:table-cell table:number-columns-repeated="2" office:value-type="string" calcext:value-type="string">
            <text:p>unused</text:p>
          </table:table-cell>
          <table:table-cell/>
          <table:table-cell table:style-name="ce77"/>
          <table:table-cell/>
          <table:table-cell table:style-name="ce124" office:value-type="string" calcext:value-type="string">
            <text:p>IGV</text:p>
          </table:table-cell>
          <table:table-cell table:style-name="ce51" office:value-type="string" calcext:value-type="string">
            <text:p>Положение направляющего аппарата</text:p>
          </table:table-cell>
        </table:table-row>
        <table:table-row table:style-name="ro4">
          <table:table-cell table:style-name="ce82" office:value-type="string" calcext:value-type="string">
            <text:p>BOV</text:p>
          </table:table-cell>
          <table:table-cell table:style-name="ce94" office:value-type="string" calcext:value-type="string">
            <text:p>DB6.DBD408</text:p>
          </table:table-cell>
          <table:table-cell table:style-name="ce51" office:value-type="string" calcext:value-type="string">
            <text:p>BOV Position (Blow Off Valve)</text:p>
          </table:table-cell>
          <table:table-cell table:style-name="ce28" office:value-type="string" calcext:value-type="string">
            <text:p>FLT</text:p>
          </table:table-cell>
          <table:table-cell table:style-name="ce28" office:value-type="string" calcext:value-type="string">
            <text:p>AI</text:p>
          </table:table-cell>
          <table:table-cell table:style-name="ce54" office:value-type="float" office:value="100" calcext:value-type="float">
            <text:p>100,0</text:p>
          </table:table-cell>
          <table:table-cell table:style-name="ce28" office:value-type="string" calcext:value-type="string">
            <text:p>%</text:p>
          </table:table-cell>
          <table:table-cell table:style-name="ce94" office:value-type="string" calcext:value-type="string">
            <text:p>DB58.DBW6</text:p>
          </table:table-cell>
          <table:table-cell table:style-name="ce28" office:value-type="float" office:value="1" calcext:value-type="float">
            <text:p>1</text:p>
          </table:table-cell>
          <table:table-cell table:style-name="ce94" table:number-columns-repeated="2"/>
          <table:table-cell table:style-name="ce106" office:value-type="string" calcext:value-type="string">
            <text:p>DB59.DBW12</text:p>
          </table:table-cell>
          <table:table-cell table:style-name="ce59" office:value-type="string" calcext:value-type="string">
            <text:p>DB6.DBX2.6</text:p>
          </table:table-cell>
          <table:table-cell table:style-name="ce61" office:value-type="string" calcext:value-type="string">
            <text:p>unused</text:p>
          </table:table-cell>
          <table:table-cell table:style-name="ce106" office:value-type="string" calcext:value-type="string">
            <text:p>DB60.DBW6</text:p>
          </table:table-cell>
          <table:table-cell table:style-name="ce59" office:value-type="string" calcext:value-type="string">
            <text:p>DB6.DBX8.6</text:p>
          </table:table-cell>
          <table:table-cell table:style-name="ce61" office:value-type="string" calcext:value-type="string">
            <text:p>unused</text:p>
          </table:table-cell>
          <table:table-cell table:style-name="ce106" table:number-columns-repeated="2"/>
          <table:table-cell table:style-name="ce124"/>
          <table:table-cell table:style-name="ce106" table:number-columns-repeated="2"/>
          <table:table-cell table:style-name="ce124"/>
          <table:table-cell table:style-name="ce51" office:value-type="string" calcext:value-type="string">
            <text:p>BOVPosition</text:p>
          </table:table-cell>
          <table:table-cell office:value-type="string" calcext:value-type="string">
            <text:p>M188.1</text:p>
          </table:table-cell>
          <table:table-cell office:value-type="string" calcext:value-type="string">
            <text:p>M180.1</text:p>
          </table:table-cell>
          <table:table-cell office:value-type="string" calcext:value-type="string">
            <text:p>M184.1</text:p>
          </table:table-cell>
          <table:table-cell table:style-name="ce59" office:value-type="string" calcext:value-type="string">
            <text:p>DB3.DBW314</text:p>
          </table:table-cell>
          <table:table-cell table:number-columns-repeated="2" office:value-type="string" calcext:value-type="string">
            <text:p>unused</text:p>
          </table:table-cell>
          <table:table-cell/>
          <table:table-cell table:style-name="ce77"/>
          <table:table-cell table:number-columns-repeated="2"/>
          <table:table-cell table:style-name="ce51" office:value-type="string" calcext:value-type="string">
            <text:p>Положение продувочного клапана</text:p>
          </table:table-cell>
        </table:table-row>
        <table:table-row table:style-name="ro1">
          <table:table-cell table:style-name="ce82" office:value-type="string" calcext:value-type="string">
            <text:p>PT260</text:p>
          </table:table-cell>
          <table:table-cell table:style-name="ce94" office:value-type="string" calcext:value-type="string">
            <text:p>DB6.DBD28</text:p>
          </table:table-cell>
          <table:table-cell table:style-name="ce51" office:value-type="string" calcext:value-type="string">
            <text:p>System pressure </text:p>
          </table:table-cell>
          <table:table-cell table:style-name="ce28" office:value-type="string" calcext:value-type="string">
            <text:p>FLT</text:p>
          </table:table-cell>
          <table:table-cell table:style-name="ce28" office:value-type="string" calcext:value-type="string">
            <text:p>AI</text:p>
          </table:table-cell>
          <table:table-cell table:style-name="ce55" office:value-type="float" office:value="15" calcext:value-type="float">
            <text:p>15,00</text:p>
          </table:table-cell>
          <table:table-cell table:style-name="ce28" office:value-type="string" calcext:value-type="string">
            <text:p>kg/㎠</text:p>
          </table:table-cell>
          <table:table-cell table:style-name="ce94" office:value-type="string" calcext:value-type="string">
            <text:p>DB58.DBW12</text:p>
          </table:table-cell>
          <table:table-cell table:style-name="ce28" office:value-type="float" office:value="2" calcext:value-type="float">
            <text:p>2</text:p>
          </table:table-cell>
          <table:table-cell table:style-name="ce94" office:value-type="string" calcext:value-type="string">
            <text:p>M232.0</text:p>
          </table:table-cell>
          <table:table-cell table:style-name="ce94"/>
          <table:table-cell table:style-name="ce106" office:value-type="string" calcext:value-type="string">
            <text:p>DB59.DBW12</text:p>
          </table:table-cell>
          <table:table-cell table:style-name="ce59" office:value-type="string" calcext:value-type="string">
            <text:p>DB6.DBX2.6</text:p>
          </table:table-cell>
          <table:table-cell table:style-name="ce61" office:value-type="string" calcext:value-type="string">
            <text:p>unused</text:p>
          </table:table-cell>
          <table:table-cell table:style-name="ce59" office:value-type="string" calcext:value-type="string">
            <text:p>DB60.DBW6</text:p>
          </table:table-cell>
          <table:table-cell table:style-name="ce59" office:value-type="string" calcext:value-type="string">
            <text:p>DB6.DBX8.6</text:p>
          </table:table-cell>
          <table:table-cell table:style-name="ce61" office:value-type="string" calcext:value-type="string">
            <text:p>unused</text:p>
          </table:table-cell>
          <table:table-cell table:style-name="ce106" table:number-columns-repeated="2"/>
          <table:table-cell table:style-name="ce124"/>
          <table:table-cell table:style-name="ce106" table:number-columns-repeated="2"/>
          <table:table-cell table:style-name="ce124"/>
          <table:table-cell table:style-name="ce51" office:value-type="string" calcext:value-type="string">
            <text:p>SystemPressure</text:p>
          </table:table-cell>
          <table:table-cell office:value-type="string" calcext:value-type="string">
            <text:p>M188.2</text:p>
          </table:table-cell>
          <table:table-cell office:value-type="string" calcext:value-type="string">
            <text:p>M180.2</text:p>
          </table:table-cell>
          <table:table-cell office:value-type="string" calcext:value-type="string">
            <text:p>M184.2</text:p>
          </table:table-cell>
          <table:table-cell table:style-name="ce59" office:value-type="string" calcext:value-type="string">
            <text:p>DB3.DBW314</text:p>
          </table:table-cell>
          <table:table-cell table:number-columns-repeated="2" office:value-type="string" calcext:value-type="string">
            <text:p>unused</text:p>
          </table:table-cell>
          <table:table-cell office:value-type="string" calcext:value-type="string">
            <text:p>DB3.DBW208</text:p>
          </table:table-cell>
          <table:table-cell table:style-name="ce77"/>
          <table:table-cell/>
          <table:table-cell table:style-name="ce82" office:value-type="string" calcext:value-type="string">
            <text:p>PT260</text:p>
          </table:table-cell>
          <table:table-cell table:style-name="ce51" office:value-type="string" calcext:value-type="string">
            <text:p>Давление на напоре</text:p>
          </table:table-cell>
        </table:table-row>
        <table:table-row table:style-name="ro1">
          <table:table-cell table:style-name="ce82" office:value-type="string" calcext:value-type="string">
            <text:p>PT232</text:p>
          </table:table-cell>
          <table:table-cell table:style-name="ce94" office:value-type="string" calcext:value-type="string">
            <text:p>DB6.DBD32</text:p>
          </table:table-cell>
          <table:table-cell table:style-name="ce51" office:value-type="string" calcext:value-type="string">
            <text:p>Stage 3 discharge pressure</text:p>
          </table:table-cell>
          <table:table-cell table:style-name="ce28" office:value-type="string" calcext:value-type="string">
            <text:p>FLT</text:p>
          </table:table-cell>
          <table:table-cell table:style-name="ce28" office:value-type="string" calcext:value-type="string">
            <text:p>AI</text:p>
          </table:table-cell>
          <table:table-cell table:style-name="ce55" office:value-type="float" office:value="15" calcext:value-type="float">
            <text:p>15,00</text:p>
          </table:table-cell>
          <table:table-cell table:style-name="ce28" office:value-type="string" calcext:value-type="string">
            <text:p>kg/㎠</text:p>
          </table:table-cell>
          <table:table-cell table:style-name="ce94" office:value-type="string" calcext:value-type="string">
            <text:p>DB58.DBW14</text:p>
          </table:table-cell>
          <table:table-cell table:style-name="ce28" office:value-type="float" office:value="2" calcext:value-type="float">
            <text:p>2</text:p>
          </table:table-cell>
          <table:table-cell table:style-name="ce94" office:value-type="string" calcext:value-type="string">
            <text:p>M232.1</text:p>
          </table:table-cell>
          <table:table-cell table:style-name="ce94"/>
          <table:table-cell table:style-name="ce106" office:value-type="string" calcext:value-type="string">
            <text:p>DB59.DBW12</text:p>
          </table:table-cell>
          <table:table-cell table:style-name="ce59" office:value-type="string" calcext:value-type="string">
            <text:p>DB6.DBX2.6</text:p>
          </table:table-cell>
          <table:table-cell table:style-name="ce61" office:value-type="string" calcext:value-type="string">
            <text:p>unused</text:p>
          </table:table-cell>
          <table:table-cell table:style-name="ce59" office:value-type="string" calcext:value-type="string">
            <text:p>DB60.DBW6</text:p>
          </table:table-cell>
          <table:table-cell table:style-name="ce59" office:value-type="string" calcext:value-type="string">
            <text:p>DB6.DBX8.6</text:p>
          </table:table-cell>
          <table:table-cell table:style-name="ce61" office:value-type="string" calcext:value-type="string">
            <text:p>unused</text:p>
          </table:table-cell>
          <table:table-cell table:style-name="ce106" table:number-columns-repeated="2"/>
          <table:table-cell table:style-name="ce124"/>
          <table:table-cell table:style-name="ce106" table:number-columns-repeated="2"/>
          <table:table-cell table:style-name="ce124"/>
          <table:table-cell table:style-name="ce51" office:value-type="string" calcext:value-type="string">
            <text:p>Stage3DischargePressure</text:p>
          </table:table-cell>
          <table:table-cell office:value-type="string" calcext:value-type="string">
            <text:p>M188.3</text:p>
          </table:table-cell>
          <table:table-cell office:value-type="string" calcext:value-type="string">
            <text:p>M180.3</text:p>
          </table:table-cell>
          <table:table-cell office:value-type="string" calcext:value-type="string">
            <text:p>M184.3</text:p>
          </table:table-cell>
          <table:table-cell table:style-name="ce59" office:value-type="string" calcext:value-type="string">
            <text:p>DB3.DBW314</text:p>
          </table:table-cell>
          <table:table-cell table:number-columns-repeated="2" office:value-type="string" calcext:value-type="string">
            <text:p>unused</text:p>
          </table:table-cell>
          <table:table-cell office:value-type="string" calcext:value-type="string">
            <text:p>DB3.DBW228</text:p>
          </table:table-cell>
          <table:table-cell table:style-name="ce77"/>
          <table:table-cell/>
          <table:table-cell table:style-name="ce124" office:value-type="string" calcext:value-type="string">
            <text:p>PT232</text:p>
          </table:table-cell>
          <table:table-cell table:style-name="ce51" office:value-type="string" calcext:value-type="string">
            <text:p>Давление 3 ступени</text:p>
          </table:table-cell>
        </table:table-row>
        <table:table-row table:style-name="ro1">
          <table:table-cell table:style-name="ce82" office:value-type="string" calcext:value-type="string">
            <text:p>PT130</text:p>
          </table:table-cell>
          <table:table-cell table:style-name="ce94" office:value-type="string" calcext:value-type="string">
            <text:p>DB6.DBD36</text:p>
          </table:table-cell>
          <table:table-cell table:style-name="ce51" office:value-type="string" calcext:value-type="string">
            <text:p>Oil supply pressure</text:p>
          </table:table-cell>
          <table:table-cell table:style-name="ce28" office:value-type="string" calcext:value-type="string">
            <text:p>FLT</text:p>
          </table:table-cell>
          <table:table-cell table:style-name="ce28" office:value-type="string" calcext:value-type="string">
            <text:p>AI</text:p>
          </table:table-cell>
          <table:table-cell table:style-name="ce55" office:value-type="float" office:value="5" calcext:value-type="float">
            <text:p>5,00</text:p>
          </table:table-cell>
          <table:table-cell table:style-name="ce28" office:value-type="string" calcext:value-type="string">
            <text:p>kg/㎠</text:p>
          </table:table-cell>
          <table:table-cell table:style-name="ce94" office:value-type="string" calcext:value-type="string">
            <text:p>DB58.DBW16</text:p>
          </table:table-cell>
          <table:table-cell table:style-name="ce28" office:value-type="float" office:value="2" calcext:value-type="float">
            <text:p>2</text:p>
          </table:table-cell>
          <table:table-cell table:style-name="ce94" office:value-type="string" calcext:value-type="string">
            <text:p>M232.2</text:p>
          </table:table-cell>
          <table:table-cell table:style-name="ce94"/>
          <table:table-cell table:style-name="ce106" office:value-type="string" calcext:value-type="string">
            <text:p>DB59.DBW116</text:p>
          </table:table-cell>
          <table:table-cell table:style-name="ce106" office:value-type="string" calcext:value-type="string">
            <text:p>DB6.DBX5.0</text:p>
          </table:table-cell>
          <table:table-cell table:style-name="ce111" office:value-type="string" calcext:value-type="string">
            <text:p>Oil supply pressure low alarm</text:p>
          </table:table-cell>
          <table:table-cell table:style-name="ce106" office:value-type="string" calcext:value-type="string">
            <text:p>DB60.DBW16</text:p>
          </table:table-cell>
          <table:table-cell table:style-name="ce106" office:value-type="string" calcext:value-type="string">
            <text:p>DB6.DBX9.0</text:p>
          </table:table-cell>
          <table:table-cell table:style-name="ce111" office:value-type="string" calcext:value-type="string">
            <text:p>Oil supply pressure low danger</text:p>
          </table:table-cell>
          <table:table-cell table:style-name="ce106" table:number-columns-repeated="2"/>
          <table:table-cell table:style-name="ce111"/>
          <table:table-cell table:style-name="ce106" table:number-columns-repeated="2"/>
          <table:table-cell table:style-name="ce111"/>
          <table:table-cell table:style-name="ce51" office:value-type="string" calcext:value-type="string">
            <text:p>OilSupplyPressure</text:p>
          </table:table-cell>
          <table:table-cell office:value-type="string" calcext:value-type="string">
            <text:p>M188.4</text:p>
          </table:table-cell>
          <table:table-cell office:value-type="string" calcext:value-type="string">
            <text:p>M180.4</text:p>
          </table:table-cell>
          <table:table-cell office:value-type="string" calcext:value-type="string">
            <text:p>M184.4</text:p>
          </table:table-cell>
          <table:table-cell table:style-name="ce106" office:value-type="string" calcext:value-type="string">
            <text:p>DB3.DBW316</text:p>
          </table:table-cell>
          <table:table-cell table:number-columns-repeated="2" office:value-type="string" calcext:value-type="string">
            <text:p>non-switchable</text:p>
          </table:table-cell>
          <table:table-cell table:style-name="ce125"/>
          <table:table-cell table:style-name="ce77"/>
          <table:table-cell/>
          <table:table-cell table:style-name="ce124" office:value-type="string" calcext:value-type="string">
            <text:p>PT130</text:p>
          </table:table-cell>
          <table:table-cell table:style-name="ce51" office:value-type="string" calcext:value-type="string">
            <text:p>Давление масла</text:p>
          </table:table-cell>
        </table:table-row>
        <table:table-row table:style-name="ro4">
          <table:table-cell table:style-name="ce82" office:value-type="string" calcext:value-type="string">
            <text:p>VT#1</text:p>
          </table:table-cell>
          <table:table-cell table:style-name="ce94" office:value-type="string" calcext:value-type="string">
            <text:p>DB6.DBD40</text:p>
          </table:table-cell>
          <table:table-cell table:style-name="ce51" office:value-type="string" calcext:value-type="string">
            <text:p>Stage 1 Vibration</text:p>
          </table:table-cell>
          <table:table-cell table:style-name="ce28" office:value-type="string" calcext:value-type="string">
            <text:p>FLT</text:p>
          </table:table-cell>
          <table:table-cell table:style-name="ce28" office:value-type="string" calcext:value-type="string">
            <text:p>AI</text:p>
          </table:table-cell>
          <table:table-cell table:style-name="ce54" office:value-type="float" office:value="127" calcext:value-type="float">
            <text:p>127,0</text:p>
          </table:table-cell>
          <table:table-cell table:style-name="ce28" office:value-type="string" calcext:value-type="string">
            <text:p>㎛</text:p>
          </table:table-cell>
          <table:table-cell table:style-name="ce94" office:value-type="string" calcext:value-type="string">
            <text:p>DB58.DBW18</text:p>
          </table:table-cell>
          <table:table-cell table:style-name="ce28" office:value-type="float" office:value="1" calcext:value-type="float">
            <text:p>1</text:p>
          </table:table-cell>
          <table:table-cell table:style-name="ce94" office:value-type="string" calcext:value-type="string">
            <text:p>M232.3</text:p>
          </table:table-cell>
          <table:table-cell table:style-name="ce94"/>
          <table:table-cell table:style-name="ce106" office:value-type="string" calcext:value-type="string">
            <text:p>DB62.DBW192</text:p>
          </table:table-cell>
          <table:table-cell table:style-name="ce106" office:value-type="string" calcext:value-type="string">
            <text:p>DB6.DBX5.1</text:p>
          </table:table-cell>
          <table:table-cell table:style-name="ce111" office:value-type="string" calcext:value-type="string">
            <text:p>Vibtation stage 1X high alarm</text:p>
          </table:table-cell>
          <table:table-cell table:style-name="ce106" office:value-type="string" calcext:value-type="string">
            <text:p>DB62.DBW198</text:p>
          </table:table-cell>
          <table:table-cell table:style-name="ce106" office:value-type="string" calcext:value-type="string">
            <text:p>DB6.DBX9.1</text:p>
          </table:table-cell>
          <table:table-cell table:style-name="ce111" office:value-type="string" calcext:value-type="string">
            <text:p>Vibtation stage 1X high danger</text:p>
          </table:table-cell>
          <table:table-cell table:style-name="ce106" table:number-columns-repeated="2"/>
          <table:table-cell table:style-name="ce111"/>
          <table:table-cell table:style-name="ce106" table:number-columns-repeated="2"/>
          <table:table-cell table:style-name="ce111"/>
          <table:table-cell table:style-name="ce51" office:value-type="string" calcext:value-type="string">
            <text:p>Stage1Vibration</text:p>
          </table:table-cell>
          <table:table-cell office:value-type="string" calcext:value-type="string">
            <text:p>M188.5</text:p>
          </table:table-cell>
          <table:table-cell office:value-type="string" calcext:value-type="string">
            <text:p>M180.5</text:p>
          </table:table-cell>
          <table:table-cell office:value-type="string" calcext:value-type="string">
            <text:p>M184.5</text:p>
          </table:table-cell>
          <table:table-cell table:style-name="ce106" office:value-type="string" calcext:value-type="string">
            <text:p>DB3.DBW318</text:p>
          </table:table-cell>
          <table:table-cell table:number-columns-repeated="2" office:value-type="string" calcext:value-type="string">
            <text:p>non-switchable</text:p>
          </table:table-cell>
          <table:table-cell/>
          <table:table-cell table:style-name="ce77"/>
          <table:table-cell/>
          <table:table-cell table:style-name="ce124" office:value-type="string" calcext:value-type="string">
            <text:p>VT#1</text:p>
          </table:table-cell>
          <table:table-cell table:style-name="ce51" office:value-type="string" calcext:value-type="string">
            <text:p>Вибрация 1 ступени</text:p>
          </table:table-cell>
        </table:table-row>
        <table:table-row table:style-name="ro4">
          <table:table-cell table:style-name="ce82" office:value-type="string" calcext:value-type="string">
            <text:p>VT#2</text:p>
          </table:table-cell>
          <table:table-cell table:style-name="ce94" office:value-type="string" calcext:value-type="string">
            <text:p>DB6.DBD44</text:p>
          </table:table-cell>
          <table:table-cell table:style-name="ce51" office:value-type="string" calcext:value-type="string">
            <text:p>Stage 2 Vibration</text:p>
          </table:table-cell>
          <table:table-cell table:style-name="ce28" office:value-type="string" calcext:value-type="string">
            <text:p>FLT</text:p>
          </table:table-cell>
          <table:table-cell table:style-name="ce28" office:value-type="string" calcext:value-type="string">
            <text:p>AI</text:p>
          </table:table-cell>
          <table:table-cell table:style-name="ce54" office:value-type="float" office:value="127" calcext:value-type="float">
            <text:p>127,0</text:p>
          </table:table-cell>
          <table:table-cell table:style-name="ce28" office:value-type="string" calcext:value-type="string">
            <text:p>㎛</text:p>
          </table:table-cell>
          <table:table-cell table:style-name="ce94" office:value-type="string" calcext:value-type="string">
            <text:p>DB58.DBW20</text:p>
          </table:table-cell>
          <table:table-cell table:style-name="ce28" office:value-type="float" office:value="1" calcext:value-type="float">
            <text:p>1</text:p>
          </table:table-cell>
          <table:table-cell table:style-name="ce94" office:value-type="string" calcext:value-type="string">
            <text:p>M232.4</text:p>
          </table:table-cell>
          <table:table-cell table:style-name="ce94" office:value-type="string" calcext:value-type="string">
            <text:p>3...18 мА</text:p>
          </table:table-cell>
          <table:table-cell table:style-name="ce106" office:value-type="string" calcext:value-type="string">
            <text:p>DB62.DBW194</text:p>
          </table:table-cell>
          <table:table-cell table:style-name="ce106" office:value-type="string" calcext:value-type="string">
            <text:p>DB6.DBX5.2</text:p>
          </table:table-cell>
          <table:table-cell table:style-name="ce111" office:value-type="string" calcext:value-type="string">
            <text:p>Vibtation stage 2X high alarm</text:p>
          </table:table-cell>
          <table:table-cell table:style-name="ce106" office:value-type="string" calcext:value-type="string">
            <text:p>DB63.DBW0</text:p>
          </table:table-cell>
          <table:table-cell table:style-name="ce106" office:value-type="string" calcext:value-type="string">
            <text:p>DB6.DBX9.2</text:p>
          </table:table-cell>
          <table:table-cell table:style-name="ce111" office:value-type="string" calcext:value-type="string">
            <text:p>Vibtation stage 2X high danger</text:p>
          </table:table-cell>
          <table:table-cell table:style-name="ce106" table:number-columns-repeated="2"/>
          <table:table-cell table:style-name="ce111"/>
          <table:table-cell table:style-name="ce106" table:number-columns-repeated="2"/>
          <table:table-cell table:style-name="ce111"/>
          <table:table-cell table:style-name="ce51" office:value-type="string" calcext:value-type="string">
            <text:p>Stage2Vibration</text:p>
          </table:table-cell>
          <table:table-cell office:value-type="string" calcext:value-type="string">
            <text:p>M188.6</text:p>
          </table:table-cell>
          <table:table-cell office:value-type="string" calcext:value-type="string">
            <text:p>M180.6</text:p>
          </table:table-cell>
          <table:table-cell office:value-type="string" calcext:value-type="string">
            <text:p>M184.6</text:p>
          </table:table-cell>
          <table:table-cell table:style-name="ce106" office:value-type="string" calcext:value-type="string">
            <text:p>DB3.DBW320</text:p>
          </table:table-cell>
          <table:table-cell table:number-columns-repeated="2" office:value-type="string" calcext:value-type="string">
            <text:p>non-switchable</text:p>
          </table:table-cell>
          <table:table-cell/>
          <table:table-cell table:style-name="ce77"/>
          <table:table-cell/>
          <table:table-cell table:style-name="ce124" office:value-type="string" calcext:value-type="string">
            <text:p>VT#2</text:p>
          </table:table-cell>
          <table:table-cell table:style-name="ce51" office:value-type="string" calcext:value-type="string">
            <text:p>Вибрация 2 ступени</text:p>
          </table:table-cell>
        </table:table-row>
        <table:table-row table:style-name="ro4">
          <table:table-cell table:style-name="ce82" office:value-type="string" calcext:value-type="string">
            <text:p>VT#3</text:p>
          </table:table-cell>
          <table:table-cell table:style-name="ce94" office:value-type="string" calcext:value-type="string">
            <text:p>DB6.DBD48</text:p>
          </table:table-cell>
          <table:table-cell table:style-name="ce51" office:value-type="string" calcext:value-type="string">
            <text:p>Stage 3 Vibration</text:p>
          </table:table-cell>
          <table:table-cell table:style-name="ce28" office:value-type="string" calcext:value-type="string">
            <text:p>FLT</text:p>
          </table:table-cell>
          <table:table-cell table:style-name="ce28" office:value-type="string" calcext:value-type="string">
            <text:p>AI</text:p>
          </table:table-cell>
          <table:table-cell table:style-name="ce54" office:value-type="float" office:value="127" calcext:value-type="float">
            <text:p>127,0</text:p>
          </table:table-cell>
          <table:table-cell table:style-name="ce28" office:value-type="string" calcext:value-type="string">
            <text:p>㎛</text:p>
          </table:table-cell>
          <table:table-cell table:style-name="ce94" office:value-type="string" calcext:value-type="string">
            <text:p>DB58.DBW22</text:p>
          </table:table-cell>
          <table:table-cell table:style-name="ce28" office:value-type="float" office:value="1" calcext:value-type="float">
            <text:p>1</text:p>
          </table:table-cell>
          <table:table-cell table:style-name="ce94" office:value-type="string" calcext:value-type="string">
            <text:p>M232.5</text:p>
          </table:table-cell>
          <table:table-cell table:style-name="ce94"/>
          <table:table-cell table:style-name="ce106" office:value-type="string" calcext:value-type="string">
            <text:p>DB62.DBW196</text:p>
          </table:table-cell>
          <table:table-cell table:style-name="ce106" office:value-type="string" calcext:value-type="string">
            <text:p>DB6.DBX5.3</text:p>
          </table:table-cell>
          <table:table-cell table:style-name="ce111" office:value-type="string" calcext:value-type="string">
            <text:p>Vibtation stage 3X high alarm</text:p>
          </table:table-cell>
          <table:table-cell table:style-name="ce106" office:value-type="string" calcext:value-type="string">
            <text:p>DB63.DBW2</text:p>
          </table:table-cell>
          <table:table-cell table:style-name="ce106" office:value-type="string" calcext:value-type="string">
            <text:p>DB6.DBX9.3</text:p>
          </table:table-cell>
          <table:table-cell table:style-name="ce111" office:value-type="string" calcext:value-type="string">
            <text:p>Vibtation stage 3X high danger</text:p>
          </table:table-cell>
          <table:table-cell table:style-name="ce106" table:number-columns-repeated="2"/>
          <table:table-cell table:style-name="ce111"/>
          <table:table-cell table:style-name="ce106" table:number-columns-repeated="2"/>
          <table:table-cell table:style-name="ce111"/>
          <table:table-cell table:style-name="ce51" office:value-type="string" calcext:value-type="string">
            <text:p>Stage3Vibration</text:p>
          </table:table-cell>
          <table:table-cell office:value-type="string" calcext:value-type="string">
            <text:p>M188.7</text:p>
          </table:table-cell>
          <table:table-cell office:value-type="string" calcext:value-type="string">
            <text:p>M180.7</text:p>
          </table:table-cell>
          <table:table-cell office:value-type="string" calcext:value-type="string">
            <text:p>M184.7</text:p>
          </table:table-cell>
          <table:table-cell table:style-name="ce106" office:value-type="string" calcext:value-type="string">
            <text:p>DB3.DBW322</text:p>
          </table:table-cell>
          <table:table-cell table:number-columns-repeated="2" office:value-type="string" calcext:value-type="string">
            <text:p>non-switchable</text:p>
          </table:table-cell>
          <table:table-cell/>
          <table:table-cell table:style-name="ce77"/>
          <table:table-cell/>
          <table:table-cell table:style-name="ce124" office:value-type="string" calcext:value-type="string">
            <text:p>VT#3</text:p>
          </table:table-cell>
          <table:table-cell table:style-name="ce51" office:value-type="string" calcext:value-type="string">
            <text:p>Вибрация 3 ступени</text:p>
          </table:table-cell>
        </table:table-row>
        <table:table-row table:style-name="ro1">
          <table:table-cell table:style-name="ce82" office:value-type="string" calcext:value-type="string">
            <text:p>PDT120</text:p>
          </table:table-cell>
          <table:table-cell table:style-name="ce94" office:value-type="string" calcext:value-type="string">
            <text:p>DB6.DBD52</text:p>
          </table:table-cell>
          <table:table-cell table:style-name="ce51" office:value-type="string" calcext:value-type="string">
            <text:p>Oil filter diff pressure <text:s/></text:p>
          </table:table-cell>
          <table:table-cell table:style-name="ce28" office:value-type="string" calcext:value-type="string">
            <text:p>FLT</text:p>
          </table:table-cell>
          <table:table-cell table:style-name="ce28" office:value-type="string" calcext:value-type="string">
            <text:p>AI</text:p>
          </table:table-cell>
          <table:table-cell table:style-name="ce55" office:value-type="float" office:value="3.5" calcext:value-type="float">
            <text:p>3,50</text:p>
          </table:table-cell>
          <table:table-cell table:style-name="ce28" office:value-type="string" calcext:value-type="string">
            <text:p>kg/㎠</text:p>
          </table:table-cell>
          <table:table-cell table:style-name="ce94" office:value-type="string" calcext:value-type="string">
            <text:p>DB58.DBW24</text:p>
          </table:table-cell>
          <table:table-cell table:style-name="ce28" office:value-type="float" office:value="2" calcext:value-type="float">
            <text:p>2</text:p>
          </table:table-cell>
          <table:table-cell table:style-name="ce94" office:value-type="string" calcext:value-type="string">
            <text:p>M232.6</text:p>
          </table:table-cell>
          <table:table-cell table:style-name="ce94"/>
          <table:table-cell table:style-name="ce106" office:value-type="string" calcext:value-type="string">
            <text:p>DB59.DBW124</text:p>
          </table:table-cell>
          <table:table-cell table:style-name="ce106" office:value-type="string" calcext:value-type="string">
            <text:p>DB6.DBX4.5</text:p>
          </table:table-cell>
          <table:table-cell table:style-name="ce111" office:value-type="string" calcext:value-type="string">
            <text:p>Oil filter diff pressure high alarm</text:p>
          </table:table-cell>
          <table:table-cell table:style-name="ce106" office:value-type="string" calcext:value-type="string">
            <text:p>DB60.DBW6</text:p>
          </table:table-cell>
          <table:table-cell table:style-name="ce59" office:value-type="string" calcext:value-type="string">
            <text:p>DB6.DBX9.4</text:p>
          </table:table-cell>
          <table:table-cell table:style-name="ce61" office:value-type="string" calcext:value-type="string">
            <text:p>unused</text:p>
          </table:table-cell>
          <table:table-cell table:style-name="ce106" table:number-columns-repeated="2"/>
          <table:table-cell table:style-name="ce82"/>
          <table:table-cell table:style-name="ce106" table:number-columns-repeated="2"/>
          <table:table-cell table:style-name="ce82"/>
          <table:table-cell table:style-name="ce51" office:value-type="string" calcext:value-type="string">
            <text:p>OilFilterDiffPressure</text:p>
          </table:table-cell>
          <table:table-cell office:value-type="string" calcext:value-type="string">
            <text:p>DB1.DBX0.1</text:p>
          </table:table-cell>
          <table:table-cell office:value-type="string" calcext:value-type="string">
            <text:p>DB1.DBX14.3</text:p>
          </table:table-cell>
          <table:table-cell office:value-type="string" calcext:value-type="string">
            <text:p>M185.0</text:p>
          </table:table-cell>
          <table:table-cell table:style-name="ce106" office:value-type="string" calcext:value-type="string">
            <text:p>DB3.DBW324</text:p>
          </table:table-cell>
          <table:table-cell table:style-name="ce125" office:value-type="string" calcext:value-type="string">
            <text:p>M181.0</text:p>
          </table:table-cell>
          <table:table-cell office:value-type="string" calcext:value-type="string">
            <text:p>unused</text:p>
          </table:table-cell>
          <table:table-cell/>
          <table:table-cell table:style-name="ce77"/>
          <table:table-cell/>
          <table:table-cell table:style-name="ce124" office:value-type="string" calcext:value-type="string">
            <text:p>PDT120</text:p>
          </table:table-cell>
          <table:table-cell table:style-name="ce51" office:value-type="string" calcext:value-type="string">
            <text:p>Перепад давления масла на маслофильтре </text:p>
          </table:table-cell>
        </table:table-row>
        <table:table-row table:style-name="ro4">
          <table:table-cell table:style-name="ce82" office:value-type="string" calcext:value-type="string">
            <text:p>TD140</text:p>
          </table:table-cell>
          <table:table-cell table:style-name="ce94" office:value-type="string" calcext:value-type="string">
            <text:p>DB6.DBD56</text:p>
          </table:table-cell>
          <table:table-cell table:style-name="ce51" office:value-type="string" calcext:value-type="string">
            <text:p>Motor current</text:p>
          </table:table-cell>
          <table:table-cell table:style-name="ce28" office:value-type="string" calcext:value-type="string">
            <text:p>FLT</text:p>
          </table:table-cell>
          <table:table-cell table:style-name="ce28" office:value-type="string" calcext:value-type="string">
            <text:p>AI</text:p>
          </table:table-cell>
          <table:table-cell table:style-name="ce54" office:value-type="float" office:value="150" calcext:value-type="float">
            <text:p>150,0</text:p>
          </table:table-cell>
          <table:table-cell table:style-name="ce28" office:value-type="string" calcext:value-type="string">
            <text:p>A</text:p>
          </table:table-cell>
          <table:table-cell table:style-name="ce94" office:value-type="string" calcext:value-type="string">
            <text:p>DB58.DBW26</text:p>
          </table:table-cell>
          <table:table-cell table:style-name="ce28" office:value-type="float" office:value="1" calcext:value-type="float">
            <text:p>1</text:p>
          </table:table-cell>
          <table:table-cell table:style-name="ce94" office:value-type="string" calcext:value-type="string">
            <text:p>M232.7</text:p>
          </table:table-cell>
          <table:table-cell table:style-name="ce94"/>
          <table:table-cell table:style-name="ce106" office:value-type="string" calcext:value-type="string">
            <text:p>DB59.DBW126</text:p>
          </table:table-cell>
          <table:table-cell table:style-name="ce106" office:value-type="string" calcext:value-type="string">
            <text:p>DB6.DBX5.5</text:p>
          </table:table-cell>
          <table:table-cell table:style-name="ce111" office:value-type="string" calcext:value-type="string">
            <text:p>Motor current (CT) alarm</text:p>
          </table:table-cell>
          <table:table-cell table:style-name="ce106" office:value-type="string" calcext:value-type="string">
            <text:p>DB60.DBW26</text:p>
          </table:table-cell>
          <table:table-cell table:style-name="ce106" office:value-type="string" calcext:value-type="string">
            <text:p>DB6.DBX9.5</text:p>
          </table:table-cell>
          <table:table-cell table:style-name="ce111" office:value-type="string" calcext:value-type="string">
            <text:p>Motor current danger</text:p>
          </table:table-cell>
          <table:table-cell table:style-name="ce106" table:number-columns-repeated="2"/>
          <table:table-cell table:style-name="ce111"/>
          <table:table-cell table:style-name="ce106" table:number-columns-repeated="2"/>
          <table:table-cell table:style-name="ce111"/>
          <table:table-cell table:style-name="ce51" office:value-type="string" calcext:value-type="string">
            <text:p>MotorCurrent</text:p>
          </table:table-cell>
          <table:table-cell office:value-type="string" calcext:value-type="string">
            <text:p>M189.1</text:p>
          </table:table-cell>
          <table:table-cell office:value-type="string" calcext:value-type="string">
            <text:p>M181.1</text:p>
          </table:table-cell>
          <table:table-cell office:value-type="string" calcext:value-type="string">
            <text:p>DB1.DBX14.4</text:p>
          </table:table-cell>
          <table:table-cell table:style-name="ce106" office:value-type="string" calcext:value-type="string">
            <text:p>DB3.DBW326</text:p>
          </table:table-cell>
          <table:table-cell office:value-type="string" calcext:value-type="string">
            <text:p>non-switchable</text:p>
          </table:table-cell>
          <table:table-cell table:style-name="ce80" office:value-type="string" calcext:value-type="string">
            <text:p>M185.1</text:p>
          </table:table-cell>
          <table:table-cell/>
          <table:table-cell table:style-name="ce77"/>
          <table:table-cell/>
          <table:table-cell table:style-name="ce124" office:value-type="string" calcext:value-type="string">
            <text:p>TD140</text:p>
          </table:table-cell>
          <table:table-cell table:style-name="ce51" office:value-type="string" calcext:value-type="string">
            <text:p>Ток двигателя</text:p>
          </table:table-cell>
        </table:table-row>
        <table:table-row table:style-name="ro1">
          <table:table-cell table:style-name="ce82" office:value-type="string" calcext:value-type="string">
            <text:p>PT301</text:p>
          </table:table-cell>
          <table:table-cell table:style-name="ce94" office:value-type="string" calcext:value-type="string">
            <text:p>DB6.DBD164</text:p>
          </table:table-cell>
          <table:table-cell table:style-name="ce51" office:value-type="string" calcext:value-type="string">
            <text:p>Cooling water supply pressure</text:p>
          </table:table-cell>
          <table:table-cell table:style-name="ce28" office:value-type="string" calcext:value-type="string">
            <text:p>FLT</text:p>
          </table:table-cell>
          <table:table-cell table:style-name="ce28" office:value-type="string" calcext:value-type="string">
            <text:p>AI</text:p>
          </table:table-cell>
          <table:table-cell table:style-name="ce55" office:value-type="float" office:value="5" calcext:value-type="float">
            <text:p>5,00</text:p>
          </table:table-cell>
          <table:table-cell table:style-name="ce28" office:value-type="string" calcext:value-type="string">
            <text:p>kg/㎠</text:p>
          </table:table-cell>
          <table:table-cell table:style-name="ce94" office:value-type="string" calcext:value-type="string">
            <text:p>DB58.DBW56</text:p>
          </table:table-cell>
          <table:table-cell table:style-name="ce28" office:value-type="float" office:value="2" calcext:value-type="float">
            <text:p>2</text:p>
          </table:table-cell>
          <table:table-cell table:style-name="ce94" office:value-type="string" calcext:value-type="string">
            <text:p>M233.6</text:p>
          </table:table-cell>
          <table:table-cell table:style-name="ce94"/>
          <table:table-cell table:style-name="ce106" office:value-type="string" calcext:value-type="string">
            <text:p>DB59.DBW12</text:p>
          </table:table-cell>
          <table:table-cell table:style-name="ce106" office:value-type="string" calcext:value-type="string">
            <text:p>DB6.DBX2.6</text:p>
          </table:table-cell>
          <table:table-cell table:style-name="ce61" office:value-type="string" calcext:value-type="string">
            <text:p>unused</text:p>
          </table:table-cell>
          <table:table-cell table:style-name="ce106" office:value-type="string" calcext:value-type="string">
            <text:p>DB60.DBW6</text:p>
          </table:table-cell>
          <table:table-cell table:style-name="ce59" office:value-type="string" calcext:value-type="string">
            <text:p>DB6.DBX8.6</text:p>
          </table:table-cell>
          <table:table-cell table:style-name="ce61" office:value-type="string" calcext:value-type="string">
            <text:p>unused</text:p>
          </table:table-cell>
          <table:table-cell table:style-name="ce106" table:number-columns-repeated="2"/>
          <table:table-cell table:style-name="ce82"/>
          <table:table-cell table:style-name="ce106" table:number-columns-repeated="2"/>
          <table:table-cell table:style-name="ce82"/>
          <table:table-cell table:style-name="ce51" office:value-type="string" calcext:value-type="string">
            <text:p>CoolingWaterSupplyPressure</text:p>
          </table:table-cell>
          <table:table-cell office:value-type="string" calcext:value-type="string">
            <text:p>DB1.DBX10.2</text:p>
          </table:table-cell>
          <table:table-cell office:value-type="string" calcext:value-type="string">
            <text:p>DB1.DBX11.2</text:p>
          </table:table-cell>
          <table:table-cell office:value-type="string" calcext:value-type="string">
            <text:p>M185.2</text:p>
          </table:table-cell>
          <table:table-cell table:style-name="ce106" office:value-type="string" calcext:value-type="string">
            <text:p>DB3.DBW358</text:p>
          </table:table-cell>
          <table:table-cell table:style-name="ce125" office:value-type="string" calcext:value-type="string">
            <text:p>M181.2</text:p>
          </table:table-cell>
          <table:table-cell office:value-type="string" calcext:value-type="string">
            <text:p>unused</text:p>
          </table:table-cell>
          <table:table-cell/>
          <table:table-cell table:style-name="ce77"/>
          <table:table-cell/>
          <table:table-cell table:style-name="ce124" office:value-type="string" calcext:value-type="string">
            <text:p>PT301</text:p>
          </table:table-cell>
          <table:table-cell table:style-name="ce51" office:value-type="string" calcext:value-type="string">
            <text:p>Давление охлаждающей воды</text:p>
          </table:table-cell>
        </table:table-row>
        <table:table-row table:style-name="ro4">
          <table:table-cell table:style-name="ce82" office:value-type="string" calcext:value-type="string">
            <text:p>VT#5</text:p>
          </table:table-cell>
          <table:table-cell table:style-name="ce94" office:value-type="string" calcext:value-type="string">
            <text:p>DB6.DBD76</text:p>
          </table:table-cell>
          <table:table-cell table:style-name="ce51" office:value-type="string" calcext:value-type="string">
            <text:p>Motor bearing Drive End (DE) vibration</text:p>
          </table:table-cell>
          <table:table-cell table:style-name="ce28" office:value-type="string" calcext:value-type="string">
            <text:p>FLT</text:p>
          </table:table-cell>
          <table:table-cell table:style-name="ce28" office:value-type="string" calcext:value-type="string">
            <text:p>AI</text:p>
          </table:table-cell>
          <table:table-cell table:style-name="ce55" office:value-type="float" office:value="20" calcext:value-type="float">
            <text:p>20,00</text:p>
          </table:table-cell>
          <table:table-cell table:style-name="ce28" office:value-type="string" calcext:value-type="string">
            <text:p>mm/s</text:p>
          </table:table-cell>
          <table:table-cell table:style-name="ce94" office:value-type="string" calcext:value-type="string">
            <text:p>DB58.DBW52</text:p>
          </table:table-cell>
          <table:table-cell table:style-name="ce28" office:value-type="float" office:value="1" calcext:value-type="float">
            <text:p>1</text:p>
          </table:table-cell>
          <table:table-cell table:style-name="ce94" office:value-type="string" calcext:value-type="string">
            <text:p>M233.4</text:p>
          </table:table-cell>
          <table:table-cell table:style-name="ce94"/>
          <table:table-cell table:style-name="ce106" office:value-type="string" calcext:value-type="string">
            <text:p>DB59.DBW154</text:p>
          </table:table-cell>
          <table:table-cell table:style-name="ce106" office:value-type="string" calcext:value-type="string">
            <text:p>DB6.DBX5.4</text:p>
          </table:table-cell>
          <table:table-cell table:style-name="ce111" office:value-type="string" calcext:value-type="string">
            <text:p>Motor bearing "DE" vibration alarm</text:p>
          </table:table-cell>
          <table:table-cell table:style-name="ce106" office:value-type="string" calcext:value-type="string">
            <text:p>DB60.DBW54</text:p>
          </table:table-cell>
          <table:table-cell table:style-name="ce106" office:value-type="string" calcext:value-type="string">
            <text:p>DB6.DBX8.3</text:p>
          </table:table-cell>
          <table:table-cell table:style-name="ce111" office:value-type="string" calcext:value-type="string">
            <text:p>Motor bearing "DE" vibration danger</text:p>
          </table:table-cell>
          <table:table-cell table:style-name="ce106" table:number-columns-repeated="2"/>
          <table:table-cell table:style-name="ce111"/>
          <table:table-cell table:style-name="ce106" table:number-columns-repeated="2"/>
          <table:table-cell table:style-name="ce111"/>
          <table:table-cell table:style-name="ce51" office:value-type="string" calcext:value-type="string">
            <text:p>MotorBearingDEVibration</text:p>
          </table:table-cell>
          <table:table-cell office:value-type="string" calcext:value-type="string">
            <text:p>DB1.DBX10.0</text:p>
          </table:table-cell>
          <table:table-cell office:value-type="string" calcext:value-type="string">
            <text:p>DB1.DBX11.0</text:p>
          </table:table-cell>
          <table:table-cell office:value-type="string" calcext:value-type="string">
            <text:p>DB1.DBX12.0</text:p>
          </table:table-cell>
          <table:table-cell table:style-name="ce106" office:value-type="string" calcext:value-type="string">
            <text:p>DB3.DBW354</text:p>
          </table:table-cell>
          <table:table-cell table:style-name="ce125" office:value-type="string" calcext:value-type="string">
            <text:p>M181.3</text:p>
          </table:table-cell>
          <table:table-cell table:style-name="ce80" office:value-type="string" calcext:value-type="string">
            <text:p>M185.3</text:p>
          </table:table-cell>
          <table:table-cell/>
          <table:table-cell table:style-name="ce77"/>
          <table:table-cell/>
          <table:table-cell table:style-name="ce124" office:value-type="string" calcext:value-type="string">
            <text:p>VT#5</text:p>
          </table:table-cell>
          <table:table-cell table:style-name="ce51" office:value-type="string" calcext:value-type="string">
            <text:p>Вибрация DE подшипника двигателя со стороны компрессора</text:p>
          </table:table-cell>
        </table:table-row>
        <table:table-row table:style-name="ro4">
          <table:table-cell table:style-name="ce82" office:value-type="string" calcext:value-type="string">
            <text:p>VT#6</text:p>
          </table:table-cell>
          <table:table-cell table:style-name="ce94" office:value-type="string" calcext:value-type="string">
            <text:p>DB6.DBD160</text:p>
          </table:table-cell>
          <table:table-cell table:style-name="ce51" office:value-type="string" calcext:value-type="string">
            <text:p>Motor bearing Non-Drive End (NDE) vibration</text:p>
          </table:table-cell>
          <table:table-cell table:style-name="ce28" office:value-type="string" calcext:value-type="string">
            <text:p>FLT</text:p>
          </table:table-cell>
          <table:table-cell table:style-name="ce28" office:value-type="string" calcext:value-type="string">
            <text:p>AI</text:p>
          </table:table-cell>
          <table:table-cell table:style-name="ce55" office:value-type="float" office:value="20" calcext:value-type="float">
            <text:p>20,00</text:p>
          </table:table-cell>
          <table:table-cell table:style-name="ce28" office:value-type="string" calcext:value-type="string">
            <text:p>mm/s</text:p>
          </table:table-cell>
          <table:table-cell table:style-name="ce94" office:value-type="string" calcext:value-type="string">
            <text:p>DB58.DBW54</text:p>
          </table:table-cell>
          <table:table-cell table:style-name="ce28" office:value-type="float" office:value="1" calcext:value-type="float">
            <text:p>1</text:p>
          </table:table-cell>
          <table:table-cell table:style-name="ce94" office:value-type="string" calcext:value-type="string">
            <text:p>M233.5</text:p>
          </table:table-cell>
          <table:table-cell table:style-name="ce94"/>
          <table:table-cell table:style-name="ce106" office:value-type="string" calcext:value-type="string">
            <text:p>DB59.DBW156</text:p>
          </table:table-cell>
          <table:table-cell table:style-name="ce106" office:value-type="string" calcext:value-type="string">
            <text:p>DB6.DBX7.4</text:p>
          </table:table-cell>
          <table:table-cell table:style-name="ce111" office:value-type="string" calcext:value-type="string">
            <text:p>Motor bearing "NDE" vibration alarm</text:p>
          </table:table-cell>
          <table:table-cell table:style-name="ce106" office:value-type="string" calcext:value-type="string">
            <text:p>DB60.DBW56</text:p>
          </table:table-cell>
          <table:table-cell table:style-name="ce106" office:value-type="string" calcext:value-type="string">
            <text:p>DB6.DBX8.4</text:p>
          </table:table-cell>
          <table:table-cell table:style-name="ce111" office:value-type="string" calcext:value-type="string">
            <text:p>Motor bearing "NDE" vibration danger</text:p>
          </table:table-cell>
          <table:table-cell table:style-name="ce106" table:number-columns-repeated="2"/>
          <table:table-cell table:style-name="ce111"/>
          <table:table-cell table:style-name="ce106" table:number-columns-repeated="2"/>
          <table:table-cell table:style-name="ce111"/>
          <table:table-cell table:style-name="ce51" office:value-type="string" calcext:value-type="string">
            <text:p>MotorBearingNDEVibration</text:p>
          </table:table-cell>
          <table:table-cell office:value-type="string" calcext:value-type="string">
            <text:p>DB1.DBX10.1</text:p>
          </table:table-cell>
          <table:table-cell office:value-type="string" calcext:value-type="string">
            <text:p>DB1.DBX11.1</text:p>
          </table:table-cell>
          <table:table-cell office:value-type="string" calcext:value-type="string">
            <text:p>DB1.DBX12.1</text:p>
          </table:table-cell>
          <table:table-cell table:style-name="ce106" office:value-type="string" calcext:value-type="string">
            <text:p>DB3.DBW356</text:p>
          </table:table-cell>
          <table:table-cell table:style-name="ce125" office:value-type="string" calcext:value-type="string">
            <text:p>M181.4</text:p>
          </table:table-cell>
          <table:table-cell table:style-name="ce80" office:value-type="string" calcext:value-type="string">
            <text:p>M185.4</text:p>
          </table:table-cell>
          <table:table-cell/>
          <table:table-cell table:style-name="ce77"/>
          <table:table-cell/>
          <table:table-cell table:style-name="ce124" office:value-type="string" calcext:value-type="string">
            <text:p>VT#6</text:p>
          </table:table-cell>
          <table:table-cell table:style-name="ce51" office:value-type="string" calcext:value-type="string">
            <text:p>Вибрация NDE подшипника двигателя с торца</text:p>
          </table:table-cell>
        </table:table-row>
        <table:table-row table:style-name="ro4">
          <table:table-cell table:style-name="ce82" office:value-type="string" calcext:value-type="string">
            <text:p>TE130</text:p>
          </table:table-cell>
          <table:table-cell table:style-name="ce94" office:value-type="string" calcext:value-type="string">
            <text:p>DB6.DBD80</text:p>
          </table:table-cell>
          <table:table-cell table:style-name="ce51" office:value-type="string" calcext:value-type="string">
            <text:p>Oil supply temperature</text:p>
          </table:table-cell>
          <table:table-cell table:style-name="ce28" office:value-type="string" calcext:value-type="string">
            <text:p>FLT</text:p>
          </table:table-cell>
          <table:table-cell table:style-name="ce28" office:value-type="string" calcext:value-type="string">
            <text:p>AI</text:p>
          </table:table-cell>
          <table:table-cell table:style-name="ce54" office:value-type="float" office:value="200" calcext:value-type="float">
            <text:p>200,0</text:p>
          </table:table-cell>
          <table:table-cell table:style-name="ce28" office:value-type="string" calcext:value-type="string">
            <text:p>℃</text:p>
          </table:table-cell>
          <table:table-cell table:style-name="ce94" office:value-type="string" calcext:value-type="string">
            <text:p>DB58.DBW28</text:p>
          </table:table-cell>
          <table:table-cell table:style-name="ce28" office:value-type="float" office:value="1" calcext:value-type="float">
            <text:p>1</text:p>
          </table:table-cell>
          <table:table-cell table:style-name="ce94" office:value-type="string" calcext:value-type="string">
            <text:p>M234.0</text:p>
          </table:table-cell>
          <table:table-cell table:style-name="ce94"/>
          <table:table-cell table:style-name="ce106" office:value-type="string" calcext:value-type="string">
            <text:p>DB59.DBW128</text:p>
          </table:table-cell>
          <table:table-cell table:style-name="ce106" office:value-type="string" calcext:value-type="string">
            <text:p>DB6.DBX5.6</text:p>
          </table:table-cell>
          <table:table-cell table:style-name="ce111" office:value-type="string" calcext:value-type="string">
            <text:p>Oil supply temperature high alarm</text:p>
          </table:table-cell>
          <table:table-cell table:style-name="ce106" office:value-type="string" calcext:value-type="string">
            <text:p>DB60.DBW28</text:p>
          </table:table-cell>
          <table:table-cell table:style-name="ce106" office:value-type="string" calcext:value-type="string">
            <text:p>DB6.DBX9.6</text:p>
          </table:table-cell>
          <table:table-cell table:style-name="ce111" office:value-type="string" calcext:value-type="string">
            <text:p>Oil supply temperature high danger</text:p>
          </table:table-cell>
          <table:table-cell table:style-name="ce106" table:number-columns-repeated="2"/>
          <table:table-cell table:style-name="ce111"/>
          <table:table-cell table:style-name="ce106" table:number-columns-repeated="2"/>
          <table:table-cell table:style-name="ce111"/>
          <table:table-cell table:style-name="ce51" office:value-type="string" calcext:value-type="string">
            <text:p>OilSupplyTemperature</text:p>
          </table:table-cell>
          <table:table-cell office:value-type="string" calcext:value-type="string">
            <text:p>M189.5</text:p>
          </table:table-cell>
          <table:table-cell office:value-type="string" calcext:value-type="string">
            <text:p>M181.5</text:p>
          </table:table-cell>
          <table:table-cell office:value-type="string" calcext:value-type="string">
            <text:p>M185.5</text:p>
          </table:table-cell>
          <table:table-cell table:style-name="ce106" office:value-type="string" calcext:value-type="string">
            <text:p>DB3.DBW328</text:p>
          </table:table-cell>
          <table:table-cell table:number-columns-repeated="2" office:value-type="string" calcext:value-type="string">
            <text:p>non-switchable</text:p>
          </table:table-cell>
          <table:table-cell/>
          <table:table-cell table:style-name="ce77"/>
          <table:table-cell/>
          <table:table-cell table:style-name="ce124" office:value-type="string" calcext:value-type="string">
            <text:p>TE130</text:p>
          </table:table-cell>
          <table:table-cell table:style-name="ce51" office:value-type="string" calcext:value-type="string">
            <text:p>Температура масла</text:p>
          </table:table-cell>
        </table:table-row>
        <table:table-row table:style-name="ro4">
          <table:table-cell table:style-name="ce82" office:value-type="string" calcext:value-type="string">
            <text:p>TE231</text:p>
          </table:table-cell>
          <table:table-cell table:style-name="ce94" office:value-type="string" calcext:value-type="string">
            <text:p>DB6.DBD84</text:p>
          </table:table-cell>
          <table:table-cell table:style-name="ce51" office:value-type="string" calcext:value-type="string">
            <text:p>Stage 3 inlet temperature</text:p>
          </table:table-cell>
          <table:table-cell table:style-name="ce28" office:value-type="string" calcext:value-type="string">
            <text:p>FLT</text:p>
          </table:table-cell>
          <table:table-cell table:style-name="ce28" office:value-type="string" calcext:value-type="string">
            <text:p>AI</text:p>
          </table:table-cell>
          <table:table-cell table:style-name="ce54" office:value-type="float" office:value="200" calcext:value-type="float">
            <text:p>200,0</text:p>
          </table:table-cell>
          <table:table-cell table:style-name="ce28" office:value-type="string" calcext:value-type="string">
            <text:p>℃</text:p>
          </table:table-cell>
          <table:table-cell table:style-name="ce94" office:value-type="string" calcext:value-type="string">
            <text:p>DB58.DBW30</text:p>
          </table:table-cell>
          <table:table-cell table:style-name="ce28" office:value-type="float" office:value="1" calcext:value-type="float">
            <text:p>1</text:p>
          </table:table-cell>
          <table:table-cell table:style-name="ce94" office:value-type="string" calcext:value-type="string">
            <text:p>M234.1</text:p>
          </table:table-cell>
          <table:table-cell table:style-name="ce94"/>
          <table:table-cell table:style-name="ce106" office:value-type="string" calcext:value-type="string">
            <text:p>DB59.DBW130</text:p>
          </table:table-cell>
          <table:table-cell table:style-name="ce106" office:value-type="string" calcext:value-type="string">
            <text:p>DB6.DBX5.7</text:p>
          </table:table-cell>
          <table:table-cell table:style-name="ce111" office:value-type="string" calcext:value-type="string">
            <text:p>Stage 3 inlet temperature high alarm</text:p>
          </table:table-cell>
          <table:table-cell table:style-name="ce106" office:value-type="string" calcext:value-type="string">
            <text:p>DB60.DBW30</text:p>
          </table:table-cell>
          <table:table-cell table:style-name="ce106" office:value-type="string" calcext:value-type="string">
            <text:p>DB6.DBX9.7</text:p>
          </table:table-cell>
          <table:table-cell table:style-name="ce111" office:value-type="string" calcext:value-type="string">
            <text:p>Stage 3 inlet temperature high danger</text:p>
          </table:table-cell>
          <table:table-cell table:style-name="ce106" table:number-columns-repeated="2"/>
          <table:table-cell table:style-name="ce111"/>
          <table:table-cell table:style-name="ce106" table:number-columns-repeated="2"/>
          <table:table-cell table:style-name="ce111"/>
          <table:table-cell table:style-name="ce51" office:value-type="string" calcext:value-type="string">
            <text:p>Stage3InletTemperature</text:p>
          </table:table-cell>
          <table:table-cell office:value-type="string" calcext:value-type="string">
            <text:p>M189.6</text:p>
          </table:table-cell>
          <table:table-cell office:value-type="string" calcext:value-type="string">
            <text:p>M181.6</text:p>
          </table:table-cell>
          <table:table-cell office:value-type="string" calcext:value-type="string">
            <text:p>M185.6</text:p>
          </table:table-cell>
          <table:table-cell table:style-name="ce106" office:value-type="string" calcext:value-type="string">
            <text:p>DB3.DBW330</text:p>
          </table:table-cell>
          <table:table-cell table:number-columns-repeated="2" office:value-type="string" calcext:value-type="string">
            <text:p>non-switchable</text:p>
          </table:table-cell>
          <table:table-cell/>
          <table:table-cell table:style-name="ce77"/>
          <table:table-cell/>
          <table:table-cell table:style-name="ce129" office:value-type="string" calcext:value-type="string">
            <text:p>TE221</text:p>
          </table:table-cell>
          <table:table-cell table:style-name="ce51" office:value-type="string" calcext:value-type="string">
            <text:p>Температура воздуха на входе 3 ступени</text:p>
          </table:table-cell>
        </table:table-row>
        <table:table-row table:style-name="ro4">
          <table:table-cell table:style-name="ce82" office:value-type="string" calcext:value-type="string">
            <text:p>TE101</text:p>
          </table:table-cell>
          <table:table-cell table:style-name="ce94" office:value-type="string" calcext:value-type="string">
            <text:p>DB6.DBD88</text:p>
          </table:table-cell>
          <table:table-cell table:style-name="ce51" office:value-type="string" calcext:value-type="string">
            <text:p>Oil reservoir temperature</text:p>
          </table:table-cell>
          <table:table-cell table:style-name="ce28" office:value-type="string" calcext:value-type="string">
            <text:p>FLT</text:p>
          </table:table-cell>
          <table:table-cell table:style-name="ce28" office:value-type="string" calcext:value-type="string">
            <text:p>AI</text:p>
          </table:table-cell>
          <table:table-cell table:style-name="ce54" office:value-type="float" office:value="200" calcext:value-type="float">
            <text:p>200,0</text:p>
          </table:table-cell>
          <table:table-cell table:style-name="ce28" office:value-type="string" calcext:value-type="string">
            <text:p>℃</text:p>
          </table:table-cell>
          <table:table-cell table:style-name="ce94" office:value-type="string" calcext:value-type="string">
            <text:p>DB58.DBW32</text:p>
          </table:table-cell>
          <table:table-cell table:style-name="ce28" office:value-type="float" office:value="1" calcext:value-type="float">
            <text:p>1</text:p>
          </table:table-cell>
          <table:table-cell table:style-name="ce94" office:value-type="string" calcext:value-type="string">
            <text:p>M234.2</text:p>
          </table:table-cell>
          <table:table-cell table:style-name="ce94"/>
          <table:table-cell table:style-name="ce106" office:value-type="string" calcext:value-type="string">
            <text:p>DB59.DBW132</text:p>
          </table:table-cell>
          <table:table-cell table:style-name="ce106" office:value-type="string" calcext:value-type="string">
            <text:p>DB6.DBX6.0</text:p>
          </table:table-cell>
          <table:table-cell table:style-name="ce111" office:value-type="string" calcext:value-type="string">
            <text:p>Oil reservoir temperature low alarm</text:p>
          </table:table-cell>
          <table:table-cell table:style-name="ce59" office:value-type="string" calcext:value-type="string">
            <text:p>DB60.DBW6</text:p>
          </table:table-cell>
          <table:table-cell table:style-name="ce59" office:value-type="string" calcext:value-type="string">
            <text:p>DB6.DBX8.6</text:p>
          </table:table-cell>
          <table:table-cell table:style-name="ce61" office:value-type="string" calcext:value-type="string">
            <text:p>unused</text:p>
          </table:table-cell>
          <table:table-cell table:style-name="ce106" office:value-type="string" calcext:value-type="string">
            <text:p>DB3.DBW414</text:p>
          </table:table-cell>
          <table:table-cell table:style-name="ce106" office:value-type="string" calcext:value-type="string">
            <text:p>M18.0</text:p>
          </table:table-cell>
          <table:table-cell table:style-name="ce111" office:value-type="string" calcext:value-type="string">
            <text:p>Oil reservoir temperature low warn.2</text:p>
          </table:table-cell>
          <table:table-cell table:style-name="ce106" office:value-type="string" calcext:value-type="string">
            <text:p>DB3.DBW414</text:p>
          </table:table-cell>
          <table:table-cell table:style-name="ce106" office:value-type="string" calcext:value-type="string">
            <text:p>M18.6</text:p>
          </table:table-cell>
          <table:table-cell table:style-name="ce111" office:value-type="string" calcext:value-type="string">
            <text:p>Oil reservoir temperature low warn.3</text:p>
          </table:table-cell>
          <table:table-cell table:style-name="ce51" office:value-type="string" calcext:value-type="string">
            <text:p>OilReservoirTemperature</text:p>
          </table:table-cell>
          <table:table-cell office:value-type="string" calcext:value-type="string">
            <text:p>M189.7</text:p>
          </table:table-cell>
          <table:table-cell office:value-type="string" calcext:value-type="string">
            <text:p>M181.7</text:p>
          </table:table-cell>
          <table:table-cell office:value-type="string" calcext:value-type="string">
            <text:p>M185.7</text:p>
          </table:table-cell>
          <table:table-cell table:style-name="ce106" office:value-type="string" calcext:value-type="string">
            <text:p>DB3.DBW332</text:p>
          </table:table-cell>
          <table:table-cell office:value-type="string" calcext:value-type="string">
            <text:p>non-switchable</text:p>
          </table:table-cell>
          <table:table-cell office:value-type="string" calcext:value-type="string">
            <text:p>unused</text:p>
          </table:table-cell>
          <table:table-cell/>
          <table:table-cell table:style-name="ce77"/>
          <table:table-cell/>
          <table:table-cell table:style-name="ce129" office:value-type="string" calcext:value-type="string">
            <text:p>TE231</text:p>
          </table:table-cell>
          <table:table-cell table:style-name="ce51" office:value-type="string" calcext:value-type="string">
            <text:p>Температура масла в маслобаке</text:p>
          </table:table-cell>
        </table:table-row>
        <table:table-row table:style-name="ro4">
          <table:table-cell table:style-name="ce82" office:value-type="string" calcext:value-type="string">
            <text:p>TE140</text:p>
          </table:table-cell>
          <table:table-cell table:style-name="ce94" office:value-type="string" calcext:value-type="string">
            <text:p>DB6.DBD92</text:p>
          </table:table-cell>
          <table:table-cell table:style-name="ce51" office:value-type="string" calcext:value-type="string">
            <text:p>Motor winding "R" temperature</text:p>
          </table:table-cell>
          <table:table-cell table:style-name="ce28" office:value-type="string" calcext:value-type="string">
            <text:p>FLT</text:p>
          </table:table-cell>
          <table:table-cell table:style-name="ce28" office:value-type="string" calcext:value-type="string">
            <text:p>AI</text:p>
          </table:table-cell>
          <table:table-cell table:style-name="ce54" office:value-type="float" office:value="200" calcext:value-type="float">
            <text:p>200,0</text:p>
          </table:table-cell>
          <table:table-cell table:style-name="ce28" office:value-type="string" calcext:value-type="string">
            <text:p>℃</text:p>
          </table:table-cell>
          <table:table-cell table:style-name="ce94" office:value-type="string" calcext:value-type="string">
            <text:p>DB58.DBW34</text:p>
          </table:table-cell>
          <table:table-cell table:style-name="ce28" office:value-type="float" office:value="1" calcext:value-type="float">
            <text:p>1</text:p>
          </table:table-cell>
          <table:table-cell table:style-name="ce94" office:value-type="string" calcext:value-type="string">
            <text:p>M234.3</text:p>
          </table:table-cell>
          <table:table-cell table:style-name="ce94"/>
          <table:table-cell table:style-name="ce106" office:value-type="string" calcext:value-type="string">
            <text:p>DB59.DBW134</text:p>
          </table:table-cell>
          <table:table-cell table:style-name="ce106" office:value-type="string" calcext:value-type="string">
            <text:p>DB6.DBX6.1</text:p>
          </table:table-cell>
          <table:table-cell table:style-name="ce111" office:value-type="string" calcext:value-type="string">
            <text:p>High warning motor winding «R» temperature</text:p>
          </table:table-cell>
          <table:table-cell table:style-name="ce106" office:value-type="string" calcext:value-type="string">
            <text:p>DB60.DBW34</text:p>
          </table:table-cell>
          <table:table-cell table:style-name="ce106" office:value-type="string" calcext:value-type="string">
            <text:p>DB6.DBX10.1</text:p>
          </table:table-cell>
          <table:table-cell table:style-name="ce153" office:value-type="string" calcext:value-type="string">
            <text:p>High alarm motor winding «R» temperature</text:p>
          </table:table-cell>
          <table:table-cell table:style-name="ce106"/>
          <table:table-cell table:style-name="ce124"/>
          <table:table-cell table:style-name="ce111"/>
          <table:table-cell table:style-name="ce106"/>
          <table:table-cell table:style-name="ce124"/>
          <table:table-cell table:style-name="ce111"/>
          <table:table-cell table:style-name="ce51" office:value-type="string" calcext:value-type="string">
            <text:p>MotorWindingRTemperature</text:p>
          </table:table-cell>
          <table:table-cell office:value-type="string" calcext:value-type="string">
            <text:p>DB1.DBX14.5</text:p>
          </table:table-cell>
          <table:table-cell office:value-type="string" calcext:value-type="string">
            <text:p>DB1.DBX15.0</text:p>
          </table:table-cell>
          <table:table-cell office:value-type="string" calcext:value-type="string">
            <text:p>DB1.DBX15.1</text:p>
          </table:table-cell>
          <table:table-cell table:style-name="ce106" office:value-type="string" calcext:value-type="string">
            <text:p>DB3.DBW334</text:p>
          </table:table-cell>
          <table:table-cell table:style-name="ce125" office:value-type="string" calcext:value-type="string">
            <text:p>M182.0</text:p>
          </table:table-cell>
          <table:table-cell table:style-name="ce80" office:value-type="string" calcext:value-type="string">
            <text:p>M186.0</text:p>
          </table:table-cell>
          <table:table-cell/>
          <table:table-cell table:style-name="ce77"/>
          <table:table-cell/>
          <table:table-cell table:style-name="ce129" office:value-type="string" calcext:value-type="string">
            <text:p>TE101</text:p>
          </table:table-cell>
          <table:table-cell table:style-name="ce51" office:value-type="string" calcext:value-type="string">
            <text:p>Температура обмотки двигателя "R"</text:p>
          </table:table-cell>
        </table:table-row>
        <table:table-row table:style-name="ro4">
          <table:table-cell table:style-name="ce4" office:value-type="string" calcext:value-type="string">
            <text:p>TE143</text:p>
          </table:table-cell>
          <table:table-cell table:style-name="ce94" office:value-type="string" calcext:value-type="string">
            <text:p>DB6.DBD96</text:p>
          </table:table-cell>
          <table:table-cell table:style-name="ce51" office:value-type="string" calcext:value-type="string">
            <text:p>Motor bearing "DE" temperature</text:p>
          </table:table-cell>
          <table:table-cell table:style-name="ce28" office:value-type="string" calcext:value-type="string">
            <text:p>FLT</text:p>
          </table:table-cell>
          <table:table-cell table:style-name="ce28" office:value-type="string" calcext:value-type="string">
            <text:p>AI</text:p>
          </table:table-cell>
          <table:table-cell table:style-name="ce54" office:value-type="float" office:value="200" calcext:value-type="float">
            <text:p>200,0</text:p>
          </table:table-cell>
          <table:table-cell table:style-name="ce28" office:value-type="string" calcext:value-type="string">
            <text:p>℃</text:p>
          </table:table-cell>
          <table:table-cell table:style-name="ce94" office:value-type="string" calcext:value-type="string">
            <text:p>DB58.DBW36</text:p>
          </table:table-cell>
          <table:table-cell table:style-name="ce28" office:value-type="float" office:value="1" calcext:value-type="float">
            <text:p>1</text:p>
          </table:table-cell>
          <table:table-cell table:style-name="ce94" office:value-type="string" calcext:value-type="string">
            <text:p>M234.4</text:p>
          </table:table-cell>
          <table:table-cell table:style-name="ce94" office:value-type="string" calcext:value-type="string">
            <text:p>-50...200 °C</text:p>
          </table:table-cell>
          <table:table-cell table:style-name="ce106" office:value-type="string" calcext:value-type="string">
            <text:p>DB59.DBW144</text:p>
          </table:table-cell>
          <table:table-cell table:style-name="ce106" office:value-type="string" calcext:value-type="string">
            <text:p>DB6.DBX6.6</text:p>
          </table:table-cell>
          <table:table-cell table:style-name="ce76" office:value-type="string" calcext:value-type="string">
            <text:p>Motor bearing "DE" temperature high alarm</text:p>
          </table:table-cell>
          <table:table-cell table:style-name="ce106" office:value-type="string" calcext:value-type="string">
            <text:p>DB60.DBW44</text:p>
          </table:table-cell>
          <table:table-cell table:style-name="ce106" office:value-type="string" calcext:value-type="string">
            <text:p>DB6.DBX10.6</text:p>
          </table:table-cell>
          <table:table-cell table:style-name="ce111" office:value-type="string" calcext:value-type="string">
            <text:p>Motor bearing "DE" temperature high danger</text:p>
          </table:table-cell>
          <table:table-cell table:style-name="ce106" office:value-type="string" calcext:value-type="string">
            <text:p>DB3.DBW560</text:p>
          </table:table-cell>
          <table:table-cell table:style-name="ce106" office:value-type="string" calcext:value-type="string">
            <text:p>M160.5</text:p>
          </table:table-cell>
          <table:table-cell table:style-name="ce111" office:value-type="string" calcext:value-type="string">
            <text:p>Motor Bearing_DE-NDE_temperature high warn</text:p>
          </table:table-cell>
          <table:table-cell table:style-name="ce106" table:number-columns-repeated="2"/>
          <table:table-cell table:style-name="ce111"/>
          <table:table-cell table:style-name="ce51" office:value-type="string" calcext:value-type="string">
            <text:p>MotorBearingDETemperature</text:p>
          </table:table-cell>
          <table:table-cell office:value-type="string" calcext:value-type="string">
            <text:p>DB1.DBX14.6</text:p>
          </table:table-cell>
          <table:table-cell office:value-type="string" calcext:value-type="string">
            <text:p>DB1.DBX15.2</text:p>
          </table:table-cell>
          <table:table-cell office:value-type="string" calcext:value-type="string">
            <text:p>DB1.DBX15.3</text:p>
          </table:table-cell>
          <table:table-cell table:style-name="ce106" office:value-type="string" calcext:value-type="string">
            <text:p>DB3.DBW344</text:p>
          </table:table-cell>
          <table:table-cell table:style-name="ce125" office:value-type="string" calcext:value-type="string">
            <text:p>M182.1</text:p>
          </table:table-cell>
          <table:table-cell table:style-name="ce80" office:value-type="string" calcext:value-type="string">
            <text:p>M186.1</text:p>
          </table:table-cell>
          <table:table-cell/>
          <table:table-cell table:style-name="ce77"/>
          <table:table-cell/>
          <table:table-cell table:style-name="ce129" office:value-type="string" calcext:value-type="string">
            <text:p>TE140</text:p>
          </table:table-cell>
          <table:table-cell table:style-name="ce51" office:value-type="string" calcext:value-type="string">
            <text:p>Температура DE подшипника двигателя со стороны компрессора</text:p>
          </table:table-cell>
        </table:table-row>
        <table:table-row table:style-name="ro1">
          <table:table-cell table:style-name="ce4" office:value-type="string" calcext:value-type="string">
            <text:p>TE144</text:p>
          </table:table-cell>
          <table:table-cell table:style-name="ce94" office:value-type="string" calcext:value-type="string">
            <text:p>DB6.DBD100</text:p>
          </table:table-cell>
          <table:table-cell table:style-name="ce51" office:value-type="string" calcext:value-type="string">
            <text:p>Motor bearing "NDE" temperature</text:p>
          </table:table-cell>
          <table:table-cell table:style-name="ce28" office:value-type="string" calcext:value-type="string">
            <text:p>FLT</text:p>
          </table:table-cell>
          <table:table-cell table:style-name="ce28" office:value-type="string" calcext:value-type="string">
            <text:p>AI</text:p>
          </table:table-cell>
          <table:table-cell table:style-name="ce54" office:value-type="float" office:value="200" calcext:value-type="float">
            <text:p>200,0</text:p>
          </table:table-cell>
          <table:table-cell table:style-name="ce28" office:value-type="string" calcext:value-type="string">
            <text:p>℃</text:p>
          </table:table-cell>
          <table:table-cell table:style-name="ce94" office:value-type="string" calcext:value-type="string">
            <text:p>DB58.DBW38</text:p>
          </table:table-cell>
          <table:table-cell table:style-name="ce28" office:value-type="float" office:value="1" calcext:value-type="float">
            <text:p>1</text:p>
          </table:table-cell>
          <table:table-cell table:style-name="ce94" office:value-type="string" calcext:value-type="string">
            <text:p>M234.5</text:p>
          </table:table-cell>
          <table:table-cell table:style-name="ce94" office:value-type="string" calcext:value-type="string">
            <text:p>-50...200 °C</text:p>
          </table:table-cell>
          <table:table-cell table:style-name="ce106" office:value-type="string" calcext:value-type="string">
            <text:p>DB59.DBW146</text:p>
          </table:table-cell>
          <table:table-cell table:style-name="ce106" office:value-type="string" calcext:value-type="string">
            <text:p>DB6.DBX6.7</text:p>
          </table:table-cell>
          <table:table-cell table:style-name="ce111" office:value-type="string" calcext:value-type="string">
            <text:p>Motor bearing "NDE" temperature high alarm</text:p>
          </table:table-cell>
          <table:table-cell table:style-name="ce106" office:value-type="string" calcext:value-type="string">
            <text:p>DB60.DBW46</text:p>
          </table:table-cell>
          <table:table-cell table:style-name="ce106" office:value-type="string" calcext:value-type="string">
            <text:p>DB6.DBX10.7</text:p>
          </table:table-cell>
          <table:table-cell table:style-name="ce111" office:value-type="string" calcext:value-type="string">
            <text:p>Motor bearing "NDE" temperature high danger</text:p>
          </table:table-cell>
          <table:table-cell table:style-name="ce106" office:value-type="string" calcext:value-type="string">
            <text:p>DB3.DBW560</text:p>
          </table:table-cell>
          <table:table-cell table:style-name="ce106" office:value-type="string" calcext:value-type="string">
            <text:p>M160.5</text:p>
          </table:table-cell>
          <table:table-cell table:style-name="ce111" office:value-type="string" calcext:value-type="string">
            <text:p>Motor Bearing_DE-NDE_temperature high warn</text:p>
          </table:table-cell>
          <table:table-cell table:style-name="ce106" table:number-columns-repeated="2"/>
          <table:table-cell table:style-name="ce111"/>
          <table:table-cell table:style-name="ce51" office:value-type="string" calcext:value-type="string">
            <text:p>MotorBearingNDETemperature</text:p>
          </table:table-cell>
          <table:table-cell office:value-type="string" calcext:value-type="string">
            <text:p>DB1.DBX14.7</text:p>
          </table:table-cell>
          <table:table-cell office:value-type="string" calcext:value-type="string">
            <text:p>DB1.DBX15.4</text:p>
          </table:table-cell>
          <table:table-cell office:value-type="string" calcext:value-type="string">
            <text:p>DB1.DBX15.5</text:p>
          </table:table-cell>
          <table:table-cell table:style-name="ce106" office:value-type="string" calcext:value-type="string">
            <text:p>DB3.DBW346</text:p>
          </table:table-cell>
          <table:table-cell table:style-name="ce125" office:value-type="string" calcext:value-type="string">
            <text:p>M182.2</text:p>
          </table:table-cell>
          <table:table-cell table:style-name="ce80" office:value-type="string" calcext:value-type="string">
            <text:p>M186.2</text:p>
          </table:table-cell>
          <table:table-cell/>
          <table:table-cell table:style-name="ce77"/>
          <table:table-cell/>
          <table:table-cell table:style-name="ce129" office:value-type="string" calcext:value-type="string">
            <text:p>TE143</text:p>
          </table:table-cell>
          <table:table-cell table:style-name="ce51" office:value-type="string" calcext:value-type="string">
            <text:p><text:span text:style-name="T4">Температура</text:span> NDE подшипника двигателя с торца</text:p>
          </table:table-cell>
        </table:table-row>
        <table:table-row table:style-name="ro4">
          <table:table-cell table:style-name="ce4" office:value-type="string" calcext:value-type="string">
            <text:p>TE221</text:p>
          </table:table-cell>
          <table:table-cell table:style-name="ce94" office:value-type="string" calcext:value-type="string">
            <text:p>DB6.DBD104</text:p>
          </table:table-cell>
          <table:table-cell table:style-name="ce51" office:value-type="string" calcext:value-type="string">
            <text:p>Stage 2 inlet temperature</text:p>
          </table:table-cell>
          <table:table-cell table:style-name="ce28" office:value-type="string" calcext:value-type="string">
            <text:p>FLT</text:p>
          </table:table-cell>
          <table:table-cell table:style-name="ce28" office:value-type="string" calcext:value-type="string">
            <text:p>AI</text:p>
          </table:table-cell>
          <table:table-cell table:style-name="ce54" office:value-type="float" office:value="200" calcext:value-type="float">
            <text:p>200,0</text:p>
          </table:table-cell>
          <table:table-cell table:style-name="ce28" office:value-type="string" calcext:value-type="string">
            <text:p>℃</text:p>
          </table:table-cell>
          <table:table-cell table:style-name="ce94" office:value-type="string" calcext:value-type="string">
            <text:p>DB58.DBW40</text:p>
          </table:table-cell>
          <table:table-cell table:style-name="ce28" office:value-type="float" office:value="1" calcext:value-type="float">
            <text:p>1</text:p>
          </table:table-cell>
          <table:table-cell table:style-name="ce94" office:value-type="string" calcext:value-type="string">
            <text:p>M234.6</text:p>
          </table:table-cell>
          <table:table-cell table:style-name="ce94" office:value-type="string" calcext:value-type="string">
            <text:p>-50...200 °C</text:p>
          </table:table-cell>
          <table:table-cell table:style-name="ce106" office:value-type="string" calcext:value-type="string">
            <text:p>DB59.DBW140</text:p>
          </table:table-cell>
          <table:table-cell table:style-name="ce106" office:value-type="string" calcext:value-type="string">
            <text:p>DB6.DBX6.4</text:p>
          </table:table-cell>
          <table:table-cell table:style-name="ce111" office:value-type="string" calcext:value-type="string">
            <text:p>Stage 2 inlet temperature high alarm</text:p>
          </table:table-cell>
          <table:table-cell table:style-name="ce106" office:value-type="string" calcext:value-type="string">
            <text:p>DB60.DBW40</text:p>
          </table:table-cell>
          <table:table-cell table:style-name="ce106" office:value-type="string" calcext:value-type="string">
            <text:p>DB6.DBX10.4</text:p>
          </table:table-cell>
          <table:table-cell table:style-name="ce111" office:value-type="string" calcext:value-type="string">
            <text:p>Stage 2 inlet temperature high danger</text:p>
          </table:table-cell>
          <table:table-cell table:style-name="ce106" office:value-type="string" calcext:value-type="string">
            <text:p>DB3.DBW554</text:p>
          </table:table-cell>
          <table:table-cell table:style-name="ce106" office:value-type="string" calcext:value-type="string">
            <text:p>M160.6</text:p>
          </table:table-cell>
          <table:table-cell table:style-name="ce111" office:value-type="string" calcext:value-type="string">
            <text:p>Stage 2 inlet temperature high warn</text:p>
          </table:table-cell>
          <table:table-cell table:style-name="ce106" table:number-columns-repeated="2"/>
          <table:table-cell table:style-name="ce111"/>
          <table:table-cell table:style-name="ce51" office:value-type="string" calcext:value-type="string">
            <text:p>Stage2InletTemperature</text:p>
          </table:table-cell>
          <table:table-cell office:value-type="string" calcext:value-type="string">
            <text:p>DB1.DBX0.2</text:p>
          </table:table-cell>
          <table:table-cell office:value-type="string" calcext:value-type="string">
            <text:p>M182.3</text:p>
          </table:table-cell>
          <table:table-cell office:value-type="string" calcext:value-type="string">
            <text:p>M186.3</text:p>
          </table:table-cell>
          <table:table-cell table:style-name="ce106" office:value-type="string" calcext:value-type="string">
            <text:p>DB3.DBW340</text:p>
          </table:table-cell>
          <table:table-cell table:number-columns-repeated="2" office:value-type="string" calcext:value-type="string">
            <text:p>non-switchable</text:p>
          </table:table-cell>
          <table:table-cell/>
          <table:table-cell table:style-name="ce77"/>
          <table:table-cell/>
          <table:table-cell table:style-name="ce129" office:value-type="string" calcext:value-type="string">
            <text:p>TE144</text:p>
          </table:table-cell>
          <table:table-cell table:style-name="ce51" office:value-type="string" calcext:value-type="string">
            <text:p>Температура воздуха на входе 2 ступени</text:p>
          </table:table-cell>
        </table:table-row>
        <table:table-row table:style-name="ro4">
          <table:table-cell table:style-name="ce82" office:value-type="string" calcext:value-type="string">
            <text:p>TE212</text:p>
          </table:table-cell>
          <table:table-cell table:style-name="ce94" office:value-type="string" calcext:value-type="string">
            <text:p>DB6.DBD116</text:p>
          </table:table-cell>
          <table:table-cell table:style-name="ce51" office:value-type="string" calcext:value-type="string">
            <text:p>#1 outlet temp</text:p>
          </table:table-cell>
          <table:table-cell table:style-name="ce28" office:value-type="string" calcext:value-type="string">
            <text:p>FLT</text:p>
          </table:table-cell>
          <table:table-cell table:style-name="ce28" office:value-type="string" calcext:value-type="string">
            <text:p>AI</text:p>
          </table:table-cell>
          <table:table-cell table:style-name="ce54" office:value-type="float" office:value="200" calcext:value-type="float">
            <text:p>200,0</text:p>
          </table:table-cell>
          <table:table-cell table:style-name="ce28" office:value-type="string" calcext:value-type="string">
            <text:p>℃</text:p>
          </table:table-cell>
          <table:table-cell table:style-name="ce94" office:value-type="string" calcext:value-type="string">
            <text:p>DB58.DBW62</text:p>
          </table:table-cell>
          <table:table-cell table:style-name="ce28" office:value-type="float" office:value="1" calcext:value-type="float">
            <text:p>1</text:p>
          </table:table-cell>
          <table:table-cell table:style-name="ce94" office:value-type="string" calcext:value-type="string">
            <text:p>M235.1</text:p>
          </table:table-cell>
          <table:table-cell table:style-name="ce94" office:value-type="string" calcext:value-type="string">
            <text:p>-50...200 °C</text:p>
          </table:table-cell>
          <table:table-cell table:style-name="ce106" office:value-type="string" calcext:value-type="string">
            <text:p>DB59.DBW12</text:p>
          </table:table-cell>
          <table:table-cell table:style-name="ce61" office:value-type="string" calcext:value-type="string">
            <text:p>DB6.DBX2.6</text:p>
          </table:table-cell>
          <table:table-cell table:style-name="ce61" office:value-type="string" calcext:value-type="string">
            <text:p>unused</text:p>
          </table:table-cell>
          <table:table-cell table:style-name="ce106" office:value-type="string" calcext:value-type="string">
            <text:p>DB60.DBW6</text:p>
          </table:table-cell>
          <table:table-cell table:style-name="ce59" office:value-type="string" calcext:value-type="string">
            <text:p>DB6.DBX8.6</text:p>
          </table:table-cell>
          <table:table-cell table:style-name="ce61" office:value-type="string" calcext:value-type="string">
            <text:p>unused</text:p>
          </table:table-cell>
          <table:table-cell table:style-name="ce106"/>
          <table:table-cell table:style-name="ce124" table:number-columns-repeated="2"/>
          <table:table-cell table:style-name="ce106"/>
          <table:table-cell table:style-name="ce124" table:number-columns-repeated="2"/>
          <table:table-cell table:style-name="ce51" office:value-type="string" calcext:value-type="string">
            <text:p>N1OutletTemp</text:p>
          </table:table-cell>
          <table:table-cell office:value-type="string" calcext:value-type="string">
            <text:p>DB1.DBX1.3</text:p>
          </table:table-cell>
          <table:table-cell office:value-type="string" calcext:value-type="string">
            <text:p>M182.4</text:p>
          </table:table-cell>
          <table:table-cell office:value-type="string" calcext:value-type="string">
            <text:p>M186.4</text:p>
          </table:table-cell>
          <table:table-cell table:style-name="ce59" office:value-type="string" calcext:value-type="string">
            <text:p>DB3.DBW314</text:p>
          </table:table-cell>
          <table:table-cell table:number-columns-repeated="2" office:value-type="string" calcext:value-type="string">
            <text:p>unused</text:p>
          </table:table-cell>
          <table:table-cell/>
          <table:table-cell table:style-name="ce77"/>
          <table:table-cell/>
          <table:table-cell table:style-name="ce124" office:value-type="string" calcext:value-type="string">
            <text:p>TE212</text:p>
          </table:table-cell>
          <table:table-cell table:style-name="ce51" office:value-type="string" calcext:value-type="string">
            <text:p>Температура воздуха на выходе 1 ступени</text:p>
          </table:table-cell>
        </table:table-row>
        <table:table-row table:style-name="ro4">
          <table:table-cell table:style-name="ce82" office:value-type="string" calcext:value-type="string">
            <text:p>TE222</text:p>
          </table:table-cell>
          <table:table-cell table:style-name="ce94" office:value-type="string" calcext:value-type="string">
            <text:p>DB6.DBD120</text:p>
          </table:table-cell>
          <table:table-cell table:style-name="ce51" office:value-type="string" calcext:value-type="string">
            <text:p>#2 outlet temp</text:p>
          </table:table-cell>
          <table:table-cell table:style-name="ce28" office:value-type="string" calcext:value-type="string">
            <text:p>FLT</text:p>
          </table:table-cell>
          <table:table-cell table:style-name="ce28" office:value-type="string" calcext:value-type="string">
            <text:p>AI</text:p>
          </table:table-cell>
          <table:table-cell table:style-name="ce54" office:value-type="float" office:value="200" calcext:value-type="float">
            <text:p>200,0</text:p>
          </table:table-cell>
          <table:table-cell table:style-name="ce28" office:value-type="string" calcext:value-type="string">
            <text:p>℃</text:p>
          </table:table-cell>
          <table:table-cell table:style-name="ce94" office:value-type="string" calcext:value-type="string">
            <text:p>DB58.DBW64</text:p>
          </table:table-cell>
          <table:table-cell table:style-name="ce28" office:value-type="float" office:value="1" calcext:value-type="float">
            <text:p>1</text:p>
          </table:table-cell>
          <table:table-cell table:style-name="ce94" office:value-type="string" calcext:value-type="string">
            <text:p>M235.2</text:p>
          </table:table-cell>
          <table:table-cell table:style-name="ce94" office:value-type="string" calcext:value-type="string">
            <text:p>-50...200 °C</text:p>
          </table:table-cell>
          <table:table-cell table:style-name="ce106" office:value-type="string" calcext:value-type="string">
            <text:p>DB59.DBW12</text:p>
          </table:table-cell>
          <table:table-cell table:style-name="ce61" office:value-type="string" calcext:value-type="string">
            <text:p>DB6.DBX2.6</text:p>
          </table:table-cell>
          <table:table-cell table:style-name="ce61" office:value-type="string" calcext:value-type="string">
            <text:p>unused</text:p>
          </table:table-cell>
          <table:table-cell table:style-name="ce106" office:value-type="string" calcext:value-type="string">
            <text:p>DB60.DBW6</text:p>
          </table:table-cell>
          <table:table-cell table:style-name="ce59" office:value-type="string" calcext:value-type="string">
            <text:p>DB6.DBX8.6</text:p>
          </table:table-cell>
          <table:table-cell table:style-name="ce61" office:value-type="string" calcext:value-type="string">
            <text:p>unused</text:p>
          </table:table-cell>
          <table:table-cell table:style-name="ce106"/>
          <table:table-cell table:style-name="ce124" table:number-columns-repeated="2"/>
          <table:table-cell table:style-name="ce106"/>
          <table:table-cell table:style-name="ce124" table:number-columns-repeated="2"/>
          <table:table-cell table:style-name="ce51" office:value-type="string" calcext:value-type="string">
            <text:p>N2OutletTemp</text:p>
          </table:table-cell>
          <table:table-cell office:value-type="string" calcext:value-type="string">
            <text:p>DB1.DBX1.4</text:p>
          </table:table-cell>
          <table:table-cell office:value-type="string" calcext:value-type="string">
            <text:p>M182.5</text:p>
          </table:table-cell>
          <table:table-cell office:value-type="string" calcext:value-type="string">
            <text:p>M186.5</text:p>
          </table:table-cell>
          <table:table-cell table:style-name="ce59" office:value-type="string" calcext:value-type="string">
            <text:p>DB3.DBW314</text:p>
          </table:table-cell>
          <table:table-cell table:number-columns-repeated="2" office:value-type="string" calcext:value-type="string">
            <text:p>unused</text:p>
          </table:table-cell>
          <table:table-cell/>
          <table:table-cell table:style-name="ce77"/>
          <table:table-cell/>
          <table:table-cell table:style-name="ce124" office:value-type="string" calcext:value-type="string">
            <text:p>TE222</text:p>
          </table:table-cell>
          <table:table-cell table:style-name="ce51" office:value-type="string" calcext:value-type="string">
            <text:p>Температура воздуха на выходе 2 ступени</text:p>
          </table:table-cell>
        </table:table-row>
        <table:table-row table:style-name="ro4">
          <table:table-cell table:style-name="ce82" office:value-type="string" calcext:value-type="string">
            <text:p>TE232</text:p>
          </table:table-cell>
          <table:table-cell table:style-name="ce94" office:value-type="string" calcext:value-type="string">
            <text:p>DB6.DBD124</text:p>
          </table:table-cell>
          <table:table-cell table:style-name="ce51" office:value-type="string" calcext:value-type="string">
            <text:p>#3 outlet temp</text:p>
          </table:table-cell>
          <table:table-cell table:style-name="ce28" office:value-type="string" calcext:value-type="string">
            <text:p>FLT</text:p>
          </table:table-cell>
          <table:table-cell table:style-name="ce28" office:value-type="string" calcext:value-type="string">
            <text:p>AI</text:p>
          </table:table-cell>
          <table:table-cell table:style-name="ce54" office:value-type="float" office:value="200" calcext:value-type="float">
            <text:p>200,0</text:p>
          </table:table-cell>
          <table:table-cell table:style-name="ce28" office:value-type="string" calcext:value-type="string">
            <text:p>℃</text:p>
          </table:table-cell>
          <table:table-cell table:style-name="ce94" office:value-type="string" calcext:value-type="string">
            <text:p>DB58.DBW66</text:p>
          </table:table-cell>
          <table:table-cell table:style-name="ce28" office:value-type="float" office:value="1" calcext:value-type="float">
            <text:p>1</text:p>
          </table:table-cell>
          <table:table-cell table:style-name="ce94" office:value-type="string" calcext:value-type="string">
            <text:p>M235.3</text:p>
          </table:table-cell>
          <table:table-cell table:style-name="ce94" office:value-type="string" calcext:value-type="string">
            <text:p>-50...200 °C</text:p>
          </table:table-cell>
          <table:table-cell table:style-name="ce106" office:value-type="string" calcext:value-type="string">
            <text:p>DB59.DBW12</text:p>
          </table:table-cell>
          <table:table-cell table:style-name="ce61" office:value-type="string" calcext:value-type="string">
            <text:p>DB6.DBX2.6</text:p>
          </table:table-cell>
          <table:table-cell table:style-name="ce61" office:value-type="string" calcext:value-type="string">
            <text:p>unused</text:p>
          </table:table-cell>
          <table:table-cell table:style-name="ce106" office:value-type="string" calcext:value-type="string">
            <text:p>DB60.DBW6</text:p>
          </table:table-cell>
          <table:table-cell table:style-name="ce59" office:value-type="string" calcext:value-type="string">
            <text:p>DB6.DBX8.6</text:p>
          </table:table-cell>
          <table:table-cell table:style-name="ce61" office:value-type="string" calcext:value-type="string">
            <text:p>unused</text:p>
          </table:table-cell>
          <table:table-cell table:style-name="ce106"/>
          <table:table-cell table:style-name="ce124" table:number-columns-repeated="2"/>
          <table:table-cell table:style-name="ce106"/>
          <table:table-cell table:style-name="ce124" table:number-columns-repeated="2"/>
          <table:table-cell table:style-name="ce51" office:value-type="string" calcext:value-type="string">
            <text:p>N3OutletTemp</text:p>
          </table:table-cell>
          <table:table-cell office:value-type="string" calcext:value-type="string">
            <text:p>DB1.DBX1.5</text:p>
          </table:table-cell>
          <table:table-cell office:value-type="string" calcext:value-type="string">
            <text:p>M182.6</text:p>
          </table:table-cell>
          <table:table-cell office:value-type="string" calcext:value-type="string">
            <text:p>M186.6</text:p>
          </table:table-cell>
          <table:table-cell table:style-name="ce59" office:value-type="string" calcext:value-type="string">
            <text:p>DB3.DBW314</text:p>
          </table:table-cell>
          <table:table-cell table:number-columns-repeated="2" office:value-type="string" calcext:value-type="string">
            <text:p>unused</text:p>
          </table:table-cell>
          <table:table-cell/>
          <table:table-cell table:style-name="ce77"/>
          <table:table-cell/>
          <table:table-cell table:style-name="ce124" office:value-type="string" calcext:value-type="string">
            <text:p>TE232</text:p>
          </table:table-cell>
          <table:table-cell table:style-name="ce51" office:value-type="string" calcext:value-type="string">
            <text:p>Температура воздуха на выходе 3 ступени</text:p>
          </table:table-cell>
        </table:table-row>
        <table:table-row table:style-name="ro4">
          <table:table-cell table:style-name="ce82" office:value-type="string" calcext:value-type="string">
            <text:p>TE301</text:p>
          </table:table-cell>
          <table:table-cell table:style-name="ce94" office:value-type="string" calcext:value-type="string">
            <text:p>DB6.DBD128</text:p>
          </table:table-cell>
          <table:table-cell table:style-name="ce51" office:value-type="string" calcext:value-type="string">
            <text:p>Cooling water supply temp</text:p>
          </table:table-cell>
          <table:table-cell table:style-name="ce28" office:value-type="string" calcext:value-type="string">
            <text:p>FLT</text:p>
          </table:table-cell>
          <table:table-cell table:style-name="ce28" office:value-type="string" calcext:value-type="string">
            <text:p>AI</text:p>
          </table:table-cell>
          <table:table-cell table:style-name="ce54" office:value-type="float" office:value="200" calcext:value-type="float">
            <text:p>200,0</text:p>
          </table:table-cell>
          <table:table-cell table:style-name="ce28" office:value-type="string" calcext:value-type="string">
            <text:p>℃</text:p>
          </table:table-cell>
          <table:table-cell table:style-name="ce94" office:value-type="string" calcext:value-type="string">
            <text:p>DB58.DBW68</text:p>
          </table:table-cell>
          <table:table-cell table:style-name="ce28" office:value-type="float" office:value="1" calcext:value-type="float">
            <text:p>1</text:p>
          </table:table-cell>
          <table:table-cell table:style-name="ce94" office:value-type="string" calcext:value-type="string">
            <text:p>M235.4</text:p>
          </table:table-cell>
          <table:table-cell table:style-name="ce94" office:value-type="string" calcext:value-type="string">
            <text:p>-50...200 °C</text:p>
          </table:table-cell>
          <table:table-cell table:style-name="ce106" office:value-type="string" calcext:value-type="string">
            <text:p>DB59.DBW148</text:p>
          </table:table-cell>
          <table:table-cell table:style-name="ce106" office:value-type="string" calcext:value-type="string">
            <text:p>DB6.DBX7.0</text:p>
          </table:table-cell>
          <table:table-cell table:style-name="ce111" office:value-type="string" calcext:value-type="string">
            <text:p>Cooling water supply temp. high alarm</text:p>
          </table:table-cell>
          <table:table-cell table:style-name="ce59" office:value-type="string" calcext:value-type="string">
            <text:p>DB60.DBW6</text:p>
          </table:table-cell>
          <table:table-cell table:style-name="ce59" office:value-type="string" calcext:value-type="string">
            <text:p>DB6.DBX8.6</text:p>
          </table:table-cell>
          <table:table-cell table:style-name="ce61" office:value-type="string" calcext:value-type="string">
            <text:p>unused</text:p>
          </table:table-cell>
          <table:table-cell table:style-name="ce106"/>
          <table:table-cell table:style-name="ce124" table:number-columns-repeated="2"/>
          <table:table-cell table:style-name="ce106"/>
          <table:table-cell table:style-name="ce124" table:number-columns-repeated="2"/>
          <table:table-cell table:style-name="ce51" office:value-type="string" calcext:value-type="string">
            <text:p>CoolingWaterSupplyTemp</text:p>
          </table:table-cell>
          <table:table-cell office:value-type="string" calcext:value-type="string">
            <text:p>DB1.DBX1.6</text:p>
          </table:table-cell>
          <table:table-cell office:value-type="string" calcext:value-type="string">
            <text:p>DB1.DBX16.6</text:p>
          </table:table-cell>
          <table:table-cell office:value-type="string" calcext:value-type="string">
            <text:p>M186.7</text:p>
          </table:table-cell>
          <table:table-cell table:style-name="ce106" office:value-type="string" calcext:value-type="string">
            <text:p>DB3.DBW348</text:p>
          </table:table-cell>
          <table:table-cell table:style-name="ce125" office:value-type="string" calcext:value-type="string">
            <text:p>M182.7</text:p>
          </table:table-cell>
          <table:table-cell office:value-type="string" calcext:value-type="string">
            <text:p>unused</text:p>
          </table:table-cell>
          <table:table-cell/>
          <table:table-cell table:style-name="ce77"/>
          <table:table-cell/>
          <table:table-cell table:style-name="ce124" office:value-type="string" calcext:value-type="string">
            <text:p>TE301</text:p>
          </table:table-cell>
          <table:table-cell table:style-name="ce51" office:value-type="string" calcext:value-type="string">
            <text:p>Температура охлаждающей воды на входе</text:p>
          </table:table-cell>
        </table:table-row>
        <table:table-row table:style-name="ro4">
          <table:table-cell table:style-name="ce82" office:value-type="string" calcext:value-type="string">
            <text:p>TE302</text:p>
          </table:table-cell>
          <table:table-cell table:style-name="ce94" office:value-type="string" calcext:value-type="string">
            <text:p>DB6.DBD132</text:p>
          </table:table-cell>
          <table:table-cell table:style-name="ce51" office:value-type="string" calcext:value-type="string">
            <text:p>Cooling water return temp</text:p>
          </table:table-cell>
          <table:table-cell table:style-name="ce28" office:value-type="string" calcext:value-type="string">
            <text:p>FLT</text:p>
          </table:table-cell>
          <table:table-cell table:style-name="ce28" office:value-type="string" calcext:value-type="string">
            <text:p>AI</text:p>
          </table:table-cell>
          <table:table-cell table:style-name="ce54" office:value-type="float" office:value="200" calcext:value-type="float">
            <text:p>200,0</text:p>
          </table:table-cell>
          <table:table-cell table:style-name="ce28" office:value-type="string" calcext:value-type="string">
            <text:p>℃</text:p>
          </table:table-cell>
          <table:table-cell table:style-name="ce94" office:value-type="string" calcext:value-type="string">
            <text:p>DB58.DBW70</text:p>
          </table:table-cell>
          <table:table-cell table:style-name="ce28" office:value-type="float" office:value="1" calcext:value-type="float">
            <text:p>1</text:p>
          </table:table-cell>
          <table:table-cell table:style-name="ce94" office:value-type="string" calcext:value-type="string">
            <text:p>M235.5</text:p>
          </table:table-cell>
          <table:table-cell table:style-name="ce94" office:value-type="string" calcext:value-type="string">
            <text:p>-50...200 °C</text:p>
          </table:table-cell>
          <table:table-cell table:style-name="ce106" office:value-type="string" calcext:value-type="string">
            <text:p>DB59.DBW150</text:p>
          </table:table-cell>
          <table:table-cell table:style-name="ce106" office:value-type="string" calcext:value-type="string">
            <text:p>DB6.DBX7.1</text:p>
          </table:table-cell>
          <table:table-cell table:style-name="ce111" office:value-type="string" calcext:value-type="string">
            <text:p>Cooling water return temp. high alarm</text:p>
          </table:table-cell>
          <table:table-cell table:style-name="ce59" office:value-type="string" calcext:value-type="string">
            <text:p>DB60.DBW6</text:p>
          </table:table-cell>
          <table:table-cell table:style-name="ce59" office:value-type="string" calcext:value-type="string">
            <text:p>DB6.DBX8.6</text:p>
          </table:table-cell>
          <table:table-cell table:style-name="ce61" office:value-type="string" calcext:value-type="string">
            <text:p>unused</text:p>
          </table:table-cell>
          <table:table-cell table:style-name="ce106"/>
          <table:table-cell table:style-name="ce124" table:number-columns-repeated="2"/>
          <table:table-cell table:style-name="ce106"/>
          <table:table-cell table:style-name="ce124" table:number-columns-repeated="2"/>
          <table:table-cell table:style-name="ce51" office:value-type="string" calcext:value-type="string">
            <text:p>CoolingWateReturnTemp</text:p>
          </table:table-cell>
          <table:table-cell office:value-type="string" calcext:value-type="string">
            <text:p>DB1.DBX5.7</text:p>
          </table:table-cell>
          <table:table-cell office:value-type="string" calcext:value-type="string">
            <text:p>DB1.DBX17.0</text:p>
          </table:table-cell>
          <table:table-cell office:value-type="string" calcext:value-type="string">
            <text:p>M187.0</text:p>
          </table:table-cell>
          <table:table-cell table:style-name="ce106" office:value-type="string" calcext:value-type="string">
            <text:p>DB3.DBW350</text:p>
          </table:table-cell>
          <table:table-cell table:style-name="ce125" office:value-type="string" calcext:value-type="string">
            <text:p>M183.0</text:p>
          </table:table-cell>
          <table:table-cell office:value-type="string" calcext:value-type="string">
            <text:p>unused</text:p>
          </table:table-cell>
          <table:table-cell/>
          <table:table-cell table:style-name="ce77"/>
          <table:table-cell/>
          <table:table-cell table:style-name="ce124" office:value-type="string" calcext:value-type="string">
            <text:p>TE302</text:p>
          </table:table-cell>
          <table:table-cell table:style-name="ce51" office:value-type="string" calcext:value-type="string">
            <text:p>Температура охлаждающей воды на выходе</text:p>
          </table:table-cell>
        </table:table-row>
        <table:table-row table:style-name="ro4">
          <table:table-cell table:style-name="ce80" office:value-type="string" calcext:value-type="string">
            <text:p>TE260</text:p>
          </table:table-cell>
          <table:table-cell table:style-name="ce80" office:value-type="string" calcext:value-type="string">
            <text:p>DB6.DBW108</text:p>
          </table:table-cell>
          <table:table-cell office:value-type="string" calcext:value-type="string">
            <text:p>System temperature (нет датчика)</text:p>
          </table:table-cell>
          <table:table-cell table:number-columns-repeated="4"/>
          <table:table-cell office:value-type="string" calcext:value-type="string">
            <text:p>DB58.DBW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234.7</text:p>
          </table:table-cell>
          <table:table-cell/>
          <table:table-cell office:value-type="string" calcext:value-type="string">
            <text:p>DB59.DBW142</text:p>
          </table:table-cell>
          <table:table-cell table:style-name="ce17" office:value-type="string" calcext:value-type="string">
            <text:p>DB6.DBX6.5</text:p>
          </table:table-cell>
          <table:table-cell/>
          <table:table-cell table:style-name="ce113" office:value-type="string" calcext:value-type="string">
            <text:p>DB60.DBW42</text:p>
          </table:table-cell>
          <table:table-cell table:style-name="ce59" office:value-type="string" calcext:value-type="string">
            <text:p>DB6.DBX10.5</text:p>
          </table:table-cell>
          <table:table-cell table:number-columns-repeated="8"/>
          <table:table-cell office:value-type="string" calcext:value-type="string">
            <text:p>DB1.DBX0.3</text:p>
          </table:table-cell>
          <table:table-cell office:value-type="string" calcext:value-type="string">
            <text:p>DB1.DBX15.6</text:p>
          </table:table-cell>
          <table:table-cell office:value-type="string" calcext:value-type="string">
            <text:p>M187.1</text:p>
          </table:table-cell>
          <table:table-cell table:style-name="ce106" office:value-type="string" calcext:value-type="string">
            <text:p>DB3.DBW342</text:p>
          </table:table-cell>
          <table:table-cell table:style-name="ce125" office:value-type="string" calcext:value-type="string">
            <text:p>M183.1</text:p>
          </table:table-cell>
          <table:table-cell office:value-type="string" calcext:value-type="string">
            <text:p>non-switchable</text:p>
          </table:table-cell>
          <table:table-cell table:number-columns-repeated="5"/>
        </table:table-row>
        <table:table-row table:style-name="ro2" table:number-rows-repeated="2">
          <table:table-cell table:number-columns-repeated="28"/>
          <table:table-cell table:style-name="ce80" table:number-columns-repeated="2"/>
          <table:table-cell table:number-columns-repeated="5"/>
        </table:table-row>
        <table:table-row table:style-name="ro2">
          <table:table-cell table:style-name="ce80"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INT16</text:p>
          </table:table-cell>
          <table:table-cell table:number-columns-repeated="23"/>
          <table:table-cell table:style-name="ce80" table:number-columns-repeated="2"/>
          <table:table-cell table:number-columns-repeated="5"/>
        </table:table-row>
        <table:table-row table:style-name="ro2">
          <table:table-cell table:style-name="ce80"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INT16</text:p>
          </table:table-cell>
          <table:table-cell table:number-columns-repeated="23"/>
          <table:table-cell table:style-name="ce80" table:number-columns-repeated="2"/>
          <table:table-cell table:number-columns-repeated="5"/>
        </table:table-row>
        <table:table-row table:style-name="ro2">
          <table:table-cell table:style-name="ce80"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NT16</text:p>
          </table:table-cell>
          <table:table-cell table:number-columns-repeated="23"/>
          <table:table-cell table:style-name="ce80" table:number-columns-repeated="2"/>
          <table:table-cell table:number-columns-repeated="5"/>
        </table:table-row>
        <table:table-row table:style-name="ro2">
          <table:table-cell table:style-name="ce80"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INT16</text:p>
          </table:table-cell>
          <table:table-cell table:number-columns-repeated="30"/>
        </table:table-row>
        <table:table-row table:style-name="ro2">
          <table:table-cell table:style-name="ce80" table:number-columns-repeated="3"/>
          <table:table-cell office:value-type="string" calcext:value-type="string">
            <text:p>false</text:p>
          </table:table-cell>
          <table:table-cell table:number-columns-repeated="31"/>
        </table:table-row>
        <table:table-row table:style-name="ro2">
          <table:table-cell table:style-name="ce80" table:number-columns-repeated="3"/>
          <table:table-cell office:value-type="string" calcext:value-type="string">
            <text:p>false</text:p>
          </table:table-cell>
          <table:table-cell table:number-columns-repeated="31"/>
        </table:table-row>
        <table:table-row table:style-name="ro2">
          <table:table-cell table:style-name="ce80" table:number-columns-repeated="3"/>
          <table:table-cell table:number-columns-repeated="32"/>
        </table:table-row>
        <table:table-row table:style-name="ro2">
          <table:table-cell table:style-name="ce80" table:number-columns-repeated="3"/>
          <table:table-cell table:number-columns-repeated="32"/>
        </table:table-row>
      </table:table>
      <table:table table:name="CtrlSystem" table:style-name="ta1">
        <table:table-column table:style-name="co26" table:default-cell-style-name="Default"/>
        <table:table-column table:style-name="co27" table:default-cell-style-name="Default"/>
        <table:table-column table:style-name="co27" table:default-cell-style-name="ce106"/>
        <table:table-column table:style-name="co28" table:default-cell-style-name="ce138"/>
        <table:table-column table:style-name="co1" table:default-cell-style-name="ce144"/>
        <table:table-column table:style-name="co29" table:default-cell-style-name="Default"/>
        <table:table-column table:style-name="co30" table:default-cell-style-name="ce80"/>
        <table:table-column table:style-name="co31" table:default-cell-style-name="ce80"/>
        <table:table-column table:style-name="co32" table:default-cell-style-name="Default"/>
        <table:table-column table:style-name="co33" table:default-cell-style-name="ce80"/>
        <table:table-column table:style-name="co17" table:default-cell-style-name="ce80"/>
        <table:table-column table:style-name="co34" table:default-cell-style-name="ce80"/>
        <table:table-column table:style-name="co32" table:default-cell-style-name="Default"/>
        <table:table-column table:style-name="co1" table:default-cell-style-name="ce80"/>
        <table:table-column table:style-name="co1" table:default-cell-style-name="Default"/>
        <table:table-column table:style-name="co1" table:default-cell-style-name="ce80"/>
        <table:table-column table:style-name="co1" table:default-cell-style-name="Default"/>
        <table:table-column table:style-name="co35" table:default-cell-style-name="Default"/>
        <table:table-column table:style-name="co1" table:number-columns-repeated="46" table:default-cell-style-name="Default"/>
        <table:table-row table:style-name="ro1">
          <table:table-cell table:number-columns-repeated="2"/>
          <table:table-cell table:style-name="ce135" office:value-type="string" calcext:value-type="string">
            <text:p>Класс ***.<text:span text:style-name="T5">CtrlSystem</text:span>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48"/>
        </table:table-row>
        <table:table-row table:style-name="ro2">
          <table:table-cell table:number-columns-repeated="2"/>
          <table:table-cell table:style-name="Default" office:value-type="string" calcext:value-type="string">
            <text:p>Название: Общие системные параметры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48"/>
        </table:table-row>
        <table:table-row table:style-name="ro2" table:number-rows-repeated="2"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48"/>
        </table:table-row>
        <table:table-row table:style-name="ro2"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  <table:table-cell table:style-name="ce155" office:value-type="string" calcext:value-type="string" table:number-columns-spanned="2" table:number-rows-spanned="1">
            <text:p>События</text:p>
          </table:table-cell>
          <table:covered-table-cell table:style-name="Default"/>
          <table:table-cell/>
          <table:table-cell table:style-name="Default"/>
          <table:table-cell/>
          <table:table-cell table:style-name="Default"/>
          <table:table-cell table:number-columns-repeated="48"/>
        </table:table-row>
        <table:table-row table:style-name="ro5">
          <table:table-cell office:value-type="string" calcext:value-type="string">
            <text:p>Узел OPC</text:p>
            <text:p>(групповой тег)</text:p>
          </table:table-cell>
          <table:table-cell office:value-type="string" calcext:value-type="string">
            <text:p>Код в узле</text:p>
          </table:table-cell>
          <table:table-cell table:style-name="Default" office:value-type="string" calcext:value-type="string">
            <text:p>Адрес</text:p>
          </table:table-cell>
          <table:table-cell table:style-name="Default" office:value-type="string" calcext:value-type="string">
            <text:p>Описание анг.</text:p>
          </table:table-cell>
          <table:table-cell table:style-name="Default" office:value-type="string" calcext:value-type="string">
            <text:p>Знач. при 1</text:p>
          </table:table-cell>
          <table:table-cell office:value-type="string" calcext:value-type="string">
            <text:p>Название анг.</text:p>
          </table:table-cell>
          <table:table-cell table:style-name="Default" office:value-type="string" calcext:value-type="string">
            <text:p>Название рус.</text:p>
          </table:table-cell>
          <table:table-cell table:style-name="Default" office:value-type="string" calcext:value-type="string">
            <text:p>Описание рус.</text:p>
          </table:table-cell>
          <table:table-cell office:value-type="string" calcext:value-type="string">
            <text:p>Групповой флаг</text:p>
          </table:table-cell>
          <table:table-cell table:style-name="ce96" office:value-type="string" calcext:value-type="string">
            <text:p>Номер бита в групповом флаге</text:p>
          </table:table-cell>
          <table:table-cell table:style-name="ce158" office:value-type="string" calcext:value-type="string">
            <text:p>0-&gt;1</text:p>
          </table:table-cell>
          <table:table-cell table:style-name="ce158" office:value-type="string" calcext:value-type="string">
            <text:p>1-&gt;0</text:p>
          </table:table-cell>
          <table:table-cell office:value-type="string" calcext:value-type="string">
            <text:p>Комментарий</text:p>
          </table:table-cell>
          <table:table-cell table:style-name="Default"/>
          <table:table-cell office:value-type="string" calcext:value-type="string">
            <text:p>Соответствие блока пересылки данных DB6 и внутренних флагов контроллера M</text:p>
          </table:table-cell>
          <table:table-cell table:style-name="Default"/>
          <table:table-cell table:number-columns-repeated="48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B6.DBX0.0</text:p>
          </table:table-cell>
          <table:table-cell office:value-type="string" calcext:value-type="string">
            <text:p>Compressor NOT ready</text:p>
          </table:table-cell>
          <table:table-cell office:value-type="string" calcext:value-type="string">
            <office:annotation draw:style-name="gr6" draw:text-style-name="P4" svg:width="2.899cm" svg:height="6.085cm" svg:x="22.155cm" svg:y="2.853cm" draw:caption-point-x="-0.611cm" draw:caption-point-y="0.804cm">
              <dc:creator>&lt;анонимный&gt;</dc:creator>
              <dc:date>2025-01-20T00:00:00</dc:date>
              <text:p text:style-name="P3"><text:span text:style-name="T1">Готов (0), если нули в DB6.DBX2.0, 2.1, 2.2, 2.3, 2.4, 2.7, 3.0, 3.1, 3.2. Если хоть один из них единица, то через 8 секунд будет «1» здесь (не готов). (назначение 3.2?)</text:span></text:p>
            </office:annotation>
            <text:p>not ready</text:p>
          </table:table-cell>
          <table:table-cell office:value-type="string" calcext:value-type="string">
            <text:p>comprNotReady</text:p>
          </table:table-cell>
          <table:table-cell table:style-name="Default" office:value-type="string" calcext:value-type="string">
            <text:p>компрНеГотов</text:p>
          </table:table-cell>
          <table:table-cell table:style-name="Default" office:value-type="string" calcext:value-type="string">
            <text:p>Компрессор не готов</text:p>
          </table:table-cell>
          <table:table-cell table:formula="of:=[.A7]" office:value-type="string" office:string-value="State" calcext:value-type="string">
            <text:p>State</text:p>
          </table:table-cell>
          <table:table-cell table:style-name="Default" table:formula="of:=[.B7]" office:value-type="float" office:value="8" calcext:value-type="float">
            <text:p>8</text:p>
          </table:table-cell>
          <table:table-cell table:style-name="Default"/>
          <table:table-cell table:style-name="Default" office:value-type="string" calcext:value-type="string">
            <text:p>Компрессор готов</text:p>
          </table:table-cell>
          <table:table-cell/>
          <table:table-cell table:style-name="Default"/>
          <table:table-cell/>
          <table:table-cell table:style-name="Default" office:value-type="string" calcext:value-type="string">
            <text:p>DB6.DBW0</text:p>
          </table:table-cell>
          <table:table-cell office:value-type="string" calcext:value-type="string">
            <text:p>MW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B6.DBX0.1</text:p>
          </table:table-cell>
          <table:table-cell office:value-type="string" calcext:value-type="string">
            <text:p>Total warning</text:p>
          </table:table-cell>
          <table:table-cell office:value-type="string" calcext:value-type="string">
            <text:p>alarm</text:p>
          </table:table-cell>
          <table:table-cell office:value-type="string" calcext:value-type="string">
            <text:p>totalWarn</text:p>
          </table:table-cell>
          <table:table-cell table:style-name="Default" office:value-type="string" calcext:value-type="string">
            <text:p>общаяОшибка</text:p>
          </table:table-cell>
          <table:table-cell table:style-name="Default" office:value-type="string" calcext:value-type="string">
            <text:p>Установлено хоть одно предупреждение</text:p>
          </table:table-cell>
          <table:table-cell table:formula="of:=[.A8]" office:value-type="string" office:string-value="State" calcext:value-type="string">
            <text:p>State</text:p>
          </table:table-cell>
          <table:table-cell table:style-name="Default" table:formula="of:=[.B8]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office:value-type="string" calcext:value-type="string">
            <text:p>DB6.DBW2</text:p>
          </table:table-cell>
          <table:table-cell office:value-type="string" calcext:value-type="string">
            <text:p>MW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B6.DBX0.2</text:p>
          </table:table-cell>
          <table:table-cell office:value-type="string" calcext:value-type="string">
            <text:p>Total trip / fault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totalFault</text:p>
          </table:table-cell>
          <table:table-cell table:style-name="Default" office:value-type="string" calcext:value-type="string">
            <text:p>общаяАвария</text:p>
          </table:table-cell>
          <table:table-cell table:style-name="Default" office:value-type="string" calcext:value-type="string">
            <text:p>Установлена хоть одна авария</text:p>
          </table:table-cell>
          <table:table-cell table:formula="of:=[.A9]" office:value-type="string" office:string-value="State" calcext:value-type="string">
            <text:p>State</text:p>
          </table:table-cell>
          <table:table-cell table:style-name="Default" table:formula="of:=[.B9]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office:value-type="string" calcext:value-type="string">
            <text:p>DB6.DBW4</text:p>
          </table:table-cell>
          <table:table-cell office:value-type="string" calcext:value-type="string">
            <text:p>MW4</text:p>
          </table:table-cell>
          <table:table-cell office:value-type="string" calcext:value-type="string">
            <text:p>warning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B6.DBX0.3</text:p>
          </table:table-cell>
          <table:table-cell office:value-type="string" calcext:value-type="string">
            <text:p>Compressor run/stop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comprRun</text:p>
          </table:table-cell>
          <table:table-cell table:style-name="Default" office:value-type="string" calcext:value-type="string">
            <text:p>компрРаботает</text:p>
          </table:table-cell>
          <table:table-cell table:style-name="Default" office:value-type="string" calcext:value-type="string">
            <text:p>Компрессор работает</text:p>
          </table:table-cell>
          <table:table-cell table:formula="of:=[.A10]" office:value-type="string" office:string-value="State" calcext:value-type="string">
            <text:p>State</text:p>
          </table:table-cell>
          <table:table-cell table:style-name="Default" table:formula="of:=[.B10]" office:value-type="float" office:value="11" calcext:value-type="float">
            <text:p>11</text:p>
          </table:table-cell>
          <table:table-cell table:style-name="Default" office:value-type="string" calcext:value-type="string">
            <text:p>Компрессор включен</text:p>
          </table:table-cell>
          <table:table-cell table:style-name="Default" office:value-type="string" calcext:value-type="string">
            <text:p>Компрессор Отключен</text:p>
          </table:table-cell>
          <table:table-cell/>
          <table:table-cell table:style-name="Default"/>
          <table:table-cell/>
          <table:table-cell table:style-name="Default" office:value-type="string" calcext:value-type="string">
            <text:p>DB6.DBW6</text:p>
          </table:table-cell>
          <table:table-cell office:value-type="string" calcext:value-type="string">
            <text:p>MW6</text:p>
          </table:table-cell>
          <table:table-cell office:value-type="string" calcext:value-type="string">
            <text:p>warning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B6.DBX0.4</text:p>
          </table:table-cell>
          <table:table-cell office:value-type="string" calcext:value-type="string">
            <text:p>Oil heater state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ilHeaterOn</text:p>
          </table:table-cell>
          <table:table-cell table:style-name="Default" office:value-type="string" calcext:value-type="string">
            <text:p>нагревМаслаВкл</text:p>
          </table:table-cell>
          <table:table-cell table:style-name="Default" office:value-type="string" calcext:value-type="string">
            <text:p>Нагреватель масла включен</text:p>
          </table:table-cell>
          <table:table-cell table:formula="of:=[.A11]" office:value-type="string" office:string-value="State" calcext:value-type="string">
            <text:p>State</text:p>
          </table:table-cell>
          <table:table-cell table:style-name="Default" table:formula="of:=[.B11]" office:value-type="float" office:value="12" calcext:value-type="float">
            <text:p>12</text:p>
          </table:table-cell>
          <table:table-cell table:style-name="Default" office:value-type="string" calcext:value-type="string">
            <text:p>Нагреватель масла включен</text:p>
          </table:table-cell>
          <table:table-cell table:style-name="Default" office:value-type="string" calcext:value-type="string">
            <text:p>Нагреватель масла Отключен</text:p>
          </table:table-cell>
          <table:table-cell/>
          <table:table-cell table:style-name="Default"/>
          <table:table-cell/>
          <table:table-cell table:style-name="Default" office:value-type="string" calcext:value-type="string">
            <text:p>DB6.DBW8</text:p>
          </table:table-cell>
          <table:table-cell office:value-type="string" calcext:value-type="string">
            <text:p>MW8</text:p>
          </table:table-cell>
          <table:table-cell office:value-type="string" calcext:value-type="string">
            <text:p>alarm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B6.DBX0.5</text:p>
          </table:table-cell>
          <table:table-cell office:value-type="string" calcext:value-type="string">
            <text:p>Oil pump run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ilPumpRun</text:p>
          </table:table-cell>
          <table:table-cell table:style-name="Default" office:value-type="string" calcext:value-type="string">
            <text:p>маслонасосВкл</text:p>
          </table:table-cell>
          <table:table-cell table:style-name="Default" office:value-type="string" calcext:value-type="string">
            <text:p>Маслонасос работает</text:p>
          </table:table-cell>
          <table:table-cell table:formula="of:=[.A12]" office:value-type="string" office:string-value="State" calcext:value-type="string">
            <text:p>State</text:p>
          </table:table-cell>
          <table:table-cell table:style-name="Default" table:formula="of:=[.B12]" office:value-type="float" office:value="13" calcext:value-type="float">
            <text:p>13</text:p>
          </table:table-cell>
          <table:table-cell table:style-name="Default" office:value-type="string" calcext:value-type="string">
            <text:p>Маслонасос включен</text:p>
          </table:table-cell>
          <table:table-cell table:style-name="Default" office:value-type="string" calcext:value-type="string">
            <text:p>Маслонасос Отключен</text:p>
          </table:table-cell>
          <table:table-cell/>
          <table:table-cell table:style-name="Default"/>
          <table:table-cell/>
          <table:table-cell table:style-name="Default" office:value-type="string" calcext:value-type="string">
            <text:p>DB6.DBW10</text:p>
          </table:table-cell>
          <table:table-cell office:value-type="string" calcext:value-type="string">
            <text:p>MW10</text:p>
          </table:table-cell>
          <table:table-cell office:value-type="string" calcext:value-type="string">
            <text:p>alarm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B6.DBX0.6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loaded</text:p>
          </table:table-cell>
          <table:table-cell table:style-name="Default" office:value-type="string" calcext:value-type="string">
            <text:p>нагружен</text:p>
          </table:table-cell>
          <table:table-cell table:style-name="Default" office:value-type="string" calcext:value-type="string">
            <text:p>Компрессор нагружен</text:p>
          </table:table-cell>
          <table:table-cell table:formula="of:=[.A13]" office:value-type="string" office:string-value="State" calcext:value-type="string">
            <text:p>State</text:p>
          </table:table-cell>
          <table:table-cell table:style-name="Default" table:formula="of:=[.B13]" office:value-type="float" office:value="14" calcext:value-type="float">
            <text:p>14</text:p>
          </table:table-cell>
          <table:table-cell table:style-name="Default" office:value-type="string" calcext:value-type="string">
            <text:p>Компрессор нагружен</text:p>
          </table:table-cell>
          <table:table-cell table:style-name="Default" office:value-type="string" calcext:value-type="string">
            <text:p>Компрессор разгружен</text:p>
          </table:table-cell>
          <table:table-cell/>
          <table:table-cell table:style-name="Default"/>
          <table:table-cell/>
          <table:table-cell table:style-name="Default"/>
          <table:table-cell table:number-columns-repeated="48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6.DBX1.2</text:p>
          </table:table-cell>
          <table:table-cell table:style-name="ce139" office:value-type="string" calcext:value-type="string">
            <text:p>State of automatic compressor load</text:p>
          </table:table-cell>
          <table:table-cell office:value-type="string" calcext:value-type="string">
            <text:p>enable</text:p>
          </table:table-cell>
          <table:table-cell table:style-name="ce148" office:value-type="string" calcext:value-type="string">
            <text:p>autoLoadState</text:p>
          </table:table-cell>
          <table:table-cell table:style-name="Default" office:value-type="string" calcext:value-type="string">
            <text:p>автозагрузка</text:p>
          </table:table-cell>
          <table:table-cell table:style-name="Default" office:value-type="string" calcext:value-type="string">
            <text:p>Статус автозагрузки</text:p>
          </table:table-cell>
          <table:table-cell table:formula="of:=[.A14]" office:value-type="string" office:string-value="State" calcext:value-type="string">
            <text:p>State</text:p>
          </table:table-cell>
          <table:table-cell table:style-name="Default" table:formula="of:=[.B14]" office:value-type="float" office:value="2" calcext:value-type="float">
            <text:p>2</text:p>
          </table:table-cell>
          <table:table-cell table:style-name="Default" office:value-type="string" calcext:value-type="string">
            <text:p>Автозагрузка включена</text:p>
          </table:table-cell>
          <table:table-cell table:style-name="Default" office:value-type="string" calcext:value-type="string">
            <text:p>Автозагрузка отключена</text:p>
          </table:table-cell>
          <table:table-cell/>
          <table:table-cell table:style-name="Default"/>
          <table:table-cell/>
          <table:table-cell table:style-name="Default"/>
          <table:table-cell table:number-columns-repeated="48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B6.DBX1.3</text:p>
          </table:table-cell>
          <table:table-cell office:value-type="string" calcext:value-type="string">
            <text:p>No surge alarm</text:p>
          </table:table-cell>
          <table:table-cell office:value-type="string" calcext:value-type="string">
            <text:p>no alarm</text:p>
          </table:table-cell>
          <table:table-cell office:value-type="string" calcext:value-type="string">
            <text:p>noSurgeAlarm</text:p>
          </table:table-cell>
          <table:table-cell table:style-name="Default" office:value-type="string" calcext:value-type="string">
            <text:p>нетПомпажа</text:p>
          </table:table-cell>
          <table:table-cell table:style-name="Default" office:value-type="string" calcext:value-type="string">
            <text:p>Помпажа нет</text:p>
          </table:table-cell>
          <table:table-cell table:formula="of:=[.A15]" office:value-type="string" office:string-value="State" calcext:value-type="string">
            <text:p>State</text:p>
          </table:table-cell>
          <table:table-cell table:style-name="Default" table:formula="of:=[.B15]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Помпаж</text:p>
          </table:table-cell>
          <table:table-cell/>
          <table:table-cell table:style-name="Default"/>
          <table:table-cell/>
          <table:table-cell table:style-name="Default"/>
          <table:table-cell table:number-columns-repeated="48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4" calcext:value-type="float">
            <text:p>4</text:p>
          </table:table-cell>
          <table:table-cell table:style-name="ce136" office:value-type="string" calcext:value-type="string">
            <text:p>DB6.DBX1.4</text:p>
          </table:table-cell>
          <table:table-cell table:style-name="ce140" office:value-type="string" calcext:value-type="string">
            <text:p>Open output valve</text:p>
          </table:table-cell>
          <table:table-cell table:style-name="ce146" office:value-type="string" calcext:value-type="string">
            <text:p>open</text:p>
          </table:table-cell>
          <table:table-cell table:style-name="ce149" office:value-type="string" calcext:value-type="string">
            <text:p>openOutputValve</text:p>
          </table:table-cell>
          <table:table-cell table:style-name="ce128" office:value-type="string" calcext:value-type="string">
            <text:p>открВыхКлапан</text:p>
          </table:table-cell>
          <table:table-cell table:style-name="ce128" office:value-type="string" calcext:value-type="string">
            <text:p><text:span text:style-name="T10">Открыть в</text:span>ыходной клапан</text:p>
          </table:table-cell>
          <table:table-cell table:formula="of:=[.A16]" office:value-type="string" office:string-value="State" calcext:value-type="string">
            <text:p>State</text:p>
          </table:table-cell>
          <table:table-cell table:style-name="Default" table:formula="of:=[.B16]" office:value-type="float" office:value="4" calcext:value-type="float">
            <text:p>4</text:p>
          </table:table-cell>
          <table:table-cell table:style-name="ce128" office:value-type="string" calcext:value-type="string">
            <text:p>Выходной клапан открыть</text:p>
          </table:table-cell>
          <table:table-cell table:style-name="ce128" office:value-type="string" calcext:value-type="string">
            <text:p>Выходной клапан не открывать</text:p>
          </table:table-cell>
          <table:table-cell/>
          <table:table-cell table:style-name="Default"/>
          <table:table-cell/>
          <table:table-cell table:style-name="Default"/>
          <table:table-cell table:number-columns-repeated="48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B6.DBX1.6</text:p>
          </table:table-cell>
          <table:table-cell office:value-type="string" calcext:value-type="string">
            <text:p>Compressor run more then 25 second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comprRunMore25s</text:p>
          </table:table-cell>
          <table:table-cell table:style-name="Default" office:value-type="string" calcext:value-type="string">
            <text:p>компрРаботает25с</text:p>
          </table:table-cell>
          <table:table-cell table:style-name="Default" office:value-type="string" calcext:value-type="string">
            <text:p>Компрессор работает дольше 25 секунд</text:p>
          </table:table-cell>
          <table:table-cell table:formula="of:=[.A17]" office:value-type="string" office:string-value="State" calcext:value-type="string">
            <text:p>State</text:p>
          </table:table-cell>
          <table:table-cell table:style-name="Default" table:formula="of:=[.B17]" office:value-type="float" office:value="6" calcext:value-type="float">
            <text:p>6</text:p>
          </table:table-cell>
          <table:table-cell table:style-name="Default" office:value-type="string" calcext:value-type="string">
            <text:p>Компрессор работает дольше 25 секунд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8"/>
        </table:table-row>
        <table:table-row table:style-name="ro1">
          <table:table-cell office:value-type="string" calcext:value-type="string">
            <text:p>ReadyCondi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B6.DBX2.0</text:p>
          </table:table-cell>
          <table:table-cell office:value-type="string" calcext:value-type="string">
            <text:p>Total trip / fault (Ready Condition)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c_totalFault</text:p>
          </table:table-cell>
          <table:table-cell table:style-name="Default" office:value-type="string" calcext:value-type="string">
            <text:p>готов_общаяАвария</text:p>
          </table:table-cell>
          <table:table-cell table:style-name="Default" office:value-type="string" calcext:value-type="string">
            <text:p>Общая авария</text:p>
          </table:table-cell>
          <table:table-cell table:formula="of:=[.A18]" office:value-type="string" office:string-value="ReadyCondition" calcext:value-type="string">
            <text:p>ReadyCondition</text:p>
          </table:table-cell>
          <table:table-cell table:style-name="Default" table:formula="of:=[.B18]" office:value-type="float" office:value="8" calcext:value-type="float">
            <text:p>8</text:p>
          </table:table-cell>
          <table:table-cell table:style-name="Default" table:number-columns-repeated="2"/>
          <table:table-cell office:value-type="string" calcext:value-type="string">
            <text:p>Условие готовности к пуску</text:p>
          </table:table-cell>
          <table:table-cell table:style-name="Default"/>
          <table:table-cell/>
          <table:table-cell table:style-name="Default"/>
          <table:table-cell table:number-columns-repeated="48"/>
        </table:table-row>
        <table:table-row table:style-name="ro1">
          <table:table-cell office:value-type="string" calcext:value-type="string">
            <text:p>ReadyCondi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B6.DBX2.1</text:p>
          </table:table-cell>
          <table:table-cell office:value-type="string" calcext:value-type="string">
            <text:p>Drive motor not fully stopper (Ready Condition)</text:p>
          </table:table-cell>
          <table:table-cell office:value-type="string" calcext:value-type="string">
            <text:p>not </text:p>
          </table:table-cell>
          <table:table-cell office:value-type="string" calcext:value-type="string">
            <text:p>rc_driveMotorNotStopped</text:p>
          </table:table-cell>
          <table:table-cell table:style-name="Default" office:value-type="string" calcext:value-type="string">
            <text:p>готов_моторНеОстановлен</text:p>
          </table:table-cell>
          <table:table-cell table:style-name="Default" office:value-type="string" calcext:value-type="string">
            <text:p>Мотор не остановлен полностью</text:p>
          </table:table-cell>
          <table:table-cell table:formula="of:=[.A19]" office:value-type="string" office:string-value="ReadyCondition" calcext:value-type="string">
            <text:p>ReadyCondition</text:p>
          </table:table-cell>
          <table:table-cell table:style-name="Default" table:formula="of:=[.B19]" office:value-type="float" office:value="9" calcext:value-type="float">
            <text:p>9</text:p>
          </table:table-cell>
          <table:table-cell table:style-name="Default" table:number-columns-repeated="2"/>
          <table:table-cell office:value-type="string" calcext:value-type="string">
            <text:p>Условие готовности к пуску</text:p>
          </table:table-cell>
          <table:table-cell table:style-name="Default"/>
          <table:table-cell/>
          <table:table-cell table:style-name="Default"/>
          <table:table-cell table:number-columns-repeated="48"/>
        </table:table-row>
        <table:table-row table:style-name="ro1">
          <table:table-cell office:value-type="string" calcext:value-type="string">
            <text:p>ReadyCondi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B6.DBX2.2</text:p>
          </table:table-cell>
          <table:table-cell office:value-type="string" calcext:value-type="string">
            <text:p>Oil supply pressure low (Ready Condition)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c_oilPressLow</text:p>
          </table:table-cell>
          <table:table-cell table:style-name="Default" office:value-type="string" calcext:value-type="string">
            <text:p>готов_давлМаслаНизко</text:p>
          </table:table-cell>
          <table:table-cell table:style-name="Default" office:value-type="string" calcext:value-type="string">
            <text:p>Давление масла низко</text:p>
          </table:table-cell>
          <table:table-cell table:formula="of:=[.A20]" office:value-type="string" office:string-value="ReadyCondition" calcext:value-type="string">
            <text:p>ReadyCondition</text:p>
          </table:table-cell>
          <table:table-cell table:style-name="Default" table:formula="of:=[.B20]" office:value-type="float" office:value="10" calcext:value-type="float">
            <text:p>10</text:p>
          </table:table-cell>
          <table:table-cell table:style-name="Default" table:number-columns-repeated="2"/>
          <table:table-cell office:value-type="string" calcext:value-type="string">
            <text:p>Условие готовности к пуску</text:p>
          </table:table-cell>
          <table:table-cell table:style-name="Default"/>
          <table:table-cell/>
          <table:table-cell table:style-name="Default"/>
          <table:table-cell table:number-columns-repeated="48"/>
        </table:table-row>
        <table:table-row table:style-name="ro1">
          <table:table-cell office:value-type="string" calcext:value-type="string">
            <text:p>ReadyCondi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B6.DBX2.3</text:p>
          </table:table-cell>
          <table:table-cell office:value-type="string" calcext:value-type="string">
            <text:p>Oil supply temperature low (Ready Condition)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c_oilTempLow</text:p>
          </table:table-cell>
          <table:table-cell table:style-name="Default" office:value-type="string" calcext:value-type="string">
            <text:p>готов_темпМаслаНизка</text:p>
          </table:table-cell>
          <table:table-cell table:style-name="Default" office:value-type="string" calcext:value-type="string">
            <text:p>Температура масла низка</text:p>
          </table:table-cell>
          <table:table-cell table:formula="of:=[.A21]" office:value-type="string" office:string-value="ReadyCondition" calcext:value-type="string">
            <text:p>ReadyCondition</text:p>
          </table:table-cell>
          <table:table-cell table:style-name="Default" table:formula="of:=[.B21]" office:value-type="float" office:value="11" calcext:value-type="float">
            <text:p>11</text:p>
          </table:table-cell>
          <table:table-cell table:style-name="Default" table:number-columns-repeated="2"/>
          <table:table-cell office:value-type="string" calcext:value-type="string">
            <text:p>Условие готовности к пуску</text:p>
          </table:table-cell>
          <table:table-cell table:style-name="Default"/>
          <table:table-cell/>
          <table:table-cell table:style-name="Default"/>
          <table:table-cell table:number-columns-repeated="48"/>
        </table:table-row>
        <table:table-row table:style-name="ro1">
          <table:table-cell office:value-type="string" calcext:value-type="string">
            <text:p>ReadyCondi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B6.DBX2.4</text:p>
          </table:table-cell>
          <table:table-cell office:value-type="string" calcext:value-type="string">
            <text:p>Emergency stop button pressed (Ready Condition)</text:p>
          </table:table-cell>
          <table:table-cell office:value-type="string" calcext:value-type="string">
            <text:p>not</text:p>
          </table:table-cell>
          <table:table-cell table:style-name="ce125" office:value-type="string" calcext:value-type="string">
            <text:p>rc_emerStopBtnPressed</text:p>
          </table:table-cell>
          <table:table-cell table:style-name="ce125" office:value-type="string" calcext:value-type="string">
            <text:p>готов_кнпАварСтопНажата</text:p>
          </table:table-cell>
          <table:table-cell table:style-name="ce125" office:value-type="string" calcext:value-type="string">
            <text:p>Нажата кнопка аварийного останова</text:p>
          </table:table-cell>
          <table:table-cell table:formula="of:=[.A22]" office:value-type="string" office:string-value="ReadyCondition" calcext:value-type="string">
            <text:p>ReadyCondition</text:p>
          </table:table-cell>
          <table:table-cell table:style-name="Default" table:formula="of:=[.B22]" office:value-type="float" office:value="12" calcext:value-type="float">
            <text:p>12</text:p>
          </table:table-cell>
          <table:table-cell table:style-name="ce125" table:number-columns-repeated="2"/>
          <table:table-cell office:value-type="string" calcext:value-type="string">
            <text:p>Условие готовности к пуску</text:p>
          </table:table-cell>
          <table:table-cell table:style-name="Default"/>
          <table:table-cell/>
          <table:table-cell table:style-name="Default"/>
          <table:table-cell table:number-columns-repeated="48"/>
        </table:table-row>
        <table:table-row table:style-name="ro1">
          <table:table-cell office:value-type="string" calcext:value-type="string">
            <text:p>ReadyConditi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B6.DBX2.7</text:p>
          </table:table-cell>
          <table:table-cell office:value-type="string" calcext:value-type="string">
            <text:p>IGV position not at 0% (Ready Condition)</text:p>
          </table:table-cell>
          <table:table-cell office:value-type="string" calcext:value-type="string">
            <text:p>not</text:p>
          </table:table-cell>
          <table:table-cell table:style-name="ce125" office:value-type="string" calcext:value-type="string">
            <text:p>rc_IGVnotAt0</text:p>
          </table:table-cell>
          <table:table-cell table:style-name="ce125" office:value-type="string" calcext:value-type="string">
            <text:p>готов_напрАппНеНа0</text:p>
          </table:table-cell>
          <table:table-cell table:style-name="ce125" office:value-type="string" calcext:value-type="string">
            <text:p>Направляющий аппарат (ДЗ?) не на 0%</text:p>
          </table:table-cell>
          <table:table-cell table:formula="of:=[.A23]" office:value-type="string" office:string-value="ReadyCondition" calcext:value-type="string">
            <text:p>ReadyCondition</text:p>
          </table:table-cell>
          <table:table-cell table:style-name="Default" table:formula="of:=[.B23]" office:value-type="float" office:value="15" calcext:value-type="float">
            <text:p>15</text:p>
          </table:table-cell>
          <table:table-cell table:style-name="ce125" table:number-columns-repeated="2"/>
          <table:table-cell office:value-type="string" calcext:value-type="string">
            <text:p>Условие готовности к пуску</text:p>
          </table:table-cell>
          <table:table-cell table:style-name="Default"/>
          <table:table-cell/>
          <table:table-cell table:style-name="Default"/>
          <table:table-cell table:number-columns-repeated="48"/>
        </table:table-row>
        <table:table-row table:style-name="ro1">
          <table:table-cell office:value-type="string" calcext:value-type="string">
            <text:p>ReadyCondi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B6.DBX3.0</text:p>
          </table:table-cell>
          <table:table-cell office:value-type="string" calcext:value-type="string">
            <text:p>BOV position not fully opened (Ready Condition)</text:p>
          </table:table-cell>
          <table:table-cell office:value-type="string" calcext:value-type="string">
            <text:p>not</text:p>
          </table:table-cell>
          <table:table-cell table:style-name="ce125" office:value-type="string" calcext:value-type="string">
            <text:p>rc_BOVnotFullyOpened</text:p>
          </table:table-cell>
          <table:table-cell table:style-name="ce125" office:value-type="string" calcext:value-type="string">
            <text:p>готов_ППКнеОткрПолностью</text:p>
          </table:table-cell>
          <table:table-cell table:style-name="ce125" office:value-type="string" calcext:value-type="string">
            <text:p>ППК не открыт полностью</text:p>
          </table:table-cell>
          <table:table-cell table:formula="of:=[.A24]" office:value-type="string" office:string-value="ReadyCondition" calcext:value-type="string">
            <text:p>ReadyCondition</text:p>
          </table:table-cell>
          <table:table-cell table:style-name="Default" table:formula="of:=[.B24]" office:value-type="float" office:value="0" calcext:value-type="float">
            <text:p>0</text:p>
          </table:table-cell>
          <table:table-cell table:style-name="ce125" table:number-columns-repeated="2"/>
          <table:table-cell office:value-type="string" calcext:value-type="string">
            <text:p>Условие готовности к пуску</text:p>
          </table:table-cell>
          <table:table-cell table:number-columns-repeated="2"/>
          <table:table-cell table:style-name="Default"/>
          <table:table-cell table:number-columns-repeated="4"/>
          <table:table-cell table:style-name="ce80" table:number-columns-repeated="44"/>
        </table:table-row>
        <table:table-row table:style-name="ro1">
          <table:table-cell office:value-type="string" calcext:value-type="string">
            <text:p>Ready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6.DBX3.1</text:p>
          </table:table-cell>
          <table:table-cell office:value-type="string" calcext:value-type="string">
            <text:p>Discharge check valve failure (Ready Condition)</text:p>
          </table:table-cell>
          <table:table-cell office:value-type="string" calcext:value-type="string">
            <text:p>not</text:p>
          </table:table-cell>
          <table:table-cell table:style-name="ce125" office:value-type="string" calcext:value-type="string">
            <text:p>rc_dischCheckVlvFailure</text:p>
          </table:table-cell>
          <table:table-cell table:style-name="ce125" office:value-type="string" calcext:value-type="string">
            <text:p>готов_сбойКлапКонтрРасхода</text:p>
          </table:table-cell>
          <table:table-cell table:style-name="ce125" office:value-type="string" calcext:value-type="string">
            <text:p>Неполадка клапана контроля расхода (обратный клапан?)</text:p>
          </table:table-cell>
          <table:table-cell table:formula="of:=[.A25]" office:value-type="string" office:string-value="ReadyCondition" calcext:value-type="string">
            <text:p>ReadyCondition</text:p>
          </table:table-cell>
          <table:table-cell table:style-name="Default" table:formula="of:=[.B25]" office:value-type="float" office:value="1" calcext:value-type="float">
            <text:p>1</text:p>
          </table:table-cell>
          <table:table-cell table:style-name="ce125" table:number-columns-repeated="2"/>
          <table:table-cell office:value-type="string" calcext:value-type="string">
            <text:p>Условие готовности к пуску</text:p>
          </table:table-cell>
          <table:table-cell table:style-name="Default"/>
          <table:table-cell/>
          <table:table-cell table:style-name="Default"/>
          <table:table-cell table:number-columns-repeated="48"/>
        </table:table-row>
        <table:table-row table:style-name="ro1">
          <table:table-cell office:value-type="string" calcext:value-type="string">
            <text:p>ReadyCondi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6.DBX3.2</text:p>
          </table:table-cell>
          <table:table-cell office:value-type="string" calcext:value-type="string">
            <text:p>Motor started (Ready Condition)</text:p>
          </table:table-cell>
          <table:table-cell office:value-type="string" calcext:value-type="string">
            <text:p>started</text:p>
          </table:table-cell>
          <table:table-cell table:style-name="ce125" office:value-type="string" calcext:value-type="string">
            <text:p>motorStarted</text:p>
          </table:table-cell>
          <table:table-cell table:style-name="ce125" office:value-type="string" calcext:value-type="string">
            <text:p>моторЗапущен</text:p>
          </table:table-cell>
          <table:table-cell table:style-name="ce125" office:value-type="string" calcext:value-type="string">
            <text:p>Мотор запущен</text:p>
          </table:table-cell>
          <table:table-cell table:formula="of:=[.A26]" office:value-type="string" office:string-value="ReadyCondition" calcext:value-type="string">
            <text:p>ReadyCondition</text:p>
          </table:table-cell>
          <table:table-cell table:style-name="Default" table:formula="of:=[.B26]" office:value-type="float" office:value="2" calcext:value-type="float">
            <text:p>2</text:p>
          </table:table-cell>
          <table:table-cell table:style-name="ce125" table:number-columns-repeated="2"/>
          <table:table-cell/>
          <table:table-cell table:style-name="Default"/>
          <table:table-cell/>
          <table:table-cell table:style-name="Default"/>
          <table:table-cell table:number-columns-repeated="48"/>
        </table:table-row>
        <table:table-row table:style-name="ro1">
          <table:table-cell office:value-type="string" calcext:value-type="string">
            <text:p>ReadyCondi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B6.DBX3.3</text:p>
          </table:table-cell>
          <table:table-cell office:value-type="string" calcext:value-type="string">
            <text:p>Local / Remote control mode sta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remoteControlMode</text:p>
          </table:table-cell>
          <table:table-cell table:style-name="ce125" office:value-type="string" calcext:value-type="string">
            <text:p>местУдаленУправл</text:p>
          </table:table-cell>
          <table:table-cell table:style-name="ce125" office:value-type="string" calcext:value-type="string">
            <text:p>Статус режима удалённого управления</text:p>
          </table:table-cell>
          <table:table-cell table:formula="of:=[.A27]" office:value-type="string" office:string-value="ReadyCondition" calcext:value-type="string">
            <text:p>ReadyCondition</text:p>
          </table:table-cell>
          <table:table-cell table:style-name="Default" table:formula="of:=[.B27]" office:value-type="float" office:value="3" calcext:value-type="float">
            <text:p>3</text:p>
          </table:table-cell>
          <table:table-cell table:style-name="ce125" office:value-type="string" calcext:value-type="string">
            <text:p>Режим дистанционного управления</text:p>
          </table:table-cell>
          <table:table-cell table:style-name="ce125" office:value-type="string" calcext:value-type="string">
            <text:p>Режим местного управления</text:p>
          </table:table-cell>
          <table:table-cell table:style-name="ce125" office:value-type="string" calcext:value-type="string">
            <text:p>Значение DB6 DBX3.3 присваивается по значению "dataToPanel".controlModeValue (DB3.DBW898): 2-true; 4-false.</text:p>
          </table:table-cell>
          <table:table-cell table:style-name="Default"/>
          <table:table-cell/>
          <table:table-cell table:style-name="Default"/>
          <table:table-cell table:number-columns-repeated="4"/>
          <table:table-cell table:style-name="ce151" office:value-type="string" calcext:value-type="string">
            <text:p>Его значение меняется по фронту "SetCmndSignal".changeControlModePulse (DB1.DBX5.3)</text:p>
          </table:table-cell>
          <table:table-cell table:style-name="ce80" table:number-columns-repeated="2"/>
          <table:table-cell table:number-columns-repeated="5"/>
          <table:table-cell table:style-name="ce80" office:value-type="string" calcext:value-type="string">
            <text:p>M118.6</text:p>
          </table:table-cell>
          <table:table-cell table:style-name="ce80" office:value-type="string" calcext:value-type="string">
            <text:p>Смена значение проводится в два этапа:</text:p>
          </table:table-cell>
          <table:table-cell table:number-columns-repeated="34"/>
        </table:table-row>
        <table:table-row table:style-name="ro1">
          <table:table-cell table:style-name="ce80" table:number-columns-repeated="2"/>
          <table:table-cell table:style-name="ce136" office:value-type="string" calcext:value-type="string">
            <text:p>DB58.DBW160</text:p>
          </table:table-cell>
          <table:table-cell table:style-name="ce142" office:value-type="string" calcext:value-type="string">
            <text:p><text:span text:style-name="T6">Set point current value (0,01 </text:span><text:span text:style-name="T7">kg/㎠)</text:span></text:p>
          </table:table-cell>
          <table:table-cell table:style-name="ce94" office:value-type="string" calcext:value-type="string">
            <text:p>kg/㎠</text:p>
          </table:table-cell>
          <table:table-cell table:style-name="ce80" office:value-type="string" calcext:value-type="string">
            <text:p>SetPointCur</text:p>
          </table:table-cell>
          <table:table-cell office:value-type="string" calcext:value-type="string">
            <text:p>ЗаданиеТек</text:p>
          </table:table-cell>
          <table:table-cell office:value-type="string" calcext:value-type="string">
            <text:p>Задание, текущее значение, в 0,01кг/см2 (значение 150 — это 1,5 кг/см2)</text:p>
          </table:table-cell>
          <table:table-cell table:style-name="ce80"/>
          <table:table-cell table:number-columns-repeated="3"/>
          <table:table-cell table:style-name="ce152" office:value-type="string" calcext:value-type="string">
            <text:p>Уставка работы, INT</text:p>
          </table:table-cell>
          <table:table-cell/>
          <table:table-cell table:style-name="ce80"/>
          <table:table-cell/>
          <table:table-cell table:style-name="ce80"/>
          <table:table-cell table:number-columns-repeated="5"/>
          <table:table-cell table:style-name="ce80" table:number-columns-repeated="5"/>
          <table:table-cell/>
          <table:table-cell table:style-name="ce80"/>
          <table:table-cell table:style-name="ce80" office:value-type="string" calcext:value-type="string">
            <text:p>1 — нажатие на переключатель-индикатор даёт первый импульс в DB1.DBX5.3</text:p>
          </table:table-cell>
          <table:table-cell table:style-name="ce80" table:number-columns-repeated="34"/>
        </table:table-row>
        <table:table-row table:style-name="ro1">
          <table:table-cell table:style-name="ce80" table:number-columns-repeated="2"/>
          <table:table-cell table:style-name="ce136" office:value-type="string" calcext:value-type="string">
            <text:p>DB58.DBW162</text:p>
          </table:table-cell>
          <table:table-cell table:style-name="ce142" office:value-type="string" calcext:value-type="string">
            <text:p><text:span text:style-name="T6">Unload set point current value (0,01 </text:span><text:span text:style-name="T7">kg/㎠)</text:span></text:p>
          </table:table-cell>
          <table:table-cell table:style-name="ce94" office:value-type="string" calcext:value-type="string">
            <text:p>kg/㎠</text:p>
          </table:table-cell>
          <table:table-cell table:style-name="ce80" office:value-type="string" calcext:value-type="string">
            <text:p>UnloadSetPointCur</text:p>
          </table:table-cell>
          <table:table-cell office:value-type="string" calcext:value-type="string">
            <text:p>ТочкаРазгрузкиТек</text:p>
          </table:table-cell>
          <table:table-cell office:value-type="string" calcext:value-type="string">
            <text:p><text:span text:style-name="T10">Верхняя уставка автоматической разгрузки, текущее значение, </text:span>в 0,01кг/см2</text:p>
          </table:table-cell>
          <table:table-cell table:style-name="ce80"/>
          <table:table-cell table:number-columns-repeated="3"/>
          <table:table-cell table:style-name="ce152" office:value-type="string" calcext:value-type="string">
            <text:p>Уставка разгрузки, INT</text:p>
          </table:table-cell>
          <table:table-cell/>
          <table:table-cell table:style-name="ce80"/>
          <table:table-cell/>
          <table:table-cell table:style-name="ce80"/>
          <table:table-cell table:number-columns-repeated="5"/>
          <table:table-cell table:style-name="ce80" table:number-columns-repeated="5"/>
          <table:table-cell table:number-columns-repeated="2"/>
          <table:table-cell table:style-name="ce80" office:value-type="string" calcext:value-type="string">
            <text:p>2 — нажатие на кнопку «Yes» в окне подтверждения даёт второй импульс в DB1.DBX5.3</text:p>
          </table:table-cell>
          <table:table-cell table:style-name="ce80" table:number-columns-repeated="34"/>
        </table:table-row>
        <table:table-row table:style-name="ro1">
          <table:table-cell table:style-name="ce80" table:number-columns-repeated="2"/>
          <table:table-cell table:style-name="ce136" office:value-type="string" calcext:value-type="string">
            <text:p>DB58.DBW164</text:p>
          </table:table-cell>
          <table:table-cell table:style-name="ce142" office:value-type="string" calcext:value-type="string">
            <text:p><text:span text:style-name="T6">Reload set point current value (0,01 </text:span><text:span text:style-name="T7">kg/㎠)</text:span></text:p>
          </table:table-cell>
          <table:table-cell table:style-name="ce94" office:value-type="string" calcext:value-type="string">
            <text:p>kg/㎠</text:p>
          </table:table-cell>
          <table:table-cell table:style-name="ce80" office:value-type="string" calcext:value-type="string">
            <text:p>ReloadSetPointCur</text:p>
          </table:table-cell>
          <table:table-cell office:value-type="string" calcext:value-type="string">
            <text:p>ТочкаЗагрузкиТек</text:p>
          </table:table-cell>
          <table:table-cell office:value-type="string" calcext:value-type="string">
            <text:p><text:span text:style-name="T10">Нижняя уставка автоматической загрузки, текущее значение, </text:span>в 0,01кг/см2</text:p>
          </table:table-cell>
          <table:table-cell table:style-name="ce80"/>
          <table:table-cell table:number-columns-repeated="3"/>
          <table:table-cell table:style-name="ce152" office:value-type="string" calcext:value-type="string">
            <text:p>Уставка нагрузки, INT</text:p>
          </table:table-cell>
          <table:table-cell/>
          <table:table-cell table:style-name="ce80" office:value-type="string" calcext:value-type="string">
            <text:p><text:span text:style-name="T10">'- повторная загрузка посл</text:span>е защитной разгрузки</text:p>
          </table:table-cell>
          <table:table-cell/>
          <table:table-cell table:style-name="ce80"/>
          <table:table-cell table:number-columns-repeated="5"/>
          <table:table-cell table:style-name="ce80" table:number-columns-repeated="42"/>
        </table:table-row>
        <table:table-row table:style-name="ro1">
          <table:table-cell table:style-name="ce134" office:value-type="string" calcext:value-type="string">
            <text:p>RemoteCommand</text:p>
          </table:table-cell>
          <table:table-cell table:style-name="ce80"/>
          <table:table-cell office:value-type="string" calcext:value-type="string">
            <text:p>MW242</text:p>
          </table:table-cell>
          <table:table-cell table:style-name="ce142" office:value-type="string" calcext:value-type="string">
            <text:p><text:span text:style-name="T6">Set point set value in Remote mode (0,01 </text:span><text:span text:style-name="T7">kg/㎠)</text:span></text:p>
          </table:table-cell>
          <table:table-cell table:style-name="ce94" office:value-type="string" calcext:value-type="string">
            <text:p>kg/㎠</text:p>
          </table:table-cell>
          <table:table-cell table:style-name="ce80" office:value-type="string" calcext:value-type="string">
            <text:p>SetPointNew</text:p>
          </table:table-cell>
          <table:table-cell office:value-type="string" calcext:value-type="string">
            <text:p>ЗаданиеНовое</text:p>
          </table:table-cell>
          <table:table-cell office:value-type="string" calcext:value-type="string">
            <text:p>Задание, новое значение в режиме Дист., в 0,01кг/см2 (значение 150 — это 1,5 кг/см2)</text:p>
          </table:table-cell>
          <table:table-cell table:style-name="ce80"/>
          <table:table-cell table:number-columns-repeated="3"/>
          <table:table-cell table:style-name="ce152" office:value-type="string" calcext:value-type="string">
            <text:p>Уставка работы, INT</text:p>
          </table:table-cell>
          <table:table-cell/>
          <table:table-cell table:style-name="ce80"/>
          <table:table-cell/>
          <table:table-cell table:style-name="ce80"/>
          <table:table-cell table:number-columns-repeated="5"/>
          <table:table-cell table:style-name="ce80" table:number-columns-repeated="42"/>
        </table:table-row>
        <table:table-row table:style-name="ro1">
          <table:table-cell table:style-name="ce134" office:value-type="string" calcext:value-type="string">
            <text:p>RemoteCommand</text:p>
          </table:table-cell>
          <table:table-cell table:style-name="ce80"/>
          <table:table-cell office:value-type="string" calcext:value-type="string">
            <text:p>MW244</text:p>
          </table:table-cell>
          <table:table-cell table:style-name="ce142" office:value-type="string" calcext:value-type="string">
            <text:p><text:span text:style-name="T6">Unload set point set value in Remote mode (0,01 </text:span><text:span text:style-name="T7">kg/㎠)</text:span></text:p>
          </table:table-cell>
          <table:table-cell table:style-name="ce94" office:value-type="string" calcext:value-type="string">
            <text:p>kg/㎠</text:p>
          </table:table-cell>
          <table:table-cell table:style-name="ce80" office:value-type="string" calcext:value-type="string">
            <text:p>UnloadSetPointNew</text:p>
          </table:table-cell>
          <table:table-cell office:value-type="string" calcext:value-type="string">
            <text:p>ТочкаРазгрузкиНовое</text:p>
          </table:table-cell>
          <table:table-cell office:value-type="string" calcext:value-type="string">
            <text:p><text:span text:style-name="T10">Верхняя уставка автоматической разгрузки, новое значение в режиме Дист.,</text:span> в 0,01кг/см2</text:p>
          </table:table-cell>
          <table:table-cell table:style-name="ce80"/>
          <table:table-cell table:number-columns-repeated="3"/>
          <table:table-cell table:style-name="ce152" office:value-type="string" calcext:value-type="string">
            <text:p>Уставка разгрузки, INT</text:p>
          </table:table-cell>
          <table:table-cell/>
          <table:table-cell table:style-name="ce80"/>
          <table:table-cell/>
          <table:table-cell table:style-name="ce80"/>
          <table:table-cell table:number-columns-repeated="5"/>
          <table:table-cell table:style-name="ce80" table:number-columns-repeated="42"/>
        </table:table-row>
        <table:table-row table:style-name="ro1">
          <table:table-cell table:style-name="ce134" office:value-type="string" calcext:value-type="string">
            <text:p>RemoteCommand</text:p>
          </table:table-cell>
          <table:table-cell table:style-name="ce80"/>
          <table:table-cell office:value-type="string" calcext:value-type="string">
            <text:p>MW246</text:p>
          </table:table-cell>
          <table:table-cell table:style-name="ce142" office:value-type="string" calcext:value-type="string">
            <text:p><text:span text:style-name="T6">Reload set point set value in Remote mode (0,01 </text:span><text:span text:style-name="T7">kg/㎠)</text:span></text:p>
          </table:table-cell>
          <table:table-cell table:style-name="ce94" office:value-type="string" calcext:value-type="string">
            <text:p>kg/㎠</text:p>
          </table:table-cell>
          <table:table-cell table:style-name="ce80" office:value-type="string" calcext:value-type="string">
            <text:p>ReloadSetPointNew</text:p>
          </table:table-cell>
          <table:table-cell office:value-type="string" calcext:value-type="string">
            <text:p>ТочкаЗагрузкиНовое</text:p>
          </table:table-cell>
          <table:table-cell office:value-type="string" calcext:value-type="string">
            <text:p><text:span text:style-name="T10">Нижняя уставка автоматической загрузки, новое значение в режиме Дист.</text:span>, в 0,01кг/см2</text:p>
          </table:table-cell>
          <table:table-cell table:style-name="ce80"/>
          <table:table-cell table:number-columns-repeated="3"/>
          <table:table-cell table:style-name="ce152" office:value-type="string" calcext:value-type="string">
            <text:p>Уставка нагрузки, INT</text:p>
          </table:table-cell>
          <table:table-cell/>
          <table:table-cell table:style-name="ce80"/>
          <table:table-cell/>
          <table:table-cell table:style-name="ce80"/>
          <table:table-cell table:number-columns-repeated="5"/>
          <table:table-cell table:style-name="ce80" table:number-columns-repeated="42"/>
        </table:table-row>
        <table:table-row table:style-name="ro4">
          <table:table-cell table:style-name="ce134"/>
          <table:table-cell table:style-name="ce80"/>
          <table:table-cell table:style-name="ce136" office:value-type="string" calcext:value-type="string">
            <text:p>DB50.DBX11.7</text:p>
          </table:table-cell>
          <table:table-cell table:style-name="ce140" office:value-type="string" calcext:value-type="string">
            <text:p><text:span text:style-name="T8">Use remote set poi</text:span>nts</text:p>
          </table:table-cell>
          <table:table-cell table:style-name="ce137" office:value-type="string" calcext:value-type="string">
            <text:p>use</text:p>
          </table:table-cell>
          <table:table-cell table:style-name="ce80" office:value-type="string" calcext:value-type="string">
            <text:p><text:span text:style-name="T10">UseRemoteSetPoi</text:span>nts</text:p>
          </table:table-cell>
          <table:table-cell table:number-columns-repeated="2"/>
          <table:table-cell table:style-name="ce80"/>
          <table:table-cell table:number-columns-repeated="3"/>
          <table:table-cell table:style-name="ce152"/>
          <table:table-cell/>
          <table:table-cell table:style-name="ce80"/>
          <table:table-cell/>
          <table:table-cell table:style-name="ce80"/>
          <table:table-cell table:number-columns-repeated="5"/>
          <table:table-cell table:style-name="ce80" table:number-columns-repeated="42"/>
        </table:table-row>
        <table:table-row table:style-name="ro4">
          <table:table-cell table:number-columns-repeated="2"/>
          <table:table-cell table:style-name="ce137" office:value-type="string" calcext:value-type="string">
            <text:p>DB6.DBD148</text:p>
          </table:table-cell>
          <table:table-cell table:style-name="ce142" office:value-type="string" calcext:value-type="string">
            <text:p>Compressor run time</text:p>
          </table:table-cell>
          <table:table-cell table:style-name="ce94" office:value-type="string" calcext:value-type="string">
            <text:p>hh</text:p>
          </table:table-cell>
          <table:table-cell table:style-name="ce80" office:value-type="string" calcext:value-type="string">
            <text:p>comprRunHours</text:p>
          </table:table-cell>
          <table:table-cell office:value-type="string" calcext:value-type="string">
            <text:p>НаработкаВсего</text:p>
          </table:table-cell>
          <table:table-cell office:value-type="string" calcext:value-type="string">
            <text:p>Полная наработка компрессора</text:p>
          </table:table-cell>
          <table:table-cell table:style-name="ce80"/>
          <table:table-cell table:number-columns-repeated="3"/>
          <table:table-cell table:style-name="ce152" office:value-type="string" calcext:value-type="string">
            <text:p>Часы работы компрессора, DINT</text:p>
          </table:table-cell>
          <table:table-cell/>
          <table:table-cell table:style-name="ce125"/>
          <table:table-cell table:number-columns-repeated="5"/>
          <table:table-cell table:style-name="ce80" table:number-columns-repeated="5"/>
          <table:table-cell table:number-columns-repeated="39"/>
        </table:table-row>
        <table:table-row table:style-name="ro4">
          <table:table-cell table:number-columns-repeated="2"/>
          <table:table-cell table:style-name="ce137" office:value-type="string" calcext:value-type="string">
            <text:p>DB6.DBD152</text:p>
          </table:table-cell>
          <table:table-cell table:style-name="ce142" office:value-type="string" calcext:value-type="string">
            <text:p>Compressor load time</text:p>
          </table:table-cell>
          <table:table-cell table:style-name="ce94" office:value-type="string" calcext:value-type="string">
            <text:p>hh</text:p>
          </table:table-cell>
          <table:table-cell table:style-name="ce80" office:value-type="string" calcext:value-type="string">
            <text:p>comprLoadHours</text:p>
          </table:table-cell>
          <table:table-cell office:value-type="string" calcext:value-type="string">
            <text:p>НаработкаПодНагр</text:p>
          </table:table-cell>
          <table:table-cell office:value-type="string" calcext:value-type="string">
            <text:p>Наработка компрессора под нагрузкой</text:p>
          </table:table-cell>
          <table:table-cell table:style-name="ce80"/>
          <table:table-cell table:number-columns-repeated="3"/>
          <table:table-cell table:style-name="ce152" office:value-type="string" calcext:value-type="string">
            <text:p>Часы компрессора под нагрузкой, DINT</text:p>
          </table:table-cell>
          <table:table-cell/>
          <table:table-cell table:style-name="ce80"/>
          <table:table-cell table:number-columns-repeated="49"/>
        </table:table-row>
        <table:table-row table:style-name="ro4">
          <table:table-cell table:style-name="ce134" office:value-type="string" calcext:value-type="string">
            <text:p>RemoteCommand</text:p>
          </table:table-cell>
          <table:table-cell office:value-type="float" office:value="8" calcext:value-type="float">
            <text:p>8</text:p>
          </table:table-cell>
          <table:table-cell table:style-name="ce94" office:value-type="string" calcext:value-type="string">
            <text:p>M240.0</text:p>
          </table:table-cell>
          <table:table-cell table:style-name="ce142" office:value-type="string" calcext:value-type="string">
            <text:p>Start compressor command from master</text:p>
          </table:table-cell>
          <table:table-cell table:style-name="ce142" office:value-type="string" calcext:value-type="string">
            <text:p>start</text:p>
          </table:table-cell>
          <table:table-cell table:style-name="ce150" office:value-type="string" calcext:value-type="string">
            <text:p>startCmprCmndFromMaster</text:p>
          </table:table-cell>
          <table:table-cell table:style-name="ce152" office:value-type="string" calcext:value-type="string">
            <text:p>кмндПускМастер</text:p>
          </table:table-cell>
          <table:table-cell office:value-type="string" calcext:value-type="string">
            <text:p>Команда запустить компрессор от мастера</text:p>
          </table:table-cell>
          <table:table-cell table:style-name="ce80" table:formula="of:=[.A37]" office:value-type="string" office:string-value="RemoteCommand" calcext:value-type="string">
            <text:p>RemoteCommand</text:p>
          </table:table-cell>
          <table:table-cell table:formula="of:=[.B37]" office:value-type="float" office:value="8" calcext:value-type="float">
            <text:p>8</text:p>
          </table:table-cell>
          <table:table-cell table:number-columns-repeated="2"/>
          <table:table-cell table:style-name="ce80"/>
          <table:table-cell/>
          <table:table-cell table:style-name="ce80"/>
          <table:table-cell table:number-columns-repeated="49"/>
        </table:table-row>
        <table:table-row table:style-name="ro4">
          <table:table-cell table:style-name="ce134" office:value-type="string" calcext:value-type="string">
            <text:p>RemoteCommand</text:p>
          </table:table-cell>
          <table:table-cell office:value-type="float" office:value="9" calcext:value-type="float">
            <text:p>9</text:p>
          </table:table-cell>
          <table:table-cell table:style-name="ce94" office:value-type="string" calcext:value-type="string">
            <text:p>M240.1</text:p>
          </table:table-cell>
          <table:table-cell table:style-name="ce142" office:value-type="string" calcext:value-type="string">
            <text:p>Stop compressor command from master</text:p>
          </table:table-cell>
          <table:table-cell table:style-name="ce142" office:value-type="string" calcext:value-type="string">
            <text:p>stop</text:p>
          </table:table-cell>
          <table:table-cell table:style-name="ce150" office:value-type="string" calcext:value-type="string">
            <text:p>stopCmprCmndFromMaster</text:p>
          </table:table-cell>
          <table:table-cell table:style-name="ce152" office:value-type="string" calcext:value-type="string">
            <text:p>кмндСтопМастер</text:p>
          </table:table-cell>
          <table:table-cell office:value-type="string" calcext:value-type="string">
            <text:p>Команда остановить компрессор от мастера</text:p>
          </table:table-cell>
          <table:table-cell table:style-name="ce80" table:formula="of:=[.A38]" office:value-type="string" office:string-value="RemoteCommand" calcext:value-type="string">
            <text:p>RemoteCommand</text:p>
          </table:table-cell>
          <table:table-cell table:formula="of:=[.B38]" office:value-type="float" office:value="9" calcext:value-type="float">
            <text:p>9</text:p>
          </table:table-cell>
          <table:table-cell table:number-columns-repeated="2"/>
          <table:table-cell table:style-name="ce80"/>
          <table:table-cell/>
          <table:table-cell table:style-name="ce80"/>
          <table:table-cell table:number-columns-repeated="49"/>
        </table:table-row>
        <table:table-row table:style-name="ro4">
          <table:table-cell table:style-name="ce134" office:value-type="string" calcext:value-type="string">
            <text:p>RemoteCommand</text:p>
          </table:table-cell>
          <table:table-cell office:value-type="float" office:value="10" calcext:value-type="float">
            <text:p>10</text:p>
          </table:table-cell>
          <table:table-cell table:style-name="ce94" office:value-type="string" calcext:value-type="string">
            <text:p>M240.2</text:p>
          </table:table-cell>
          <table:table-cell table:style-name="ce142"/>
          <table:table-cell table:style-name="ce142" office:value-type="string" calcext:value-type="string">
            <text:p>load</text:p>
          </table:table-cell>
          <table:table-cell table:style-name="ce150"/>
          <table:table-cell table:style-name="ce152"/>
          <table:table-cell office:value-type="string" calcext:value-type="string">
            <text:p>Команда нагрузить работающий компрессор от мастера</text:p>
          </table:table-cell>
          <table:table-cell table:style-name="ce80" table:formula="of:=[.A39]" office:value-type="string" office:string-value="RemoteCommand" calcext:value-type="string">
            <text:p>RemoteCommand</text:p>
          </table:table-cell>
          <table:table-cell table:formula="of:=[.B39]" office:value-type="float" office:value="10" calcext:value-type="float">
            <text:p>10</text:p>
          </table:table-cell>
          <table:table-cell table:number-columns-repeated="2"/>
          <table:table-cell table:style-name="ce80"/>
          <table:table-cell/>
          <table:table-cell table:style-name="ce80"/>
          <table:table-cell table:number-columns-repeated="49"/>
        </table:table-row>
        <table:table-row table:style-name="ro4">
          <table:table-cell table:style-name="ce134" office:value-type="string" calcext:value-type="string">
            <text:p>RemoteCommand</text:p>
          </table:table-cell>
          <table:table-cell office:value-type="float" office:value="11" calcext:value-type="float">
            <text:p>11</text:p>
          </table:table-cell>
          <table:table-cell table:style-name="ce94" office:value-type="string" calcext:value-type="string">
            <text:p>M240.3</text:p>
          </table:table-cell>
          <table:table-cell table:style-name="ce142"/>
          <table:table-cell table:style-name="ce142" office:value-type="string" calcext:value-type="string">
            <text:p>unload</text:p>
          </table:table-cell>
          <table:table-cell table:style-name="ce150"/>
          <table:table-cell table:style-name="ce152"/>
          <table:table-cell office:value-type="string" calcext:value-type="string">
            <text:p>Команда разгрузить работающий компрессор от мастера</text:p>
          </table:table-cell>
          <table:table-cell table:style-name="ce80" table:formula="of:=[.A40]" office:value-type="string" office:string-value="RemoteCommand" calcext:value-type="string">
            <text:p>RemoteCommand</text:p>
          </table:table-cell>
          <table:table-cell table:formula="of:=[.B40]" office:value-type="float" office:value="11" calcext:value-type="float">
            <text:p>11</text:p>
          </table:table-cell>
          <table:table-cell table:number-columns-repeated="2"/>
          <table:table-cell table:style-name="ce80"/>
          <table:table-cell/>
          <table:table-cell table:style-name="ce80"/>
          <table:table-cell table:number-columns-repeated="49"/>
        </table:table-row>
        <table:table-row table:style-name="ro4">
          <table:table-cell table:style-name="ce134" office:value-type="string" calcext:value-type="string">
            <text:p>RemoteCommand</text:p>
          </table:table-cell>
          <table:table-cell office:value-type="float" office:value="13" calcext:value-type="float">
            <text:p>13</text:p>
          </table:table-cell>
          <table:table-cell table:style-name="ce94" office:value-type="string" calcext:value-type="string">
            <text:p>M240.5</text:p>
          </table:table-cell>
          <table:table-cell table:style-name="ce142" office:value-type="string" calcext:value-type="string">
            <text:p>Reset warnings command from master</text:p>
          </table:table-cell>
          <table:table-cell table:style-name="ce142" office:value-type="string" calcext:value-type="string">
            <text:p>reset</text:p>
          </table:table-cell>
          <table:table-cell table:style-name="ce150" office:value-type="string" calcext:value-type="string">
            <text:p>resetWarnsCmndFromMaster</text:p>
          </table:table-cell>
          <table:table-cell table:style-name="ce152" office:value-type="string" calcext:value-type="string">
            <text:p>кмндСбросМастер</text:p>
          </table:table-cell>
          <table:table-cell office:value-type="string" calcext:value-type="string">
            <text:p>Команда сброса предупреждений от мастера</text:p>
          </table:table-cell>
          <table:table-cell table:style-name="ce80" table:formula="of:=[.A41]" office:value-type="string" office:string-value="RemoteCommand" calcext:value-type="string">
            <text:p>RemoteCommand</text:p>
          </table:table-cell>
          <table:table-cell table:formula="of:=[.B41]" office:value-type="float" office:value="13" calcext:value-type="float">
            <text:p>13</text:p>
          </table:table-cell>
          <table:table-cell table:number-columns-repeated="2"/>
          <table:table-cell table:style-name="ce80"/>
          <table:table-cell/>
          <table:table-cell table:style-name="ce80"/>
          <table:table-cell table:number-columns-repeated="49"/>
        </table:table-row>
        <table:table-row table:style-name="ro4">
          <table:table-cell table:number-columns-repeated="2"/>
          <table:table-cell table:style-name="ce137" office:value-type="string" calcext:value-type="string">
            <text:p>DB50.DBX0.0</text:p>
          </table:table-cell>
          <table:table-cell table:style-name="ce142" office:value-type="string" calcext:value-type="string">
            <text:p>Selected temperature Unit Celsius or Fahrenheit (0-°C; 1-°F)</text:p>
          </table:table-cell>
          <table:table-cell table:style-name="ce142" office:value-type="string" calcext:value-type="string">
            <text:p>°F</text:p>
          </table:table-cell>
          <table:table-cell table:style-name="ce150" office:value-type="string" calcext:value-type="string">
            <text:p>temperatureUnitCF (0-°C; 1-°F)</text:p>
          </table:table-cell>
          <table:table-cell table:style-name="ce152" office:value-type="string" calcext:value-type="string">
            <text:p>едТемпЦФ</text:p>
          </table:table-cell>
          <table:table-cell office:value-type="string" calcext:value-type="string">
            <text:p>Единица измерения температуры: градусы Цельсия или Фаренгейта</text:p>
          </table:table-cell>
          <table:table-cell table:style-name="ce80"/>
          <table:table-cell table:number-columns-repeated="3"/>
          <table:table-cell table:style-name="ce80"/>
          <table:table-cell/>
          <table:table-cell table:style-name="ce80"/>
          <table:table-cell table:number-columns-repeated="49"/>
        </table:table-row>
        <table:table-row table:style-name="ro4">
          <table:table-cell table:number-columns-repeated="2"/>
          <table:table-cell table:style-name="ce94" office:value-type="string" calcext:value-type="string">
            <text:p>M12.1</text:p>
          </table:table-cell>
          <table:table-cell table:style-name="ce142" office:value-type="string" calcext:value-type="string">
            <text:p>Maintenance required</text:p>
          </table:table-cell>
          <table:table-cell table:style-name="ce142" office:value-type="string" calcext:value-type="string">
            <text:p>required</text:p>
          </table:table-cell>
          <table:table-cell table:style-name="ce150" office:value-type="string" calcext:value-type="string">
            <text:p>maintenanceRequired</text:p>
          </table:table-cell>
          <table:table-cell office:value-type="string" calcext:value-type="string">
            <text:p>требОбслуживание</text:p>
          </table:table-cell>
          <table:table-cell office:value-type="string" calcext:value-type="string">
            <text:p>Признак необходимости обслуживания</text:p>
          </table:table-cell>
          <table:table-cell table:style-name="ce80"/>
          <table:table-cell table:number-columns-repeated="3"/>
          <table:table-cell table:style-name="ce80" office:value-type="string" calcext:value-type="string">
            <text:p>Флагом управляет программа контроллера</text:p>
          </table:table-cell>
          <table:table-cell/>
          <table:table-cell table:style-name="ce80"/>
          <table:table-cell table:number-columns-repeated="49"/>
        </table:table-row>
        <table:table-row table:style-name="ro4">
          <table:table-cell table:style-name="ce134" office:value-type="string" calcext:value-type="string">
            <text:p>RemoteCommand</text:p>
          </table:table-cell>
          <table:table-cell/>
          <table:table-cell table:style-name="ce137" office:value-type="string" calcext:value-type="string">
            <text:p>DB50.DBX5.3</text:p>
          </table:table-cell>
          <table:table-cell table:style-name="ce129" office:value-type="string" calcext:value-type="string">
            <text:p>Change Remote — Local mode <text:span text:style-name="T9">command</text:span>, neg.edge for change</text:p>
          </table:table-cell>
          <table:table-cell table:style-name="ce82" office:value-type="string" calcext:value-type="string">
            <text:p>step</text:p>
          </table:table-cell>
          <table:table-cell table:style-name="ce80" office:value-type="string" calcext:value-type="string">
            <text:p>ChangeModePulse</text:p>
          </table:table-cell>
          <table:table-cell office:value-type="string" calcext:value-type="string">
            <text:p>импульсИзмененияРежима</text:p>
          </table:table-cell>
          <table:table-cell table:style-name="ce128" office:value-type="string" calcext:value-type="string">
            <text:p>Смена значения режима Местн.-Дист. проводится по заднему фронту</text:p>
          </table:table-cell>
          <table:table-cell table:style-name="ce128"/>
          <table:table-cell table:number-columns-repeated="3"/>
          <table:table-cell table:style-name="ce80"/>
          <table:table-cell/>
          <table:table-cell table:style-name="ce80"/>
          <table:table-cell table:number-columns-repeated="49"/>
        </table:table-row>
        <table:table-row table:style-name="ro4">
          <table:table-cell table:style-name="ce134" office:value-type="string" calcext:value-type="string">
            <text:p>RemoteCommand</text:p>
          </table:table-cell>
          <table:table-cell/>
          <table:table-cell table:style-name="ce94" office:value-type="string" calcext:value-type="string">
            <text:p>DB1.DBX7.3</text:p>
          </table:table-cell>
          <table:table-cell table:style-name="ce82"/>
          <table:table-cell table:style-name="ce82" office:value-type="string" calcext:value-type="string">
            <text:p>no</text:p>
          </table:table-cell>
          <table:table-cell table:style-name="ce80"/>
          <table:table-cell table:number-columns-repeated="2"/>
          <table:table-cell table:style-name="ce80"/>
          <table:table-cell table:number-columns-repeated="3"/>
          <table:table-cell table:style-name="ce80"/>
          <table:table-cell/>
          <table:table-cell table:style-name="ce80"/>
          <table:table-cell table:number-columns-repeated="49"/>
        </table:table-row>
        <table:table-row table:style-name="ro4">
          <table:table-cell table:number-columns-repeated="2"/>
          <table:table-cell table:style-name="ce94" office:value-type="string" calcext:value-type="string">
            <text:p>DB3.DBW898</text:p>
          </table:table-cell>
          <table:table-cell table:style-name="ce143"/>
          <table:table-cell table:style-name="ce82" office:value-type="string" calcext:value-type="string">
            <text:p>currStep</text:p>
          </table:table-cell>
          <table:table-cell table:style-name="ce151"/>
          <table:table-cell/>
          <table:table-cell table:style-name="ce151"/>
          <table:table-cell table:style-name="ce80"/>
          <table:table-cell table:number-columns-repeated="3"/>
          <table:table-cell table:style-name="ce80"/>
          <table:table-cell/>
          <table:table-cell table:style-name="ce80"/>
          <table:table-cell table:number-columns-repeated="49"/>
        </table:table-row>
        <table:table-row table:style-name="ro4">
          <table:table-cell table:number-columns-repeated="2"/>
          <table:table-cell table:style-name="ce94" office:value-type="string" calcext:value-type="string">
            <text:p>MW240</text:p>
          </table:table-cell>
          <table:table-cell table:style-name="Default" office:value-type="string" calcext:value-type="string">
            <text:p>Remote command group tag</text:p>
          </table:table-cell>
          <table:table-cell table:style-name="ce80"/>
          <table:table-cell table:style-name="ce80" office:value-type="string" calcext:value-type="string">
            <text:p>RemoteCommand</text:p>
          </table:table-cell>
          <table:table-cell/>
          <table:table-cell office:value-type="string" calcext:value-type="string">
            <text:p>Групповой тег дистанционных команд</text:p>
          </table:table-cell>
          <table:table-cell table:style-name="ce80"/>
          <table:table-cell table:number-columns-repeated="3"/>
          <table:table-cell table:style-name="ce80"/>
          <table:table-cell/>
          <table:table-cell table:style-name="ce80"/>
          <table:table-cell table:number-columns-repeated="49"/>
        </table:table-row>
        <table:table-row table:style-name="ro4">
          <table:table-cell table:number-columns-repeated="2"/>
          <table:table-cell table:style-name="ce94" office:value-type="string" calcext:value-type="string">
            <text:p>DB1.DBW0</text:p>
          </table:table-cell>
          <table:table-cell table:style-name="ce80" table:number-columns-repeated="2"/>
          <table:table-cell table:style-name="ce80" office:value-type="string" calcext:value-type="string">
            <text:p>State</text:p>
          </table:table-cell>
          <table:table-cell/>
          <table:table-cell office:value-type="string" calcext:value-type="string">
            <text:p>Групповой тег состояния компрессора</text:p>
          </table:table-cell>
          <table:table-cell table:style-name="ce80"/>
          <table:table-cell table:number-columns-repeated="3"/>
          <table:table-cell table:style-name="ce80"/>
          <table:table-cell office:value-type="string" calcext:value-type="string">
            <text:p>mw240</text:p>
          </table:table-cell>
          <table:table-cell table:style-name="ce80" office:value-type="string" calcext:value-type="string">
            <text:p>Commands from master</text:p>
          </table:table-cell>
          <table:table-cell table:number-columns-repeated="2"/>
          <table:table-cell office:value-type="string" calcext:value-type="string">
            <text:p>Запись из masterPLC в compr1</text:p>
          </table:table-cell>
          <table:table-cell table:number-columns-repeated="46"/>
        </table:table-row>
        <table:table-row table:style-name="ro4">
          <table:table-cell table:number-columns-repeated="2"/>
          <table:table-cell table:style-name="ce94" office:value-type="string" calcext:value-type="string">
            <text:p>DB1.DBW2</text:p>
          </table:table-cell>
          <table:table-cell table:style-name="ce80" table:number-columns-repeated="2"/>
          <table:table-cell table:style-name="ce80" office:value-type="string" calcext:value-type="string">
            <text:p>ReadyCondition</text:p>
          </table:table-cell>
          <table:table-cell/>
          <table:table-cell office:value-type="string" calcext:value-type="string">
            <text:p>Групповой тег условий пуска двигателя</text:p>
          </table:table-cell>
          <table:table-cell table:style-name="ce80"/>
          <table:table-cell table:number-columns-repeated="3"/>
          <table:table-cell table:style-name="ce80"/>
          <table:table-cell/>
          <table:table-cell table:style-name="ce80"/>
          <table:table-cell table:number-columns-repeated="3"/>
          <table:table-cell office:value-type="string" calcext:value-type="string">
            <text:p>compr1</text:p>
          </table:table-cell>
          <table:table-cell office:value-type="string" calcext:value-type="string">
            <text:p>masterPLC</text:p>
          </table:table-cell>
          <table:table-cell table:number-columns-repeated="2"/>
          <table:table-cell office:value-type="string" calcext:value-type="string">
            <text:p>DB200</text:p>
          </table:table-cell>
          <table:table-cell table:number-columns-repeated="41"/>
        </table:table-row>
        <table:table-row table:style-name="ro2">
          <table:table-cell table:number-columns-repeated="2"/>
          <table:table-cell table:style-name="ce80" table:number-columns-repeated="4"/>
          <table:table-cell table:number-columns-repeated="2"/>
          <table:table-cell table:style-name="ce80"/>
          <table:table-cell table:number-columns-repeated="3"/>
          <table:table-cell table:style-name="ce80"/>
          <table:table-cell/>
          <table:table-cell table:style-name="ce80"/>
          <table:table-cell table:number-columns-repeated="3"/>
          <table:table-cell office:value-type="string" calcext:value-type="string">
            <text:p>mw240</text:p>
          </table:table-cell>
          <table:table-cell office:value-type="string" calcext:value-type="string">
            <text:p>DB200 DBW0</text:p>
          </table:table-cell>
          <table:table-cell/>
          <table:table-cell office:value-type="string" calcext:value-type="string">
            <text:p>C1_RUN_C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0.0</text:p>
          </table:table-cell>
          <table:table-cell table:number-columns-repeated="40"/>
        </table:table-row>
        <table:table-row table:style-name="ro2">
          <table:table-cell table:number-columns-repeated="2"/>
          <table:table-cell table:style-name="ce80" table:number-columns-repeated="4"/>
          <table:table-cell table:number-columns-repeated="2"/>
          <table:table-cell table:style-name="ce80"/>
          <table:table-cell table:number-columns-repeated="3"/>
          <table:table-cell table:style-name="ce80"/>
          <table:table-cell/>
          <table:table-cell table:style-name="ce80"/>
          <table:table-cell table:number-columns-repeated="6"/>
          <table:table-cell office:value-type="string" calcext:value-type="string">
            <text:p>C1_STOP_C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0.1</text:p>
          </table:table-cell>
          <table:table-cell table:number-columns-repeated="40"/>
        </table:table-row>
        <table:table-row table:style-name="ro2">
          <table:table-cell table:number-columns-repeated="2"/>
          <table:table-cell table:style-name="ce80" table:number-columns-repeated="4"/>
          <table:table-cell table:number-columns-repeated="2"/>
          <table:table-cell table:style-name="ce80"/>
          <table:table-cell table:number-columns-repeated="3"/>
          <table:table-cell table:style-name="ce80"/>
          <table:table-cell/>
          <table:table-cell table:style-name="ce80"/>
          <table:table-cell table:number-columns-repeated="6"/>
          <table:table-cell office:value-type="string" calcext:value-type="string">
            <text:p>C1_LOAD_C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0.2</text:p>
          </table:table-cell>
          <table:table-cell table:number-columns-repeated="40"/>
        </table:table-row>
        <table:table-row table:style-name="ro4">
          <table:table-cell table:number-columns-repeated="2"/>
          <table:table-cell table:style-name="ce80" table:number-columns-repeated="4"/>
          <table:table-cell table:style-name="ce152"/>
          <table:table-cell/>
          <table:table-cell table:style-name="ce80"/>
          <table:table-cell table:number-columns-repeated="3"/>
          <table:table-cell table:style-name="ce80"/>
          <table:table-cell/>
          <table:table-cell table:style-name="ce80"/>
          <table:table-cell table:number-columns-repeated="6"/>
          <table:table-cell office:value-type="string" calcext:value-type="string">
            <text:p>C1_UNLOAD_C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0.3</text:p>
          </table:table-cell>
          <table:table-cell table:number-columns-repeated="40"/>
        </table:table-row>
        <table:table-row table:style-name="ro2">
          <table:table-cell table:number-columns-repeated="2"/>
          <table:table-cell table:style-name="ce80" table:number-columns-repeated="4"/>
          <table:table-cell table:number-columns-repeated="2"/>
          <table:table-cell table:style-name="ce80"/>
          <table:table-cell table:number-columns-repeated="3"/>
          <table:table-cell table:style-name="ce80"/>
          <table:table-cell/>
          <table:table-cell table:style-name="ce80"/>
          <table:table-cell table:number-columns-repeated="6"/>
          <table:table-cell office:value-type="string" calcext:value-type="string">
            <text:p>SP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0.4</text:p>
          </table:table-cell>
          <table:table-cell table:number-columns-repeated="40"/>
        </table:table-row>
        <table:table-row table:style-name="ro2">
          <table:table-cell table:number-columns-repeated="2"/>
          <table:table-cell table:style-name="ce80" table:number-columns-repeated="4"/>
          <table:table-cell table:number-columns-repeated="2"/>
          <table:table-cell table:style-name="ce80"/>
          <table:table-cell table:number-columns-repeated="3"/>
          <table:table-cell table:style-name="ce80"/>
          <table:table-cell/>
          <table:table-cell table:style-name="ce80"/>
          <table:table-cell table:number-columns-repeated="6"/>
          <table:table-cell office:value-type="string" calcext:value-type="string">
            <text:p>C1_RESET_C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0.5</text:p>
          </table:table-cell>
          <table:table-cell table:number-columns-repeated="40"/>
        </table:table-row>
        <table:table-row table:style-name="ro2">
          <table:table-cell table:number-columns-repeated="2"/>
          <table:table-cell table:style-name="ce80" table:number-columns-repeated="4"/>
          <table:table-cell table:number-columns-repeated="2"/>
          <table:table-cell table:style-name="ce80"/>
          <table:table-cell table:number-columns-repeated="3"/>
          <table:table-cell table:style-name="ce80"/>
          <table:table-cell/>
          <table:table-cell table:style-name="ce80"/>
          <table:table-cell table:number-columns-repeated="6"/>
          <table:table-cell office:value-type="string" calcext:value-type="string">
            <text:p>SP2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0.6</text:p>
          </table:table-cell>
          <table:table-cell table:number-columns-repeated="40"/>
        </table:table-row>
        <table:table-row table:style-name="ro2">
          <table:table-cell table:number-columns-repeated="2"/>
          <table:table-cell table:style-name="ce80" table:number-columns-repeated="4"/>
          <table:table-cell table:number-columns-repeated="2"/>
          <table:table-cell table:style-name="ce80"/>
          <table:table-cell table:number-columns-repeated="3"/>
          <table:table-cell table:style-name="ce80"/>
          <table:table-cell/>
          <table:table-cell table:style-name="ce80"/>
          <table:table-cell table:number-columns-repeated="6"/>
          <table:table-cell office:value-type="string" calcext:value-type="string">
            <text:p>SP3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0.7</text:p>
          </table:table-cell>
          <table:table-cell table:number-columns-repeated="40"/>
        </table:table-row>
        <table:table-row table:style-name="ro2">
          <table:table-cell table:number-columns-repeated="2"/>
          <table:table-cell table:style-name="ce80" table:number-columns-repeated="4"/>
          <table:table-cell table:number-columns-repeated="2"/>
          <table:table-cell table:style-name="ce80"/>
          <table:table-cell table:number-columns-repeated="3"/>
          <table:table-cell table:style-name="ce80"/>
          <table:table-cell/>
          <table:table-cell table:style-name="ce80"/>
          <table:table-cell table:number-columns-repeated="6"/>
          <table:table-cell office:value-type="string" calcext:value-type="string">
            <text:p>SP4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1.0</text:p>
          </table:table-cell>
          <table:table-cell table:number-columns-repeated="40"/>
        </table:table-row>
        <table:table-row table:style-name="ro2">
          <table:table-cell table:number-columns-repeated="2"/>
          <table:table-cell table:style-name="ce80" table:number-columns-repeated="4"/>
          <table:table-cell table:number-columns-repeated="2"/>
          <table:table-cell table:style-name="ce80"/>
          <table:table-cell table:number-columns-repeated="3"/>
          <table:table-cell table:style-name="ce80"/>
          <table:table-cell/>
          <table:table-cell table:style-name="ce80"/>
          <table:table-cell table:number-columns-repeated="3"/>
          <table:table-cell office:value-type="string" calcext:value-type="string">
            <text:p>mw242</text:p>
          </table:table-cell>
          <table:table-cell office:value-type="string" calcext:value-type="string">
            <text:p>DB200 DBW2</text:p>
          </table:table-cell>
          <table:table-cell/>
          <table:table-cell office:value-type="string" calcext:value-type="string">
            <text:p>C1_SET_P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не используется в программе</text:p>
          </table:table-cell>
          <table:table-cell table:number-columns-repeated="39"/>
        </table:table-row>
        <table:table-row table:style-name="ro2">
          <table:table-cell table:number-columns-repeated="2"/>
          <table:table-cell table:style-name="ce80" table:number-columns-repeated="4"/>
          <table:table-cell table:number-columns-repeated="2"/>
          <table:table-cell table:style-name="ce80"/>
          <table:table-cell table:number-columns-repeated="3"/>
          <table:table-cell table:style-name="ce80"/>
          <table:table-cell/>
          <table:table-cell table:style-name="ce80"/>
          <table:table-cell table:number-columns-repeated="3"/>
          <table:table-cell office:value-type="string" calcext:value-type="string">
            <text:p>mw244</text:p>
          </table:table-cell>
          <table:table-cell office:value-type="string" calcext:value-type="string">
            <text:p>DB200 DBW4</text:p>
          </table:table-cell>
          <table:table-cell/>
          <table:table-cell office:value-type="string" calcext:value-type="string">
            <text:p>C1_UNLOAD_P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не используется в программе</text:p>
          </table:table-cell>
          <table:table-cell table:number-columns-repeated="39"/>
        </table:table-row>
        <table:table-row table:style-name="ro2">
          <table:table-cell table:number-columns-repeated="2"/>
          <table:table-cell table:style-name="ce80" table:number-columns-repeated="4"/>
          <table:table-cell table:number-columns-repeated="2"/>
          <table:table-cell table:style-name="ce80"/>
          <table:table-cell table:number-columns-repeated="3"/>
          <table:table-cell table:style-name="ce80"/>
          <table:table-cell/>
          <table:table-cell table:style-name="ce80"/>
          <table:table-cell table:number-columns-repeated="3"/>
          <table:table-cell office:value-type="string" calcext:value-type="string">
            <text:p>mw246</text:p>
          </table:table-cell>
          <table:table-cell office:value-type="string" calcext:value-type="string">
            <text:p>DB200 DBW6</text:p>
          </table:table-cell>
          <table:table-cell/>
          <table:table-cell office:value-type="string" calcext:value-type="string">
            <text:p>C1_RELOAD_P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не используется в программе</text:p>
          </table:table-cell>
          <table:table-cell table:number-columns-repeated="39"/>
        </table:table-row>
        <table:table-row table:style-name="ro2" table:number-rows-repeated="4">
          <table:table-cell table:number-columns-repeated="2"/>
          <table:table-cell table:style-name="ce80" table:number-columns-repeated="4"/>
          <table:table-cell table:number-columns-repeated="2"/>
          <table:table-cell table:style-name="ce80"/>
          <table:table-cell table:number-columns-repeated="3"/>
          <table:table-cell table:style-name="ce80"/>
          <table:table-cell/>
          <table:table-cell table:style-name="ce80"/>
          <table:table-cell table:number-columns-repeated="49"/>
        </table:table-row>
        <table:table-row table:style-name="ro2" table:number-rows-repeated="5"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48"/>
        </table:table-row>
        <table:table-row table:style-name="ro2"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Чтение из compr1 в masterPLC</text:p>
          </table:table-cell>
          <table:table-cell table:number-columns-repeated="46"/>
        </table:table-row>
        <table:table-row table:style-name="ro2"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compr1</text:p>
          </table:table-cell>
          <table:table-cell office:value-type="string" calcext:value-type="string">
            <text:p>masterPLC</text:p>
          </table:table-cell>
          <table:table-cell table:number-columns-repeated="44"/>
        </table:table-row>
        <table:table-row table:style-name="ro2"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DB6 DBW0</text:p>
          </table:table-cell>
          <table:table-cell office:value-type="string" calcext:value-type="string">
            <text:p>DB100 DBW0</text:p>
          </table:table-cell>
          <table:table-cell table:number-columns-repeated="44"/>
        </table:table-row>
        <table:table-row table:style-name="ro2"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80 слов</text:p>
          </table:table-cell>
          <table:table-cell office:value-type="string" calcext:value-type="string">
            <text:p>80 слов (words)</text:p>
          </table:table-cell>
          <table:table-cell table:number-columns-repeated="44"/>
        </table:table-row>
        <table:table-row table:style-name="ro2"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DB6 DBW78</text:p>
          </table:table-cell>
          <table:table-cell office:value-type="string" calcext:value-type="string">
            <text:p>DB100 DBW78</text:p>
          </table:table-cell>
          <table:table-cell table:number-columns-repeated="44"/>
        </table:table-row>
      </table:table>
      <table:table table:name="Приводы" table:style-name="ta1">
        <office:forms form:automatic-focus="false" form:apply-design-mode="false"/>
        <table:table-column table:style-name="co1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" table:default-cell-style-name="Default"/>
        <table:table-row table:style-name="ro2">
          <table:table-cell/>
          <table:table-cell table:style-name="ce159" office:value-type="string" calcext:value-type="string">
            <text:p>Регистр</text:p>
          </table:table-cell>
          <table:table-cell table:style-name="ce159" office:value-type="string" calcext:value-type="string">
            <text:p>Бит</text:p>
          </table:table-cell>
          <table:table-cell table:style-name="ce159" office:value-type="string" calcext:value-type="string">
            <text:p>Класс</text:p>
          </table:table-cell>
          <table:table-cell table:style-name="ce159" office:value-type="string" calcext:value-type="string">
            <text:p>Объект</text:p>
          </table:table-cell>
          <table:table-cell table:style-name="ce159" office:value-type="string" calcext:value-type="string">
            <text:p>Поле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AccessRights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Состояние/команда</text:p>
          </table:table-cell>
          <table:table-cell table:style-name="ce155" office:value-type="string" calcext:value-type="string" table:number-columns-spanned="2" table:number-rows-spanned="1">
            <text:p>События</text:p>
          </table:table-cell>
          <table:covered-table-cell/>
          <table:table-cell table:number-columns-repeated="3"/>
        </table:table-row>
        <table:table-row table:style-name="ro2">
          <table:table-cell/>
          <table:table-cell table:style-name="ce159" table:number-columns-repeated="5"/>
          <table:table-cell table:number-columns-repeated="4"/>
          <table:table-cell table:style-name="ce158" office:value-type="string" calcext:value-type="string">
            <text:p>0-&gt;1</text:p>
          </table:table-cell>
          <table:table-cell table:style-name="ce158" office:value-type="string" calcext:value-type="string">
            <text:p>1-&gt;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X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ompressor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ён</text:p>
          </table:table-cell>
          <table:table-cell office:value-type="string" calcext:value-type="string">
            <text:p>состояние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QX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mpresso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Компрессор Команда на включение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QX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GV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Открыть</text:p>
          </table:table-cell>
          <table:table-cell office:value-type="string" calcext:value-type="string">
            <text:p>состояние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QX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GV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Закрыть</text:p>
          </table:table-cell>
          <table:table-cell office:value-type="string" calcext:value-type="string">
            <text:p>состояние</text:p>
          </table:table-cell>
          <table:table-cell table:number-columns-repeated="5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IGV</text:p>
          </table:table-cell>
          <table:table-cell office:value-type="string" calcext:value-type="string">
            <text:p>CurrPositionFromPLC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Задание положения от ПЛК</text:p>
          </table:table-cell>
          <table:table-cell office:value-type="string" calcext:value-type="string">
            <text:p>состояние</text:p>
          </table:table-cell>
          <table:table-cell table:number-columns-repeated="5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IGV</text:p>
          </table:table-cell>
          <table:table-cell office:value-type="string" calcext:value-type="string">
            <text:p>SetPosi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Задать положение</text:p>
          </table:table-cell>
          <table:table-cell office:value-type="string" calcext:value-type="string">
            <text:p>команда</text:p>
          </table:table-cell>
          <table:table-cell table:number-columns-repeated="5"/>
        </table:table-row>
        <table:table-row table:style-name="ro2">
          <table:table-cell/>
          <table:table-cell table:style-name="ce128" office:value-type="string" calcext:value-type="string">
            <text:p>DB58,WORD4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2" office:value-type="string" calcext:value-type="string">
            <text:p>IGV</text:p>
          </table:table-cell>
          <table:table-cell office:value-type="string" calcext:value-type="string">
            <text:p>CurrOpenPosition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Текущее положение в 0,1%</text:p>
          </table:table-cell>
          <table:table-cell office:value-type="string" calcext:value-type="string">
            <text:p>состояние</text:p>
          </table:table-cell>
          <table:table-cell table:number-columns-repeated="5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Закрыть</text:p>
          </table:table-cell>
          <table:table-cell office:value-type="string" calcext:value-type="string">
            <text:p>состояние</text:p>
          </table:table-cell>
          <table:table-cell table:number-columns-repeated="5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Закрыт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Продувочный клапан Закрыт</text:p>
          </table:table-cell>
          <table:table-cell office:value-type="string" calcext:value-type="string">
            <text:p>Продувочный клапан приоткрыт</text:p>
          </table:table-cell>
          <table:table-cell table:number-columns-repeated="3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SwitchToClos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Включить на закрытие</text:p>
          </table:table-cell>
          <table:table-cell office:value-type="string" calcext:value-type="string">
            <text:p>команда</text:p>
          </table:table-cell>
          <table:table-cell table:number-columns-repeated="5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ManualMod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Ручной режим</text:p>
          </table:table-cell>
          <table:table-cell office:value-type="string" calcext:value-type="string">
            <text:p>команда</text:p>
          </table:table-cell>
          <table:table-cell office:value-type="string" calcext:value-type="string">
            <text:p>Продувочный клапан Ручной режим</text:p>
          </table:table-cell>
          <table:table-cell office:value-type="string" calcext:value-type="string">
            <text:p>Продувочный клапан Авторежим</text:p>
          </table:table-cell>
          <table:table-cell table:number-columns-repeated="3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Открыть</text:p>
          </table:table-cell>
          <table:table-cell office:value-type="string" calcext:value-type="string">
            <text:p>состояние</text:p>
          </table:table-cell>
          <table:table-cell table:number-columns-repeated="5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Открыт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Продувочный клапан Открыт</text:p>
          </table:table-cell>
          <table:table-cell office:value-type="string" calcext:value-type="string">
            <text:p>Продувочный клапан призакрыт</text:p>
          </table:table-cell>
          <table:table-cell table:number-columns-repeated="3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Разрешить работу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<text:span text:style-name="T10">Продувочный клапан </text:span>Разрешить работу</text:p>
          </table:table-cell>
          <table:table-cell table:number-columns-repeated="4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Запретить работу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<text:span text:style-name="T10">Продувочный клапан </text:span>Запретить работу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QINT2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CurrPositionFromPLC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Задание положения от ПЛК</text:p>
          </table:table-cell>
          <table:table-cell office:value-type="string" calcext:value-type="string">
            <text:p>состояние</text:p>
          </table:table-cell>
          <table:table-cell table:number-columns-repeated="5"/>
        </table:table-row>
        <table:table-row table:style-name="ro2">
          <table:table-cell/>
          <table:table-cell table:style-name="ce128" office:value-type="string" calcext:value-type="string">
            <text:p>DB5,WORD13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SetClosePosition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Задание степени закрытия</text:p>
          </table:table-cell>
          <table:table-cell office:value-type="string" calcext:value-type="string">
            <text:p>состояние</text:p>
          </table:table-cell>
          <table:table-cell table:number-columns-repeated="5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PositionWhenLoaded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Задание при загрузке</text:p>
          </table:table-cell>
          <table:table-cell office:value-type="string" calcext:value-type="string">
            <text:p>команда</text:p>
          </table:table-cell>
          <table:table-cell table:number-columns-repeated="5"/>
        </table:table-row>
        <table:table-row table:style-name="ro2">
          <table:table-cell/>
          <table:table-cell table:style-name="ce128" office:value-type="string" calcext:value-type="string">
            <text:p>DB58,WORD6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CurrClosePosition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Текущее положение в 0,1%</text:p>
          </table:table-cell>
          <table:table-cell office:value-type="string" calcext:value-type="string">
            <text:p>состояние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QX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trlRelay</text:p>
          </table:table-cell>
          <table:table-cell office:value-type="string" calcext:value-type="string">
            <text:p>oilHea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состояние</text:p>
          </table:table-cell>
          <table:table-cell table:number-columns-repeated="5"/>
        </table:table-row>
        <table:table-row table:style-name="ro2">
          <table:table-cell/>
          <table:table-cell table:style-name="ce128" office:value-type="string" calcext:value-type="string">
            <text:p>DB50,X4</text:p>
          </table:table-cell>
          <table:table-cell table:style-name="ce128" office:value-type="float" office:value="6" calcext:value-type="float">
            <text:p>6</text:p>
          </table:table-cell>
          <table:table-cell office:value-type="string" calcext:value-type="string">
            <text:p>CtrlRelay</text:p>
          </table:table-cell>
          <table:table-cell office:value-type="string" calcext:value-type="string">
            <text:p>oilHeater</text:p>
          </table:table-cell>
          <table:table-cell office:value-type="string" calcext:value-type="string">
            <text:p>Switch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команда</text:p>
          </table:table-cell>
          <table:table-cell table:number-columns-repeated="5"/>
        </table:table-row>
        <table:table-row table:style-name="ro2">
          <table:table-cell/>
          <table:table-cell table:style-name="ce128" office:value-type="string" calcext:value-type="string">
            <text:p>DB50,X4</text:p>
          </table:table-cell>
          <table:table-cell table:style-name="ce128" office:value-type="float" office:value="5" calcext:value-type="float">
            <text:p>5</text:p>
          </table:table-cell>
          <table:table-cell office:value-type="string" calcext:value-type="string">
            <text:p>CtrlRelay</text:p>
          </table:table-cell>
          <table:table-cell office:value-type="string" calcext:value-type="string">
            <text:p>oilHeater</text:p>
          </table:table-cell>
          <table:table-cell office:value-type="string" calcext:value-type="string">
            <text:p>ManualMod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Ручной режим</text:p>
          </table:table-cell>
          <table:table-cell office:value-type="string" calcext:value-type="string">
            <text:p>команда</text:p>
          </table:table-cell>
          <table:table-cell office:value-type="string" calcext:value-type="string">
            <text:p><text:span text:style-name="T10">Нагреватель масла </text:span>Ручной режим</text:p>
          </table:table-cell>
          <table:table-cell office:value-type="string" calcext:value-type="string">
            <text:p><text:span text:style-name="T10">Нагреватель масла </text:span>Авторежим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X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Relay</text:p>
          </table:table-cell>
          <table:table-cell office:value-type="string" calcext:value-type="string">
            <text:p>oilPum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состояние</text:p>
          </table:table-cell>
          <table:table-cell table:number-columns-repeated="5"/>
        </table:table-row>
        <table:table-row table:style-name="ro2">
          <table:table-cell/>
          <table:table-cell table:style-name="ce128" office:value-type="string" calcext:value-type="string">
            <text:p>DB50,X4</text:p>
          </table:table-cell>
          <table:table-cell table:style-name="ce128" office:value-type="float" office:value="1" calcext:value-type="float">
            <text:p>1</text:p>
          </table:table-cell>
          <table:table-cell office:value-type="string" calcext:value-type="string">
            <text:p>CtrlRelay</text:p>
          </table:table-cell>
          <table:table-cell office:value-type="string" calcext:value-type="string">
            <text:p>oilPump</text:p>
          </table:table-cell>
          <table:table-cell office:value-type="string" calcext:value-type="string">
            <text:p>Switch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команда</text:p>
          </table:table-cell>
          <table:table-cell table:number-columns-repeated="5"/>
        </table:table-row>
        <table:table-row table:style-name="ro2">
          <table:table-cell/>
          <table:table-cell table:style-name="ce128" office:value-type="string" calcext:value-type="string">
            <text:p>DB50,X4</text:p>
          </table:table-cell>
          <table:table-cell table:style-name="ce128" office:value-type="float" office:value="0" calcext:value-type="float">
            <text:p>0</text:p>
          </table:table-cell>
          <table:table-cell office:value-type="string" calcext:value-type="string">
            <text:p>CtrlRelay</text:p>
          </table:table-cell>
          <table:table-cell office:value-type="string" calcext:value-type="string">
            <text:p>oilPump</text:p>
          </table:table-cell>
          <table:table-cell office:value-type="string" calcext:value-type="string">
            <text:p>ManualMod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Ручной режим</text:p>
          </table:table-cell>
          <table:table-cell office:value-type="string" calcext:value-type="string">
            <text:p>команда</text:p>
          </table:table-cell>
          <table:table-cell office:value-type="string" calcext:value-type="string">
            <text:p><text:span text:style-name="T10">ПМН </text:span>Ручной режим</text:p>
          </table:table-cell>
          <table:table-cell office:value-type="string" calcext:value-type="string">
            <text:p><text:span text:style-name="T10">ПМН </text:span>Авторежим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CtrlRelay</text:p>
          </table:table-cell>
          <table:table-cell office:value-type="string" calcext:value-type="string">
            <text:p>enclosureFa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Вентилятор корпуса Включен</text:p>
          </table:table-cell>
          <table:table-cell office:value-type="string" calcext:value-type="string">
            <text:p><text:span text:style-name="T10">Вентилятор корпуса </text:span>Отключен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CtrlRelay</text:p>
          </table:table-cell>
          <table:table-cell office:value-type="string" calcext:value-type="string">
            <text:p>enclosureFan</text:p>
          </table:table-cell>
          <table:table-cell office:value-type="string" calcext:value-type="string">
            <text:p>Switch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команда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CtrlRelay</text:p>
          </table:table-cell>
          <table:table-cell office:value-type="string" calcext:value-type="string">
            <text:p>enclosureFan</text:p>
          </table:table-cell>
          <table:table-cell office:value-type="string" calcext:value-type="string">
            <text:p>ManualMod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Ручной режим</text:p>
          </table:table-cell>
          <table:table-cell office:value-type="string" calcext:value-type="string">
            <text:p>команда</text:p>
          </table:table-cell>
          <table:table-cell office:value-type="string" calcext:value-type="string">
            <text:p><text:span text:style-name="T10">Вентилятор корпуса </text:span>Ручной режим</text:p>
          </table:table-cell>
          <table:table-cell office:value-type="string" calcext:value-type="string">
            <text:p><text:span text:style-name="T10">Вентилятор корпуса </text:span>Авторежим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X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commonShutdownRelay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Общее реле Отключения активно</text:p>
          </table:table-cell>
          <table:table-cell office:value-type="string" calcext:value-type="string">
            <text:p>Общее реле Отключения сброшено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X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motorCoolingFa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Вентилятор охлаждения Включен</text:p>
          </table:table-cell>
          <table:table-cell office:value-type="string" calcext:value-type="string">
            <text:p><text:span text:style-name="T10">Вентилятор охлаждения </text:span>Отключен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можно</text:p>
          </table:table-cell>
          <table:table-cell table:style-name="ce128" office:value-type="string" calcext:value-type="string">
            <text:p>DB50,X7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CtrlRelay</text:p>
          </table:table-cell>
          <table:table-cell office:value-type="string" calcext:value-type="string">
            <text:p>motorCoolingFan</text:p>
          </table:table-cell>
          <table:table-cell office:value-type="string" calcext:value-type="string">
            <text:p>Switch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команда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pan text:style-name="T10">доб</text:span>авить</text:p>
          </table:table-cell>
          <table:table-cell table:style-name="ce128" office:value-type="string" calcext:value-type="string">
            <text:p>DB50,X7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CtrlRelay</text:p>
          </table:table-cell>
          <table:table-cell office:value-type="string" calcext:value-type="string">
            <text:p>motorCoolingFan</text:p>
          </table:table-cell>
          <table:table-cell office:value-type="string" calcext:value-type="string">
            <text:p>ManualMod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Ручной режим</text:p>
          </table:table-cell>
          <table:table-cell office:value-type="string" calcext:value-type="string">
            <text:p>команда</text:p>
          </table:table-cell>
          <table:table-cell office:value-type="string" calcext:value-type="string">
            <text:p><text:span text:style-name="T10">Вентилятор  охлаждения </text:span>Ручной режим</text:p>
          </table:table-cell>
          <table:table-cell office:value-type="string" calcext:value-type="string">
            <text:p><text:span text:style-name="T10">Вентилятор  охлаждения </text:span>Авторежим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X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vacuumPum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Вакуумный насос Включен</text:p>
          </table:table-cell>
          <table:table-cell office:value-type="string" calcext:value-type="string">
            <text:p><text:span text:style-name="T10">Вакуумный насос </text:span>Отключен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можно</text:p>
          </table:table-cell>
          <table:table-cell table:style-name="ce128" office:value-type="string" calcext:value-type="string">
            <text:p>DB50,X11</text:p>
          </table:table-cell>
          <table:table-cell table:style-name="ce128" office:value-type="float" office:value="2" calcext:value-type="float">
            <text:p>2</text:p>
          </table:table-cell>
          <table:table-cell table:style-name="ce128" office:value-type="string" calcext:value-type="string">
            <text:p>CtrlRelay</text:p>
          </table:table-cell>
          <table:table-cell office:value-type="string" calcext:value-type="string">
            <text:p>vacuumPump</text:p>
          </table:table-cell>
          <table:table-cell office:value-type="string" calcext:value-type="string">
            <text:p>Switch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команда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pan text:style-name="T10">доб</text:span>авить</text:p>
          </table:table-cell>
          <table:table-cell table:style-name="ce128" office:value-type="string" calcext:value-type="string">
            <text:p>DB50,X11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CtrlRelay</text:p>
          </table:table-cell>
          <table:table-cell office:value-type="string" calcext:value-type="string">
            <text:p>vacuumPump</text:p>
          </table:table-cell>
          <table:table-cell office:value-type="string" calcext:value-type="string">
            <text:p>ManualMod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Ручной режим</text:p>
          </table:table-cell>
          <table:table-cell office:value-type="string" calcext:value-type="string">
            <text:p>команда</text:p>
          </table:table-cell>
          <table:table-cell office:value-type="string" calcext:value-type="string">
            <text:p><text:span text:style-name="T10">Вакуумный насос </text:span>Ручной режим</text:p>
          </table:table-cell>
          <table:table-cell office:value-type="string" calcext:value-type="string">
            <text:p><text:span text:style-name="T10">Вакуумный насос </text:span>Авторежим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X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sealAirValv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Клапан уплотнения Включен</text:p>
          </table:table-cell>
          <table:table-cell office:value-type="string" calcext:value-type="string">
            <text:p><text:span text:style-name="T10">Клапан уплотнения </text:span>Отключен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X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outputValv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состояние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QX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commonAlar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состояние</text:p>
          </table:table-cell>
          <table:table-cell table:number-columns-repeated="5"/>
        </table:table-row>
        <table:table-row table:style-name="ro2" table:number-rows-repeated="11">
          <table:table-cell table:number-columns-repeated="15"/>
        </table:table-row>
        <table:table-row table:style-name="ro2">
          <table:table-cell/>
          <table:table-cell office:value-type="string" calcext:value-type="string">
            <text:p>Дискретные выходы</text:p>
          </table:table-cell>
          <table:table-cell/>
          <table:table-cell office:value-type="string" calcext:value-type="string">
            <text:p>Описание в проекте («резерв» - название в проекте, но есть применение в программе)</text:p>
          </table:table-cell>
          <table:table-cell table:number-columns-repeated="5"/>
          <table:table-cell office:value-type="string" calcext:value-type="string">
            <text:p>Контроль состояния</text:p>
          </table:table-cell>
          <table:table-cell table:style-name="ce166" office:value-type="string" calcext:value-type="string">
            <text:p>Команда ручного управления</text:p>
          </table:table-cell>
          <table:table-cell office:value-type="string" calcext:value-type="string">
            <text:p>Действие в прогр.</text:p>
          </table:table-cell>
          <table:table-cell office:value-type="string" calcext:value-type="string">
            <text:p>Режим авто/ручной</text:p>
          </table:table-cell>
          <table:table-cell table:number-columns-repeated="2"/>
        </table:table-row>
        <table:table-row table:style-name="ro2">
          <table:table-cell/>
          <table:table-cell table:style-name="ce161" office:value-type="string" calcext:value-type="string">
            <text:p>Q0.0</text:p>
          </table:table-cell>
          <table:table-cell table:style-name="ce161" office:value-type="string" calcext:value-type="string">
            <text:p>EY0</text:p>
          </table:table-cell>
          <table:table-cell table:style-name="ce161" office:value-type="string" calcext:value-type="string">
            <text:p>Общее реле тревоги (common alarm relay; energized if alarm)</text:p>
          </table:table-cell>
          <table:table-cell table:number-columns-repeated="6"/>
          <table:table-cell table:style-name="ce166"/>
          <table:table-cell table:number-columns-repeated="4"/>
        </table:table-row>
        <table:table-row table:style-name="ro2">
          <table:table-cell/>
          <table:table-cell office:value-type="string" calcext:value-type="string">
            <text:p>Q0.1</text:p>
          </table:table-cell>
          <table:table-cell office:value-type="string" calcext:value-type="string">
            <text:p>EY1</text:p>
          </table:table-cell>
          <table:table-cell office:value-type="string" calcext:value-type="string">
            <text:p>Компрессор включить (start the compressor; stop when de-energized)</text:p>
          </table:table-cell>
          <table:table-cell table:number-columns-repeated="5"/>
          <table:table-cell office:value-type="string" calcext:value-type="string">
            <text:p><text:span text:style-name="T10">AX1_MotorStarterSignal (</text:span>I4.0)</text:p>
          </table:table-cell>
          <table:table-cell table:style-name="ce166" office:value-type="string" calcext:value-type="string">
            <text:p>"runCmprCmndFromMaster" (M240.0)</text:p>
          </table:table-cell>
          <table:table-cell/>
          <table:table-cell office:value-type="string" calcext:value-type="string">
            <text:p>"Remote" (M3.3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0.2</text:p>
          </table:table-cell>
          <table:table-cell office:value-type="string" calcext:value-type="string">
            <text:p>EY2</text:p>
          </table:table-cell>
          <table:table-cell office:value-type="string" calcext:value-type="string">
            <text:p>Реле управления всп.маслонасоса (aux.oil pump control relay)</text:p>
          </table:table-cell>
          <table:table-cell table:number-columns-repeated="5"/>
          <table:table-cell office:value-type="string" calcext:value-type="string">
            <text:p>нет</text:p>
          </table:table-cell>
          <table:table-cell table:style-name="ce166" office:value-type="string" calcext:value-type="string">
            <text:p>"SetCmndSignal".oilPumpCmnd (DB1.DBX4.1) (1-включить)</text:p>
          </table:table-cell>
          <table:table-cell/>
          <table:table-cell office:value-type="string" calcext:value-type="string">
            <text:p>"SetCmndSignal".oilPumpControlAutoOrManual (DB1.DBX4.0) (0-авто; 1-ручн.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0.3</text:p>
          </table:table-cell>
          <table:table-cell office:value-type="string" calcext:value-type="string">
            <text:p>EY3</text:p>
          </table:table-cell>
          <table:table-cell table:style-name="ce161" office:value-type="string" calcext:value-type="string">
            <text:p>Общее реле отключения (common shutdown relay; energized if no shutdown) — зелёная лампа на световой колонне, включена по 0 (false) на выходе (????)</text:p>
          </table:table-cell>
          <table:table-cell table:number-columns-repeated="6"/>
          <table:table-cell table:style-name="ce166" office:value-type="string" calcext:value-type="string">
            <text:p>нет</text:p>
          </table:table-cell>
          <table:table-cell/>
          <table:table-cell office:value-type="string" calcext:value-type="string">
            <text:p>Включение по false в TotalTripOrFault (M0.2, DB6.DBX0.2), отключение по true там же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0.4</text:p>
          </table:table-cell>
          <table:table-cell office:value-type="string" calcext:value-type="string">
            <text:p>EY4</text:p>
          </table:table-cell>
          <table:table-cell office:value-type="string" calcext:value-type="string">
            <text:p>Вентилятор мотора реле управления (motor cooling fan control relay)</text:p>
          </table:table-cell>
          <table:table-cell table:number-columns-repeated="5"/>
          <table:table-cell table:number-columns-repeated="2" office:value-type="string" calcext:value-type="string">
            <text:p>нет</text:p>
          </table:table-cell>
          <table:table-cell/>
          <table:table-cell table:style-name="ce166" office:value-type="string" calcext:value-type="string">
            <text:p>Включение по CompressorRun (M0.3, DB6.DBX0.3), отключение - через 30 сек. после отключения CompressorRu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0.5</text:p>
          </table:table-cell>
          <table:table-cell office:value-type="string" calcext:value-type="string">
            <text:p>EY5</text:p>
          </table:table-cell>
          <table:table-cell office:value-type="string" calcext:value-type="string">
            <text:p>Реле управления вакуумного насоса (vacuum pump control relay)</text:p>
          </table:table-cell>
          <table:table-cell table:number-columns-repeated="5"/>
          <table:table-cell table:number-columns-repeated="2" office:value-type="string" calcext:value-type="string">
            <text:p>нет</text:p>
          </table:table-cell>
          <table:table-cell/>
          <table:table-cell table:style-name="ce166" office:value-type="string" calcext:value-type="string">
            <text:p>Включение по CompressorRun (M0.3, DB6.DBX0.3) или oilPumpStartCmnd (M13.7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0.6</text:p>
          </table:table-cell>
          <table:table-cell office:value-type="string" calcext:value-type="string">
            <text:p>EY6</text:p>
          </table:table-cell>
          <table:table-cell office:value-type="string" calcext:value-type="string">
            <text:p>Уплотнение воздушного клапана (seal air valve)</text:p>
          </table:table-cell>
          <table:table-cell table:number-columns-repeated="5"/>
          <table:table-cell table:number-columns-repeated="2" office:value-type="string" calcext:value-type="string">
            <text:p>нет</text:p>
          </table:table-cell>
          <table:table-cell/>
          <table:table-cell table:style-name="ce166" office:value-type="string" calcext:value-type="string">
            <text:p>Включение по CompressorRun (M0.3, DB6.DBX0.3) и "dataToPanel".stage3DischargePressAveraged (DB3.DBW228) меньше 1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0.7</text:p>
          </table:table-cell>
          <table:table-cell table:style-name="ce91" office:value-type="string" calcext:value-type="string">
            <text:p>EY7</text:p>
          </table:table-cell>
          <table:table-cell office:value-type="string" calcext:value-type="string">
            <text:p>резерв — Разрешение работы запорного клапана BlockOffValve (?)</text:p>
          </table:table-cell>
          <table:table-cell table:number-columns-repeated="5"/>
          <table:table-cell office:value-type="string" calcext:value-type="string">
            <text:p>нет</text:p>
          </table:table-cell>
          <table:table-cell table:style-name="ce166" office:value-type="string" calcext:value-type="string">
            <text:p>нет</text:p>
          </table:table-cell>
          <table:table-cell/>
          <table:table-cell table:style-name="ce166" office:value-type="string" calcext:value-type="string">
            <text:p>Включение постоянно по CompressorRun (M0.3, DB6.DBX0.3) или импульс 1 сек. по CompressorRun, зависит от "SetCmndSignal".blockOffValveControlContOrOnePulse (DB1.DBX5.4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1.0</text:p>
          </table:table-cell>
          <table:table-cell office:value-type="string" calcext:value-type="string">
            <text:p>EY8</text:p>
          </table:table-cell>
          <table:table-cell office:value-type="string" calcext:value-type="string">
            <text:p>Входные лопатки открыть (IGV open)</text:p>
          </table:table-cell>
          <table:table-cell table:number-columns-repeated="5"/>
          <table:table-cell office:value-type="string" calcext:value-type="string">
            <text:p>нет</text:p>
          </table:table-cell>
          <table:table-cell table:style-name="ce166" office:value-type="string" calcext:value-type="string">
            <text:p>нет (подаётся алгоритмом)</text:p>
          </table:table-cell>
          <table:table-cell/>
          <table:table-cell office:value-type="string" calcext:value-type="string">
            <text:p>"SetCmndSignal".valveControlAutoOrManual (DB1.DBX5.2) (0-авто; 1-ручн.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1.1</text:p>
          </table:table-cell>
          <table:table-cell office:value-type="string" calcext:value-type="string">
            <text:p>EY9</text:p>
          </table:table-cell>
          <table:table-cell office:value-type="string" calcext:value-type="string">
            <text:p>Входные лопатки закрыть (IGV close)</text:p>
          </table:table-cell>
          <table:table-cell table:number-columns-repeated="5"/>
          <table:table-cell office:value-type="string" calcext:value-type="string">
            <text:p>нет</text:p>
          </table:table-cell>
          <table:table-cell table:style-name="ce166" office:value-type="string" calcext:value-type="string">
            <text:p>нет (подаётся алгоритмом)</text:p>
          </table:table-cell>
          <table:table-cell/>
          <table:table-cell office:value-type="string" calcext:value-type="string">
            <text:p>"SetCmndSignal".valveControlAutoOrManual (DB1.DBX5.2) (0-авто; 1-ручн.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1.2</text:p>
          </table:table-cell>
          <table:table-cell table:style-name="ce91" office:value-type="string" calcext:value-type="string">
            <text:p>EY10</text:p>
          </table:table-cell>
          <table:table-cell office:value-type="string" calcext:value-type="string">
            <text:p>резерв — Закрыть запорный клапан (при работе компрессора или выбеге 30 мин.)</text:p>
          </table:table-cell>
          <table:table-cell table:number-columns-repeated="5"/>
          <table:table-cell office:value-type="string" calcext:value-type="string">
            <text:p>blockOffValveClosed (I5.6)</text:p>
          </table:table-cell>
          <table:table-cell table:style-name="ce166" office:value-type="string" calcext:value-type="string">
            <text:p>"SetCmndSignal".blockOffValveCmnd (DB1.DBX9.4) (0-открыть; 1-закрыть)</text:p>
          </table:table-cell>
          <table:table-cell office:value-type="string" calcext:value-type="string">
            <text:p>импульс 5 сек.</text:p>
          </table:table-cell>
          <table:table-cell office:value-type="string" calcext:value-type="string">
            <text:p>"SetCmndSignal".blockOffValveControlAutoOrManual (DB1.DBX9.5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1.3</text:p>
          </table:table-cell>
          <table:table-cell table:style-name="ce91" office:value-type="string" calcext:value-type="string">
            <text:p>EY11</text:p>
          </table:table-cell>
          <table:table-cell office:value-type="string" calcext:value-type="string">
            <text:p>резерв — Запрет работы запорного клапана (в импульсном режиме)</text:p>
          </table:table-cell>
          <table:table-cell table:number-columns-repeated="6"/>
          <table:table-cell table:style-name="ce166" office:value-type="string" calcext:value-type="string">
            <text:p>нет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Q1.4</text:p>
          </table:table-cell>
          <table:table-cell table:style-name="ce80" office:value-type="string" calcext:value-type="string">
            <text:p>EY12</text:p>
          </table:table-cell>
          <table:table-cell office:value-type="string" calcext:value-type="string">
            <text:p>Реле управления контактора нагревателя резервуарного масла (reservoir oil heater contactor control relay)</text:p>
          </table:table-cell>
          <table:table-cell table:number-columns-repeated="6"/>
          <table:table-cell table:style-name="ce166" office:value-type="string" calcext:value-type="string">
            <text:p>"SetCmndSignal".oilHeaterCmnd (DB1DBX4.6) (1-включить)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"SetCmndSignal".oilHeaterControlAutoOrManual (DB1.DBX4.5) (0-авто; 1-ручн.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1.5</text:p>
          </table:table-cell>
          <table:table-cell table:style-name="ce91" office:value-type="string" calcext:value-type="string">
            <text:p>EY13</text:p>
          </table:table-cell>
          <table:table-cell office:value-type="string" calcext:value-type="string">
            <text:p>резерв — Открыть запорный клапан (через 30 мин. после остановки компрессора)</text:p>
          </table:table-cell>
          <table:table-cell table:number-columns-repeated="5"/>
          <table:table-cell office:value-type="string" calcext:value-type="string">
            <text:p>blockOffValveClosed (I5.7)</text:p>
          </table:table-cell>
          <table:table-cell table:style-name="ce166" office:value-type="string" calcext:value-type="string">
            <text:p>"SetCmndSignal".blockOffValveCmnd (DB1.DBX9.4) (0-открыть; 1-закрыть)</text:p>
          </table:table-cell>
          <table:table-cell office:value-type="string" calcext:value-type="string">
            <text:p>импульс 30 сек.</text:p>
          </table:table-cell>
          <table:table-cell office:value-type="string" calcext:value-type="string">
            <text:p>"SetCmndSignal".blockOffValveControlAutoOrManual (DB1.DBX9.5) (0-авто; 1-ручн.)</text:p>
          </table:table-cell>
          <table:table-cell/>
          <table:table-cell office:value-type="string" calcext:value-type="string">
            <text:p>автоматически переводится в авторежим при работающем компрессоре CompressorRun (M0.3, DB6.DBX0.3)</text:p>
          </table:table-cell>
        </table:table-row>
        <table:table-row table:style-name="ro2">
          <table:table-cell/>
          <table:table-cell office:value-type="string" calcext:value-type="string">
            <text:p>Q1.6</text:p>
          </table:table-cell>
          <table:table-cell table:style-name="ce80" office:value-type="string" calcext:value-type="string">
            <text:p>EY14</text:p>
          </table:table-cell>
          <table:table-cell office:value-type="string" calcext:value-type="string">
            <text:p>резерв — Управление выходным клапаном компрессора?</text:p>
          </table:table-cell>
          <table:table-cell table:number-columns-repeated="6"/>
          <table:table-cell table:style-name="ce166" office:value-type="string" calcext:value-type="string">
            <text:p>нет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Q1.7</text:p>
          </table:table-cell>
          <table:table-cell table:style-name="ce92" office:value-type="string" calcext:value-type="string">
            <text:p>EY15</text:p>
          </table:table-cell>
          <table:table-cell office:value-type="string" calcext:value-type="string">
            <text:p>резерв — Управление вентилятором корпуса</text:p>
          </table:table-cell>
          <table:table-cell table:number-columns-repeated="6"/>
          <table:table-cell table:style-name="ce166" office:value-type="string" calcext:value-type="string">
            <text:p>"SetCmndSignal".enclosureFanCmnd (DB1.DBX9.6) (1-включить)</text:p>
          </table:table-cell>
          <table:table-cell office:value-type="string" calcext:value-type="string">
            <text:p>включить</text:p>
          </table:table-cell>
          <table:table-cell table:style-name="ce80" office:value-type="string" calcext:value-type="string">
            <text:p>"SetCmndSignal".enclosureFanControlAutoOrManual (DB1.DBX9.7) (0-авто; 1-ручн.)</text:p>
          </table:table-cell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">
          <table:table-cell/>
          <table:table-cell office:value-type="string" calcext:value-type="string">
            <text:p>Аналоговые выходы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QW288</text:p>
          </table:table-cell>
          <table:table-cell/>
          <table:table-cell office:value-type="string" calcext:value-type="string">
            <text:p>Задание положения напр. аппарата (IGV position) при пневмоуправлении</text:p>
          </table:table-cell>
          <table:table-cell table:number-columns-repeated="8"/>
          <table:table-cell office:value-type="string" calcext:value-type="string">
            <text:p>"SetCmndSignal".IGVcontrolElectroPneumo (DB1.DBX211.3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W290</text:p>
          </table:table-cell>
          <table:table-cell/>
          <table:table-cell office:value-type="string" calcext:value-type="string">
            <text:p>Задание положения ППК (BOV position)</text:p>
          </table:table-cell>
          <table:table-cell table:number-columns-repeated="11"/>
        </table:table-row>
      </table:table>
      <table:table table:name="Предупреждения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24"/>
        <table:table-column table:style-name="co3" table:default-cell-style-name="Default"/>
        <table:table-column table:style-name="co1" table:default-cell-style-name="ce144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ce80"/>
        <table:table-column table:style-name="co1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1" table:number-columns-repeated="6" table:default-cell-style-name="Default"/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ce155" office:value-type="string" calcext:value-type="string" table:number-columns-spanned="2" table:number-rows-spanned="1">
            <text:p>События</text:p>
          </table:table-cell>
          <table:covered-table-cell/>
          <table:table-cell table:style-name="ce159" office:value-type="string" calcext:value-type="string">
            <text:p>Поле</text:p>
          </table:table-cell>
          <table:table-cell table:style-name="ce159" office:value-type="string" calcext:value-type="string">
            <text:p>Объект</text:p>
          </table:table-cell>
          <table:table-cell office:value-type="string" calcext:value-type="string">
            <text:p>Предупреждение : 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2">
          <table:table-cell/>
          <table:table-cell table:style-name="Default" office:value-type="string" calcext:value-type="string">
            <text:p>Адрес</text:p>
          </table:table-cell>
          <table:table-cell office:value-type="string" calcext:value-type="string">
            <text:p>Описание анг.</text:p>
          </table:table-cell>
          <table:table-cell table:style-name="Default" office:value-type="string" calcext:value-type="string">
            <text:p>Знач. при 1</text:p>
          </table:table-cell>
          <table:table-cell office:value-type="string" calcext:value-type="string">
            <text:p>Название анг.</text:p>
          </table:table-cell>
          <table:table-cell office:value-type="string" calcext:value-type="string">
            <text:p>Название рус.</text:p>
          </table:table-cell>
          <table:table-cell office:value-type="string" calcext:value-type="string">
            <text:p>Описание рус.</text:p>
          </table:table-cell>
          <table:table-cell table:style-name="Default" office:value-type="string" calcext:value-type="string">
            <text:p>Групповой флаг</text:p>
          </table:table-cell>
          <table:table-cell office:value-type="string" calcext:value-type="string">
            <text:p>Номер бита в групповом флаге</text:p>
          </table:table-cell>
          <table:table-cell table:style-name="ce158" office:value-type="string" calcext:value-type="string">
            <text:p>0-&gt;1</text:p>
          </table:table-cell>
          <table:table-cell table:style-name="ce158" office:value-type="string" calcext:value-type="string">
            <text:p>1-&gt;0</text:p>
          </table:table-cell>
          <table:table-cell table:style-name="ce158" table:number-columns-repeated="2"/>
          <table:table-cell table:number-columns-repeated="7"/>
        </table:table-row>
        <table:table-row table:style-name="ro1">
          <table:table-cell/>
          <table:table-cell table:style-name="ce106" office:value-type="string" calcext:value-type="string">
            <text:p>DB6 DBX4.0</text:p>
          </table:table-cell>
          <table:table-cell table:style-name="ce111" office:value-type="string" calcext:value-type="string">
            <text:p>Surge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SurgeWarning</text:p>
          </table:table-cell>
          <table:table-cell office:value-type="string" calcext:value-type="string">
            <text:p>предпомпаж</text:p>
          </table:table-cell>
          <table:table-cell table:style-name="ce80" office:value-type="string" calcext:value-type="string">
            <text:p>Предпомпаж</text:p>
          </table:table-cell>
          <table:table-cell office:value-type="string" calcext:value-type="string">
            <text:p>WarningMessGroupFlag1</text:p>
          </table:table-cell>
          <table:table-cell office:value-type="float" office:value="8" calcext:value-type="float">
            <text:p>8</text:p>
          </table:table-cell>
          <table:table-cell table:style-name="ce191" table:formula="of:=COM.MICROSOFT.CONCAT([.$N$1];[.$N3];[.$O$1];[.$O3];[.$O$1];[.$P3])" office:value-type="string" office:string-value="Предупреждение : Предпомпаж  " calcext:value-type="string">
            <text:p>Предупреждение : Предпомпаж <text:s/></text:p>
          </table:table-cell>
          <table:table-cell table:number-columns-repeated="3"/>
          <table:table-cell table:style-name="ce80" office:value-type="string" calcext:value-type="string">
            <text:p>Предпомпаж</text:p>
          </table:table-cell>
          <table:table-cell table:number-columns-repeated="6"/>
        </table:table-row>
        <table:table-row table:style-name="ro1">
          <table:table-cell/>
          <table:table-cell table:style-name="ce106" office:value-type="string" calcext:value-type="string">
            <text:p>DB6 DBX4.2</text:p>
          </table:table-cell>
          <table:table-cell table:style-name="ce111" office:value-type="string" calcext:value-type="string">
            <text:p>Oil level alarm (low)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OilLevelAlarmLow</text:p>
          </table:table-cell>
          <table:table-cell office:value-type="string" calcext:value-type="string">
            <text:p>уровень масла авария низкий</text:p>
          </table:table-cell>
          <table:table-cell office:value-type="string" calcext:value-type="string">
            <text:p>Уровень масла аварийно низкий</text:p>
          </table:table-cell>
          <table:table-cell office:value-type="string" calcext:value-type="string">
            <text:p>WarningMessGroupFlag1</text:p>
          </table:table-cell>
          <table:table-cell office:value-type="float" office:value="10" calcext:value-type="float">
            <text:p>10</text:p>
          </table:table-cell>
          <table:table-cell table:style-name="ce191" table:formula="of:=COM.MICROSOFT.CONCAT([.$N$1];[.$N4];[.$O$1];[.$O4];[.$O$1];[.$P4])" office:value-type="string" office:string-value="Предупреждение : Уровень масла  низкий" calcext:value-type="string">
            <text:p>Предупреждение : Уровень масла <text:s/>низкий</text:p>
          </table:table-cell>
          <table:table-cell table:number-columns-repeated="3"/>
          <table:table-cell office:value-type="string" calcext:value-type="string">
            <text:p>Уровень масла</text:p>
          </table:table-cell>
          <table:table-cell/>
          <table:table-cell office:value-type="string" calcext:value-type="string">
            <text:p>низкий</text:p>
          </table:table-cell>
          <table:table-cell table:number-columns-repeated="4"/>
        </table:table-row>
        <table:table-row table:style-name="ro1">
          <table:table-cell/>
          <table:table-cell table:style-name="ce106" office:value-type="string" calcext:value-type="string">
            <text:p>DB6 DBX4.3</text:p>
          </table:table-cell>
          <table:table-cell table:style-name="ce111" office:value-type="string" calcext:value-type="string">
            <text:p>Cooling water flow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CoolingWaterFlowAlarm</text:p>
          </table:table-cell>
          <table:table-cell office:value-type="string" calcext:value-type="string">
            <text:p>нет протока воды</text:p>
          </table:table-cell>
          <table:table-cell office:value-type="string" calcext:value-type="string">
            <text:p>Нет протока охлаждающей воды</text:p>
          </table:table-cell>
          <table:table-cell office:value-type="string" calcext:value-type="string">
            <text:p>WarningMessGroupFlag1</text:p>
          </table:table-cell>
          <table:table-cell office:value-type="float" office:value="11" calcext:value-type="float">
            <text:p>11</text:p>
          </table:table-cell>
          <table:table-cell table:style-name="ce191" table:formula="of:=COM.MICROSOFT.CONCAT([.$N$1];[.$N5];[.$O$1];[.$O5];[.$O$1];[.$P5])" office:value-type="string" office:string-value="Предупреждение : Нет протока воды  " calcext:value-type="string">
            <text:p>Предупреждение : Нет протока воды <text:s/></text:p>
          </table:table-cell>
          <table:table-cell table:number-columns-repeated="3"/>
          <table:table-cell office:value-type="string" calcext:value-type="string">
            <text:p>Нет протока воды</text:p>
          </table:table-cell>
          <table:table-cell table:number-columns-repeated="6"/>
        </table:table-row>
        <table:table-row table:style-name="ro1">
          <table:table-cell/>
          <table:table-cell table:style-name="ce106" office:value-type="string" calcext:value-type="string">
            <text:p>DB6 DBX4.4</text:p>
          </table:table-cell>
          <table:table-cell table:style-name="ce111" office:value-type="string" calcext:value-type="string">
            <text:p>Air filter diff press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AirFilterDiffPressureHighAlarm</text:p>
          </table:table-cell>
          <table:table-cell office:value-type="string" calcext:value-type="string">
            <text:p>высокий перепад на воздушном фильтре</text:p>
          </table:table-cell>
          <table:table-cell office:value-type="string" calcext:value-type="string">
            <text:p>Высокий перепад давления на воздушном фильтре</text:p>
          </table:table-cell>
          <table:table-cell office:value-type="string" calcext:value-type="string">
            <text:p>WarningMessGroupFlag1</text:p>
          </table:table-cell>
          <table:table-cell office:value-type="float" office:value="12" calcext:value-type="float">
            <text:p>12</text:p>
          </table:table-cell>
          <table:table-cell table:style-name="ce191" table:formula="of:=COM.MICROSOFT.CONCAT([.$N$1];[.$N6];[.$O$1];[.$O6];[.$O$1];[.$P6])" office:value-type="string" office:string-value="Предупреждение : Перепад давления на воздушном фильтре  высокий" calcext:value-type="string">
            <text:p>Предупреждение : Перепад давления на воздушном фильтре <text:s/>высокий</text:p>
          </table:table-cell>
          <table:table-cell table:number-columns-repeated="3"/>
          <table:table-cell office:value-type="string" calcext:value-type="string">
            <text:p>Перепад давления на воздушном фильтре</text:p>
          </table:table-cell>
          <table:table-cell/>
          <table:table-cell office:value-type="string" calcext:value-type="string">
            <text:p>высокий</text:p>
          </table:table-cell>
          <table:table-cell table:number-columns-repeated="4"/>
        </table:table-row>
        <table:table-row table:style-name="ro1">
          <table:table-cell/>
          <table:table-cell table:style-name="ce106" office:value-type="string" calcext:value-type="string">
            <text:p>DB6 DBX4.5</text:p>
          </table:table-cell>
          <table:table-cell table:style-name="ce111" office:value-type="string" calcext:value-type="string">
            <text:p>Oil filter diff press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OilFilterDiffPressureHighAlarm</text:p>
          </table:table-cell>
          <table:table-cell office:value-type="string" calcext:value-type="string">
            <text:p>высокий перепад на масляном фильтре</text:p>
          </table:table-cell>
          <table:table-cell office:value-type="string" calcext:value-type="string">
            <text:p>Высокий перепад давления на масляном фильтре</text:p>
          </table:table-cell>
          <table:table-cell office:value-type="string" calcext:value-type="string">
            <text:p>WarningMessGroupFlag1</text:p>
          </table:table-cell>
          <table:table-cell office:value-type="float" office:value="13" calcext:value-type="float">
            <text:p>13</text:p>
          </table:table-cell>
          <table:table-cell table:style-name="ce191" table:formula="of:=COM.MICROSOFT.CONCAT([.$N$1];[.$N7];[.$O$1];[.$O7];[.$O$1];[.$P7])" office:value-type="string" office:string-value="Предупреждение : Перепад давления масла на маслофильтре  PDT120 высокий" calcext:value-type="string">
            <text:p>Предупреждение : Перепад давления масла на маслофильтре <text:s/>PDT120 высокий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9_OilFilterDiffPressure</text:p>
          </table:table-cell>
          <table:table-cell office:value-type="string" calcext:value-type="string">
            <text:p>Перепад давления масла на маслофильтре </text:p>
          </table:table-cell>
          <table:table-cell office:value-type="string" calcext:value-type="string">
            <text:p>PDT120</text:p>
          </table:table-cell>
          <table:table-cell office:value-type="string" calcext:value-type="string">
            <text:p>высокий</text:p>
          </table:table-cell>
          <table:table-cell table:number-columns-repeated="4"/>
        </table:table-row>
        <table:table-row table:style-name="ro1">
          <table:table-cell/>
          <table:table-cell table:style-name="ce106" office:value-type="string" calcext:value-type="string">
            <text:p>DB6 DBX4.6</text:p>
          </table:table-cell>
          <table:table-cell table:style-name="ce111" office:value-type="string" calcext:value-type="string">
            <text:p>Oil pump overload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OilPumpOverload</text:p>
          </table:table-cell>
          <table:table-cell office:value-type="string" calcext:value-type="string">
            <text:p>перегруз маслонасоса</text:p>
          </table:table-cell>
          <table:table-cell office:value-type="string" calcext:value-type="string">
            <text:p>Маслонасос перегружен</text:p>
          </table:table-cell>
          <table:table-cell office:value-type="string" calcext:value-type="string">
            <text:p>WarningMessGroupFlag1</text:p>
          </table:table-cell>
          <table:table-cell office:value-type="float" office:value="14" calcext:value-type="float">
            <text:p>14</text:p>
          </table:table-cell>
          <table:table-cell table:style-name="ce191" table:formula="of:=COM.MICROSOFT.CONCAT([.$N$1];[.$N8];[.$O$1];[.$O8];[.$O$1];[.$P8])" office:value-type="string" office:string-value="Предупреждение : Перегрузка маслонасоса  " calcext:value-type="string">
            <text:p>Предупреждение : Перегрузка маслонасоса <text:s/></text:p>
          </table:table-cell>
          <table:table-cell table:number-columns-repeated="3"/>
          <table:table-cell office:value-type="string" calcext:value-type="string">
            <text:p>Перегрузка маслонасоса</text:p>
          </table:table-cell>
          <table:table-cell table:number-columns-repeated="6"/>
        </table:table-row>
        <table:table-row table:style-name="ro1">
          <table:table-cell/>
          <table:table-cell table:style-name="ce106" office:value-type="string" calcext:value-type="string">
            <text:p>DB6 DBX4.7</text:p>
          </table:table-cell>
          <table:table-cell table:style-name="ce111" office:value-type="string" calcext:value-type="string">
            <text:p>Vacuum pump overload</text:p>
          </table:table-cell>
          <table:table-cell office:value-type="string" calcext:value-type="string">
            <text:p>warning</text:p>
          </table:table-cell>
          <table:table-cell table:style-name="ce186" office:value-type="string" calcext:value-type="string">
            <text:p>VacuumPumpOverload</text:p>
          </table:table-cell>
          <table:table-cell table:style-name="ce80" office:value-type="string" calcext:value-type="string">
            <text:p>перегруз вакуумного насоса</text:p>
          </table:table-cell>
          <table:table-cell table:style-name="ce80" office:value-type="string" calcext:value-type="string">
            <text:p>Вакуумный насос перегружен</text:p>
          </table:table-cell>
          <table:table-cell office:value-type="string" calcext:value-type="string">
            <text:p>WarningMessGroupFlag1</text:p>
          </table:table-cell>
          <table:table-cell office:value-type="float" office:value="15" calcext:value-type="float">
            <text:p>15</text:p>
          </table:table-cell>
          <table:table-cell table:style-name="ce191" table:formula="of:=COM.MICROSOFT.CONCAT([.$N$1];[.$N9];[.$O$1];[.$O9];[.$O$1];[.$P9])" office:value-type="string" office:string-value="Предупреждение : Перегрузка вакуумного насоса  " calcext:value-type="string">
            <text:p>Предупреждение : Перегрузка вакуумного насоса <text:s/></text:p>
          </table:table-cell>
          <table:table-cell table:number-columns-repeated="3"/>
          <table:table-cell table:style-name="ce128" office:value-type="string" calcext:value-type="string">
            <text:p>Перегрузка вакуумного насоса</text:p>
          </table:table-cell>
          <table:table-cell table:number-columns-repeated="6"/>
        </table:table-row>
        <table:table-row table:style-name="ro1">
          <table:table-cell/>
          <table:table-cell table:style-name="ce106" office:value-type="string" calcext:value-type="string">
            <text:p>DB6 DBX5.0</text:p>
          </table:table-cell>
          <table:table-cell table:style-name="ce111" office:value-type="string" calcext:value-type="string">
            <text:p>Oil supply pressure low alarm</text:p>
          </table:table-cell>
          <table:table-cell office:value-type="string" calcext:value-type="string">
            <text:p>warning</text:p>
          </table:table-cell>
          <table:table-cell table:style-name="ce80" office:value-type="string" calcext:value-type="string">
            <text:p>OilSupplyPressureLowAlarm</text:p>
          </table:table-cell>
          <table:table-cell table:style-name="ce80" office:value-type="string" calcext:value-type="string">
            <text:p>давление масла низко</text:p>
          </table:table-cell>
          <table:table-cell table:style-name="ce80" office:value-type="string" calcext:value-type="string">
            <text:p>Давление масла низко</text:p>
          </table:table-cell>
          <table:table-cell office:value-type="string" calcext:value-type="string">
            <text:p>WarningMessGroupFlag1</text:p>
          </table:table-cell>
          <table:table-cell office:value-type="float" office:value="0" calcext:value-type="float">
            <text:p>0</text:p>
          </table:table-cell>
          <table:table-cell table:style-name="ce191" table:formula="of:=COM.MICROSOFT.CONCAT([.$N$1];[.$N10];[.$O$1];[.$O10];[.$O$1];[.$P10])" office:value-type="string" office:string-value="Предупреждение : Давление масла PT130 низкое" calcext:value-type="string">
            <text:p>Предупреждение : Давление масла PT130 низкое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5_OilSupplyPressure</text:p>
          </table:table-cell>
          <table:table-cell office:value-type="string" calcext:value-type="string">
            <text:p>Давление масла</text:p>
          </table:table-cell>
          <table:table-cell office:value-type="string" calcext:value-type="string">
            <text:p>PT130</text:p>
          </table:table-cell>
          <table:table-cell office:value-type="string" calcext:value-type="string">
            <text:p>низкое</text:p>
          </table:table-cell>
          <table:table-cell table:number-columns-repeated="4"/>
        </table:table-row>
        <table:table-row table:style-name="ro1">
          <table:table-cell/>
          <table:table-cell table:style-name="ce106" office:value-type="string" calcext:value-type="string">
            <text:p>DB6 DBX5.1</text:p>
          </table:table-cell>
          <table:table-cell table:style-name="ce111" office:value-type="string" calcext:value-type="string">
            <text:p>Vibration stage 1X high alarm</text:p>
          </table:table-cell>
          <table:table-cell office:value-type="string" calcext:value-type="string">
            <text:p>warning</text:p>
          </table:table-cell>
          <table:table-cell table:style-name="ce80" office:value-type="string" calcext:value-type="string">
            <text:p>VibrationStage1HighAlarm</text:p>
          </table:table-cell>
          <table:table-cell table:style-name="ce80" office:value-type="string" calcext:value-type="string">
            <text:p>вибрация ступени 1 высока</text:p>
          </table:table-cell>
          <table:table-cell table:style-name="ce80" office:value-type="string" calcext:value-type="string">
            <text:p>Вибрация ступени 1X высокая</text:p>
          </table:table-cell>
          <table:table-cell office:value-type="string" calcext:value-type="string">
            <text:p>WarningMessGroupFlag1</text:p>
          </table:table-cell>
          <table:table-cell office:value-type="float" office:value="1" calcext:value-type="float">
            <text:p>1</text:p>
          </table:table-cell>
          <table:table-cell table:style-name="ce191" table:formula="of:=COM.MICROSOFT.CONCAT([.$N$1];[.$N11];[.$O$1];[.$O11];[.$O$1];[.$P11])" office:value-type="string" office:string-value="Предупреждение : Вибрация 1 ступени VT#1 " calcext:value-type="string">
            <text:p>Предупреждение : Вибрация 1 ступени VT#1 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6_Stage1Vibration</text:p>
          </table:table-cell>
          <table:table-cell office:value-type="string" calcext:value-type="string">
            <text:p>Вибрация 1 ступени</text:p>
          </table:table-cell>
          <table:table-cell office:value-type="string" calcext:value-type="string">
            <text:p>VT#1</text:p>
          </table:table-cell>
          <table:table-cell table:number-columns-repeated="5"/>
        </table:table-row>
        <table:table-row table:style-name="ro1">
          <table:table-cell/>
          <table:table-cell table:style-name="ce106" office:value-type="string" calcext:value-type="string">
            <text:p>DB6 DBX5.2</text:p>
          </table:table-cell>
          <table:table-cell table:style-name="ce111" office:value-type="string" calcext:value-type="string">
            <text:p>Vibration stage 2X high alarm</text:p>
          </table:table-cell>
          <table:table-cell office:value-type="string" calcext:value-type="string">
            <text:p>warning</text:p>
          </table:table-cell>
          <table:table-cell table:style-name="ce80" office:value-type="string" calcext:value-type="string">
            <text:p>VibrationStage2HighAlarm</text:p>
          </table:table-cell>
          <table:table-cell table:style-name="ce80" office:value-type="string" calcext:value-type="string">
            <text:p>вибрация ступени 2 высока</text:p>
          </table:table-cell>
          <table:table-cell table:style-name="ce80" office:value-type="string" calcext:value-type="string">
            <text:p>Вибрация ступени 2X высокая</text:p>
          </table:table-cell>
          <table:table-cell office:value-type="string" calcext:value-type="string">
            <text:p>WarningMessGroupFlag1</text:p>
          </table:table-cell>
          <table:table-cell office:value-type="float" office:value="2" calcext:value-type="float">
            <text:p>2</text:p>
          </table:table-cell>
          <table:table-cell table:style-name="ce191" table:formula="of:=COM.MICROSOFT.CONCAT([.$N$1];[.$N12];[.$O$1];[.$O12];[.$O$1];[.$P12])" office:value-type="string" office:string-value="Предупреждение : Вибрация 2 ступени VT#2 " calcext:value-type="string">
            <text:p>Предупреждение : Вибрация 2 ступени VT#2 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7_Stage2Vibration</text:p>
          </table:table-cell>
          <table:table-cell office:value-type="string" calcext:value-type="string">
            <text:p>Вибрация 2 ступени</text:p>
          </table:table-cell>
          <table:table-cell office:value-type="string" calcext:value-type="string">
            <text:p>VT#2</text:p>
          </table:table-cell>
          <table:table-cell table:number-columns-repeated="5"/>
        </table:table-row>
        <table:table-row table:style-name="ro1">
          <table:table-cell/>
          <table:table-cell table:style-name="ce106" office:value-type="string" calcext:value-type="string">
            <text:p>DB6 DBX5.3</text:p>
          </table:table-cell>
          <table:table-cell table:style-name="ce111" office:value-type="string" calcext:value-type="string">
            <text:p>Vibration stage 3X high alarm</text:p>
          </table:table-cell>
          <table:table-cell office:value-type="string" calcext:value-type="string">
            <text:p>warning</text:p>
          </table:table-cell>
          <table:table-cell table:style-name="ce80" office:value-type="string" calcext:value-type="string">
            <text:p>VibrationStage3HighAlarm</text:p>
          </table:table-cell>
          <table:table-cell table:style-name="ce80" office:value-type="string" calcext:value-type="string">
            <text:p>вибрация ступени 3 высока</text:p>
          </table:table-cell>
          <table:table-cell table:style-name="ce80" office:value-type="string" calcext:value-type="string">
            <text:p>Вибрация ступени 3X высокая</text:p>
          </table:table-cell>
          <table:table-cell office:value-type="string" calcext:value-type="string">
            <text:p>WarningMessGroupFlag1</text:p>
          </table:table-cell>
          <table:table-cell office:value-type="float" office:value="3" calcext:value-type="float">
            <text:p>3</text:p>
          </table:table-cell>
          <table:table-cell table:style-name="ce191" table:formula="of:=COM.MICROSOFT.CONCAT([.$N$1];[.$N13];[.$O$1];[.$O13];[.$O$1];[.$P13])" office:value-type="string" office:string-value="Предупреждение : Вибрация 3 ступени VT#3 " calcext:value-type="string">
            <text:p>Предупреждение : Вибрация 3 ступени VT#3 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8_Stage3Vibration</text:p>
          </table:table-cell>
          <table:table-cell office:value-type="string" calcext:value-type="string">
            <text:p>Вибрация 3 ступени</text:p>
          </table:table-cell>
          <table:table-cell office:value-type="string" calcext:value-type="string">
            <text:p>VT#3</text:p>
          </table:table-cell>
          <table:table-cell table:number-columns-repeated="5"/>
        </table:table-row>
        <table:table-row table:style-name="ro1">
          <table:table-cell/>
          <table:table-cell table:style-name="ce106" office:value-type="string" calcext:value-type="string">
            <text:p>DB6 DBX5.4</text:p>
          </table:table-cell>
          <table:table-cell table:style-name="ce111" office:value-type="string" calcext:value-type="string">
            <text:p>Motor bearing "DE" vibration alarm</text:p>
          </table:table-cell>
          <table:table-cell office:value-type="string" calcext:value-type="string">
            <text:p>warning</text:p>
          </table:table-cell>
          <table:table-cell table:style-name="ce80" office:value-type="string" calcext:value-type="string">
            <text:p>MotorBearing_DE_VibrationAlarm</text:p>
          </table:table-cell>
          <table:table-cell table:style-name="ce80" office:value-type="string" calcext:value-type="string">
            <text:p>вибрация подшипника на приводном конце высока</text:p>
          </table:table-cell>
          <table:table-cell table:style-name="ce80" office:value-type="string" calcext:value-type="string">
            <text:p>Вибрация подшипника на приводном конце двигателя высока</text:p>
          </table:table-cell>
          <table:table-cell office:value-type="string" calcext:value-type="string">
            <text:p>WarningMessGroupFlag1</text:p>
          </table:table-cell>
          <table:table-cell office:value-type="float" office:value="4" calcext:value-type="float">
            <text:p>4</text:p>
          </table:table-cell>
          <table:table-cell table:style-name="ce191" table:formula="of:=COM.MICROSOFT.CONCAT([.$N$1];[.$N14];[.$O$1];[.$O14];[.$O$1];[.$P14])" office:value-type="string" office:string-value="Предупреждение : Вибрация DE подшипника VT#5 высокая" calcext:value-type="string">
            <text:p>Предупреждение : Вибрация DE подшипника VT#5 высокая</text:p>
          </table:table-cell>
          <table:table-cell/>
          <table:table-cell office:value-type="string" calcext:value-type="string">
            <text:p>rtdWarnExist</text:p>
          </table:table-cell>
          <table:table-cell table:style-name="ce128" office:value-type="string" calcext:value-type="string">
            <text:p>ai12_MotorBearingDEVibration</text:p>
          </table:table-cell>
          <table:table-cell office:value-type="string" calcext:value-type="string">
            <text:p>Вибрация DE подшипника</text:p>
          </table:table-cell>
          <table:table-cell office:value-type="string" calcext:value-type="string">
            <text:p>VT#5</text:p>
          </table:table-cell>
          <table:table-cell office:value-type="string" calcext:value-type="string">
            <text:p>высокая</text:p>
          </table:table-cell>
          <table:table-cell table:number-columns-repeated="4"/>
        </table:table-row>
        <table:table-row table:style-name="ro1">
          <table:table-cell/>
          <table:table-cell table:style-name="ce106" office:value-type="string" calcext:value-type="string">
            <text:p>DB6 DBX5.5</text:p>
          </table:table-cell>
          <table:table-cell table:style-name="ce111" office:value-type="string" calcext:value-type="string">
            <text:p>Motor current (CT) high alarm</text:p>
          </table:table-cell>
          <table:table-cell office:value-type="string" calcext:value-type="string">
            <text:p>warning</text:p>
          </table:table-cell>
          <table:table-cell table:style-name="ce80" office:value-type="string" calcext:value-type="string">
            <text:p>MotorCurrentHighAlarm</text:p>
          </table:table-cell>
          <table:table-cell table:style-name="ce80" office:value-type="string" calcext:value-type="string">
            <text:p>ток двигателя высокий</text:p>
          </table:table-cell>
          <table:table-cell table:style-name="ce80" office:value-type="string" calcext:value-type="string">
            <text:p>Ток двигателя высокий</text:p>
          </table:table-cell>
          <table:table-cell office:value-type="string" calcext:value-type="string">
            <text:p>WarningMessGroupFlag1</text:p>
          </table:table-cell>
          <table:table-cell office:value-type="float" office:value="5" calcext:value-type="float">
            <text:p>5</text:p>
          </table:table-cell>
          <table:table-cell table:style-name="ce191" table:formula="of:=COM.MICROSOFT.CONCAT([.$N$1];[.$N15];[.$O$1];[.$O15];[.$O$1];[.$P15])" office:value-type="string" office:string-value="Предупреждение : Ток двигателя TD140 " calcext:value-type="string">
            <text:p>Предупреждение : Ток двигателя TD140 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10_MotorCurrent</text:p>
          </table:table-cell>
          <table:table-cell office:value-type="string" calcext:value-type="string">
            <text:p>Ток двигателя</text:p>
          </table:table-cell>
          <table:table-cell table:style-name="ce128" office:value-type="string" calcext:value-type="string">
            <text:p>TD140</text:p>
          </table:table-cell>
          <table:table-cell table:number-columns-repeated="5"/>
        </table:table-row>
        <table:table-row table:style-name="ro1">
          <table:table-cell/>
          <table:table-cell table:style-name="ce106" office:value-type="string" calcext:value-type="string">
            <text:p>DB6 DBX5.6</text:p>
          </table:table-cell>
          <table:table-cell table:style-name="ce111" office:value-type="string" calcext:value-type="string">
            <text:p>Oil supply temperat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OilSupplyTempHighAlarm</text:p>
          </table:table-cell>
          <table:table-cell office:value-type="string" calcext:value-type="string">
            <text:p>температура масла высока</text:p>
          </table:table-cell>
          <table:table-cell office:value-type="string" calcext:value-type="string">
            <text:p>Температура масла высокая</text:p>
          </table:table-cell>
          <table:table-cell office:value-type="string" calcext:value-type="string">
            <text:p>WarningMessGroupFlag1</text:p>
          </table:table-cell>
          <table:table-cell office:value-type="float" office:value="6" calcext:value-type="float">
            <text:p>6</text:p>
          </table:table-cell>
          <table:table-cell table:style-name="ce191" table:formula="of:=COM.MICROSOFT.CONCAT([.$N$1];[.$N16];[.$O$1];[.$O16];[.$O$1];[.$P16])" office:value-type="string" office:string-value="Предупреждение : Температура масла TE130 высокая" calcext:value-type="string">
            <text:p>Предупреждение : Температура масла TE130 высокая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14_OilSupplyTemperature</text:p>
          </table:table-cell>
          <table:table-cell office:value-type="string" calcext:value-type="string">
            <text:p>Температура масла</text:p>
          </table:table-cell>
          <table:table-cell office:value-type="string" calcext:value-type="string">
            <text:p>TE130</text:p>
          </table:table-cell>
          <table:table-cell office:value-type="string" calcext:value-type="string">
            <text:p>высокая</text:p>
          </table:table-cell>
          <table:table-cell table:number-columns-repeated="4"/>
        </table:table-row>
        <table:table-row table:style-name="ro1">
          <table:table-cell/>
          <table:table-cell table:style-name="ce106" office:value-type="string" calcext:value-type="string">
            <text:p>DB6 DBX5.7</text:p>
          </table:table-cell>
          <table:table-cell table:style-name="ce111" office:value-type="string" calcext:value-type="string">
            <text:p>Stage 3 inlet temperat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Stage3InletTempHighAlarm</text:p>
          </table:table-cell>
          <table:table-cell office:value-type="string" calcext:value-type="string">
            <text:p>температура входа ступени 3 высока</text:p>
          </table:table-cell>
          <table:table-cell office:value-type="string" calcext:value-type="string">
            <text:p>Температура на входе ступени 3 высокая</text:p>
          </table:table-cell>
          <table:table-cell office:value-type="string" calcext:value-type="string">
            <text:p>WarningMessGroupFlag1</text:p>
          </table:table-cell>
          <table:table-cell office:value-type="float" office:value="7" calcext:value-type="float">
            <text:p>7</text:p>
          </table:table-cell>
          <table:table-cell table:style-name="ce191" table:formula="of:=COM.MICROSOFT.CONCAT([.$N$1];[.$N17];[.$O$1];[.$O17];[.$O$1];[.$P17])" office:value-type="string" office:string-value="Предупреждение : Температура воздуха на входе 3 ступени TE231 высокая" calcext:value-type="string">
            <text:p>Предупреждение : Температура воздуха на входе 3 ступени TE231 высокая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15_Stage3InletTemperature</text:p>
          </table:table-cell>
          <table:table-cell office:value-type="string" calcext:value-type="string">
            <text:p>Температура воздуха на входе 3 ступени</text:p>
          </table:table-cell>
          <table:table-cell office:value-type="string" calcext:value-type="string">
            <text:p>TE231</text:p>
          </table:table-cell>
          <table:table-cell office:value-type="string" calcext:value-type="string">
            <text:p>высокая</text:p>
          </table:table-cell>
          <table:table-cell table:number-columns-repeated="4"/>
        </table:table-row>
        <table:table-row table:style-name="ro1">
          <table:table-cell/>
          <table:table-cell table:style-name="ce106" office:value-type="string" calcext:value-type="string">
            <text:p>DB6 DBX6.0</text:p>
          </table:table-cell>
          <table:table-cell table:style-name="ce111" office:value-type="string" calcext:value-type="string">
            <text:p>Oil reservoir temperature low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OilReservoirTempLowAlarm</text:p>
          </table:table-cell>
          <table:table-cell office:value-type="string" calcext:value-type="string">
            <text:p>температура в маслобаке низка</text:p>
          </table:table-cell>
          <table:table-cell office:value-type="string" calcext:value-type="string">
            <text:p>Температура в маслобаке низкая</text:p>
          </table:table-cell>
          <table:table-cell office:value-type="string" calcext:value-type="string">
            <text:p>WarningMessGroupFlag2</text:p>
          </table:table-cell>
          <table:table-cell office:value-type="float" office:value="8" calcext:value-type="float">
            <text:p>8</text:p>
          </table:table-cell>
          <table:table-cell table:style-name="ce191" table:formula="of:=COM.MICROSOFT.CONCAT([.$N$1];[.$N18];[.$O$1];[.$O18];[.$O$1];[.$P18])" office:value-type="string" office:string-value="Предупреждение : Температура масла в маслобаке TE101 низкая" calcext:value-type="string">
            <text:p>Предупреждение : Температура масла в маслобаке TE101 низкая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16_OilReservoirTemperature</text:p>
          </table:table-cell>
          <table:table-cell office:value-type="string" calcext:value-type="string">
            <text:p>Температура масла в маслобаке</text:p>
          </table:table-cell>
          <table:table-cell office:value-type="string" calcext:value-type="string">
            <text:p>TE101</text:p>
          </table:table-cell>
          <table:table-cell office:value-type="string" calcext:value-type="string">
            <text:p>низкая</text:p>
          </table:table-cell>
          <table:table-cell table:number-columns-repeated="4"/>
        </table:table-row>
        <table:table-row table:style-name="ro1">
          <table:table-cell/>
          <table:table-cell table:style-name="ce106" office:value-type="string" calcext:value-type="string">
            <text:p>DB6 DBX6.1</text:p>
          </table:table-cell>
          <table:table-cell table:style-name="ce111" office:value-type="string" calcext:value-type="string">
            <text:p>Motor coil "R" temperat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otorCoil_R_TempHighAlarm</text:p>
          </table:table-cell>
          <table:table-cell office:value-type="string" calcext:value-type="string">
            <text:p>температура обмотки Р двигателя высока</text:p>
          </table:table-cell>
          <table:table-cell office:value-type="string" calcext:value-type="string">
            <text:p>Температура обмотки «Р» двигателя высокая</text:p>
          </table:table-cell>
          <table:table-cell office:value-type="string" calcext:value-type="string">
            <text:p>WarningMessGroupFlag2</text:p>
          </table:table-cell>
          <table:table-cell office:value-type="float" office:value="9" calcext:value-type="float">
            <text:p>9</text:p>
          </table:table-cell>
          <table:table-cell table:style-name="ce191" table:formula="of:=COM.MICROSOFT.CONCAT([.$N$1];[.$N19];[.$O$1];[.$O19];[.$O$1];[.$P19])" office:value-type="string" office:string-value="Предупреждение : Температура обмотки двигателя &quot;R&quot; TE140 высокая" calcext:value-type="string">
            <text:p>Предупреждение : Температура обмотки двигателя "R" TE140 высокая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17_MotorWindingRTemperature</text:p>
          </table:table-cell>
          <table:table-cell office:value-type="string" calcext:value-type="string">
            <text:p>Температура обмотки двигателя "R"</text:p>
          </table:table-cell>
          <table:table-cell office:value-type="string" calcext:value-type="string">
            <text:p>TE140</text:p>
          </table:table-cell>
          <table:table-cell office:value-type="string" calcext:value-type="string">
            <text:p>высокая</text:p>
          </table:table-cell>
          <table:table-cell table:number-columns-repeated="4"/>
        </table:table-row>
        <table:table-row table:style-name="ro1">
          <table:table-cell/>
          <table:table-cell table:style-name="ce106" office:value-type="string" calcext:value-type="string">
            <text:p>DB6 DBX6.2</text:p>
          </table:table-cell>
          <table:table-cell table:style-name="ce111"/>
          <table:table-cell office:value-type="string" calcext:value-type="string">
            <text:p>warning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COM.MICROSOFT.CONCAT([.$N$1];[.$N20];[.$O$1];[.$O20];[.$O$1];[.$P20])" office:value-type="string" office:string-value="Предупреждение :   " calcext:value-type="string">
            <text:p>Предупреждение : <text:s text:c="2"/></text:p>
          </table:table-cell>
          <table:table-cell table:number-columns-repeated="10"/>
        </table:table-row>
        <table:table-row table:style-name="ro1">
          <table:table-cell/>
          <table:table-cell table:style-name="ce106" office:value-type="string" calcext:value-type="string">
            <text:p>DB6 DBX6.3</text:p>
          </table:table-cell>
          <table:table-cell table:style-name="ce111"/>
          <table:table-cell office:value-type="string" calcext:value-type="string">
            <text:p>warning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formula="of:=COM.MICROSOFT.CONCAT([.$N$1];[.$N21];[.$O$1];[.$O21];[.$O$1];[.$P21])" office:value-type="string" office:string-value="Предупреждение :   " calcext:value-type="string">
            <text:p>Предупреждение : <text:s text:c="2"/></text:p>
          </table:table-cell>
          <table:table-cell table:number-columns-repeated="10"/>
        </table:table-row>
        <table:table-row table:style-name="ro1">
          <table:table-cell/>
          <table:table-cell table:style-name="ce106" office:value-type="string" calcext:value-type="string">
            <text:p>DB6 DBX6.4</text:p>
          </table:table-cell>
          <table:table-cell table:style-name="ce111" office:value-type="string" calcext:value-type="string">
            <text:p>Stage 2 inlet temperat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Stage2InletTempHighAlarm</text:p>
          </table:table-cell>
          <table:table-cell office:value-type="string" calcext:value-type="string">
            <text:p>температура входа ступени 2 высока</text:p>
          </table:table-cell>
          <table:table-cell office:value-type="string" calcext:value-type="string">
            <text:p>Температура на входе ступени 2 высокая</text:p>
          </table:table-cell>
          <table:table-cell office:value-type="string" calcext:value-type="string">
            <text:p>WarningMessGroupFlag2</text:p>
          </table:table-cell>
          <table:table-cell office:value-type="float" office:value="12" calcext:value-type="float">
            <text:p>12</text:p>
          </table:table-cell>
          <table:table-cell table:style-name="ce191" table:formula="of:=COM.MICROSOFT.CONCAT([.$N$1];[.$N22];[.$O$1];[.$O22];[.$O$1];[.$P22])" office:value-type="string" office:string-value="Предупреждение : Температура воздуха на входе 2 ступени TE221 высокая" calcext:value-type="string">
            <text:p>Предупреждение : Температура воздуха на входе 2 ступени TE221 высокая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20_Stage2InletTemperature</text:p>
          </table:table-cell>
          <table:table-cell office:value-type="string" calcext:value-type="string">
            <text:p>Температура воздуха на входе 2 ступени</text:p>
          </table:table-cell>
          <table:table-cell office:value-type="string" calcext:value-type="string">
            <text:p>TE221</text:p>
          </table:table-cell>
          <table:table-cell office:value-type="string" calcext:value-type="string">
            <text:p>высокая</text:p>
          </table:table-cell>
          <table:table-cell table:number-columns-repeated="4"/>
        </table:table-row>
        <table:table-row table:style-name="ro1">
          <table:table-cell/>
          <table:table-cell table:style-name="ce106" office:value-type="string" calcext:value-type="string">
            <text:p>DB6 DBX6.5</text:p>
          </table:table-cell>
          <table:table-cell table:style-name="ce111"/>
          <table:table-cell office:value-type="string" calcext:value-type="string">
            <text:p>warning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COM.MICROSOFT.CONCAT([.$N$1];[.$N23];[.$O$1];[.$O23];[.$O$1];[.$P23])" office:value-type="string" office:string-value="Предупреждение :   " calcext:value-type="string">
            <text:p>Предупреждение : <text:s text:c="2"/></text:p>
          </table:table-cell>
          <table:table-cell table:number-columns-repeated="10"/>
        </table:table-row>
        <table:table-row table:style-name="ro1">
          <table:table-cell/>
          <table:table-cell table:style-name="ce106" office:value-type="string" calcext:value-type="string">
            <text:p>DB6 DBX6.6</text:p>
          </table:table-cell>
          <table:table-cell table:style-name="ce111" office:value-type="string" calcext:value-type="string">
            <text:p>Motor bearing "DE" temperat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otorBearing_DE_TempHighAlarm</text:p>
          </table:table-cell>
          <table:table-cell office:value-type="string" calcext:value-type="string">
            <text:p>температура подшипника со стороны редуктора высока</text:p>
          </table:table-cell>
          <table:table-cell office:value-type="string" calcext:value-type="string">
            <text:p>Температура подшипника двигателя со стороны редуктора высока</text:p>
          </table:table-cell>
          <table:table-cell office:value-type="string" calcext:value-type="string">
            <text:p>WarningMessGroupFlag2</text:p>
          </table:table-cell>
          <table:table-cell office:value-type="float" office:value="14" calcext:value-type="float">
            <text:p>14</text:p>
          </table:table-cell>
          <table:table-cell table:style-name="ce191" table:formula="of:=COM.MICROSOFT.CONCAT([.$N$1];[.$N24];[.$O$1];[.$O24];[.$O$1];[.$P24])" office:value-type="string" office:string-value="Предупреждение : Температура DE подшипника TE143 высокая" calcext:value-type="string">
            <text:p>Предупреждение : Температура DE подшипника TE143 высокая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18_MotorBearingDETemperature</text:p>
          </table:table-cell>
          <table:table-cell office:value-type="string" calcext:value-type="string">
            <text:p>Температура DE подшипника</text:p>
          </table:table-cell>
          <table:table-cell office:value-type="string" calcext:value-type="string">
            <text:p>TE143</text:p>
          </table:table-cell>
          <table:table-cell office:value-type="string" calcext:value-type="string">
            <text:p>высокая</text:p>
          </table:table-cell>
          <table:table-cell table:number-columns-repeated="4"/>
        </table:table-row>
        <table:table-row table:style-name="ro1">
          <table:table-cell/>
          <table:table-cell table:style-name="ce106" office:value-type="string" calcext:value-type="string">
            <text:p>DB6 DBX6.7</text:p>
          </table:table-cell>
          <table:table-cell table:style-name="ce111" office:value-type="string" calcext:value-type="string">
            <text:p>Motor bearing "NDE" temperat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otorBearing_NDE_TempHighAlarm</text:p>
          </table:table-cell>
          <table:table-cell office:value-type="string" calcext:value-type="string">
            <text:p>температура подшипника с торца высока</text:p>
          </table:table-cell>
          <table:table-cell office:value-type="string" calcext:value-type="string">
            <text:p>Температура подшипника двигателя с торца высока</text:p>
          </table:table-cell>
          <table:table-cell office:value-type="string" calcext:value-type="string">
            <text:p>WarningMessGroupFlag2</text:p>
          </table:table-cell>
          <table:table-cell office:value-type="float" office:value="15" calcext:value-type="float">
            <text:p>15</text:p>
          </table:table-cell>
          <table:table-cell table:style-name="ce191" table:formula="of:=COM.MICROSOFT.CONCAT([.$N$1];[.$N25];[.$O$1];[.$O25];[.$O$1];[.$P25])" office:value-type="string" office:string-value="Предупреждение : Температура NDE подшипника TE144 высокая" calcext:value-type="string">
            <text:p>Предупреждение : Температура NDE подшипника TE144 высокая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19_MotorBearingNDETemperature</text:p>
          </table:table-cell>
          <table:table-cell office:value-type="string" calcext:value-type="string">
            <text:p>Температура NDE подшипника</text:p>
          </table:table-cell>
          <table:table-cell office:value-type="string" calcext:value-type="string">
            <text:p>TE144</text:p>
          </table:table-cell>
          <table:table-cell office:value-type="string" calcext:value-type="string">
            <text:p>высокая</text:p>
          </table:table-cell>
          <table:table-cell table:number-columns-repeated="4"/>
        </table:table-row>
        <table:table-row table:style-name="ro1">
          <table:table-cell/>
          <table:table-cell table:style-name="ce106" office:value-type="string" calcext:value-type="string">
            <text:p>DB6 DBX7.0</text:p>
          </table:table-cell>
          <table:table-cell table:style-name="ce111" office:value-type="string" calcext:value-type="string">
            <text:p>Cooling water supply temp.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CoolingWaterSupplyTempAlarm</text:p>
          </table:table-cell>
          <table:table-cell office:value-type="string" calcext:value-type="string">
            <text:p>температура охлаждающей воды высока</text:p>
          </table:table-cell>
          <table:table-cell office:value-type="string" calcext:value-type="string">
            <text:p>Температура на подаче охлаждающей воды высока</text:p>
          </table:table-cell>
          <table:table-cell office:value-type="string" calcext:value-type="string">
            <text:p>WarningMessGroupFlag2</text:p>
          </table:table-cell>
          <table:table-cell office:value-type="float" office:value="0" calcext:value-type="float">
            <text:p>0</text:p>
          </table:table-cell>
          <table:table-cell table:style-name="ce191" table:formula="of:=COM.MICROSOFT.CONCAT([.$N$1];[.$N26];[.$O$1];[.$O26];[.$O$1];[.$P26])" office:value-type="string" office:string-value="Предупреждение : Температура охлаждающей воды на входе TE301 высокая" calcext:value-type="string">
            <text:p>Предупреждение : Температура охлаждающей воды на входе TE301 высокая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24_CoolingWaterSupplyTemp</text:p>
          </table:table-cell>
          <table:table-cell office:value-type="string" calcext:value-type="string">
            <text:p>Температура охлаждающей воды на входе</text:p>
          </table:table-cell>
          <table:table-cell office:value-type="string" calcext:value-type="string">
            <text:p>TE301</text:p>
          </table:table-cell>
          <table:table-cell office:value-type="string" calcext:value-type="string">
            <text:p>высокая</text:p>
          </table:table-cell>
          <table:table-cell table:number-columns-repeated="4"/>
        </table:table-row>
        <table:table-row table:style-name="ro1">
          <table:table-cell/>
          <table:table-cell table:style-name="ce106" office:value-type="string" calcext:value-type="string">
            <text:p>DB6 DBX7.1</text:p>
          </table:table-cell>
          <table:table-cell table:style-name="ce111" office:value-type="string" calcext:value-type="string">
            <text:p>Cooling water return temp.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CoolingWaterReturnTempAlarm</text:p>
          </table:table-cell>
          <table:table-cell office:value-type="string" calcext:value-type="string">
            <text:p>температура возвратной воды высока</text:p>
          </table:table-cell>
          <table:table-cell office:value-type="string" calcext:value-type="string">
            <text:p>Температура на возврате охлаждающей воды высока</text:p>
          </table:table-cell>
          <table:table-cell office:value-type="string" calcext:value-type="string">
            <text:p>WarningMessGroupFlag2</text:p>
          </table:table-cell>
          <table:table-cell office:value-type="float" office:value="1" calcext:value-type="float">
            <text:p>1</text:p>
          </table:table-cell>
          <table:table-cell table:style-name="ce191" table:formula="of:=COM.MICROSOFT.CONCAT([.$N$1];[.$N27];[.$O$1];[.$O27];[.$O$1];[.$P27])" office:value-type="string" office:string-value="Предупреждение : Температура охлаждающей воды на выходе TE302 высокая" calcext:value-type="string">
            <text:p>Предупреждение : Температура охлаждающей воды на выходе TE302 высокая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25_CoolingWateReturnTemp</text:p>
          </table:table-cell>
          <table:table-cell office:value-type="string" calcext:value-type="string">
            <text:p>Температура охлаждающей воды на выходе</text:p>
          </table:table-cell>
          <table:table-cell office:value-type="string" calcext:value-type="string">
            <text:p>TE302</text:p>
          </table:table-cell>
          <table:table-cell office:value-type="string" calcext:value-type="string">
            <text:p>высокая</text:p>
          </table:table-cell>
          <table:table-cell table:number-columns-repeated="4"/>
        </table:table-row>
        <table:table-row table:style-name="ro1">
          <table:table-cell/>
          <table:table-cell table:style-name="ce106" office:value-type="string" calcext:value-type="string">
            <text:p>DB6 DBX7.2</text:p>
          </table:table-cell>
          <table:table-cell table:style-name="ce181" office:value-type="string" calcext:value-type="string">
            <text:p>Cooling fan overload alarm</text:p>
          </table:table-cell>
          <table:table-cell office:value-type="string" calcext:value-type="string">
            <text:p>warning</text:p>
          </table:table-cell>
          <table:table-cell table:style-name="ce80" office:value-type="string" calcext:value-type="string">
            <text:p>CoolingFanOverloadWarn</text:p>
          </table:table-cell>
          <table:table-cell table:style-name="ce80" office:value-type="string" calcext:value-type="string">
            <text:p>перегруз вентилятора</text:p>
          </table:table-cell>
          <table:table-cell table:style-name="ce80" office:value-type="string" calcext:value-type="string">
            <text:p>Охлаждающий вентилятор перегружен</text:p>
          </table:table-cell>
          <table:table-cell office:value-type="string" calcext:value-type="string">
            <text:p>WarningMessGroupFlag2</text:p>
          </table:table-cell>
          <table:table-cell office:value-type="float" office:value="2" calcext:value-type="float">
            <text:p>2</text:p>
          </table:table-cell>
          <table:table-cell table:style-name="ce191" table:formula="of:=COM.MICROSOFT.CONCAT([.$N$1];[.$N28];[.$O$1];[.$O28];[.$O$1];[.$P28])" office:value-type="string" office:string-value="Предупреждение : Перегрузка вентилятора  " calcext:value-type="string">
            <text:p>Предупреждение : Перегрузка вентилятора <text:s/></text:p>
          </table:table-cell>
          <table:table-cell table:number-columns-repeated="3"/>
          <table:table-cell table:style-name="ce128" office:value-type="string" calcext:value-type="string">
            <text:p>Перегрузка вентилятора</text:p>
          </table:table-cell>
          <table:table-cell table:number-columns-repeated="6"/>
        </table:table-row>
        <table:table-row table:style-name="ro1">
          <table:table-cell/>
          <table:table-cell table:style-name="ce106" office:value-type="string" calcext:value-type="string">
            <text:p>DB6 DBX7.3</text:p>
          </table:table-cell>
          <table:table-cell table:style-name="ce182"/>
          <table:table-cell office:value-type="string" calcext:value-type="string">
            <text:p>warning</text:p>
          </table:table-cell>
          <table:table-cell table:style-name="ce80" table:number-columns-repeated="3"/>
          <table:table-cell/>
          <table:table-cell office:value-type="float" office:value="3" calcext:value-type="float">
            <text:p>3</text:p>
          </table:table-cell>
          <table:table-cell table:style-name="ce80" table:formula="of:=COM.MICROSOFT.CONCAT([.$N$1];[.$N29];[.$O$1];[.$O29];[.$O$1];[.$P29])" office:value-type="string" office:string-value="Предупреждение :   " calcext:value-type="string">
            <text:p>Предупреждение : <text:s text:c="2"/></text:p>
          </table:table-cell>
          <table:table-cell table:number-columns-repeated="10"/>
        </table:table-row>
        <table:table-row table:style-name="ro1">
          <table:table-cell/>
          <table:table-cell table:style-name="ce106" office:value-type="string" calcext:value-type="string">
            <text:p>DB6 DBX7.4</text:p>
          </table:table-cell>
          <table:table-cell table:style-name="ce111" office:value-type="string" calcext:value-type="string">
            <text:p>Motor bearing "NDE" vibration alarm</text:p>
          </table:table-cell>
          <table:table-cell office:value-type="string" calcext:value-type="string">
            <text:p>warning</text:p>
          </table:table-cell>
          <table:table-cell table:style-name="ce80" office:value-type="string" calcext:value-type="string">
            <text:p>MotorBearing_NDE_VibrationAlarm</text:p>
          </table:table-cell>
          <table:table-cell table:style-name="ce80" office:value-type="string" calcext:value-type="string">
            <text:p><text:span text:style-name="T10">вибрация подшипника на гл</text:span>ухом конце высока</text:p>
          </table:table-cell>
          <table:table-cell table:style-name="ce80" office:value-type="string" calcext:value-type="string">
            <text:p><text:span text:style-name="T10">Вибрация подшипника на глухом</text:span> конце двигателя высока</text:p>
          </table:table-cell>
          <table:table-cell office:value-type="string" calcext:value-type="string">
            <text:p>WarningMessGroupFlag2</text:p>
          </table:table-cell>
          <table:table-cell office:value-type="float" office:value="4" calcext:value-type="float">
            <text:p>4</text:p>
          </table:table-cell>
          <table:table-cell table:style-name="ce191" table:formula="of:=COM.MICROSOFT.CONCAT([.$N$1];[.$N30];[.$O$1];[.$O30];[.$O$1];[.$P30])" office:value-type="string" office:string-value="Предупреждение : Вибрация NDE подшипника VT#6 высокая" calcext:value-type="string">
            <text:p>Предупреждение : Вибрация NDE подшипника VT#6 высокая</text:p>
          </table:table-cell>
          <table:table-cell/>
          <table:table-cell office:value-type="string" calcext:value-type="string">
            <text:p>rtdWarnExist</text:p>
          </table:table-cell>
          <table:table-cell table:style-name="ce128" office:value-type="string" calcext:value-type="string">
            <text:p>ai13_MotorBearingNDEVibration</text:p>
          </table:table-cell>
          <table:table-cell office:value-type="string" calcext:value-type="string">
            <text:p>Вибрация NDE подшипника</text:p>
          </table:table-cell>
          <table:table-cell office:value-type="string" calcext:value-type="string">
            <text:p>VT#6</text:p>
          </table:table-cell>
          <table:table-cell office:value-type="string" calcext:value-type="string">
            <text:p>высокая</text:p>
          </table:table-cell>
          <table:table-cell table:number-columns-repeated="4"/>
        </table:table-row>
        <table:table-row table:style-name="ro1">
          <table:table-cell/>
          <table:table-cell table:style-name="ce106" office:value-type="string" calcext:value-type="string">
            <text:p>DB6 DBX7.5</text:p>
          </table:table-cell>
          <table:table-cell table:style-name="ce111"/>
          <table:table-cell office:value-type="string" calcext:value-type="string">
            <text:p>warning</text:p>
          </table:table-cell>
          <table:table-cell table:style-name="ce80" table:number-columns-repeated="3"/>
          <table:table-cell/>
          <table:table-cell office:value-type="float" office:value="5" calcext:value-type="float">
            <text:p>5</text:p>
          </table:table-cell>
          <table:table-cell table:style-name="ce80" table:formula="of:=COM.MICROSOFT.CONCAT([.$N$1];[.$N31];[.$O$1];[.$O31];[.$O$1];[.$P31])" office:value-type="string" office:string-value="Предупреждение :   " calcext:value-type="string">
            <text:p>Предупреждение : <text:s text:c="2"/></text:p>
          </table:table-cell>
          <table:table-cell table:number-columns-repeated="3"/>
          <table:table-cell table:style-name="ce80"/>
          <table:table-cell table:number-columns-repeated="6"/>
        </table:table-row>
        <table:table-row table:style-name="ro1">
          <table:table-cell/>
          <table:table-cell table:style-name="ce106" office:value-type="string" calcext:value-type="string">
            <text:p>DB6 DBX7.6</text:p>
          </table:table-cell>
          <table:table-cell table:style-name="ce111" office:value-type="string" calcext:value-type="string">
            <text:p>Exist event messages #3 (out range)</text:p>
          </table:table-cell>
          <table:table-cell office:value-type="string" calcext:value-type="string">
            <text:p>warning</text:p>
          </table:table-cell>
          <table:table-cell table:style-name="ce80" office:value-type="string" calcext:value-type="string">
            <text:p>ExistEventMessages3</text:p>
          </table:table-cell>
          <table:table-cell table:style-name="ce80" office:value-type="string" calcext:value-type="string">
            <text:p>есть предупреждение в группе 3</text:p>
          </table:table-cell>
          <table:table-cell table:style-name="ce80" office:value-type="string" calcext:value-type="string">
            <text:p>Есть предупреждение в группе 3 (вне диапазона)</text:p>
          </table:table-cell>
          <table:table-cell office:value-type="string" calcext:value-type="string">
            <text:p>WarningMessGroupFlag2</text:p>
          </table:table-cell>
          <table:table-cell office:value-type="float" office:value="6" calcext:value-type="float">
            <text:p>6</text:p>
          </table:table-cell>
          <table:table-cell table:style-name="ce191" table:formula="of:=COM.MICROSOFT.CONCAT([.$N$1];[.$N32];[.$O$1];[.$O32];[.$O$1];[.$P32])" office:value-type="string" office:string-value="Предупреждение : Есть предупреждение в группе 3 (вне диапазона)  " calcext:value-type="string">
            <text:p>Предупреждение : Есть предупреждение в группе 3 (вне диапазона) <text:s/></text:p>
          </table:table-cell>
          <table:table-cell table:number-columns-repeated="3"/>
          <table:table-cell office:value-type="string" calcext:value-type="string">
            <text:p>Есть предупреждение в группе 3 (вне диапазона)</text:p>
          </table:table-cell>
          <table:table-cell table:number-columns-repeated="6"/>
        </table:table-row>
        <table:table-row table:style-name="ro1">
          <table:table-cell/>
          <table:table-cell table:style-name="ce106" office:value-type="string" calcext:value-type="string">
            <text:p>DB6 DBX7.7</text:p>
          </table:table-cell>
          <table:table-cell table:style-name="ce111" office:value-type="string" calcext:value-type="string">
            <text:p>Exist event messages #1, #2 (out range)</text:p>
          </table:table-cell>
          <table:table-cell office:value-type="string" calcext:value-type="string">
            <text:p>warning</text:p>
          </table:table-cell>
          <table:table-cell table:style-name="ce80" office:value-type="string" calcext:value-type="string">
            <text:p>ExistEventMessages1_2</text:p>
          </table:table-cell>
          <table:table-cell table:style-name="ce80" office:value-type="string" calcext:value-type="string">
            <text:p>есть предупреждение в группах 1, 2</text:p>
          </table:table-cell>
          <table:table-cell table:style-name="ce80" office:value-type="string" calcext:value-type="string">
            <text:p>Есть предупреждение в группах 1, 2 (вне диапазона)</text:p>
          </table:table-cell>
          <table:table-cell office:value-type="string" calcext:value-type="string">
            <text:p>WarningMessGroupFlag2</text:p>
          </table:table-cell>
          <table:table-cell office:value-type="float" office:value="7" calcext:value-type="float">
            <text:p>7</text:p>
          </table:table-cell>
          <table:table-cell table:style-name="ce191" table:formula="of:=COM.MICROSOFT.CONCAT([.$N$1];[.$N33];[.$O$1];[.$O33];[.$O$1];[.$P33])" office:value-type="string" office:string-value="Предупреждение : Есть предупреждение в группах 1, 2 (вне диапазона)  " calcext:value-type="string">
            <text:p>Предупреждение : Есть предупреждение в группах 1, 2 (вне диапазона) <text:s/></text:p>
          </table:table-cell>
          <table:table-cell table:number-columns-repeated="3"/>
          <table:table-cell office:value-type="string" calcext:value-type="string">
            <text:p>Есть предупреждение в группах 1, 2 (вне диапазона)</text:p>
          </table:table-cell>
          <table:table-cell table:number-columns-repeated="6"/>
        </table:table-row>
        <table:table-row table:style-name="ro1">
          <table:table-cell/>
          <table:table-cell table:style-name="ce167" office:value-type="string" calcext:value-type="string">
            <text:p>DB6 DBW4</text:p>
          </table:table-cell>
          <table:table-cell table:style-name="ce183" office:value-type="string" calcext:value-type="string">
            <text:p>Warnings group flag 1</text:p>
          </table:table-cell>
          <table:table-cell table:style-name="ce184" office:value-type="string" calcext:value-type="string">
            <text:p>warning</text:p>
          </table:table-cell>
          <table:table-cell table:style-name="ce166" office:value-type="string" calcext:value-type="string">
            <text:p>WarningMessGroupFlag1</text:p>
          </table:table-cell>
          <table:table-cell table:style-name="ce166" office:value-type="string" calcext:value-type="string">
            <text:p>группа предупреждений 1</text:p>
          </table:table-cell>
          <table:table-cell table:style-name="ce166"/>
          <table:table-cell table:style-name="ce166" office:value-type="string" calcext:value-type="string">
            <text:p>S7:[VetrolCompr_1]DB6,UINT4</text:p>
          </table:table-cell>
          <table:table-cell table:number-columns-repeated="12"/>
        </table:table-row>
        <table:table-row table:style-name="ro1">
          <table:table-cell/>
          <table:table-cell table:style-name="ce167" office:value-type="string" calcext:value-type="string">
            <text:p>DB6 DBW6</text:p>
          </table:table-cell>
          <table:table-cell table:style-name="ce183" office:value-type="string" calcext:value-type="string">
            <text:p>Warnings group flag 2</text:p>
          </table:table-cell>
          <table:table-cell table:style-name="ce184" office:value-type="string" calcext:value-type="string">
            <text:p>warning</text:p>
          </table:table-cell>
          <table:table-cell table:style-name="ce166" office:value-type="string" calcext:value-type="string">
            <text:p>WarningMessGroupFlag2</text:p>
          </table:table-cell>
          <table:table-cell table:style-name="ce166" office:value-type="string" calcext:value-type="string">
            <text:p>группа предупреждений 2</text:p>
          </table:table-cell>
          <table:table-cell table:style-name="ce166"/>
          <table:table-cell table:style-name="ce166" office:value-type="string" calcext:value-type="string">
            <text:p>S7:[VetrolCompr_1]DB6,UINT6</text:p>
          </table:table-cell>
          <table:table-cell/>
          <table:table-cell table:style-name="ce191" table:formula="of:=COM.MICROSOFT.CONCAT([.$N$1];[.$N30];[.$O$1];[.$O30];[.$O$1];[.$P30])" office:value-type="string" office:string-value="Предупреждение : Вибрация NDE подшипника VT#6 высокая" calcext:value-type="string">
            <text:p>Предупреждение : Вибрация NDE подшипника VT#6 высокая</text:p>
          </table:table-cell>
          <table:table-cell table:number-columns-repeated="3"/>
          <table:table-cell office:value-type="string" calcext:value-type="string">
            <text:p>Обслуживание : 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160.0</text:p>
          </table:table-cell>
          <table:table-cell table:style-name="ce124" office:value-type="string" calcext:value-type="string">
            <text:p>#3 STAGE INLET TEMP. HIGH.</text:p>
          </table:table-cell>
          <table:table-cell table:style-name="ce124" office:value-type="string" calcext:value-type="string">
            <text:p>high</text:p>
          </table:table-cell>
          <table:table-cell office:value-type="string" calcext:value-type="string">
            <text:p><text:span text:style-name="T10">MT_</text:span>Num3StageInletTempHigh</text:p>
          </table:table-cell>
          <table:table-cell office:value-type="string" calcext:value-type="string">
            <text:p>ремонт высокая температура входа ступени 3</text:p>
          </table:table-cell>
          <table:table-cell office:value-type="string" calcext:value-type="string">
            <text:p>Требуется обслуживание: высокая температура на входе ступени 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Температура воздуха на входе 3 ступени</text:p>
          </table:table-cell>
          <table:table-cell office:value-type="string" calcext:value-type="string">
            <text:p>TE231</text:p>
          </table:table-cell>
          <table:table-cell office:value-type="string" calcext:value-type="string">
            <text:p>высокая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160.1</text:p>
          </table:table-cell>
          <table:table-cell table:style-name="ce124" office:value-type="string" calcext:value-type="string">
            <text:p>OIL SUPPLY TEMP. HIGH.</text:p>
          </table:table-cell>
          <table:table-cell table:style-name="ce124" office:value-type="string" calcext:value-type="string">
            <text:p>high</text:p>
          </table:table-cell>
          <table:table-cell office:value-type="string" calcext:value-type="string">
            <text:p>MT_oilSupplyTempHigh</text:p>
          </table:table-cell>
          <table:table-cell office:value-type="string" calcext:value-type="string">
            <text:p>ремонт высокая температура масла</text:p>
          </table:table-cell>
          <table:table-cell office:value-type="string" calcext:value-type="string">
            <text:p>Требуется обслуживание: высокая температура масла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Температура масла</text:p>
          </table:table-cell>
          <table:table-cell office:value-type="string" calcext:value-type="string">
            <text:p>TE130</text:p>
          </table:table-cell>
          <table:table-cell office:value-type="string" calcext:value-type="string">
            <text:p>высокая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160.2</text:p>
          </table:table-cell>
          <table:table-cell table:style-name="ce124" office:value-type="string" calcext:value-type="string">
            <text:p>OIL SUPPLY PRESSURE LOW.</text:p>
          </table:table-cell>
          <table:table-cell table:style-name="ce124" office:value-type="string" calcext:value-type="string">
            <text:p>low</text:p>
          </table:table-cell>
          <table:table-cell office:value-type="string" calcext:value-type="string">
            <text:p>MT_oilSupplyPressureLow</text:p>
          </table:table-cell>
          <table:table-cell office:value-type="string" calcext:value-type="string">
            <text:p>ремонт низкое давление масла</text:p>
          </table:table-cell>
          <table:table-cell office:value-type="string" calcext:value-type="string">
            <text:p>Требуется обслуживание: низкое давление масла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Давление масла</text:p>
          </table:table-cell>
          <table:table-cell office:value-type="string" calcext:value-type="string">
            <text:p>PT130</text:p>
          </table:table-cell>
          <table:table-cell office:value-type="string" calcext:value-type="string">
            <text:p>низкое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160.3</text:p>
          </table:table-cell>
          <table:table-cell table:style-name="ce124" office:value-type="string" calcext:value-type="string">
            <text:p>CHECK VIBRATION TREND.</text:p>
          </table:table-cell>
          <table:table-cell table:style-name="ce124" office:value-type="string" calcext:value-type="string">
            <text:p>need check</text:p>
          </table:table-cell>
          <table:table-cell office:value-type="string" calcext:value-type="string">
            <text:p>MT_checkVibrationTrend</text:p>
          </table:table-cell>
          <table:table-cell office:value-type="string" calcext:value-type="string">
            <text:p>ремонт проверить графики вибрации</text:p>
          </table:table-cell>
          <table:table-cell office:value-type="string" calcext:value-type="string">
            <text:p>Требуется обслуживание: проверить графики вибрации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проверьте графики вибрации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M160.4</text:p>
          </table:table-cell>
          <table:table-cell table:style-name="ce124" office:value-type="string" calcext:value-type="string">
            <text:p>MOTOR COIL TEMP. HIGH.</text:p>
          </table:table-cell>
          <table:table-cell table:style-name="ce124" office:value-type="string" calcext:value-type="string">
            <text:p>high</text:p>
          </table:table-cell>
          <table:table-cell office:value-type="string" calcext:value-type="string">
            <text:p>MT_motorCoilTempHigh</text:p>
          </table:table-cell>
          <table:table-cell office:value-type="string" calcext:value-type="string">
            <text:p>ремонт высокая температура обмоток двигателя</text:p>
          </table:table-cell>
          <table:table-cell office:value-type="string" calcext:value-type="string">
            <text:p>Требуется обслуживание: высокая температура обмоток двигателя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Температура обмотки двигателя "R"</text:p>
          </table:table-cell>
          <table:table-cell office:value-type="string" calcext:value-type="string">
            <text:p>TE140</text:p>
          </table:table-cell>
          <table:table-cell office:value-type="string" calcext:value-type="string">
            <text:p>высокая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160.5</text:p>
          </table:table-cell>
          <table:table-cell table:style-name="ce124" office:value-type="string" calcext:value-type="string">
            <text:p>MOTOR BEARING TEMP. HIGH.</text:p>
          </table:table-cell>
          <table:table-cell table:style-name="ce124" office:value-type="string" calcext:value-type="string">
            <text:p>high</text:p>
          </table:table-cell>
          <table:table-cell office:value-type="string" calcext:value-type="string">
            <text:p>MT_motorBearingTempHigh</text:p>
          </table:table-cell>
          <table:table-cell office:value-type="string" calcext:value-type="string">
            <text:p>ремонт высокая температура подшипников двигателя</text:p>
          </table:table-cell>
          <table:table-cell office:value-type="string" calcext:value-type="string">
            <text:p>Требуется обслуживание: высокая температура подшипников двигателя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Температура подшипника</text:p>
          </table:table-cell>
          <table:table-cell/>
          <table:table-cell office:value-type="string" calcext:value-type="string">
            <text:p>высокая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160.6</text:p>
          </table:table-cell>
          <table:table-cell table:style-name="ce124" office:value-type="string" calcext:value-type="string">
            <text:p>#2 STAGE INLET TEMP. HIGH.</text:p>
          </table:table-cell>
          <table:table-cell table:style-name="ce124" office:value-type="string" calcext:value-type="string">
            <text:p>high</text:p>
          </table:table-cell>
          <table:table-cell office:value-type="string" calcext:value-type="string">
            <text:p>MT_Num2StageInletTempHigh</text:p>
          </table:table-cell>
          <table:table-cell office:value-type="string" calcext:value-type="string">
            <text:p>ремонт высокая температура входа ступени 2</text:p>
          </table:table-cell>
          <table:table-cell office:value-type="string" calcext:value-type="string">
            <text:p>Требуется обслуживание: высокая температура на входе ступени 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Температура воздуха на входе 2 ступени</text:p>
          </table:table-cell>
          <table:table-cell office:value-type="string" calcext:value-type="string">
            <text:p>TE221</text:p>
          </table:table-cell>
          <table:table-cell office:value-type="string" calcext:value-type="string">
            <text:p>высокая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160.7</text:p>
          </table:table-cell>
          <table:table-cell table:style-name="ce124" office:value-type="string" calcext:value-type="string">
            <text:p>OIL FILTER DIFF ALARM.</text:p>
          </table:table-cell>
          <table:table-cell table:style-name="ce124" office:value-type="string" calcext:value-type="string">
            <text:p>alarm</text:p>
          </table:table-cell>
          <table:table-cell office:value-type="string" calcext:value-type="string">
            <text:p>MT_oilFilterDiffAlarm</text:p>
          </table:table-cell>
          <table:table-cell office:value-type="string" calcext:value-type="string">
            <text:p>ремонт перепад на маслофильтре высок</text:p>
          </table:table-cell>
          <table:table-cell office:value-type="string" calcext:value-type="string">
            <text:p>Требуется обслуживание: перепад на маслофильтре высок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Перепад давления масла на маслофильтре </text:p>
          </table:table-cell>
          <table:table-cell office:value-type="string" calcext:value-type="string">
            <text:p>PDT120</text:p>
          </table:table-cell>
          <table:table-cell office:value-type="string" calcext:value-type="string">
            <text:p>высокий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161.0</text:p>
          </table:table-cell>
          <table:table-cell table:style-name="ce124" office:value-type="string" calcext:value-type="string">
            <text:p>AIR FILTER DIFF ALARM.</text:p>
          </table:table-cell>
          <table:table-cell table:style-name="ce124" office:value-type="string" calcext:value-type="string">
            <text:p>alarm</text:p>
          </table:table-cell>
          <table:table-cell office:value-type="string" calcext:value-type="string">
            <text:p>MT_airFilterDiffAlarm</text:p>
          </table:table-cell>
          <table:table-cell office:value-type="string" calcext:value-type="string">
            <text:p>ремонт перепад на возд.фильтре высок</text:p>
          </table:table-cell>
          <table:table-cell office:value-type="string" calcext:value-type="string">
            <text:p>Требуется обслуживание: перепад на воздушном фильтре высок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Перепад давления на воздушном фильтре</text:p>
          </table:table-cell>
          <table:table-cell/>
          <table:table-cell office:value-type="string" calcext:value-type="string">
            <text:p>высокий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161.1</text:p>
          </table:table-cell>
          <table:table-cell table:style-name="ce124" office:value-type="string" calcext:value-type="string">
            <text:p>INJECT GREASE INTO THE COUPLING</text:p>
          </table:table-cell>
          <table:table-cell table:style-name="ce124" office:value-type="string" calcext:value-type="string">
            <text:p>inject</text:p>
          </table:table-cell>
          <table:table-cell office:value-type="string" calcext:value-type="string">
            <text:p>MT_injectGreaseIntoTheCoupling</text:p>
          </table:table-cell>
          <table:table-cell office:value-type="string" calcext:value-type="string">
            <text:p>ремонт смажьте соединения</text:p>
          </table:table-cell>
          <table:table-cell office:value-type="string" calcext:value-type="string">
            <text:p>Требуется обслуживание: смажьте соединения</text:p>
          </table:table-cell>
          <table:table-cell office:value-type="string" calcext:value-type="string">
            <text:p>MaintenanceGroupFlag</text:p>
          </table:table-cell>
          <table:table-cell office:value-type="float" office:value="1" calcext:value-type="float">
            <text:p>1</text:p>
          </table:table-cell>
          <table:table-cell table:formula="of:=COM.MICROSOFT.CONCAT([.$N$35];[.$N45];[.$O$1];[.$O45];[.$O$35];[.$P45])" office:value-type="string" office:string-value="Обслуживание : смажьте соединения  " calcext:value-type="string">
            <text:p>Обслуживание : смажьте соединения <text:s/></text:p>
          </table:table-cell>
          <table:table-cell table:number-columns-repeated="3"/>
          <table:table-cell office:value-type="string" calcext:value-type="string">
            <text:p>смажьте соединения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M161.2</text:p>
          </table:table-cell>
          <table:table-cell table:style-name="ce124" office:value-type="string" calcext:value-type="string">
            <text:p>REPLACE LUBRICATION OIL.</text:p>
          </table:table-cell>
          <table:table-cell table:style-name="ce124" office:value-type="string" calcext:value-type="string">
            <text:p>replace</text:p>
          </table:table-cell>
          <table:table-cell office:value-type="string" calcext:value-type="string">
            <text:p>MT_replaceLubricationOil</text:p>
          </table:table-cell>
          <table:table-cell office:value-type="string" calcext:value-type="string">
            <text:p>ремонт замена смазки</text:p>
          </table:table-cell>
          <table:table-cell office:value-type="string" calcext:value-type="string">
            <text:p>Требуется обслуживание: замените смазку</text:p>
          </table:table-cell>
          <table:table-cell office:value-type="string" calcext:value-type="string">
            <text:p>MaintenanceGroupFlag</text:p>
          </table:table-cell>
          <table:table-cell office:value-type="float" office:value="2" calcext:value-type="float">
            <text:p>2</text:p>
          </table:table-cell>
          <table:table-cell table:formula="of:=COM.MICROSOFT.CONCAT([.$N$35];[.$N46];[.$O$1];[.$O46];[.$O$35];[.$P46])" office:value-type="string" office:string-value="Обслуживание : требуется замена смазки  " calcext:value-type="string">
            <text:p>Обслуживание : требуется замена смазки <text:s/></text:p>
          </table:table-cell>
          <table:table-cell table:number-columns-repeated="3"/>
          <table:table-cell office:value-type="string" calcext:value-type="string">
            <text:p>требуется замена смазки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M161.3</text:p>
          </table:table-cell>
          <table:table-cell table:style-name="ce124" office:value-type="string" calcext:value-type="string">
            <text:p>REPLACE LUB. OIL INSIDE OF MOTOR BRG.</text:p>
          </table:table-cell>
          <table:table-cell table:style-name="ce124" office:value-type="string" calcext:value-type="string">
            <text:p>replace</text:p>
          </table:table-cell>
          <table:table-cell office:value-type="string" calcext:value-type="string">
            <text:p>MT_replaceLubOilInsideOfMotorBrg</text:p>
          </table:table-cell>
          <table:table-cell office:value-type="string" calcext:value-type="string">
            <text:p>ремонт заменить смазку подшипников двигателя</text:p>
          </table:table-cell>
          <table:table-cell office:value-type="string" calcext:value-type="string">
            <text:p>Требуется обслуживание: заменить смазку подшипников двигателя</text:p>
          </table:table-cell>
          <table:table-cell office:value-type="string" calcext:value-type="string">
            <text:p>MaintenanceGroupFlag</text:p>
          </table:table-cell>
          <table:table-cell office:value-type="float" office:value="3" calcext:value-type="float">
            <text:p>3</text:p>
          </table:table-cell>
          <table:table-cell table:formula="of:=COM.MICROSOFT.CONCAT([.$N$35];[.$N47];[.$O$1];[.$O47];[.$O$35];[.$P47])" office:value-type="string" office:string-value="Обслуживание : заменить масло в подшипниках двигателя  " calcext:value-type="string">
            <text:p>Обслуживание : заменить масло в подшипниках двигателя <text:s/></text:p>
          </table:table-cell>
          <table:table-cell table:number-columns-repeated="3"/>
          <table:table-cell office:value-type="string" calcext:value-type="string">
            <text:p>заменить масло в подшипниках двигателя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M161.4</text:p>
          </table:table-cell>
          <table:table-cell table:style-name="ce124" office:value-type="string" calcext:value-type="string">
            <text:p>INJECT GREASE INTO THE MOTOR BRG.</text:p>
          </table:table-cell>
          <table:table-cell table:style-name="ce124" office:value-type="string" calcext:value-type="string">
            <text:p>inject</text:p>
          </table:table-cell>
          <table:table-cell office:value-type="string" calcext:value-type="string">
            <text:p>MT_injectGreaseIntoTheMotorBrg</text:p>
          </table:table-cell>
          <table:table-cell office:value-type="string" calcext:value-type="string">
            <text:p>ремонт смазать подшипники двигателя</text:p>
          </table:table-cell>
          <table:table-cell office:value-type="string" calcext:value-type="string">
            <text:p>Требуется обслуживание: смазать подшипники двигателя</text:p>
          </table:table-cell>
          <table:table-cell office:value-type="string" calcext:value-type="string">
            <text:p>MaintenanceGroupFlag</text:p>
          </table:table-cell>
          <table:table-cell office:value-type="float" office:value="4" calcext:value-type="float">
            <text:p>4</text:p>
          </table:table-cell>
          <table:table-cell table:formula="of:=COM.MICROSOFT.CONCAT([.$N$35];[.$N48];[.$O$1];[.$O48];[.$O$35];[.$P48])" office:value-type="string" office:string-value="Обслуживание : ввести смазку в подшипники двигателя  " calcext:value-type="string">
            <text:p>Обслуживание : ввести смазку в подшипники двигателя <text:s/></text:p>
          </table:table-cell>
          <table:table-cell table:number-columns-repeated="3"/>
          <table:table-cell office:value-type="string" calcext:value-type="string">
            <text:p>ввести смазку в подшипники двигателя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M161.5</text:p>
          </table:table-cell>
          <table:table-cell table:style-name="ce124" office:value-type="string" calcext:value-type="string">
            <text:p>Check ELECTRIC IGV(Actuator)</text:p>
          </table:table-cell>
          <table:table-cell table:style-name="ce124" office:value-type="string" calcext:value-type="string">
            <text:p>need check</text:p>
          </table:table-cell>
          <table:table-cell office:value-type="string" calcext:value-type="string">
            <text:p>MT_checkElectricIGV</text:p>
          </table:table-cell>
          <table:table-cell office:value-type="string" calcext:value-type="string">
            <text:p>ремонт проверить электрику напр.аппарата</text:p>
          </table:table-cell>
          <table:table-cell office:value-type="string" calcext:value-type="string">
            <text:p>Требуется обслуживание: проверить электрику направляющего аппарата</text:p>
          </table:table-cell>
          <table:table-cell office:value-type="string" calcext:value-type="string">
            <text:p>MaintenanceGroupFlag</text:p>
          </table:table-cell>
          <table:table-cell office:value-type="float" office:value="5" calcext:value-type="float">
            <text:p>5</text:p>
          </table:table-cell>
          <table:table-cell table:formula="of:=COM.MICROSOFT.CONCAT([.$N$35];[.$N49];[.$O$1];[.$O49];[.$O$35];[.$P49])" office:value-type="string" office:string-value="Обслуживание : проверить электрику направляющего аппарата  " calcext:value-type="string">
            <text:p>Обслуживание : проверить электрику направляющего аппарата <text:s/></text:p>
          </table:table-cell>
          <table:table-cell table:number-columns-repeated="3"/>
          <table:table-cell office:value-type="string" calcext:value-type="string">
            <text:p>проверить электрику направляющего аппарата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M161.6</text:p>
          </table:table-cell>
          <table:table-cell table:style-name="ce124" office:value-type="string" calcext:value-type="string">
            <text:p>Check BOV ASSY</text:p>
          </table:table-cell>
          <table:table-cell table:style-name="ce124" office:value-type="string" calcext:value-type="string">
            <text:p>need check</text:p>
          </table:table-cell>
          <table:table-cell office:value-type="string" calcext:value-type="string">
            <text:p>MT_checkBOV_Assy</text:p>
          </table:table-cell>
          <table:table-cell office:value-type="string" calcext:value-type="string">
            <text:p>ремонт проверить сборку помпажн.клапана</text:p>
          </table:table-cell>
          <table:table-cell office:value-type="string" calcext:value-type="string">
            <text:p>Требуется обслуживание: проверить сборку помпажного клапана</text:p>
          </table:table-cell>
          <table:table-cell office:value-type="string" calcext:value-type="string">
            <text:p>MaintenanceGroupFlag</text:p>
          </table:table-cell>
          <table:table-cell office:value-type="float" office:value="6" calcext:value-type="float">
            <text:p>6</text:p>
          </table:table-cell>
          <table:table-cell table:formula="of:=COM.MICROSOFT.CONCAT([.$N$35];[.$N50];[.$O$1];[.$O50];[.$O$35];[.$P50])" office:value-type="string" office:string-value="Обслуживание : проверить сборку продувочного клапана  " calcext:value-type="string">
            <text:p>Обслуживание : проверить сборку продувочного клапана <text:s/></text:p>
          </table:table-cell>
          <table:table-cell table:number-columns-repeated="3"/>
          <table:table-cell office:value-type="string" calcext:value-type="string">
            <text:p>проверить сборку продувочного клапана</text:p>
          </table:table-cell>
          <table:table-cell table:number-columns-repeated="6"/>
        </table:table-row>
        <table:table-row table:style-name="ro2">
          <table:table-cell/>
          <table:table-cell table:style-name="ce168" office:value-type="string" calcext:value-type="string">
            <text:p>MW160</text:p>
          </table:table-cell>
          <table:table-cell table:style-name="ce168" office:value-type="string" calcext:value-type="string">
            <text:p>Maintenance group flag</text:p>
          </table:table-cell>
          <table:table-cell table:style-name="ce168" office:value-type="string" calcext:value-type="string">
            <text:p>all above</text:p>
          </table:table-cell>
          <table:table-cell table:style-name="ce166" office:value-type="string" calcext:value-type="string">
            <text:p>MaintenanceGroupFlag</text:p>
          </table:table-cell>
          <table:table-cell table:style-name="ce166" office:value-type="string" calcext:value-type="string">
            <text:p>группа ремонта</text:p>
          </table:table-cell>
          <table:table-cell table:style-name="ce166"/>
          <table:table-cell table:style-name="ce166" office:value-type="string" calcext:value-type="string">
            <text:p>S7:[VetrolCompr_1]MWORD160</text:p>
          </table:table-cell>
          <table:table-cell table:number-columns-repeated="5"/>
          <table:table-cell office:value-type="string" calcext:value-type="string">
            <text:p>Вне диапазона :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Смещение сигнала : </text:p>
          </table:table-cell>
          <table:table-cell table:number-columns-repeated="4"/>
        </table:table-row>
        <table:table-row table:style-name="ro1">
          <table:table-cell table:style-name="ce80"/>
          <table:table-cell office:value-type="string" calcext:value-type="string">
            <text:p>M230.0</text:p>
          </table:table-cell>
          <table:table-cell table:style-name="ce124"/>
          <table:table-cell office:value-type="string" calcext:value-type="string">
            <text:p>warning</text:p>
          </table:table-cell>
          <table:table-cell table:number-columns-repeated="3"/>
          <table:table-cell table:style-name="Default"/>
          <table:table-cell office:value-type="float" office:value="8" calcext:value-type="float">
            <text:p>8</text:p>
          </table:table-cell>
          <table:table-cell table:formula="of:=COM.MICROSOFT.CONCAT([.$N$51];[.$N65];[.$O$1];[.$O65];[.$O$51];[.$P52])" office:value-type="string" office:string-value="Вне диапазона : Положение направляющего аппарата IGV " calcext:value-type="string">
            <text:p>Вне диапазона : Положение направляющего аппарата IGV </text:p>
          </table:table-cell>
          <table:table-cell table:number-columns-repeated="10"/>
        </table:table-row>
        <table:table-row table:style-name="ro1">
          <table:table-cell/>
          <table:table-cell table:style-name="ce82" office:value-type="string" calcext:value-type="string">
            <text:p>M230.1</text:p>
          </table:table-cell>
          <table:table-cell table:style-name="ce124"/>
          <table:table-cell office:value-type="string" calcext:value-type="string">
            <text:p>warning</text:p>
          </table:table-cell>
          <table:table-cell table:number-columns-repeated="3"/>
          <table:table-cell table:style-name="Default"/>
          <table:table-cell office:value-type="float" office:value="9" calcext:value-type="float">
            <text:p>9</text:p>
          </table:table-cell>
          <table:table-cell table:formula="of:=COM.MICROSOFT.CONCAT([.$N$51];[.$N53];[.$O$1];[.$O53];[.$O$51];[.$P53])" office:value-type="string" office:string-value="Вне диапазона :   " calcext:value-type="string">
            <text:p>Вне диапазона : <text:s text:c="2"/></text:p>
          </table:table-cell>
          <table:table-cell table:number-columns-repeated="3"/>
          <table:table-cell table:style-name="ce185"/>
          <table:table-cell table:style-name="ce1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230.5</text:p>
          </table:table-cell>
          <table:table-cell table:style-name="ce124"/>
          <table:table-cell office:value-type="string" calcext:value-type="string">
            <text:p>warning</text:p>
          </table:table-cell>
          <table:table-cell table:number-columns-repeated="3"/>
          <table:table-cell table:style-name="Default"/>
          <table:table-cell office:value-type="float" office:value="13" calcext:value-type="float">
            <text:p>13</text:p>
          </table:table-cell>
          <table:table-cell table:formula="of:=COM.MICROSOFT.CONCAT([.$P$51];[.$N54];[.$O$1];[.$O54];[.$O$51];[.$P54])" office:value-type="string" office:string-value="Смещение сигнала :   " calcext:value-type="string">
            <text:p>Смещение сигнала : <text:s text:c="2"/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230.6</text:p>
          </table:table-cell>
          <table:table-cell table:style-name="ce124"/>
          <table:table-cell office:value-type="string" calcext:value-type="string">
            <text:p>warning</text:p>
          </table:table-cell>
          <table:table-cell table:style-name="ce113"/>
          <table:table-cell table:number-columns-repeated="2"/>
          <table:table-cell table:style-name="Default"/>
          <table:table-cell office:value-type="float" office:value="14" calcext:value-type="float">
            <text:p>14</text:p>
          </table:table-cell>
          <table:table-cell table:formula="of:=COM.MICROSOFT.CONCAT([.$P$51];[.$N55];[.$O$1];[.$O55];[.$O$51];[.$P55])" office:value-type="string" office:string-value="Смещение сигнала :   " calcext:value-type="string">
            <text:p>Смещение сигнала : <text:s text:c="2"/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230.7</text:p>
          </table:table-cell>
          <table:table-cell table:style-name="ce124"/>
          <table:table-cell office:value-type="string" calcext:value-type="string">
            <text:p>warning</text:p>
          </table:table-cell>
          <table:table-cell table:style-name="ce113"/>
          <table:table-cell table:number-columns-repeated="2"/>
          <table:table-cell table:style-name="Default"/>
          <table:table-cell office:value-type="float" office:value="15" calcext:value-type="float">
            <text:p>15</text:p>
          </table:table-cell>
          <table:table-cell table:formula="of:=COM.MICROSOFT.CONCAT([.$P$51];[.$N56];[.$O$1];[.$O56];[.$O$51];[.$P56])" office:value-type="string" office:string-value="Смещение сигнала :   " calcext:value-type="string">
            <text:p>Смещение сигнала : <text:s text:c="2"/></text:p>
          </table:table-cell>
          <table:table-cell table:number-columns-repeated="10"/>
        </table:table-row>
        <table:table-row table:style-name="ro1">
          <table:table-cell table:style-name="ce80"/>
          <table:table-cell table:style-name="ce82" office:value-type="string" calcext:value-type="string">
            <text:p>M232.0</text:p>
          </table:table-cell>
          <table:table-cell table:style-name="ce124" office:value-type="string" calcext:value-type="string">
            <text:p>SYSTEM PRESS. ANALOG FAULT</text:p>
          </table:table-cell>
          <table:table-cell office:value-type="string" calcext:value-type="string">
            <text:p>warning</text:p>
          </table:table-cell>
          <table:table-cell table:style-name="ce113" office:value-type="string" calcext:value-type="string">
            <text:p>SystemPressAnalogFault</text:p>
          </table:table-cell>
          <table:table-cell office:value-type="string" calcext:value-type="string">
            <text:p>вне диапазона системное давление</text:p>
          </table:table-cell>
          <table:table-cell office:value-type="string" calcext:value-type="string">
            <text:p>Сигнал вне допустимого диапазона: системное давление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8" calcext:value-type="float">
            <text:p>8</text:p>
          </table:table-cell>
          <table:table-cell table:formula="of:=COM.MICROSOFT.CONCAT([.$N$51];[.$N57];[.$O$1];[.$O57];[.$O$51];[.$P57])" office:value-type="string" office:string-value="Вне диапазона : Давление на напоре PT260 " calcext:value-type="string">
            <text:p>Вне диапазона : Давление на напоре PT260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3_SystemPressure</text:p>
          </table:table-cell>
          <table:table-cell office:value-type="string" calcext:value-type="string">
            <text:p>Давление на напоре</text:p>
          </table:table-cell>
          <table:table-cell office:value-type="string" calcext:value-type="string">
            <text:p>PT260</text:p>
          </table:table-cell>
          <table:table-cell table:number-columns-repeated="5"/>
        </table:table-row>
        <table:table-row table:style-name="ro1">
          <table:table-cell table:style-name="ce80"/>
          <table:table-cell table:style-name="ce82" office:value-type="string" calcext:value-type="string">
            <text:p>M232.1</text:p>
          </table:table-cell>
          <table:table-cell table:style-name="ce124" office:value-type="string" calcext:value-type="string">
            <text:p>DISCH. PRESS. ANALOG FAULT</text:p>
          </table:table-cell>
          <table:table-cell office:value-type="string" calcext:value-type="string">
            <text:p>warning</text:p>
          </table:table-cell>
          <table:table-cell table:style-name="ce113" office:value-type="string" calcext:value-type="string">
            <text:p>DischPressAnalogFault</text:p>
          </table:table-cell>
          <table:table-cell office:value-type="string" calcext:value-type="string">
            <text:p>вне диапазона давление на выходе</text:p>
          </table:table-cell>
          <table:table-cell office:value-type="string" calcext:value-type="string">
            <text:p>Сигнал вне допустимого диапазона: давление на выходе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9" calcext:value-type="float">
            <text:p>9</text:p>
          </table:table-cell>
          <table:table-cell table:formula="of:=COM.MICROSOFT.CONCAT([.$N$51];[.$N58];[.$O$1];[.$O58];[.$O$51];[.$P58])" office:value-type="string" office:string-value="Вне диапазона : Давление 3 ступени PT232 " calcext:value-type="string">
            <text:p>Вне диапазона : Давление 3 ступени PT232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4_Stage3DischargePressure</text:p>
          </table:table-cell>
          <table:table-cell office:value-type="string" calcext:value-type="string">
            <text:p>Давление 3 ступени</text:p>
          </table:table-cell>
          <table:table-cell office:value-type="string" calcext:value-type="string">
            <text:p>PT232</text:p>
          </table:table-cell>
          <table:table-cell table:number-columns-repeated="5"/>
        </table:table-row>
        <table:table-row table:style-name="ro1">
          <table:table-cell table:style-name="ce152"/>
          <table:table-cell table:style-name="ce82" office:value-type="string" calcext:value-type="string">
            <text:p>M232.2</text:p>
          </table:table-cell>
          <table:table-cell table:style-name="ce124" office:value-type="string" calcext:value-type="string">
            <text:p>OIL SUPPLY PR ANALOG FAULT</text:p>
          </table:table-cell>
          <table:table-cell office:value-type="string" calcext:value-type="string">
            <text:p>warning</text:p>
          </table:table-cell>
          <table:table-cell table:style-name="ce113" office:value-type="string" calcext:value-type="string">
            <text:p>OilSupplyPressAnalogFault</text:p>
          </table:table-cell>
          <table:table-cell office:value-type="string" calcext:value-type="string">
            <text:p>вне диапазона давление масла</text:p>
          </table:table-cell>
          <table:table-cell office:value-type="string" calcext:value-type="string">
            <text:p>Сигнал вне допустимого диапазона: давление масла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10" calcext:value-type="float">
            <text:p>10</text:p>
          </table:table-cell>
          <table:table-cell table:formula="of:=COM.MICROSOFT.CONCAT([.$N$51];[.$N59];[.$O$1];[.$O59];[.$O$51];[.$P59])" office:value-type="string" office:string-value="Вне диапазона : Давление масла PT130 " calcext:value-type="string">
            <text:p>Вне диапазона : Давление масла PT130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5_OilSupplyPressure</text:p>
          </table:table-cell>
          <table:table-cell office:value-type="string" calcext:value-type="string">
            <text:p>Давление масла</text:p>
          </table:table-cell>
          <table:table-cell office:value-type="string" calcext:value-type="string">
            <text:p>PT130</text:p>
          </table:table-cell>
          <table:table-cell table:number-columns-repeated="5"/>
        </table:table-row>
        <table:table-row table:style-name="ro1">
          <table:table-cell table:style-name="ce152"/>
          <table:table-cell table:style-name="ce82" office:value-type="string" calcext:value-type="string">
            <text:p>M232.3</text:p>
          </table:table-cell>
          <table:table-cell table:style-name="ce124" office:value-type="string" calcext:value-type="string">
            <text:p>VIB#1 ANALOG FAULT</text:p>
          </table:table-cell>
          <table:table-cell office:value-type="string" calcext:value-type="string">
            <text:p>warning</text:p>
          </table:table-cell>
          <table:table-cell table:style-name="ce113" office:value-type="string" calcext:value-type="string">
            <text:p>Vib1AnalogFault</text:p>
          </table:table-cell>
          <table:table-cell office:value-type="string" calcext:value-type="string">
            <text:p>вне диапазона вибрация 1</text:p>
          </table:table-cell>
          <table:table-cell office:value-type="string" calcext:value-type="string">
            <text:p>Сигнал вне допустимого диапазона: вибрация 1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11" calcext:value-type="float">
            <text:p>11</text:p>
          </table:table-cell>
          <table:table-cell table:formula="of:=COM.MICROSOFT.CONCAT([.$N$51];[.$N60];[.$O$1];[.$O60];[.$O$51];[.$P60])" office:value-type="string" office:string-value="Вне диапазона : Вибрация 1 ступени VT#1 " calcext:value-type="string">
            <text:p>Вне диапазона : Вибрация 1 ступени VT#1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6_Stage1Vibration</text:p>
          </table:table-cell>
          <table:table-cell office:value-type="string" calcext:value-type="string">
            <text:p>Вибрация 1 ступени</text:p>
          </table:table-cell>
          <table:table-cell office:value-type="string" calcext:value-type="string">
            <text:p>VT#1</text:p>
          </table:table-cell>
          <table:table-cell table:number-columns-repeated="5"/>
        </table:table-row>
        <table:table-row table:style-name="ro1">
          <table:table-cell table:style-name="ce152"/>
          <table:table-cell table:style-name="ce82" office:value-type="string" calcext:value-type="string">
            <text:p>M232.4</text:p>
          </table:table-cell>
          <table:table-cell table:style-name="ce124" office:value-type="string" calcext:value-type="string">
            <text:p>VIB#2 ANALOG FAULT</text:p>
          </table:table-cell>
          <table:table-cell office:value-type="string" calcext:value-type="string">
            <text:p>warning</text:p>
          </table:table-cell>
          <table:table-cell table:style-name="ce113" office:value-type="string" calcext:value-type="string">
            <text:p>Vib2AnalogFault</text:p>
          </table:table-cell>
          <table:table-cell office:value-type="string" calcext:value-type="string">
            <text:p>вне диапазона вибрация 2</text:p>
          </table:table-cell>
          <table:table-cell office:value-type="string" calcext:value-type="string">
            <text:p>Сигнал вне допустимого диапазона: вибрация 2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12" calcext:value-type="float">
            <text:p>12</text:p>
          </table:table-cell>
          <table:table-cell table:formula="of:=COM.MICROSOFT.CONCAT([.$N$51];[.$N61];[.$O$1];[.$O61];[.$O$51];[.$P61])" office:value-type="string" office:string-value="Вне диапазона : Вибрация 2 ступени VT#2 " calcext:value-type="string">
            <text:p>Вне диапазона : Вибрация 2 ступени VT#2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7_Stage2Vibration</text:p>
          </table:table-cell>
          <table:table-cell office:value-type="string" calcext:value-type="string">
            <text:p>Вибрация 2 ступени</text:p>
          </table:table-cell>
          <table:table-cell office:value-type="string" calcext:value-type="string">
            <text:p>VT#2</text:p>
          </table:table-cell>
          <table:table-cell table:number-columns-repeated="5"/>
        </table:table-row>
        <table:table-row table:style-name="ro1">
          <table:table-cell table:style-name="ce152"/>
          <table:table-cell table:style-name="ce82" office:value-type="string" calcext:value-type="string">
            <text:p>M232.5</text:p>
          </table:table-cell>
          <table:table-cell table:style-name="ce124" office:value-type="string" calcext:value-type="string">
            <text:p>VIB#3 ANALOG FAULT</text:p>
          </table:table-cell>
          <table:table-cell office:value-type="string" calcext:value-type="string">
            <text:p>warning</text:p>
          </table:table-cell>
          <table:table-cell table:style-name="ce113" office:value-type="string" calcext:value-type="string">
            <text:p>Vib3AnalogFault</text:p>
          </table:table-cell>
          <table:table-cell office:value-type="string" calcext:value-type="string">
            <text:p>вне диапазона вибрация 3</text:p>
          </table:table-cell>
          <table:table-cell office:value-type="string" calcext:value-type="string">
            <text:p>Сигнал вне допустимого диапазона: вибрация 3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13" calcext:value-type="float">
            <text:p>13</text:p>
          </table:table-cell>
          <table:table-cell table:formula="of:=COM.MICROSOFT.CONCAT([.$N$51];[.$N62];[.$O$1];[.$O62];[.$O$51];[.$P62])" office:value-type="string" office:string-value="Вне диапазона : Вибрация 3 ступени VT#3 " calcext:value-type="string">
            <text:p>Вне диапазона : Вибрация 3 ступени VT#3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8_Stage3Vibration</text:p>
          </table:table-cell>
          <table:table-cell office:value-type="string" calcext:value-type="string">
            <text:p>Вибрация 3 ступени</text:p>
          </table:table-cell>
          <table:table-cell office:value-type="string" calcext:value-type="string">
            <text:p>VT#3</text:p>
          </table:table-cell>
          <table:table-cell table:number-columns-repeated="5"/>
        </table:table-row>
        <table:table-row table:style-name="ro1">
          <table:table-cell table:style-name="ce152"/>
          <table:table-cell table:style-name="ce82" office:value-type="string" calcext:value-type="string">
            <text:p>M232.6</text:p>
          </table:table-cell>
          <table:table-cell table:style-name="ce124" office:value-type="string" calcext:value-type="string">
            <text:p>Oil FILTER Diff Pressure ANALOG FAULT</text:p>
          </table:table-cell>
          <table:table-cell office:value-type="string" calcext:value-type="string">
            <text:p>warning</text:p>
          </table:table-cell>
          <table:table-cell table:style-name="ce113" office:value-type="string" calcext:value-type="string">
            <text:p>OilFilterDiffPressAnalogFault</text:p>
          </table:table-cell>
          <table:table-cell office:value-type="string" calcext:value-type="string">
            <text:p>вне диапазона перепад на маслофильтре</text:p>
          </table:table-cell>
          <table:table-cell office:value-type="string" calcext:value-type="string">
            <text:p>Сигнал вне допустимого диапазона: перепад на маслофильтре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14" calcext:value-type="float">
            <text:p>14</text:p>
          </table:table-cell>
          <table:table-cell table:formula="of:=COM.MICROSOFT.CONCAT([.$N$51];[.$N63];[.$O$1];[.$O63];[.$O$51];[.$P63])" office:value-type="string" office:string-value="Вне диапазона : Перепад давления масла на маслофильтре  PD120 " calcext:value-type="string">
            <text:p>Вне диапазона : Перепад давления масла на маслофильтре <text:s/>PD120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9_OilFilterDiffPressure</text:p>
          </table:table-cell>
          <table:table-cell office:value-type="string" calcext:value-type="string">
            <text:p>Перепад давления масла на маслофильтре </text:p>
          </table:table-cell>
          <table:table-cell office:value-type="string" calcext:value-type="string">
            <text:p>PD120</text:p>
          </table:table-cell>
          <table:table-cell table:number-columns-repeated="5"/>
        </table:table-row>
        <table:table-row table:style-name="ro1">
          <table:table-cell table:style-name="ce152"/>
          <table:table-cell table:style-name="ce82" office:value-type="string" calcext:value-type="string">
            <text:p>M232.7</text:p>
          </table:table-cell>
          <table:table-cell table:style-name="ce124" office:value-type="string" calcext:value-type="string">
            <text:p>MOTOR CURRENT ANALOG FAULT</text:p>
          </table:table-cell>
          <table:table-cell office:value-type="string" calcext:value-type="string">
            <text:p>warning</text:p>
          </table:table-cell>
          <table:table-cell table:style-name="ce113" office:value-type="string" calcext:value-type="string">
            <text:p>MotorCurrentAnalogFault</text:p>
          </table:table-cell>
          <table:table-cell office:value-type="string" calcext:value-type="string">
            <text:p>вне диапазона ток двигателя</text:p>
          </table:table-cell>
          <table:table-cell office:value-type="string" calcext:value-type="string">
            <text:p>Сигнал вне допустимого диапазона: ток двигателя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15" calcext:value-type="float">
            <text:p>15</text:p>
          </table:table-cell>
          <table:table-cell table:formula="of:=COM.MICROSOFT.CONCAT([.$N$51];[.$N64];[.$O$1];[.$O64];[.$O$51];[.$P64])" office:value-type="string" office:string-value="Вне диапазона : Ток двигателя TD240 " calcext:value-type="string">
            <text:p>Вне диапазона : Ток двигателя TD240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10_MotorCurrent</text:p>
          </table:table-cell>
          <table:table-cell office:value-type="string" calcext:value-type="string">
            <text:p>Ток двигателя</text:p>
          </table:table-cell>
          <table:table-cell office:value-type="string" calcext:value-type="string">
            <text:p>TD240</text:p>
          </table:table-cell>
          <table:table-cell table:number-columns-repeated="5"/>
        </table:table-row>
        <table:table-row table:style-name="ro1">
          <table:table-cell table:style-name="ce152"/>
          <table:table-cell table:style-name="ce129" office:value-type="string" calcext:value-type="string">
            <text:p>M233.0</text:p>
          </table:table-cell>
          <table:table-cell table:style-name="ce129" office:value-type="string" calcext:value-type="string">
            <text:p>IGV SIGNAL FAULT</text:p>
          </table:table-cell>
          <table:table-cell office:value-type="string" calcext:value-type="string">
            <text:p>warning</text:p>
          </table:table-cell>
          <table:table-cell table:style-name="ce128" office:value-type="string" calcext:value-type="string">
            <text:p>IgvSignalFault</text:p>
          </table:table-cell>
          <table:table-cell table:style-name="ce128" office:value-type="string" calcext:value-type="string">
            <text:p>вне диапазона положение напр.аппарата</text:p>
          </table:table-cell>
          <table:table-cell table:style-name="ce128" office:value-type="string" calcext:value-type="string">
            <text:p>Сигнал вне допустимого диапазона: положение направляющего аппарата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0" calcext:value-type="float">
            <text:p>0</text:p>
          </table:table-cell>
          <table:table-cell table:style-name="ce128" table:formula="of:=COM.MICROSOFT.CONCAT([.$N$51];[.$N65];[.$O$1];[.$O65];[.$O$51];[.$P63])" office:value-type="string" office:string-value="Вне диапазона : Положение направляющего аппарата IGV " calcext:value-type="string">
            <text:p>Вне диапазона : Положение направляющего аппарата IGV </text:p>
          </table:table-cell>
          <table:table-cell/>
          <table:table-cell office:value-type="string" calcext:value-type="string">
            <text:p>rtdOutRange</text:p>
          </table:table-cell>
          <table:table-cell table:style-name="ce128" office:value-type="string" calcext:value-type="string">
            <text:p>ai1_IGVPosition</text:p>
          </table:table-cell>
          <table:table-cell table:style-name="ce185" office:value-type="string" calcext:value-type="string">
            <text:p>Положение направляющего аппарата</text:p>
          </table:table-cell>
          <table:table-cell table:style-name="ce113" office:value-type="string" calcext:value-type="string">
            <text:p>IGV</text:p>
          </table:table-cell>
          <table:table-cell table:number-columns-repeated="5"/>
        </table:table-row>
        <table:table-row table:style-name="ro1">
          <table:table-cell table:style-name="ce152"/>
          <table:table-cell table:style-name="ce82" office:value-type="string" calcext:value-type="string">
            <text:p>M233.1</text:p>
          </table:table-cell>
          <table:table-cell table:style-name="ce124"/>
          <table:table-cell office:value-type="string" calcext:value-type="string">
            <text:p>warning</text:p>
          </table:table-cell>
          <table:table-cell table:style-name="ce113"/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 table:style-name="ce80" table:formula="of:=COM.MICROSOFT.CONCAT([.$N$51];[.$N66];[.$O$1];[.$O66];[.$O$51];[.$P64])" office:value-type="string" office:string-value="Вне диапазона :   " calcext:value-type="string">
            <text:p>Вне диапазона : <text:s text:c="2"/></text:p>
          </table:table-cell>
          <table:table-cell table:number-columns-repeated="10"/>
        </table:table-row>
        <table:table-row table:style-name="ro1">
          <table:table-cell table:style-name="ce152"/>
          <table:table-cell table:style-name="ce82" office:value-type="string" calcext:value-type="string">
            <text:p>M233.2</text:p>
          </table:table-cell>
          <table:table-cell table:style-name="ce124"/>
          <table:table-cell office:value-type="string" calcext:value-type="string">
            <text:p>warning</text:p>
          </table:table-cell>
          <table:table-cell table:style-name="ce113"/>
          <table:table-cell table:number-columns-repeated="2"/>
          <table:table-cell table:style-name="Default"/>
          <table:table-cell office:value-type="float" office:value="2" calcext:value-type="float">
            <text:p>2</text:p>
          </table:table-cell>
          <table:table-cell table:style-name="ce80" table:formula="of:=COM.MICROSOFT.CONCAT([.$N$51];[.$N67];[.$O$1];[.$O67];[.$O$51];[.$P65])" office:value-type="string" office:string-value="Вне диапазона :   " calcext:value-type="string">
            <text:p>Вне диапазона : <text:s text:c="2"/></text:p>
          </table:table-cell>
          <table:table-cell table:number-columns-repeated="10"/>
        </table:table-row>
        <table:table-row table:style-name="ro1">
          <table:table-cell table:style-name="ce152"/>
          <table:table-cell table:style-name="ce82" office:value-type="string" calcext:value-type="string">
            <text:p>M233.3</text:p>
          </table:table-cell>
          <table:table-cell/>
          <table:table-cell office:value-type="string" calcext:value-type="string">
            <text:p>warning</text:p>
          </table:table-cell>
          <table:table-cell table:number-columns-repeated="3"/>
          <table:table-cell table:style-name="Default"/>
          <table:table-cell office:value-type="float" office:value="3" calcext:value-type="float">
            <text:p>3</text:p>
          </table:table-cell>
          <table:table-cell table:style-name="ce80" table:formula="of:=COM.MICROSOFT.CONCAT([.$N$51];[.$N68];[.$O$1];[.$O68];[.$O$51];[.$P66])" office:value-type="string" office:string-value="Вне диапазона :   " calcext:value-type="string">
            <text:p>Вне диапазона : <text:s text:c="2"/></text:p>
          </table:table-cell>
          <table:table-cell table:number-columns-repeated="10"/>
        </table:table-row>
        <table:table-row table:style-name="ro1">
          <table:table-cell table:style-name="ce152"/>
          <table:table-cell table:style-name="ce82" office:value-type="string" calcext:value-type="string">
            <text:p>M233.4</text:p>
          </table:table-cell>
          <table:table-cell table:style-name="ce82" office:value-type="string" calcext:value-type="string">
            <text:p>Motor bearing Drive End vibration analog fault</text:p>
          </table:table-cell>
          <table:table-cell office:value-type="string" calcext:value-type="string">
            <text:p>warning</text:p>
          </table:table-cell>
          <table:table-cell table:style-name="ce80" office:value-type="string" calcext:value-type="string">
            <text:p>MotorBearingDriveEndVibration</text:p>
          </table:table-cell>
          <table:table-cell table:style-name="ce80" office:value-type="string" calcext:value-type="string">
            <text:p>вне диапазона вибрация двигателя со стороны редуктора</text:p>
          </table:table-cell>
          <table:table-cell table:style-name="ce80" office:value-type="string" calcext:value-type="string">
            <text:p>Сигнал вне допустимого диапазона: вибрация двигателя со стороны редуктора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4" calcext:value-type="float">
            <text:p>4</text:p>
          </table:table-cell>
          <table:table-cell table:style-name="ce80" table:formula="of:=COM.MICROSOFT.CONCAT([.$N$51];[.$N69];[.$O$1];[.$O69];[.$O$51];[.$P67])" office:value-type="string" office:string-value="Вне диапазона : Вибрация двигателя со стороны редуктора VT5 " calcext:value-type="string">
            <text:p>Вне диапазона : Вибрация двигателя со стороны редуктора VT5 </text:p>
          </table:table-cell>
          <table:table-cell/>
          <table:table-cell office:value-type="string" calcext:value-type="string">
            <text:p>rtdOutRange</text:p>
          </table:table-cell>
          <table:table-cell table:style-name="ce80" office:value-type="string" calcext:value-type="string">
            <text:p>ai12_MotorBearingDEVibration</text:p>
          </table:table-cell>
          <table:table-cell office:value-type="string" calcext:value-type="string">
            <text:p>Вибрация двигателя со стороны редуктора</text:p>
          </table:table-cell>
          <table:table-cell office:value-type="string" calcext:value-type="string">
            <text:p>VT5</text:p>
          </table:table-cell>
          <table:table-cell table:number-columns-repeated="5"/>
        </table:table-row>
        <table:table-row table:style-name="ro1">
          <table:table-cell table:style-name="ce152"/>
          <table:table-cell table:style-name="ce82" office:value-type="string" calcext:value-type="string">
            <text:p>M233.5</text:p>
          </table:table-cell>
          <table:table-cell table:style-name="ce82" office:value-type="string" calcext:value-type="string">
            <text:p>Motor bearing Non-Drive End vibration analog fault</text:p>
          </table:table-cell>
          <table:table-cell office:value-type="string" calcext:value-type="string">
            <text:p>warning</text:p>
          </table:table-cell>
          <table:table-cell table:style-name="ce80" office:value-type="string" calcext:value-type="string">
            <text:p>MotorBearingNonDriveEndVibration</text:p>
          </table:table-cell>
          <table:table-cell table:style-name="ce80" office:value-type="string" calcext:value-type="string">
            <text:p>вне диапазона вибрация двигателя с глухого конца</text:p>
          </table:table-cell>
          <table:table-cell table:style-name="ce80" office:value-type="string" calcext:value-type="string">
            <text:p>Сигнал вне допустимого диапазона: вибрация двигателя с глухого конца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5" calcext:value-type="float">
            <text:p>5</text:p>
          </table:table-cell>
          <table:table-cell table:style-name="ce80" table:formula="of:=COM.MICROSOFT.CONCAT([.$N$51];[.$N70];[.$O$1];[.$O70];[.$O$51];[.$P68])" office:value-type="string" office:string-value="Вне диапазона : Вибрация двигателя с глухого конца VT6 " calcext:value-type="string">
            <text:p>Вне диапазона : Вибрация двигателя с глухого конца VT6 </text:p>
          </table:table-cell>
          <table:table-cell/>
          <table:table-cell office:value-type="string" calcext:value-type="string">
            <text:p>rtdOutRange</text:p>
          </table:table-cell>
          <table:table-cell table:style-name="ce80" office:value-type="string" calcext:value-type="string">
            <text:p>ai13_MotorBearingNDEVibration</text:p>
          </table:table-cell>
          <table:table-cell office:value-type="string" calcext:value-type="string">
            <text:p>Вибрация двигателя с глухого конца</text:p>
          </table:table-cell>
          <table:table-cell office:value-type="string" calcext:value-type="string">
            <text:p>VT6</text:p>
          </table:table-cell>
          <table:table-cell table:number-columns-repeated="5"/>
        </table:table-row>
        <table:table-row table:style-name="ro1">
          <table:table-cell table:style-name="ce152"/>
          <table:table-cell table:style-name="ce82" office:value-type="string" calcext:value-type="string">
            <text:p>M233.6</text:p>
          </table:table-cell>
          <table:table-cell table:style-name="ce82" office:value-type="string" calcext:value-type="string">
            <text:p>C/W INLET PRESS ANALOG FAULT</text:p>
          </table:table-cell>
          <table:table-cell office:value-type="string" calcext:value-type="string">
            <text:p>warning</text:p>
          </table:table-cell>
          <table:table-cell table:style-name="ce150" office:value-type="string" calcext:value-type="string">
            <text:p>CoolingWaterInletPressAnalogFault</text:p>
          </table:table-cell>
          <table:table-cell table:style-name="ce80" office:value-type="string" calcext:value-type="string">
            <text:p>вне диапазона давление охлаждающей воды</text:p>
          </table:table-cell>
          <table:table-cell table:style-name="ce80" office:value-type="string" calcext:value-type="string">
            <text:p>Сигнал вне допустимого диапазона: давление на подаче охлаждающей воды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6" calcext:value-type="float">
            <text:p>6</text:p>
          </table:table-cell>
          <table:table-cell table:style-name="ce80" table:formula="of:=COM.MICROSOFT.CONCAT([.$N$51];[.$N71];[.$O$1];[.$O71];[.$O$51];[.$P69])" office:value-type="string" office:string-value="Вне диапазона : Давление воды PT301 " calcext:value-type="string">
            <text:p>Вне диапазона : Давление воды PT301 </text:p>
          </table:table-cell>
          <table:table-cell/>
          <table:table-cell office:value-type="string" calcext:value-type="string">
            <text:p>rtdOutRange</text:p>
          </table:table-cell>
          <table:table-cell table:style-name="ce80" office:value-type="string" calcext:value-type="string">
            <text:p>ai11_CoolingWaterSupplyPressure</text:p>
          </table:table-cell>
          <table:table-cell office:value-type="string" calcext:value-type="string">
            <text:p>Давление воды</text:p>
          </table:table-cell>
          <table:table-cell office:value-type="string" calcext:value-type="string">
            <text:p>PT301</text:p>
          </table:table-cell>
          <table:table-cell table:number-columns-repeated="5"/>
        </table:table-row>
        <table:table-row table:style-name="ro1">
          <table:table-cell table:style-name="ce152"/>
          <table:table-cell table:style-name="ce129" office:value-type="string" calcext:value-type="string">
            <text:p>M234.0</text:p>
          </table:table-cell>
          <table:table-cell table:style-name="ce129" office:value-type="string" calcext:value-type="string">
            <text:p>OIL SUPPLY TEMP SIGNAL FAULT</text:p>
          </table:table-cell>
          <table:table-cell office:value-type="string" calcext:value-type="string">
            <text:p>warning</text:p>
          </table:table-cell>
          <table:table-cell table:style-name="ce187" office:value-type="string" calcext:value-type="string">
            <text:p>OilSupplyTempSignalFault</text:p>
          </table:table-cell>
          <table:table-cell table:style-name="ce128" office:value-type="string" calcext:value-type="string">
            <text:p>вне диапазона температура масла</text:p>
          </table:table-cell>
          <table:table-cell table:style-name="ce128" office:value-type="string" calcext:value-type="string">
            <text:p>Сигнал вне допустимого диапазона: температура масла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8" calcext:value-type="float">
            <text:p>8</text:p>
          </table:table-cell>
          <table:table-cell table:style-name="ce128" table:formula="of:=COM.MICROSOFT.CONCAT([.$N$51];[.$N72];[.$O$1];[.$O72];[.$O$51];[.$P70])" office:value-type="string" office:string-value="Вне диапазона : Температура масла TE130 " calcext:value-type="string">
            <text:p>Вне диапазона : Температура масла TE130 </text:p>
          </table:table-cell>
          <table:table-cell/>
          <table:table-cell office:value-type="string" calcext:value-type="string">
            <text:p>rtdOutRange</text:p>
          </table:table-cell>
          <table:table-cell table:style-name="ce128" office:value-type="string" calcext:value-type="string">
            <text:p>ai14_OilSupplyTemperature</text:p>
          </table:table-cell>
          <table:table-cell office:value-type="string" calcext:value-type="string">
            <text:p>Температура масла</text:p>
          </table:table-cell>
          <table:table-cell office:value-type="string" calcext:value-type="string">
            <text:p>TE130</text:p>
          </table:table-cell>
          <table:table-cell table:number-columns-repeated="5"/>
        </table:table-row>
        <table:table-row table:style-name="ro1">
          <table:table-cell table:style-name="ce152"/>
          <table:table-cell table:style-name="ce129" office:value-type="string" calcext:value-type="string">
            <text:p>M234.1</text:p>
          </table:table-cell>
          <table:table-cell table:style-name="ce129" office:value-type="string" calcext:value-type="string">
            <text:p>#3 INLET TEMP SIGNAL FAULT</text:p>
          </table:table-cell>
          <table:table-cell office:value-type="string" calcext:value-type="string">
            <text:p>warning</text:p>
          </table:table-cell>
          <table:table-cell table:style-name="ce187" office:value-type="string" calcext:value-type="string">
            <text:p>Num3InletTempSignalFault</text:p>
          </table:table-cell>
          <table:table-cell table:style-name="ce128" office:value-type="string" calcext:value-type="string">
            <text:p>вне диапазона температура входа ступени 3</text:p>
          </table:table-cell>
          <table:table-cell table:style-name="ce128" office:value-type="string" calcext:value-type="string">
            <text:p>Сигнал вне допустимого диапазона: температура на входе ступени 3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9" calcext:value-type="float">
            <text:p>9</text:p>
          </table:table-cell>
          <table:table-cell table:style-name="ce128" table:formula="of:=COM.MICROSOFT.CONCAT([.$N$51];[.$N73];[.$O$1];[.$O73];[.$O$51];[.$P71])" office:value-type="string" office:string-value="Вне диапазона : Температура воздуха на входе 3 ступени TE231 " calcext:value-type="string">
            <text:p>Вне диапазона : Температура воздуха на входе 3 ступени TE231 </text:p>
          </table:table-cell>
          <table:table-cell/>
          <table:table-cell office:value-type="string" calcext:value-type="string">
            <text:p>rtdOutRange</text:p>
          </table:table-cell>
          <table:table-cell table:style-name="ce128" office:value-type="string" calcext:value-type="string">
            <text:p>ai15_Stage3InletTemperature</text:p>
          </table:table-cell>
          <table:table-cell office:value-type="string" calcext:value-type="string">
            <text:p>Температура воздуха на входе 3 ступени</text:p>
          </table:table-cell>
          <table:table-cell office:value-type="string" calcext:value-type="string">
            <text:p>TE231</text:p>
          </table:table-cell>
          <table:table-cell table:number-columns-repeated="5"/>
        </table:table-row>
        <table:table-row table:style-name="ro1">
          <table:table-cell table:style-name="ce152"/>
          <table:table-cell table:style-name="ce129" office:value-type="string" calcext:value-type="string">
            <text:p>M234.2</text:p>
          </table:table-cell>
          <table:table-cell table:style-name="ce129" office:value-type="string" calcext:value-type="string">
            <text:p>OIL RESV. TEMP SIGNAL FAULT</text:p>
          </table:table-cell>
          <table:table-cell office:value-type="string" calcext:value-type="string">
            <text:p>warning</text:p>
          </table:table-cell>
          <table:table-cell table:style-name="ce187" office:value-type="string" calcext:value-type="string">
            <text:p>OilResvTempSignalFault</text:p>
          </table:table-cell>
          <table:table-cell table:style-name="ce128" office:value-type="string" calcext:value-type="string">
            <text:p>вне диапазона температура масла резерв</text:p>
          </table:table-cell>
          <table:table-cell table:style-name="ce128" office:value-type="string" calcext:value-type="string">
            <text:p>Сигнал вне допустимого диапазона: температура масла, резерв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10" calcext:value-type="float">
            <text:p>10</text:p>
          </table:table-cell>
          <table:table-cell table:style-name="ce128" table:formula="of:=COM.MICROSOFT.CONCAT([.$N$51];[.$N74];[.$O$1];[.$O74];[.$O$51];[.$P72])" office:value-type="string" office:string-value="Вне диапазона : Температура масла в маслобаке TE101 " calcext:value-type="string">
            <text:p>Вне диапазона : Температура масла в маслобаке TE101 </text:p>
          </table:table-cell>
          <table:table-cell/>
          <table:table-cell office:value-type="string" calcext:value-type="string">
            <text:p>rtdOutRange</text:p>
          </table:table-cell>
          <table:table-cell table:style-name="ce128" office:value-type="string" calcext:value-type="string">
            <text:p>ai16_OilReservoirTemperature</text:p>
          </table:table-cell>
          <table:table-cell office:value-type="string" calcext:value-type="string">
            <text:p>Температура масла в маслобаке</text:p>
          </table:table-cell>
          <table:table-cell office:value-type="string" calcext:value-type="string">
            <text:p>TE101</text:p>
          </table:table-cell>
          <table:table-cell table:number-columns-repeated="5"/>
        </table:table-row>
        <table:table-row table:style-name="ro1">
          <table:table-cell table:style-name="ce152"/>
          <table:table-cell table:style-name="ce129" office:value-type="string" calcext:value-type="string">
            <text:p>M234.3</text:p>
          </table:table-cell>
          <table:table-cell table:style-name="ce129" office:value-type="string" calcext:value-type="string">
            <text:p>MOTOR «R» TEMP SIGNAL FAULT</text:p>
          </table:table-cell>
          <table:table-cell office:value-type="string" calcext:value-type="string">
            <text:p>warning</text:p>
          </table:table-cell>
          <table:table-cell table:style-name="ce187" office:value-type="string" calcext:value-type="string">
            <text:p>Motor_R_TempSignalFault</text:p>
          </table:table-cell>
          <table:table-cell table:style-name="ce128" office:value-type="string" calcext:value-type="string">
            <text:p>вне диапазона температура обмотки Р</text:p>
          </table:table-cell>
          <table:table-cell table:style-name="ce128" office:value-type="string" calcext:value-type="string">
            <text:p>Сигнал вне допустимого диапазона: температура обмотки «Р» двигателя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11" calcext:value-type="float">
            <text:p>11</text:p>
          </table:table-cell>
          <table:table-cell table:style-name="ce128" table:formula="of:=COM.MICROSOFT.CONCAT([.$N$51];[.$N75];[.$O$1];[.$O75];[.$O$51];[.$P73])" office:value-type="string" office:string-value="Вне диапазона : Температура обмотки двигателя &quot;R&quot; TE140 " calcext:value-type="string">
            <text:p>Вне диапазона : Температура обмотки двигателя "R" TE140 </text:p>
          </table:table-cell>
          <table:table-cell/>
          <table:table-cell office:value-type="string" calcext:value-type="string">
            <text:p>rtdOutRange</text:p>
          </table:table-cell>
          <table:table-cell table:style-name="ce128" office:value-type="string" calcext:value-type="string">
            <text:p>ai17_MotorWindingRTemperature</text:p>
          </table:table-cell>
          <table:table-cell office:value-type="string" calcext:value-type="string">
            <text:p>Температура обмотки двигателя "R"</text:p>
          </table:table-cell>
          <table:table-cell office:value-type="string" calcext:value-type="string">
            <text:p>TE140</text:p>
          </table:table-cell>
          <table:table-cell table:number-columns-repeated="5"/>
        </table:table-row>
        <table:table-row table:style-name="ro1">
          <table:table-cell table:style-name="ce152"/>
          <table:table-cell table:style-name="ce129" office:value-type="string" calcext:value-type="string">
            <text:p>M234.4</text:p>
          </table:table-cell>
          <table:table-cell table:style-name="ce129" office:value-type="string" calcext:value-type="string">
            <text:p>MOTOR «DE» TEMP SIGNAL FAULT</text:p>
          </table:table-cell>
          <table:table-cell office:value-type="string" calcext:value-type="string">
            <text:p>warning</text:p>
          </table:table-cell>
          <table:table-cell table:style-name="ce187" office:value-type="string" calcext:value-type="string">
            <text:p>Motor_DE_TempSignalFault</text:p>
          </table:table-cell>
          <table:table-cell table:style-name="ce128" office:value-type="string" calcext:value-type="string">
            <text:p>вне диапазона температура привод.конца двигателя</text:p>
          </table:table-cell>
          <table:table-cell table:style-name="ce128" office:value-type="string" calcext:value-type="string">
            <text:p>Сигнал вне допустимого диапазона: температура приводного конца двигателя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12" calcext:value-type="float">
            <text:p>12</text:p>
          </table:table-cell>
          <table:table-cell table:style-name="ce128" table:formula="of:=COM.MICROSOFT.CONCAT([.$N$51];[.$N76];[.$O$1];[.$O76];[.$O$51];[.$P74])" office:value-type="string" office:string-value="Вне диапазона : Температура DE подшипника TE143 " calcext:value-type="string">
            <text:p>Вне диапазона : Температура DE подшипника TE143 </text:p>
          </table:table-cell>
          <table:table-cell/>
          <table:table-cell office:value-type="string" calcext:value-type="string">
            <text:p>rtdOutRange</text:p>
          </table:table-cell>
          <table:table-cell table:style-name="ce128" office:value-type="string" calcext:value-type="string">
            <text:p>ai18_MotorBearingDETemperature</text:p>
          </table:table-cell>
          <table:table-cell office:value-type="string" calcext:value-type="string">
            <text:p>Температура DE подшипника</text:p>
          </table:table-cell>
          <table:table-cell office:value-type="string" calcext:value-type="string">
            <text:p>TE143</text:p>
          </table:table-cell>
          <table:table-cell table:number-columns-repeated="5"/>
        </table:table-row>
        <table:table-row table:style-name="ro1">
          <table:table-cell table:style-name="ce152"/>
          <table:table-cell table:style-name="ce129" office:value-type="string" calcext:value-type="string">
            <text:p>M234.5</text:p>
          </table:table-cell>
          <table:table-cell table:style-name="ce129" office:value-type="string" calcext:value-type="string">
            <text:p>MOTOR «NDE» TEMP SIGNAL FAULT</text:p>
          </table:table-cell>
          <table:table-cell office:value-type="string" calcext:value-type="string">
            <text:p>warning</text:p>
          </table:table-cell>
          <table:table-cell table:style-name="ce187" office:value-type="string" calcext:value-type="string">
            <text:p>Motor_NDE_TempSignalFault</text:p>
          </table:table-cell>
          <table:table-cell table:style-name="ce128" office:value-type="string" calcext:value-type="string">
            <text:p>вне диапазона температура непривод.конца двигателя</text:p>
          </table:table-cell>
          <table:table-cell table:style-name="ce128" office:value-type="string" calcext:value-type="string">
            <text:p>Сигнал вне допустимого диапазона: температура неприводного конца двигателя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13" calcext:value-type="float">
            <text:p>13</text:p>
          </table:table-cell>
          <table:table-cell table:style-name="ce128" table:formula="of:=COM.MICROSOFT.CONCAT([.$N$51];[.$N77];[.$O$1];[.$O77];[.$O$51];[.$P77])" office:value-type="string" office:string-value="Вне диапазона : Температура NDE подшипника TE144 " calcext:value-type="string">
            <text:p>Вне диапазона : Температура NDE подшипника TE144 </text:p>
          </table:table-cell>
          <table:table-cell/>
          <table:table-cell office:value-type="string" calcext:value-type="string">
            <text:p>rtdOutRange</text:p>
          </table:table-cell>
          <table:table-cell table:style-name="ce128" office:value-type="string" calcext:value-type="string">
            <text:p>ai19_MotorBearingNDETemperature</text:p>
          </table:table-cell>
          <table:table-cell office:value-type="string" calcext:value-type="string">
            <text:p>Температура NDE подшипника</text:p>
          </table:table-cell>
          <table:table-cell office:value-type="string" calcext:value-type="string">
            <text:p>TE144</text:p>
          </table:table-cell>
          <table:table-cell table:number-columns-repeated="5"/>
        </table:table-row>
        <table:table-row table:style-name="ro1">
          <table:table-cell table:style-name="ce152"/>
          <table:table-cell table:style-name="ce129" office:value-type="string" calcext:value-type="string">
            <text:p>M234.6</text:p>
          </table:table-cell>
          <table:table-cell table:style-name="ce129" office:value-type="string" calcext:value-type="string">
            <text:p>#2 INLET TEMP SIGNAL FAULT</text:p>
          </table:table-cell>
          <table:table-cell office:value-type="string" calcext:value-type="string">
            <text:p>warning</text:p>
          </table:table-cell>
          <table:table-cell table:style-name="ce187" office:value-type="string" calcext:value-type="string">
            <text:p>Num2InletTempSignalFault</text:p>
          </table:table-cell>
          <table:table-cell table:style-name="ce128" office:value-type="string" calcext:value-type="string">
            <text:p>вне диапазона температура входа ступени 2</text:p>
          </table:table-cell>
          <table:table-cell table:style-name="ce128" office:value-type="string" calcext:value-type="string">
            <text:p>Сигнал вне допустимого диапазона: температура на входе ступени 2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14" calcext:value-type="float">
            <text:p>14</text:p>
          </table:table-cell>
          <table:table-cell table:style-name="ce128" table:formula="of:=COM.MICROSOFT.CONCAT([.$N$51];[.$N78];[.$O$1];[.$O78];[.$O$51];[.$P80])" office:value-type="string" office:string-value="Вне диапазона : Температура воздуха на входе 2 ступени TE221 " calcext:value-type="string">
            <text:p>Вне диапазона : Температура воздуха на входе 2 ступени TE221 </text:p>
          </table:table-cell>
          <table:table-cell/>
          <table:table-cell office:value-type="string" calcext:value-type="string">
            <text:p>rtdOutRange</text:p>
          </table:table-cell>
          <table:table-cell table:style-name="ce128" office:value-type="string" calcext:value-type="string">
            <text:p>ai20_Stage2InletTemperature</text:p>
          </table:table-cell>
          <table:table-cell office:value-type="string" calcext:value-type="string">
            <text:p>Температура воздуха на входе 2 ступени</text:p>
          </table:table-cell>
          <table:table-cell office:value-type="string" calcext:value-type="string">
            <text:p>TE221</text:p>
          </table:table-cell>
          <table:table-cell table:number-columns-repeated="5"/>
        </table:table-row>
        <table:table-row table:style-name="ro1">
          <table:table-cell table:style-name="ce152"/>
          <table:table-cell table:style-name="ce82" office:value-type="string" calcext:value-type="string">
            <text:p>M234.7</text:p>
          </table:table-cell>
          <table:table-cell table:style-name="ce124"/>
          <table:table-cell office:value-type="string" calcext:value-type="string">
            <text:p>warning</text:p>
          </table:table-cell>
          <table:table-cell table:number-columns-repeated="3"/>
          <table:table-cell table:style-name="Default"/>
          <table:table-cell office:value-type="float" office:value="15" calcext:value-type="float">
            <text:p>15</text:p>
          </table:table-cell>
          <table:table-cell table:formula="of:=COM.MICROSOFT.CONCAT([.$N$51];[.$N79];[.$O$1];[.$O79];[.$O$51];[.$P81])" office:value-type="string" office:string-value="Вне диапазона :   " calcext:value-type="string">
            <text:p>Вне диапазона : <text:s text:c="2"/></text:p>
          </table:table-cell>
          <table:table-cell table:number-columns-repeated="10"/>
        </table:table-row>
        <table:table-row table:style-name="ro1">
          <table:table-cell table:style-name="ce152"/>
          <table:table-cell table:style-name="ce82" office:value-type="string" calcext:value-type="string">
            <text:p>M235.0</text:p>
          </table:table-cell>
          <table:table-cell table:style-name="ce124"/>
          <table:table-cell office:value-type="string" calcext:value-type="string">
            <text:p>warning</text:p>
          </table:table-cell>
          <table:table-cell table:style-name="ce113"/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table:formula="of:=COM.MICROSOFT.CONCAT([.$N$51];[.$N80];[.$O$1];[.$O80];[.$O$51];[.$P82])" office:value-type="string" office:string-value="Вне диапазона :   " calcext:value-type="string">
            <text:p>Вне диапазона : <text:s text:c="2"/></text:p>
          </table:table-cell>
          <table:table-cell table:number-columns-repeated="10"/>
        </table:table-row>
        <table:table-row table:style-name="ro1">
          <table:table-cell table:style-name="ce152"/>
          <table:table-cell table:style-name="ce82" office:value-type="string" calcext:value-type="string">
            <text:p>M235.1</text:p>
          </table:table-cell>
          <table:table-cell table:style-name="ce82" office:value-type="string" calcext:value-type="string">
            <text:p>#1 OUT TEMP SIGNAL FAULT</text:p>
          </table:table-cell>
          <table:table-cell office:value-type="string" calcext:value-type="string">
            <text:p>warning</text:p>
          </table:table-cell>
          <table:table-cell table:style-name="ce150" office:value-type="string" calcext:value-type="string">
            <text:p>Num1OutTempSignalFault</text:p>
          </table:table-cell>
          <table:table-cell table:style-name="ce80" office:value-type="string" calcext:value-type="string">
            <text:p>вне диапазона температура выхода ступени 1</text:p>
          </table:table-cell>
          <table:table-cell table:style-name="ce80" office:value-type="string" calcext:value-type="string">
            <text:p>Сигнал вне допустимого диапазона: температура на выходе ступени 1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1" calcext:value-type="float">
            <text:p>1</text:p>
          </table:table-cell>
          <table:table-cell table:style-name="ce80" table:formula="of:=COM.MICROSOFT.CONCAT([.$N$51];[.$N81];[.$O$1];[.$O81];[.$O$51];[.$P83])" office:value-type="string" office:string-value="Вне диапазона : Температура воздуха на выходе 1 ступени TE212 " calcext:value-type="string">
            <text:p>Вне диапазона : Температура воздуха на выходе 1 ступени TE212 </text:p>
          </table:table-cell>
          <table:table-cell/>
          <table:table-cell office:value-type="string" calcext:value-type="string">
            <text:p>rtdOutRange</text:p>
          </table:table-cell>
          <table:table-cell table:style-name="ce80" office:value-type="string" calcext:value-type="string">
            <text:p>ai21_N1OutletTemp</text:p>
          </table:table-cell>
          <table:table-cell office:value-type="string" calcext:value-type="string">
            <text:p>Температура воздуха на выходе 1 ступени</text:p>
          </table:table-cell>
          <table:table-cell office:value-type="string" calcext:value-type="string">
            <text:p>TE212</text:p>
          </table:table-cell>
          <table:table-cell table:number-columns-repeated="5"/>
        </table:table-row>
        <table:table-row table:style-name="ro1">
          <table:table-cell table:style-name="ce152"/>
          <table:table-cell table:style-name="ce82" office:value-type="string" calcext:value-type="string">
            <text:p>M235.2</text:p>
          </table:table-cell>
          <table:table-cell table:style-name="ce82" office:value-type="string" calcext:value-type="string">
            <text:p>#2 OUT TEMP SIGNAL FAULT</text:p>
          </table:table-cell>
          <table:table-cell office:value-type="string" calcext:value-type="string">
            <text:p>warning</text:p>
          </table:table-cell>
          <table:table-cell table:style-name="ce150" office:value-type="string" calcext:value-type="string">
            <text:p>Num2OutTempSignalFault</text:p>
          </table:table-cell>
          <table:table-cell table:style-name="ce80" office:value-type="string" calcext:value-type="string">
            <text:p>вне диапазона температура выхода ступени 2</text:p>
          </table:table-cell>
          <table:table-cell table:style-name="ce80" office:value-type="string" calcext:value-type="string">
            <text:p>Сигнал вне допустимого диапазона: температура на выходе ступени 2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2" calcext:value-type="float">
            <text:p>2</text:p>
          </table:table-cell>
          <table:table-cell table:style-name="ce80" table:formula="of:=COM.MICROSOFT.CONCAT([.$N$51];[.$N82];[.$O$1];[.$O82];[.$O$51];[.$P84])" office:value-type="string" office:string-value="Вне диапазона : Температура воздуха на выходе 2 ступени TE222 " calcext:value-type="string">
            <text:p>Вне диапазона : Температура воздуха на выходе 2 ступени TE222 </text:p>
          </table:table-cell>
          <table:table-cell/>
          <table:table-cell office:value-type="string" calcext:value-type="string">
            <text:p>rtdOutRange</text:p>
          </table:table-cell>
          <table:table-cell table:style-name="ce80" office:value-type="string" calcext:value-type="string">
            <text:p>ai22_N2OutletTemp</text:p>
          </table:table-cell>
          <table:table-cell office:value-type="string" calcext:value-type="string">
            <text:p>Температура воздуха на выходе 2 ступени</text:p>
          </table:table-cell>
          <table:table-cell office:value-type="string" calcext:value-type="string">
            <text:p>TE222</text:p>
          </table:table-cell>
          <table:table-cell table:number-columns-repeated="5"/>
        </table:table-row>
        <table:table-row table:style-name="ro1">
          <table:table-cell table:style-name="ce152"/>
          <table:table-cell table:style-name="ce82" office:value-type="string" calcext:value-type="string">
            <text:p>M235.3</text:p>
          </table:table-cell>
          <table:table-cell table:style-name="ce82" office:value-type="string" calcext:value-type="string">
            <text:p>#3 OUT TEMP SIGNAL FAULT</text:p>
          </table:table-cell>
          <table:table-cell office:value-type="string" calcext:value-type="string">
            <text:p>warning</text:p>
          </table:table-cell>
          <table:table-cell table:style-name="ce150" office:value-type="string" calcext:value-type="string">
            <text:p>Num3OutTempSignalFault</text:p>
          </table:table-cell>
          <table:table-cell table:style-name="ce80" office:value-type="string" calcext:value-type="string">
            <text:p>вне диапазона температура выхода ступени 3</text:p>
          </table:table-cell>
          <table:table-cell table:style-name="ce80" office:value-type="string" calcext:value-type="string">
            <text:p>Сигнал вне допустимого диапазона: температура на выходе ступени 3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3" calcext:value-type="float">
            <text:p>3</text:p>
          </table:table-cell>
          <table:table-cell table:style-name="ce80" table:formula="of:=COM.MICROSOFT.CONCAT([.$N$51];[.$N83];[.$O$1];[.$O83];[.$O$51];[.$P85])" office:value-type="string" office:string-value="Вне диапазона : Температура воздуха на выходе 3 ступени TE232 " calcext:value-type="string">
            <text:p>Вне диапазона : Температура воздуха на выходе 3 ступени TE232 </text:p>
          </table:table-cell>
          <table:table-cell/>
          <table:table-cell office:value-type="string" calcext:value-type="string">
            <text:p>rtdOutRange</text:p>
          </table:table-cell>
          <table:table-cell table:style-name="ce80" office:value-type="string" calcext:value-type="string">
            <text:p>ai23_N3OutletTemp</text:p>
          </table:table-cell>
          <table:table-cell office:value-type="string" calcext:value-type="string">
            <text:p>Температура воздуха на выходе 3 ступени</text:p>
          </table:table-cell>
          <table:table-cell office:value-type="string" calcext:value-type="string">
            <text:p>TE232</text:p>
          </table:table-cell>
          <table:table-cell table:number-columns-repeated="5"/>
        </table:table-row>
        <table:table-row table:style-name="ro1">
          <table:table-cell table:style-name="ce80"/>
          <table:table-cell table:style-name="ce82" office:value-type="string" calcext:value-type="string">
            <text:p>M235.4</text:p>
          </table:table-cell>
          <table:table-cell table:style-name="ce82" office:value-type="string" calcext:value-type="string">
            <text:p>C/W INLET TEMP SIGNAL FAULT</text:p>
          </table:table-cell>
          <table:table-cell office:value-type="string" calcext:value-type="string">
            <text:p>warning</text:p>
          </table:table-cell>
          <table:table-cell table:style-name="ce150" office:value-type="string" calcext:value-type="string">
            <text:p>CoolingWaterInletTempSignalFault</text:p>
          </table:table-cell>
          <table:table-cell table:style-name="ce80" office:value-type="string" calcext:value-type="string">
            <text:p>вне диапазона температура охлаждающей воды</text:p>
          </table:table-cell>
          <table:table-cell table:style-name="ce80" office:value-type="string" calcext:value-type="string">
            <text:p>Сигнал вне допустимого диапазона: температура на подаче охлаждающей воды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4" calcext:value-type="float">
            <text:p>4</text:p>
          </table:table-cell>
          <table:table-cell table:style-name="ce80" table:formula="of:=COM.MICROSOFT.CONCAT([.$N$51];[.$N84];[.$O$1];[.$O84];[.$O$51];[.$P86])" office:value-type="string" office:string-value="Вне диапазона : Температура охлаждающей воды на входе TE301 " calcext:value-type="string">
            <text:p>Вне диапазона : Температура охлаждающей воды на входе TE301 </text:p>
          </table:table-cell>
          <table:table-cell/>
          <table:table-cell office:value-type="string" calcext:value-type="string">
            <text:p>rtdOutRange</text:p>
          </table:table-cell>
          <table:table-cell table:style-name="ce80" office:value-type="string" calcext:value-type="string">
            <text:p>ai24_CoolingWaterSupplyTemp</text:p>
          </table:table-cell>
          <table:table-cell office:value-type="string" calcext:value-type="string">
            <text:p>Температура охлаждающей воды на входе</text:p>
          </table:table-cell>
          <table:table-cell office:value-type="string" calcext:value-type="string">
            <text:p>TE301</text:p>
          </table:table-cell>
          <table:table-cell table:number-columns-repeated="5"/>
        </table:table-row>
        <table:table-row table:style-name="ro1">
          <table:table-cell table:style-name="ce80"/>
          <table:table-cell table:style-name="ce82" office:value-type="string" calcext:value-type="string">
            <text:p>M235.5</text:p>
          </table:table-cell>
          <table:table-cell table:style-name="ce82" office:value-type="string" calcext:value-type="string">
            <text:p>C/W OUTLET TEMP SIGNAL FAULT</text:p>
          </table:table-cell>
          <table:table-cell office:value-type="string" calcext:value-type="string">
            <text:p>warning</text:p>
          </table:table-cell>
          <table:table-cell table:style-name="ce150" office:value-type="string" calcext:value-type="string">
            <text:p>CoolingWaterOutletTempSignalFault</text:p>
          </table:table-cell>
          <table:table-cell table:style-name="ce80" office:value-type="string" calcext:value-type="string">
            <text:p>вне диапазона температура возвратной воды</text:p>
          </table:table-cell>
          <table:table-cell table:style-name="ce80" office:value-type="string" calcext:value-type="string">
            <text:p>Сигнал вне допустимого диапазона: температура на возврате охлаждающей воды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5" calcext:value-type="float">
            <text:p>5</text:p>
          </table:table-cell>
          <table:table-cell table:style-name="ce80" table:formula="of:=COM.MICROSOFT.CONCAT([.$N$51];[.$N85];[.$O$1];[.$O85];[.$O$51];[.$P87])" office:value-type="string" office:string-value="Вне диапазона : Температура охлаждающей воды на выходе TE302 " calcext:value-type="string">
            <text:p>Вне диапазона : Температура охлаждающей воды на выходе TE302 </text:p>
          </table:table-cell>
          <table:table-cell/>
          <table:table-cell office:value-type="string" calcext:value-type="string">
            <text:p>rtdOutRange</text:p>
          </table:table-cell>
          <table:table-cell table:style-name="ce80" office:value-type="string" calcext:value-type="string">
            <text:p>ai25_CoolingWateReturnTemp</text:p>
          </table:table-cell>
          <table:table-cell office:value-type="string" calcext:value-type="string">
            <text:p>Температура охлаждающей воды на выходе</text:p>
          </table:table-cell>
          <table:table-cell office:value-type="string" calcext:value-type="string">
            <text:p>TE302</text:p>
          </table:table-cell>
          <table:table-cell table:number-columns-repeated="5"/>
        </table:table-row>
        <table:table-row table:style-name="ro2">
          <table:table-cell table:style-name="ce80"/>
          <table:table-cell table:style-name="ce82" office:value-type="string" calcext:value-type="string">
            <text:p>M235.6</text:p>
          </table:table-cell>
          <table:table-cell/>
          <table:table-cell table:style-name="ce80"/>
          <table:table-cell table:number-columns-repeated="3"/>
          <table:table-cell table:style-name="Default"/>
          <table:table-cell office:value-type="float" office:value="6" calcext:value-type="float">
            <text:p>6</text:p>
          </table:table-cell>
          <table:table-cell table:style-name="ce80" table:formula="of:=COM.MICROSOFT.CONCAT([.$N$51];[.$N86];[.$O$1];[.$O86];[.$O$51];[.$P88])" office:value-type="string" office:string-value="Вне диапазона :   " calcext:value-type="string">
            <text:p>Вне диапазона : <text:s text:c="2"/></text:p>
          </table:table-cell>
          <table:table-cell table:number-columns-repeated="10"/>
        </table:table-row>
        <table:table-row table:style-name="ro2">
          <table:table-cell table:style-name="ce80"/>
          <table:table-cell table:style-name="ce168" office:value-type="string" calcext:value-type="string">
            <text:p>MW230</text:p>
          </table:table-cell>
          <table:table-cell table:style-name="ce168" office:value-type="string" calcext:value-type="string">
            <text:p>PT_Event Messages <text:s/>1</text:p>
          </table:table-cell>
          <table:table-cell table:style-name="ce168" office:value-type="string" calcext:value-type="string">
            <text:p>all above</text:p>
          </table:table-cell>
          <table:table-cell table:style-name="ce188" office:value-type="string" calcext:value-type="string">
            <text:p>EventMessGroupFlag1</text:p>
          </table:table-cell>
          <table:table-cell table:style-name="ce166" office:value-type="string" calcext:value-type="string">
            <text:p>группа событий 1</text:p>
          </table:table-cell>
          <table:table-cell table:style-name="ce166"/>
          <table:table-cell table:style-name="ce166" office:value-type="string" calcext:value-type="string">
            <text:p>S7:[VetrolCompr_1]MWORD230</text:p>
          </table:table-cell>
          <table:table-cell table:number-columns-repeated="12"/>
        </table:table-row>
        <table:table-row table:style-name="ro2">
          <table:table-cell/>
          <table:table-cell table:style-name="ce168" office:value-type="string" calcext:value-type="string">
            <text:p>MW232</text:p>
          </table:table-cell>
          <table:table-cell table:style-name="ce168" office:value-type="string" calcext:value-type="string">
            <text:p>PT_Event Messages <text:s/>2</text:p>
          </table:table-cell>
          <table:table-cell table:style-name="ce168" office:value-type="string" calcext:value-type="string">
            <text:p>all above</text:p>
          </table:table-cell>
          <table:table-cell table:style-name="ce188" office:value-type="string" calcext:value-type="string">
            <text:p>EventMessGroupFlag2</text:p>
          </table:table-cell>
          <table:table-cell table:style-name="ce166" office:value-type="string" calcext:value-type="string">
            <text:p>группа событий 2</text:p>
          </table:table-cell>
          <table:table-cell table:style-name="ce166"/>
          <table:table-cell table:style-name="ce166" office:value-type="string" calcext:value-type="string">
            <text:p>S7:[VetrolCompr_1]MWORD232</text:p>
          </table:table-cell>
          <table:table-cell table:number-columns-repeated="12"/>
        </table:table-row>
        <table:table-row table:style-name="ro2">
          <table:table-cell/>
          <table:table-cell table:style-name="ce168" office:value-type="string" calcext:value-type="string">
            <text:p>MW234</text:p>
          </table:table-cell>
          <table:table-cell table:style-name="ce168" office:value-type="string" calcext:value-type="string">
            <text:p>PT_Event Messages <text:s/>3</text:p>
          </table:table-cell>
          <table:table-cell table:style-name="ce168" office:value-type="string" calcext:value-type="string">
            <text:p>all above</text:p>
          </table:table-cell>
          <table:table-cell table:style-name="ce188" office:value-type="string" calcext:value-type="string">
            <text:p>EventMessGroupFlag3</text:p>
          </table:table-cell>
          <table:table-cell table:style-name="ce166" office:value-type="string" calcext:value-type="string">
            <text:p>группа событий 3</text:p>
          </table:table-cell>
          <table:table-cell table:style-name="ce166"/>
          <table:table-cell table:style-name="ce166" office:value-type="string" calcext:value-type="string">
            <text:p>S7:[VetrolCompr_1]MWORD234</text:p>
          </table:table-cell>
          <table:table-cell table:number-columns-repeated="12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Номер бита в теге «PT_Event Messages <text:s/>*» («eventMessGroupFlag*»)</text:p>
          </table:table-cell>
          <table:table-cell table:number-columns-repeated="11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/>
          <table:table-cell table:style-name="ce82" office:value-type="string" calcext:value-type="string">
            <text:p>SYSTEM TEMP SIGNAL FAULT</text:p>
          </table:table-cell>
          <table:table-cell office:value-type="string" calcext:value-type="string">
            <text:p>warning</text:p>
          </table:table-cell>
          <table:table-cell table:style-name="ce113" office:value-type="string" calcext:value-type="string">
            <text:p>SystemTempSignalFault</text:p>
          </table:table-cell>
          <table:table-cell office:value-type="string" calcext:value-type="string">
            <text:p>вне диапазона системная температура</text:p>
          </table:table-cell>
          <table:table-cell office:value-type="string" calcext:value-type="string">
            <text:p>Сигнал вне допустимого диапазона: системная температура</text:p>
          </table:table-cell>
          <table:table-cell table:style-name="Default"/>
          <table:table-cell/>
          <table:table-cell table:style-name="ce128" office:value-type="string" calcext:value-type="string">
            <text:p>не используется</text:p>
          </table:table-cell>
          <table:table-cell table:number-columns-repeated="10"/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2"/>
        </table:table-row>
        <table:table-row table:style-name="ro4">
          <table:table-cell/>
          <table:table-cell table:style-name="ce150"/>
          <table:table-cell table:style-name="ce152"/>
          <table:table-cell table:style-name="ce185"/>
          <table:table-cell table:style-name="ce152" table:number-columns-repeated="3"/>
          <table:table-cell table:style-name="ce150"/>
          <table:table-cell table:style-name="ce189"/>
          <table:table-cell table:style-name="ce150"/>
          <table:table-cell table:number-columns-repeated="10"/>
        </table:table-row>
        <table:table-row table:style-name="ro4">
          <table:table-cell/>
          <table:table-cell table:style-name="ce150"/>
          <table:table-cell table:style-name="ce152"/>
          <table:table-cell table:style-name="ce185"/>
          <table:table-cell table:style-name="ce152" table:number-columns-repeated="4"/>
          <table:table-cell table:style-name="ce80"/>
          <table:table-cell table:style-name="ce152"/>
          <table:table-cell table:number-columns-repeated="10"/>
        </table:table-row>
        <table:table-row table:style-name="ro4" table:number-rows-repeated="3">
          <table:table-cell/>
          <table:table-cell table:style-name="ce150"/>
          <table:table-cell table:style-name="ce152"/>
          <table:table-cell table:style-name="ce185"/>
          <table:table-cell table:style-name="ce152" table:number-columns-repeated="4"/>
          <table:table-cell table:style-name="ce80"/>
          <table:table-cell table:style-name="ce152"/>
          <table:table-cell/>
          <table:table-cell table:style-name="ce80" table:number-columns-repeated="9"/>
        </table:table-row>
        <table:table-row table:style-name="ro4">
          <table:table-cell/>
          <table:table-cell table:style-name="ce150"/>
          <table:table-cell table:style-name="ce152"/>
          <table:table-cell table:style-name="ce185"/>
          <table:table-cell table:style-name="ce152" table:number-columns-repeated="3"/>
          <table:table-cell table:style-name="ce150"/>
          <table:table-cell table:style-name="ce189"/>
          <table:table-cell table:style-name="ce80" table:number-columns-repeated="11"/>
        </table:table-row>
        <table:table-row table:style-name="ro2" table:number-rows-repeated="2">
          <table:table-cell/>
          <table:table-cell table:style-name="ce80" table:number-columns-repeated="3"/>
          <table:table-cell table:number-columns-repeated="2"/>
          <table:table-cell table:style-name="ce80"/>
          <table:table-cell/>
          <table:table-cell table:style-name="ce80" table:number-columns-repeated="12"/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2"/>
        </table:table-row>
        <table:table-row table:style-name="ro4">
          <table:table-cell/>
          <table:table-cell office:value-type="string" calcext:value-type="string">
            <text:p>IGV</text:p>
          </table:table-cell>
          <table:table-cell/>
          <table:table-cell table:style-name="Default"/>
          <table:table-cell table:style-name="ce152"/>
          <table:table-cell table:number-columns-repeated="2"/>
          <table:table-cell table:style-name="ce152" table:number-columns-repeated="3"/>
          <table:table-cell table:number-columns-repeated="10"/>
        </table:table-row>
        <table:table-row table:style-name="ro4">
          <table:table-cell/>
          <table:table-cell office:value-type="string" calcext:value-type="string">
            <text:p>BOV</text:p>
          </table:table-cell>
          <table:table-cell/>
          <table:table-cell table:style-name="Default"/>
          <table:table-cell table:style-name="ce152"/>
          <table:table-cell table:number-columns-repeated="2"/>
          <table:table-cell table:style-name="ce152" table:number-columns-repeated="3"/>
          <table:table-cell table:number-columns-repeated="10"/>
        </table:table-row>
        <table:table-row table:style-name="ro4">
          <table:table-cell/>
          <table:table-cell table:style-name="ce82" office:value-type="string" calcext:value-type="string">
            <text:p>PT260</text:p>
          </table:table-cell>
          <table:table-cell/>
          <table:table-cell table:style-name="Default"/>
          <table:table-cell table:style-name="ce152"/>
          <table:table-cell table:number-columns-repeated="2"/>
          <table:table-cell table:style-name="ce152" table:number-columns-repeated="3"/>
          <table:table-cell table:number-columns-repeated="10"/>
        </table:table-row>
        <table:table-row table:style-name="ro4">
          <table:table-cell/>
          <table:table-cell office:value-type="string" calcext:value-type="string">
            <text:p>PT232</text:p>
          </table:table-cell>
          <table:table-cell/>
          <table:table-cell table:style-name="Default"/>
          <table:table-cell table:style-name="ce152"/>
          <table:table-cell table:number-columns-repeated="2"/>
          <table:table-cell table:style-name="ce152" table:number-columns-repeated="3"/>
          <table:table-cell table:number-columns-repeated="10"/>
        </table:table-row>
        <table:table-row table:style-name="ro4">
          <table:table-cell/>
          <table:table-cell office:value-type="string" calcext:value-type="string">
            <text:p>PT130</text:p>
          </table:table-cell>
          <table:table-cell/>
          <table:table-cell table:style-name="Default"/>
          <table:table-cell table:style-name="ce152"/>
          <table:table-cell table:number-columns-repeated="2"/>
          <table:table-cell table:style-name="ce152" table:number-columns-repeated="3"/>
          <table:table-cell table:number-columns-repeated="10"/>
        </table:table-row>
        <table:table-row table:style-name="ro4">
          <table:table-cell/>
          <table:table-cell office:value-type="string" calcext:value-type="string">
            <text:p>VT#1</text:p>
          </table:table-cell>
          <table:table-cell/>
          <table:table-cell table:style-name="Default"/>
          <table:table-cell table:style-name="ce152"/>
          <table:table-cell table:number-columns-repeated="2"/>
          <table:table-cell table:style-name="ce152" table:number-columns-repeated="3"/>
          <table:table-cell table:number-columns-repeated="10"/>
        </table:table-row>
        <table:table-row table:style-name="ro4">
          <table:table-cell/>
          <table:table-cell office:value-type="string" calcext:value-type="string">
            <text:p>VT#2</text:p>
          </table:table-cell>
          <table:table-cell/>
          <table:table-cell table:style-name="Default"/>
          <table:table-cell table:style-name="ce152"/>
          <table:table-cell table:number-columns-repeated="2"/>
          <table:table-cell table:style-name="ce152" table:number-columns-repeated="3"/>
          <table:table-cell table:number-columns-repeated="10"/>
        </table:table-row>
        <table:table-row table:style-name="ro4">
          <table:table-cell/>
          <table:table-cell office:value-type="string" calcext:value-type="string">
            <text:p>VT#3</text:p>
          </table:table-cell>
          <table:table-cell/>
          <table:table-cell table:style-name="Default"/>
          <table:table-cell table:style-name="ce152"/>
          <table:table-cell table:number-columns-repeated="2"/>
          <table:table-cell table:style-name="ce152" table:number-columns-repeated="3"/>
          <table:table-cell table:number-columns-repeated="10"/>
        </table:table-row>
        <table:table-row table:style-name="ro4">
          <table:table-cell/>
          <table:table-cell office:value-type="string" calcext:value-type="string">
            <text:p>PDT120</text:p>
          </table:table-cell>
          <table:table-cell/>
          <table:table-cell table:style-name="Default"/>
          <table:table-cell table:style-name="ce152"/>
          <table:table-cell table:number-columns-repeated="2"/>
          <table:table-cell table:style-name="ce152" table:number-columns-repeated="3"/>
          <table:table-cell table:number-columns-repeated="10"/>
        </table:table-row>
        <table:table-row table:style-name="ro4">
          <table:table-cell/>
          <table:table-cell table:style-name="ce129" office:value-type="string" calcext:value-type="string">
            <text:p>TD140</text:p>
          </table:table-cell>
          <table:table-cell/>
          <table:table-cell table:style-name="Default"/>
          <table:table-cell table:style-name="ce152"/>
          <table:table-cell table:number-columns-repeated="2"/>
          <table:table-cell table:style-name="ce152" table:number-columns-repeated="3"/>
          <table:table-cell table:number-columns-repeated="10"/>
        </table:table-row>
        <table:table-row table:style-name="ro4">
          <table:table-cell/>
          <table:table-cell office:value-type="string" calcext:value-type="string">
            <text:p>PT301</text:p>
          </table:table-cell>
          <table:table-cell/>
          <table:table-cell table:style-name="Default"/>
          <table:table-cell table:style-name="ce152"/>
          <table:table-cell table:number-columns-repeated="2"/>
          <table:table-cell table:style-name="ce152" table:number-columns-repeated="3"/>
          <table:table-cell table:number-columns-repeated="10"/>
        </table:table-row>
        <table:table-row table:style-name="ro4">
          <table:table-cell/>
          <table:table-cell office:value-type="string" calcext:value-type="string">
            <text:p>VT#5</text:p>
          </table:table-cell>
          <table:table-cell/>
          <table:table-cell table:style-name="Default"/>
          <table:table-cell table:style-name="ce152"/>
          <table:table-cell table:number-columns-repeated="2"/>
          <table:table-cell table:style-name="ce152" table:number-columns-repeated="3"/>
          <table:table-cell table:number-columns-repeated="10"/>
        </table:table-row>
        <table:table-row table:style-name="ro4">
          <table:table-cell/>
          <table:table-cell office:value-type="string" calcext:value-type="string">
            <text:p>VT#6</text:p>
          </table:table-cell>
          <table:table-cell/>
          <table:table-cell table:style-name="Default"/>
          <table:table-cell table:style-name="ce152"/>
          <table:table-cell table:number-columns-repeated="2"/>
          <table:table-cell table:style-name="ce152" table:number-columns-repeated="3"/>
          <table:table-cell table:number-columns-repeated="10"/>
        </table:table-row>
        <table:table-row table:style-name="ro4">
          <table:table-cell/>
          <table:table-cell office:value-type="string" calcext:value-type="string">
            <text:p>TE130</text:p>
          </table:table-cell>
          <table:table-cell/>
          <table:table-cell table:style-name="Default"/>
          <table:table-cell table:style-name="ce152"/>
          <table:table-cell table:number-columns-repeated="2"/>
          <table:table-cell table:style-name="ce152" table:number-columns-repeated="3"/>
          <table:table-cell table:number-columns-repeated="10"/>
        </table:table-row>
        <table:table-row table:style-name="ro4">
          <table:table-cell/>
          <table:table-cell office:value-type="string" calcext:value-type="string">
            <text:p>TE231</text:p>
          </table:table-cell>
          <table:table-cell/>
          <table:table-cell table:style-name="Default"/>
          <table:table-cell table:style-name="ce152"/>
          <table:table-cell table:number-columns-repeated="2"/>
          <table:table-cell table:style-name="ce152" table:number-columns-repeated="3"/>
          <table:table-cell table:number-columns-repeated="10"/>
        </table:table-row>
        <table:table-row table:style-name="ro4">
          <table:table-cell/>
          <table:table-cell office:value-type="string" calcext:value-type="string">
            <text:p>TE101</text:p>
          </table:table-cell>
          <table:table-cell/>
          <table:table-cell table:style-name="Default"/>
          <table:table-cell table:style-name="ce152"/>
          <table:table-cell table:number-columns-repeated="2"/>
          <table:table-cell table:style-name="ce152" table:number-columns-repeated="3"/>
          <table:table-cell table:number-columns-repeated="10"/>
        </table:table-row>
        <table:table-row table:style-name="ro4">
          <table:table-cell/>
          <table:table-cell office:value-type="string" calcext:value-type="string">
            <text:p>TE140</text:p>
          </table:table-cell>
          <table:table-cell/>
          <table:table-cell table:style-name="Default"/>
          <table:table-cell table:style-name="ce152"/>
          <table:table-cell table:number-columns-repeated="2"/>
          <table:table-cell table:style-name="ce152" table:number-columns-repeated="3"/>
          <table:table-cell table:number-columns-repeated="10"/>
        </table:table-row>
        <table:table-row table:style-name="ro4">
          <table:table-cell/>
          <table:table-cell table:style-name="ce170" office:value-type="string" calcext:value-type="string">
            <text:p>TE143</text:p>
          </table:table-cell>
          <table:table-cell/>
          <table:table-cell table:style-name="Default"/>
          <table:table-cell table:style-name="ce152"/>
          <table:table-cell table:number-columns-repeated="2"/>
          <table:table-cell table:style-name="ce152" table:number-columns-repeated="3"/>
          <table:table-cell table:number-columns-repeated="10"/>
        </table:table-row>
        <table:table-row table:style-name="ro4">
          <table:table-cell/>
          <table:table-cell table:style-name="ce170" office:value-type="string" calcext:value-type="string">
            <text:p>TE144</text:p>
          </table:table-cell>
          <table:table-cell/>
          <table:table-cell table:style-name="Default"/>
          <table:table-cell table:style-name="ce152"/>
          <table:table-cell table:number-columns-repeated="2"/>
          <table:table-cell table:style-name="ce152" table:number-columns-repeated="3"/>
          <table:table-cell table:number-columns-repeated="10"/>
        </table:table-row>
        <table:table-row table:style-name="ro4">
          <table:table-cell/>
          <table:table-cell table:style-name="ce170" office:value-type="string" calcext:value-type="string">
            <text:p>TE221</text:p>
          </table:table-cell>
          <table:table-cell/>
          <table:table-cell table:style-name="Default"/>
          <table:table-cell table:style-name="ce152"/>
          <table:table-cell table:number-columns-repeated="2"/>
          <table:table-cell table:style-name="ce152" table:number-columns-repeated="3"/>
          <table:table-cell table:number-columns-repeated="10"/>
        </table:table-row>
        <table:table-row table:style-name="ro4">
          <table:table-cell/>
          <table:table-cell office:value-type="string" calcext:value-type="string">
            <text:p>TE212</text:p>
          </table:table-cell>
          <table:table-cell/>
          <table:table-cell table:style-name="Default"/>
          <table:table-cell table:style-name="ce152"/>
          <table:table-cell table:number-columns-repeated="2"/>
          <table:table-cell table:style-name="ce152" table:number-columns-repeated="3"/>
          <table:table-cell table:number-columns-repeated="10"/>
        </table:table-row>
        <table:table-row table:style-name="ro4">
          <table:table-cell/>
          <table:table-cell office:value-type="string" calcext:value-type="string">
            <text:p>TE222</text:p>
          </table:table-cell>
          <table:table-cell/>
          <table:table-cell table:style-name="Default"/>
          <table:table-cell table:style-name="ce152"/>
          <table:table-cell table:number-columns-repeated="2"/>
          <table:table-cell table:style-name="ce152" table:number-columns-repeated="3"/>
          <table:table-cell table:number-columns-repeated="10"/>
        </table:table-row>
        <table:table-row table:style-name="ro4">
          <table:table-cell/>
          <table:table-cell office:value-type="string" calcext:value-type="string">
            <text:p>TE232</text:p>
          </table:table-cell>
          <table:table-cell/>
          <table:table-cell table:style-name="Default"/>
          <table:table-cell table:style-name="ce152"/>
          <table:table-cell table:number-columns-repeated="2"/>
          <table:table-cell table:style-name="ce152" table:number-columns-repeated="3"/>
          <table:table-cell table:number-columns-repeated="10"/>
        </table:table-row>
        <table:table-row table:style-name="ro4">
          <table:table-cell/>
          <table:table-cell office:value-type="string" calcext:value-type="string">
            <text:p>TE301</text:p>
          </table:table-cell>
          <table:table-cell/>
          <table:table-cell table:style-name="Default"/>
          <table:table-cell table:style-name="ce152"/>
          <table:table-cell table:number-columns-repeated="2"/>
          <table:table-cell table:style-name="ce152" table:number-columns-repeated="3"/>
          <table:table-cell table:number-columns-repeated="10"/>
        </table:table-row>
        <table:table-row table:style-name="ro4">
          <table:table-cell/>
          <table:table-cell office:value-type="string" calcext:value-type="string">
            <text:p>TE302</text:p>
          </table:table-cell>
          <table:table-cell/>
          <table:table-cell table:style-name="Default"/>
          <table:table-cell table:style-name="ce152"/>
          <table:table-cell table:number-columns-repeated="2"/>
          <table:table-cell table:style-name="ce152" table:number-columns-repeated="3"/>
          <table:table-cell table:number-columns-repeated="10"/>
        </table:table-row>
      </table:table>
      <table:table table:name="Аварии" table:style-name="ta1">
        <table:table-column table:style-name="co1" table:default-cell-style-name="Default"/>
        <table:table-column table:style-name="co54" table:default-cell-style-name="ce150"/>
        <table:table-column table:style-name="co55" table:default-cell-style-name="ce152"/>
        <table:table-column table:style-name="co56" table:default-cell-style-name="ce80"/>
        <table:table-column table:style-name="co57" table:default-cell-style-name="ce80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1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1" table:number-columns-repeated="2" table:default-cell-style-name="Default"/>
        <table:table-row table:style-name="ro2">
          <table:table-cell/>
          <table:table-cell table:style-name="Default" table:number-columns-repeated="4"/>
          <table:table-cell table:number-columns-repeated="4"/>
          <table:table-cell table:style-name="ce155" office:value-type="string" calcext:value-type="string" table:number-columns-spanned="2" table:number-rows-spanned="1">
            <text:p>События</text:p>
          </table:table-cell>
          <table:covered-table-cell/>
          <table:table-cell table:style-name="ce159" office:value-type="string" calcext:value-type="string">
            <text:p>Поле</text:p>
          </table:table-cell>
          <table:table-cell table:style-name="ce159" office:value-type="string" calcext:value-type="string">
            <text:p>Объект</text:p>
          </table:table-cell>
          <table:table-cell office:value-type="string" calcext:value-type="string">
            <text:p>Авария :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/>
          <table:table-cell table:style-name="Default" office:value-type="string" calcext:value-type="string">
            <text:p>Адрес</text:p>
          </table:table-cell>
          <table:table-cell table:style-name="Default" office:value-type="string" calcext:value-type="string">
            <text:p>Описание анг.</text:p>
          </table:table-cell>
          <table:table-cell table:style-name="Default" office:value-type="string" calcext:value-type="string">
            <text:p>Знач. при 1</text:p>
          </table:table-cell>
          <table:table-cell table:style-name="Default" office:value-type="string" calcext:value-type="string">
            <text:p>Название анг.</text:p>
          </table:table-cell>
          <table:table-cell office:value-type="string" calcext:value-type="string">
            <text:p>Название рус.</text:p>
          </table:table-cell>
          <table:table-cell office:value-type="string" calcext:value-type="string">
            <text:p>Описание рус.</text:p>
          </table:table-cell>
          <table:table-cell office:value-type="string" calcext:value-type="string">
            <text:p>Групповой флаг</text:p>
          </table:table-cell>
          <table:table-cell office:value-type="string" calcext:value-type="string">
            <text:p>Номер бита в групповом флаге</text:p>
          </table:table-cell>
          <table:table-cell table:style-name="ce158" office:value-type="string" calcext:value-type="string">
            <text:p>0-&gt;1</text:p>
          </table:table-cell>
          <table:table-cell table:style-name="ce158" office:value-type="string" calcext:value-type="string">
            <text:p>1-&gt;0</text:p>
          </table:table-cell>
          <table:table-cell table:style-name="ce158" table:number-columns-repeated="2"/>
          <table:table-cell table:number-columns-repeated="3"/>
        </table:table-row>
        <table:table-row table:style-name="ro1">
          <table:table-cell/>
          <table:table-cell table:style-name="ce106" office:value-type="string" calcext:value-type="string">
            <text:p>DB6 DBX8.0</text:p>
          </table:table-cell>
          <table:table-cell table:style-name="ce111" office:value-type="string" calcext:value-type="string">
            <text:p>Surge</text:p>
          </table:table-cell>
          <table:table-cell table:style-name="ce144" office:value-type="string" calcext:value-type="string">
            <text:p>danger</text:p>
          </table:table-cell>
          <table:table-cell table:style-name="Default" office:value-type="string" calcext:value-type="string">
            <text:p>SurgeAlarm</text:p>
          </table:table-cell>
          <table:table-cell office:value-type="string" calcext:value-type="string">
            <text:p>помпаж</text:p>
          </table:table-cell>
          <table:table-cell office:value-type="string" calcext:value-type="string">
            <text:p>Помпаж</text:p>
          </table:table-cell>
          <table:table-cell table:style-name="ce80" office:value-type="string" calcext:value-type="string">
            <text:p>AlarmMessGroupFlag1</text:p>
          </table:table-cell>
          <table:table-cell office:value-type="float" office:value="8" calcext:value-type="float">
            <text:p>8</text:p>
          </table:table-cell>
          <table:table-cell table:style-name="ce128" table:formula="of:=COM.MICROSOFT.CONCAT([.$N$1];[.$N3];[.$O$1];[.$O3];[.$O$1];[.$P3])" office:value-type="string" office:string-value="Авария : Помпаж  " calcext:value-type="string">
            <text:p>Авария : Помпаж <text:s/></text:p>
          </table:table-cell>
          <table:table-cell table:number-columns-repeated="3"/>
          <table:table-cell office:value-type="string" calcext:value-type="string">
            <text:p>Помпаж</text:p>
          </table:table-cell>
          <table:table-cell table:number-columns-repeated="2"/>
        </table:table-row>
        <table:table-row table:style-name="ro1">
          <table:table-cell/>
          <table:table-cell table:style-name="ce106" office:value-type="string" calcext:value-type="string">
            <text:p>DB6.DBX8.3</text:p>
          </table:table-cell>
          <table:table-cell table:style-name="ce111" office:value-type="string" calcext:value-type="string">
            <text:p>Motor bearing "DE" vibration danger</text:p>
          </table:table-cell>
          <table:table-cell table:style-name="ce144" office:value-type="string" calcext:value-type="string">
            <text:p>danger</text:p>
          </table:table-cell>
          <table:table-cell office:value-type="string" calcext:value-type="string">
            <text:p>MotorBearing_DE_VibAlarm</text:p>
          </table:table-cell>
          <table:table-cell table:style-name="ce80" office:value-type="string" calcext:value-type="string">
            <text:p><text:span text:style-name="T10">вибрация подшипника на приводном конце аварийно</text:span> высока</text:p>
          </table:table-cell>
          <table:table-cell table:style-name="ce80" office:value-type="string" calcext:value-type="string">
            <text:p><text:span text:style-name="T10">Вибрация подшипника на приводном конце аварийно</text:span> высока</text:p>
          </table:table-cell>
          <table:table-cell table:style-name="ce80"/>
          <table:table-cell office:value-type="float" office:value="9" calcext:value-type="float">
            <text:p>9</text:p>
          </table:table-cell>
          <table:table-cell table:formula="of:=COM.MICROSOFT.CONCAT([.$N$1];[.$N4];[.$O$1];[.$O4];[.$O$1];[.$P4])" office:value-type="string" office:string-value="Авария : Вибрация DE подшипника VT#5 " calcext:value-type="string">
            <text:p>Авария : Вибрация DE подшипника VT#5 </text:p>
          </table:table-cell>
          <table:table-cell/>
          <table:table-cell office:value-type="string" calcext:value-type="string">
            <text:p>rtdAlarmExist</text:p>
          </table:table-cell>
          <table:table-cell table:style-name="ce80" office:value-type="string" calcext:value-type="string">
            <text:p>ai12_MotorBearingDEVibration</text:p>
          </table:table-cell>
          <table:table-cell office:value-type="string" calcext:value-type="string">
            <text:p>Вибрация DE подшипника</text:p>
          </table:table-cell>
          <table:table-cell office:value-type="string" calcext:value-type="string">
            <text:p>VT#5</text:p>
          </table:table-cell>
          <table:table-cell/>
        </table:table-row>
        <table:table-row table:style-name="ro1">
          <table:table-cell/>
          <table:table-cell table:style-name="ce106" office:value-type="string" calcext:value-type="string">
            <text:p>DB6.DBX8.4</text:p>
          </table:table-cell>
          <table:table-cell table:style-name="ce111" office:value-type="string" calcext:value-type="string">
            <text:p>Motor bearing "NDE" vibration danger</text:p>
          </table:table-cell>
          <table:table-cell table:style-name="ce144" office:value-type="string" calcext:value-type="string">
            <text:p>danger</text:p>
          </table:table-cell>
          <table:table-cell office:value-type="string" calcext:value-type="string">
            <text:p>MotorBearing_NDE_VibAlarm</text:p>
          </table:table-cell>
          <table:table-cell table:style-name="ce80" office:value-type="string" calcext:value-type="string">
            <text:p><text:span text:style-name="T10">вибрация подшипника на неприводном конце аварийно</text:span> высока</text:p>
          </table:table-cell>
          <table:table-cell table:style-name="ce80" office:value-type="string" calcext:value-type="string">
            <text:p><text:span text:style-name="T10">Вибрация подшипника на неприводном конце аварийно</text:span> высока</text:p>
          </table:table-cell>
          <table:table-cell table:style-name="ce80"/>
          <table:table-cell office:value-type="float" office:value="10" calcext:value-type="float">
            <text:p>10</text:p>
          </table:table-cell>
          <table:table-cell table:formula="of:=COM.MICROSOFT.CONCAT([.$N$1];[.$N5];[.$O$1];[.$O5];[.$O$1];[.$P5])" office:value-type="string" office:string-value="Авария : Вибрация NDE подшипника VT#6 " calcext:value-type="string">
            <text:p>Авария : Вибрация NDE подшипника VT#6 </text:p>
          </table:table-cell>
          <table:table-cell/>
          <table:table-cell office:value-type="string" calcext:value-type="string">
            <text:p>rtdAlarmExist</text:p>
          </table:table-cell>
          <table:table-cell table:style-name="ce80" office:value-type="string" calcext:value-type="string">
            <text:p>ai13_MotorBearingNDEVibration</text:p>
          </table:table-cell>
          <table:table-cell office:value-type="string" calcext:value-type="string">
            <text:p>Вибрация NDE подшипника</text:p>
          </table:table-cell>
          <table:table-cell office:value-type="string" calcext:value-type="string">
            <text:p>VT#6</text:p>
          </table:table-cell>
          <table:table-cell/>
        </table:table-row>
        <table:table-row table:style-name="ro1">
          <table:table-cell/>
          <table:table-cell table:style-name="ce106" office:value-type="string" calcext:value-type="string">
            <text:p>DB6 DBX9.0</text:p>
          </table:table-cell>
          <table:table-cell table:style-name="ce111" office:value-type="string" calcext:value-type="string">
            <text:p>Oil supply pressure low danger</text:p>
          </table:table-cell>
          <table:table-cell table:style-name="ce144" office:value-type="string" calcext:value-type="string">
            <text:p>danger</text:p>
          </table:table-cell>
          <table:table-cell table:style-name="Default" office:value-type="string" calcext:value-type="string">
            <text:p>OilSupplyPressureLowAlarm</text:p>
          </table:table-cell>
          <table:table-cell office:value-type="string" calcext:value-type="string">
            <text:p>давление масло аварийно низко</text:p>
          </table:table-cell>
          <table:table-cell office:value-type="string" calcext:value-type="string">
            <text:p>Давление масло аварийно низко</text:p>
          </table:table-cell>
          <table:table-cell table:style-name="ce80" office:value-type="string" calcext:value-type="string">
            <text:p>AlarmMessGroupFlag1</text:p>
          </table:table-cell>
          <table:table-cell office:value-type="float" office:value="0" calcext:value-type="float">
            <text:p>0</text:p>
          </table:table-cell>
          <table:table-cell table:formula="of:=COM.MICROSOFT.CONCAT([.$N$1];[.$N6];[.$O$1];[.$O6];[.$O$1];[.$P6])" office:value-type="string" office:string-value="Авария : Давление масла PT130 низкое" calcext:value-type="string">
            <text:p>Авария : Давление масла PT130 низкое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5_OilSupplyPressure</text:p>
          </table:table-cell>
          <table:table-cell office:value-type="string" calcext:value-type="string">
            <text:p>Давление масла</text:p>
          </table:table-cell>
          <table:table-cell office:value-type="string" calcext:value-type="string">
            <text:p>PT130</text:p>
          </table:table-cell>
          <table:table-cell office:value-type="string" calcext:value-type="string">
            <text:p>низкое</text:p>
          </table:table-cell>
        </table:table-row>
        <table:table-row table:style-name="ro1">
          <table:table-cell/>
          <table:table-cell table:style-name="ce106" office:value-type="string" calcext:value-type="string">
            <text:p>DB6 DBX9.1</text:p>
          </table:table-cell>
          <table:table-cell table:style-name="ce111" office:value-type="string" calcext:value-type="string">
            <text:p>Vibration stage 1X high danger</text:p>
          </table:table-cell>
          <table:table-cell table:style-name="ce144" office:value-type="string" calcext:value-type="string">
            <text:p>danger</text:p>
          </table:table-cell>
          <table:table-cell table:style-name="Default" office:value-type="string" calcext:value-type="string">
            <text:p>VibStage1HighAlarm</text:p>
          </table:table-cell>
          <table:table-cell office:value-type="string" calcext:value-type="string">
            <text:p>вибрация ступени 1 аварийно высока</text:p>
          </table:table-cell>
          <table:table-cell office:value-type="string" calcext:value-type="string">
            <text:p>Вибрация ступени 1 аварийно высока</text:p>
          </table:table-cell>
          <table:table-cell table:style-name="ce80" office:value-type="string" calcext:value-type="string">
            <text:p>AlarmMessGroupFlag1</text:p>
          </table:table-cell>
          <table:table-cell office:value-type="float" office:value="1" calcext:value-type="float">
            <text:p>1</text:p>
          </table:table-cell>
          <table:table-cell table:formula="of:=COM.MICROSOFT.CONCAT([.$N$1];[.$N7];[.$O$1];[.$O7];[.$O$1];[.$P7])" office:value-type="string" office:string-value="Авария : Вибрация 1 ступени VT#1 " calcext:value-type="string">
            <text:p>Авария : Вибрация 1 ступени VT#1 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6_Stage1Vibration</text:p>
          </table:table-cell>
          <table:table-cell office:value-type="string" calcext:value-type="string">
            <text:p>Вибрация 1 ступени</text:p>
          </table:table-cell>
          <table:table-cell office:value-type="string" calcext:value-type="string">
            <text:p>VT#1</text:p>
          </table:table-cell>
          <table:table-cell/>
        </table:table-row>
        <table:table-row table:style-name="ro1">
          <table:table-cell/>
          <table:table-cell table:style-name="ce106" office:value-type="string" calcext:value-type="string">
            <text:p>DB6 DBX9.2</text:p>
          </table:table-cell>
          <table:table-cell table:style-name="ce111" office:value-type="string" calcext:value-type="string">
            <text:p>Vibration stage 2X high danger</text:p>
          </table:table-cell>
          <table:table-cell table:style-name="ce144" office:value-type="string" calcext:value-type="string">
            <text:p>danger</text:p>
          </table:table-cell>
          <table:table-cell table:style-name="Default" office:value-type="string" calcext:value-type="string">
            <text:p>VibStage2HighAlarm</text:p>
          </table:table-cell>
          <table:table-cell office:value-type="string" calcext:value-type="string">
            <text:p>вибрация ступени 2 аварийно высока</text:p>
          </table:table-cell>
          <table:table-cell office:value-type="string" calcext:value-type="string">
            <text:p>Вибрация ступени 1 аварийно высока</text:p>
          </table:table-cell>
          <table:table-cell table:style-name="ce80" office:value-type="string" calcext:value-type="string">
            <text:p>AlarmMessGroupFlag1</text:p>
          </table:table-cell>
          <table:table-cell office:value-type="float" office:value="2" calcext:value-type="float">
            <text:p>2</text:p>
          </table:table-cell>
          <table:table-cell table:formula="of:=COM.MICROSOFT.CONCAT([.$N$1];[.$N8];[.$O$1];[.$O8];[.$O$1];[.$P8])" office:value-type="string" office:string-value="Авария : Вибрация 2 ступени VT#2 " calcext:value-type="string">
            <text:p>Авария : Вибрация 2 ступени VT#2 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7_Stage2Vibration</text:p>
          </table:table-cell>
          <table:table-cell office:value-type="string" calcext:value-type="string">
            <text:p>Вибрация 2 ступени</text:p>
          </table:table-cell>
          <table:table-cell office:value-type="string" calcext:value-type="string">
            <text:p>VT#2</text:p>
          </table:table-cell>
          <table:table-cell/>
        </table:table-row>
        <table:table-row table:style-name="ro1">
          <table:table-cell/>
          <table:table-cell table:style-name="ce106" office:value-type="string" calcext:value-type="string">
            <text:p>DB6 DBX9.3</text:p>
          </table:table-cell>
          <table:table-cell table:style-name="ce111" office:value-type="string" calcext:value-type="string">
            <text:p>Vibration stage 3X high danger</text:p>
          </table:table-cell>
          <table:table-cell table:style-name="ce144" office:value-type="string" calcext:value-type="string">
            <text:p>danger</text:p>
          </table:table-cell>
          <table:table-cell table:style-name="Default" office:value-type="string" calcext:value-type="string">
            <text:p>VibStage3HighAlarm</text:p>
          </table:table-cell>
          <table:table-cell office:value-type="string" calcext:value-type="string">
            <text:p>вибрация ступени 3 аварийно высока</text:p>
          </table:table-cell>
          <table:table-cell office:value-type="string" calcext:value-type="string">
            <text:p>Вибрация ступени 1 аварийно высока</text:p>
          </table:table-cell>
          <table:table-cell table:style-name="ce80" office:value-type="string" calcext:value-type="string">
            <text:p>AlarmMessGroupFlag1</text:p>
          </table:table-cell>
          <table:table-cell office:value-type="float" office:value="3" calcext:value-type="float">
            <text:p>3</text:p>
          </table:table-cell>
          <table:table-cell table:formula="of:=COM.MICROSOFT.CONCAT([.$N$1];[.$N9];[.$O$1];[.$O9];[.$O$1];[.$P9])" office:value-type="string" office:string-value="Авария : Вибрация 3 ступени VT#3 " calcext:value-type="string">
            <text:p>Авария : Вибрация 3 ступени VT#3 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8_Stage3Vibration</text:p>
          </table:table-cell>
          <table:table-cell office:value-type="string" calcext:value-type="string">
            <text:p>Вибрация 3 ступени</text:p>
          </table:table-cell>
          <table:table-cell office:value-type="string" calcext:value-type="string">
            <text:p>VT#3</text:p>
          </table:table-cell>
          <table:table-cell/>
        </table:table-row>
        <table:table-row table:style-name="ro1">
          <table:table-cell/>
          <table:table-cell table:style-name="ce106" office:value-type="string" calcext:value-type="string">
            <text:p>DB6 DBX9.5</text:p>
          </table:table-cell>
          <table:table-cell table:style-name="ce111" office:value-type="string" calcext:value-type="string">
            <text:p>Motor current danger</text:p>
          </table:table-cell>
          <table:table-cell table:style-name="ce144" office:value-type="string" calcext:value-type="string">
            <text:p>danger</text:p>
          </table:table-cell>
          <table:table-cell table:style-name="Default" office:value-type="string" calcext:value-type="string">
            <text:p>MotorCurrentAlarm</text:p>
          </table:table-cell>
          <table:table-cell office:value-type="string" calcext:value-type="string">
            <text:p>ток двигателя аварийно высок</text:p>
          </table:table-cell>
          <table:table-cell office:value-type="string" calcext:value-type="string">
            <text:p>Ток двигателя аварийно высок</text:p>
          </table:table-cell>
          <table:table-cell table:style-name="ce80" office:value-type="string" calcext:value-type="string">
            <text:p>AlarmMessGroupFlag1</text:p>
          </table:table-cell>
          <table:table-cell office:value-type="float" office:value="5" calcext:value-type="float">
            <text:p>5</text:p>
          </table:table-cell>
          <table:table-cell table:formula="of:=COM.MICROSOFT.CONCAT([.$N$1];[.$N10];[.$O$1];[.$O10];[.$O$1];[.$P10])" office:value-type="string" office:string-value="Авария : Ток двигателя TD140 " calcext:value-type="string">
            <text:p>Авария : Ток двигателя TD140 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10_MotorCurrent</text:p>
          </table:table-cell>
          <table:table-cell office:value-type="string" calcext:value-type="string">
            <text:p>Ток двигателя</text:p>
          </table:table-cell>
          <table:table-cell table:style-name="ce80" office:value-type="string" calcext:value-type="string">
            <text:p>TD140</text:p>
          </table:table-cell>
          <table:table-cell/>
        </table:table-row>
        <table:table-row table:style-name="ro1">
          <table:table-cell/>
          <table:table-cell table:style-name="ce136" office:value-type="string" calcext:value-type="string">
            <text:p>DB6 DBX9.6</text:p>
          </table:table-cell>
          <table:table-cell table:style-name="ce193" office:value-type="string" calcext:value-type="string">
            <text:p>Oil supply temperature high danger</text:p>
          </table:table-cell>
          <table:table-cell table:style-name="ce144" office:value-type="string" calcext:value-type="string">
            <text:p>danger</text:p>
          </table:table-cell>
          <table:table-cell table:style-name="ce128" office:value-type="string" calcext:value-type="string">
            <text:p>OilSupplyTempHighAlarm</text:p>
          </table:table-cell>
          <table:table-cell table:style-name="ce128" office:value-type="string" calcext:value-type="string">
            <text:p>температура масла аварийно высока</text:p>
          </table:table-cell>
          <table:table-cell table:style-name="ce128" office:value-type="string" calcext:value-type="string">
            <text:p>Температура масла аварийно высока</text:p>
          </table:table-cell>
          <table:table-cell table:style-name="ce80" office:value-type="string" calcext:value-type="string">
            <text:p>AlarmMessGroupFlag1</text:p>
          </table:table-cell>
          <table:table-cell office:value-type="float" office:value="6" calcext:value-type="float">
            <text:p>6</text:p>
          </table:table-cell>
          <table:table-cell table:style-name="ce80" table:formula="of:=COM.MICROSOFT.CONCAT([.$N$1];[.$N11];[.$O$1];[.$O11];[.$O$1];[.$P11])" office:value-type="string" office:string-value="Авария : Температура масла TE130 высокая" calcext:value-type="string">
            <text:p>Авария : Температура масла TE130 высокая</text:p>
          </table:table-cell>
          <table:table-cell/>
          <table:table-cell office:value-type="string" calcext:value-type="string">
            <text:p>rtdAlarmExist</text:p>
          </table:table-cell>
          <table:table-cell table:style-name="ce128" office:value-type="string" calcext:value-type="string">
            <text:p>ai14_OilSupplyTemperature</text:p>
          </table:table-cell>
          <table:table-cell office:value-type="string" calcext:value-type="string">
            <text:p>Температура масла</text:p>
          </table:table-cell>
          <table:table-cell office:value-type="string" calcext:value-type="string">
            <text:p>TE130</text:p>
          </table:table-cell>
          <table:table-cell office:value-type="string" calcext:value-type="string">
            <text:p>высокая</text:p>
          </table:table-cell>
        </table:table-row>
        <table:table-row table:style-name="ro1">
          <table:table-cell/>
          <table:table-cell table:style-name="ce136" office:value-type="string" calcext:value-type="string">
            <text:p>DB6 DBX9.7</text:p>
          </table:table-cell>
          <table:table-cell table:style-name="ce193" office:value-type="string" calcext:value-type="string">
            <text:p>Stage 3 inlet temperature high danger</text:p>
          </table:table-cell>
          <table:table-cell table:style-name="ce144" office:value-type="string" calcext:value-type="string">
            <text:p>danger</text:p>
          </table:table-cell>
          <table:table-cell table:style-name="ce128" office:value-type="string" calcext:value-type="string">
            <text:p>Stage3InletTempHighAlarm</text:p>
          </table:table-cell>
          <table:table-cell table:style-name="ce128" office:value-type="string" calcext:value-type="string">
            <text:p>температура входа ступени 3 аварийно высока</text:p>
          </table:table-cell>
          <table:table-cell table:style-name="ce128" office:value-type="string" calcext:value-type="string">
            <text:p>Температура входа ступени 3 аварийно высока</text:p>
          </table:table-cell>
          <table:table-cell table:style-name="ce80" office:value-type="string" calcext:value-type="string">
            <text:p>AlarmMessGroupFlag1</text:p>
          </table:table-cell>
          <table:table-cell office:value-type="float" office:value="7" calcext:value-type="float">
            <text:p>7</text:p>
          </table:table-cell>
          <table:table-cell table:formula="of:=COM.MICROSOFT.CONCAT([.$N$1];[.$N12];[.$O$1];[.$O12];[.$O$1];[.$P12])" office:value-type="string" office:string-value="Авария : Температура воздуха на входе 3 ступени TE231 высокая" calcext:value-type="string">
            <text:p>Авария : Температура воздуха на входе 3 ступени TE231 высокая</text:p>
          </table:table-cell>
          <table:table-cell/>
          <table:table-cell office:value-type="string" calcext:value-type="string">
            <text:p>rtdAlarmExist</text:p>
          </table:table-cell>
          <table:table-cell table:style-name="ce128" office:value-type="string" calcext:value-type="string">
            <text:p>ai15_Stage3InletTemperature</text:p>
          </table:table-cell>
          <table:table-cell office:value-type="string" calcext:value-type="string">
            <text:p>Температура воздуха на входе 3 ступени</text:p>
          </table:table-cell>
          <table:table-cell office:value-type="string" calcext:value-type="string">
            <text:p>TE231</text:p>
          </table:table-cell>
          <table:table-cell office:value-type="string" calcext:value-type="string">
            <text:p>высокая</text:p>
          </table:table-cell>
        </table:table-row>
        <table:table-row table:style-name="ro1">
          <table:table-cell/>
          <table:table-cell table:style-name="ce136" office:value-type="string" calcext:value-type="string">
            <text:p>DB6 DBX10.1</text:p>
          </table:table-cell>
          <table:table-cell table:style-name="ce193" office:value-type="string" calcext:value-type="string">
            <text:p>Motor coil "R" temperature high danger</text:p>
          </table:table-cell>
          <table:table-cell table:style-name="ce144" office:value-type="string" calcext:value-type="string">
            <text:p>danger</text:p>
          </table:table-cell>
          <table:table-cell table:style-name="ce128" office:value-type="string" calcext:value-type="string">
            <text:p>MotorCoil_R_TempHighAlarm</text:p>
          </table:table-cell>
          <table:table-cell table:style-name="ce128" office:value-type="string" calcext:value-type="string">
            <text:p><text:span text:style-name="T10">температура обмотки Р двигателя аварийно </text:span>высока</text:p>
          </table:table-cell>
          <table:table-cell table:style-name="ce128" office:value-type="string" calcext:value-type="string">
            <text:p><text:span text:style-name="T10">Температура обмотки Р двигателя аварийно </text:span>высока</text:p>
          </table:table-cell>
          <table:table-cell table:style-name="ce80" office:value-type="string" calcext:value-type="string">
            <text:p>AlarmMessGroupFlag2</text:p>
          </table:table-cell>
          <table:table-cell office:value-type="float" office:value="9" calcext:value-type="float">
            <text:p>9</text:p>
          </table:table-cell>
          <table:table-cell table:formula="of:=COM.MICROSOFT.CONCAT([.$N$1];[.$N13];[.$O$1];[.$O13];[.$O$1];[.$P13])" office:value-type="string" office:string-value="Авария : Температура обмотки двигателя &quot;R&quot; TE140 высокая" calcext:value-type="string">
            <text:p>Авария : Температура обмотки двигателя "R" TE140 высокая</text:p>
          </table:table-cell>
          <table:table-cell/>
          <table:table-cell office:value-type="string" calcext:value-type="string">
            <text:p>rtdAlarmExist</text:p>
          </table:table-cell>
          <table:table-cell table:style-name="ce128" office:value-type="string" calcext:value-type="string">
            <text:p>ai17_MotorWindingRTemperature</text:p>
          </table:table-cell>
          <table:table-cell office:value-type="string" calcext:value-type="string">
            <text:p>Температура обмотки двигателя "R"</text:p>
          </table:table-cell>
          <table:table-cell office:value-type="string" calcext:value-type="string">
            <text:p>TE140</text:p>
          </table:table-cell>
          <table:table-cell office:value-type="string" calcext:value-type="string">
            <text:p>высокая</text:p>
          </table:table-cell>
        </table:table-row>
        <table:table-row table:style-name="ro1">
          <table:table-cell/>
          <table:table-cell table:style-name="ce106" office:value-type="string" calcext:value-type="string">
            <text:p>DB6 DBX10.2</text:p>
          </table:table-cell>
          <table:table-cell table:style-name="ce111"/>
          <table:table-cell table:style-name="ce144" office:value-type="string" calcext:value-type="string">
            <text:p>danger</text:p>
          </table:table-cell>
          <table:table-cell table:style-name="Default"/>
          <table:table-cell table:number-columns-repeated="2"/>
          <table:table-cell table:style-name="ce80"/>
          <table:table-cell office:value-type="float" office:value="10" calcext:value-type="float">
            <text:p>10</text:p>
          </table:table-cell>
          <table:table-cell table:formula="of:=COM.MICROSOFT.CONCAT([.$N$1];[.$N14];[.$O$1];[.$O14];[.$O$1];[.$P14])" office:value-type="string" office:string-value="Авария :   " calcext:value-type="string">
            <text:p>Авария : <text:s text:c="2"/></text:p>
          </table:table-cell>
          <table:table-cell table:number-columns-repeated="6"/>
        </table:table-row>
        <table:table-row table:style-name="ro1">
          <table:table-cell/>
          <table:table-cell table:style-name="ce106" office:value-type="string" calcext:value-type="string">
            <text:p>DB6 DBX10.3</text:p>
          </table:table-cell>
          <table:table-cell table:style-name="ce111"/>
          <table:table-cell table:style-name="ce144" office:value-type="string" calcext:value-type="string">
            <text:p>danger</text:p>
          </table:table-cell>
          <table:table-cell table:style-name="Default"/>
          <table:table-cell table:number-columns-repeated="2"/>
          <table:table-cell table:style-name="ce80"/>
          <table:table-cell office:value-type="float" office:value="11" calcext:value-type="float">
            <text:p>11</text:p>
          </table:table-cell>
          <table:table-cell table:formula="of:=COM.MICROSOFT.CONCAT([.$N$1];[.$N15];[.$O$1];[.$O15];[.$O$1];[.$P15])" office:value-type="string" office:string-value="Авария :   " calcext:value-type="string">
            <text:p>Авария : <text:s text:c="2"/></text:p>
          </table:table-cell>
          <table:table-cell table:number-columns-repeated="6"/>
        </table:table-row>
        <table:table-row table:style-name="ro1">
          <table:table-cell/>
          <table:table-cell table:style-name="ce136" office:value-type="string" calcext:value-type="string">
            <text:p>DB6 DBX10.4</text:p>
          </table:table-cell>
          <table:table-cell table:style-name="ce193" office:value-type="string" calcext:value-type="string">
            <text:p>Stage 2 inlet temperature high danger</text:p>
          </table:table-cell>
          <table:table-cell table:style-name="ce144" office:value-type="string" calcext:value-type="string">
            <text:p>danger</text:p>
          </table:table-cell>
          <table:table-cell table:style-name="ce128" office:value-type="string" calcext:value-type="string">
            <text:p>Stage2InletTempHighAlarm</text:p>
          </table:table-cell>
          <table:table-cell table:style-name="ce128" office:value-type="string" calcext:value-type="string">
            <text:p>температура входа ступени 2 аварийно высока</text:p>
          </table:table-cell>
          <table:table-cell table:style-name="ce128" office:value-type="string" calcext:value-type="string">
            <text:p>Температура входа ступени 2 аварийно высока</text:p>
          </table:table-cell>
          <table:table-cell table:style-name="ce80" office:value-type="string" calcext:value-type="string">
            <text:p>AlarmMessGroupFlag2</text:p>
          </table:table-cell>
          <table:table-cell office:value-type="float" office:value="12" calcext:value-type="float">
            <text:p>12</text:p>
          </table:table-cell>
          <table:table-cell table:formula="of:=COM.MICROSOFT.CONCAT([.$N$1];[.$N16];[.$O$1];[.$O16];[.$O$1];[.$P16])" office:value-type="string" office:string-value="Авария : Температура воздуха на входе 2 ступени TE221 высокая" calcext:value-type="string">
            <text:p>Авария : Температура воздуха на входе 2 ступени TE221 высокая</text:p>
          </table:table-cell>
          <table:table-cell/>
          <table:table-cell office:value-type="string" calcext:value-type="string">
            <text:p>rtdAlarmExist</text:p>
          </table:table-cell>
          <table:table-cell table:style-name="ce128" office:value-type="string" calcext:value-type="string">
            <text:p>ai20_Stage2InletTemperature</text:p>
          </table:table-cell>
          <table:table-cell office:value-type="string" calcext:value-type="string">
            <text:p>Температура воздуха на входе 2 ступени</text:p>
          </table:table-cell>
          <table:table-cell office:value-type="string" calcext:value-type="string">
            <text:p>TE221</text:p>
          </table:table-cell>
          <table:table-cell office:value-type="string" calcext:value-type="string">
            <text:p>высокая</text:p>
          </table:table-cell>
        </table:table-row>
        <table:table-row table:style-name="ro1">
          <table:table-cell/>
          <table:table-cell table:style-name="ce136" office:value-type="string" calcext:value-type="string">
            <text:p>DB6 DBX10.6</text:p>
          </table:table-cell>
          <table:table-cell table:style-name="ce193" office:value-type="string" calcext:value-type="string">
            <text:p>Motor bearing "DE" temperature high danger</text:p>
          </table:table-cell>
          <table:table-cell table:style-name="ce144" office:value-type="string" calcext:value-type="string">
            <text:p>danger</text:p>
          </table:table-cell>
          <table:table-cell table:style-name="ce128" office:value-type="string" calcext:value-type="string">
            <text:p>MotorBearing_DE_TempHighAlarm</text:p>
          </table:table-cell>
          <table:table-cell table:style-name="ce128" office:value-type="string" calcext:value-type="string">
            <text:p><text:span text:style-name="T10">температура подшипника на приводном конце аварийно </text:span>высока</text:p>
          </table:table-cell>
          <table:table-cell table:style-name="ce128" office:value-type="string" calcext:value-type="string">
            <text:p><text:span text:style-name="T10">Температура подшипника на приводном конце аварийно </text:span>высока</text:p>
          </table:table-cell>
          <table:table-cell table:style-name="ce80" office:value-type="string" calcext:value-type="string">
            <text:p>AlarmMessGroupFlag2</text:p>
          </table:table-cell>
          <table:table-cell office:value-type="float" office:value="14" calcext:value-type="float">
            <text:p>14</text:p>
          </table:table-cell>
          <table:table-cell table:formula="of:=COM.MICROSOFT.CONCAT([.$N$1];[.$N17];[.$O$1];[.$O17];[.$O$1];[.$P17])" office:value-type="string" office:string-value="Авария : Температура DE подшипника TE143 высокая" calcext:value-type="string">
            <text:p>Авария : Температура DE подшипника TE143 высокая</text:p>
          </table:table-cell>
          <table:table-cell/>
          <table:table-cell office:value-type="string" calcext:value-type="string">
            <text:p>rtdAlarmExist</text:p>
          </table:table-cell>
          <table:table-cell table:style-name="ce128" office:value-type="string" calcext:value-type="string">
            <text:p>ai18_MotorBearingDETemperature</text:p>
          </table:table-cell>
          <table:table-cell office:value-type="string" calcext:value-type="string">
            <text:p>Температура DE подшипника</text:p>
          </table:table-cell>
          <table:table-cell office:value-type="string" calcext:value-type="string">
            <text:p>TE143</text:p>
          </table:table-cell>
          <table:table-cell office:value-type="string" calcext:value-type="string">
            <text:p>высокая</text:p>
          </table:table-cell>
        </table:table-row>
        <table:table-row table:style-name="ro1">
          <table:table-cell/>
          <table:table-cell table:style-name="ce136" office:value-type="string" calcext:value-type="string">
            <text:p>DB6 DBX10.7</text:p>
          </table:table-cell>
          <table:table-cell table:style-name="ce193" office:value-type="string" calcext:value-type="string">
            <text:p>Motor bearing "NDE" temperature high danger</text:p>
          </table:table-cell>
          <table:table-cell table:style-name="ce144" office:value-type="string" calcext:value-type="string">
            <text:p>danger</text:p>
          </table:table-cell>
          <table:table-cell table:style-name="ce128" office:value-type="string" calcext:value-type="string">
            <text:p>MotorBearing_NDE_TempHighAlarm</text:p>
          </table:table-cell>
          <table:table-cell table:style-name="ce128" office:value-type="string" calcext:value-type="string">
            <text:p><text:span text:style-name="T10">температура подшипника на неприводном конце аварийно</text:span> высока</text:p>
          </table:table-cell>
          <table:table-cell table:style-name="ce128" office:value-type="string" calcext:value-type="string">
            <text:p><text:span text:style-name="T10">Температура подшипника на неприводном конце аварийно</text:span> высока</text:p>
          </table:table-cell>
          <table:table-cell table:style-name="ce80" office:value-type="string" calcext:value-type="string">
            <text:p>AlarmMessGroupFlag2</text:p>
          </table:table-cell>
          <table:table-cell office:value-type="float" office:value="15" calcext:value-type="float">
            <text:p>15</text:p>
          </table:table-cell>
          <table:table-cell table:formula="of:=COM.MICROSOFT.CONCAT([.$N$1];[.$N18];[.$O$1];[.$O18];[.$O$1];[.$P18])" office:value-type="string" office:string-value="Авария : Температура NDE подшипника TE144 высокая" calcext:value-type="string">
            <text:p>Авария : Температура NDE подшипника TE144 высокая</text:p>
          </table:table-cell>
          <table:table-cell/>
          <table:table-cell office:value-type="string" calcext:value-type="string">
            <text:p>rtdAlarmExist</text:p>
          </table:table-cell>
          <table:table-cell table:style-name="ce128" office:value-type="string" calcext:value-type="string">
            <text:p>ai19_MotorBearingNDETemperature</text:p>
          </table:table-cell>
          <table:table-cell office:value-type="string" calcext:value-type="string">
            <text:p>Температура NDE подшипника</text:p>
          </table:table-cell>
          <table:table-cell office:value-type="string" calcext:value-type="string">
            <text:p>TE144</text:p>
          </table:table-cell>
          <table:table-cell office:value-type="string" calcext:value-type="string">
            <text:p>высокая</text:p>
          </table:table-cell>
        </table:table-row>
        <table:table-row table:style-name="ro1">
          <table:table-cell/>
          <table:table-cell table:style-name="ce106" office:value-type="string" calcext:value-type="string">
            <text:p>DB6 DBX11.2</text:p>
          </table:table-cell>
          <table:table-cell table:style-name="Default"/>
          <table:table-cell table:style-name="ce144" office:value-type="string" calcext:value-type="string">
            <text:p>danger</text:p>
          </table:table-cell>
          <table:table-cell table:style-name="Default"/>
          <table:table-cell table:number-columns-repeated="2"/>
          <table:table-cell table:style-name="ce80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style-name="ce106" office:value-type="string" calcext:value-type="string">
            <text:p>DB6.DBX11.3</text:p>
          </table:table-cell>
          <table:table-cell table:style-name="Default"/>
          <table:table-cell table:style-name="ce144" office:value-type="string" calcext:value-type="string">
            <text:p>danger</text:p>
          </table:table-cell>
          <table:table-cell table:style-name="Default"/>
          <table:table-cell table:number-columns-repeated="2"/>
          <table:table-cell table:style-name="ce80"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4">
          <table:table-cell/>
          <table:table-cell table:style-name="ce106" office:value-type="string" calcext:value-type="string">
            <text:p>DB6 DBX11.4</text:p>
          </table:table-cell>
          <table:table-cell table:style-name="ce194" office:value-type="string" calcext:value-type="string">
            <text:p>Remote stop command</text:p>
          </table:table-cell>
          <table:table-cell table:style-name="ce197" office:value-type="string" calcext:value-type="string">
            <text:p>status</text:p>
          </table:table-cell>
          <table:table-cell table:style-name="ce161" office:value-type="string" calcext:value-type="string">
            <text:p>RemStopCommand</text:p>
          </table:table-cell>
          <table:table-cell table:style-name="ce161" office:value-type="string" calcext:value-type="string">
            <text:p>дистанционная команда стоп</text:p>
          </table:table-cell>
          <table:table-cell table:style-name="ce161" office:value-type="string" calcext:value-type="string">
            <text:p>Дистанционная команда стоп</text:p>
          </table:table-cell>
          <table:table-cell table:style-name="ce198" office:value-type="string" calcext:value-type="string">
            <text:p>AlarmMessGroupFlag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4">
          <table:table-cell/>
          <table:table-cell table:style-name="ce106" office:value-type="string" calcext:value-type="string">
            <text:p>DB6 DBX11.5</text:p>
          </table:table-cell>
          <table:table-cell table:style-name="ce194" office:value-type="string" calcext:value-type="string">
            <text:p>Shut power off</text:p>
          </table:table-cell>
          <table:table-cell table:style-name="ce197" office:value-type="string" calcext:value-type="string">
            <text:p>status</text:p>
          </table:table-cell>
          <table:table-cell table:style-name="ce161" office:value-type="string" calcext:value-type="string">
            <text:p>WasShutPowerOff</text:p>
          </table:table-cell>
          <table:table-cell table:style-name="ce161" office:value-type="string" calcext:value-type="string">
            <text:p>аварийное отключение питания</text:p>
          </table:table-cell>
          <table:table-cell table:style-name="ce161" office:value-type="string" calcext:value-type="string">
            <text:p>Аварийное отключение питания</text:p>
          </table:table-cell>
          <table:table-cell table:style-name="ce198" office:value-type="string" calcext:value-type="string">
            <text:p>AlarmMessGroupFlag2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4">
          <table:table-cell/>
          <table:table-cell table:style-name="ce106" office:value-type="string" calcext:value-type="string">
            <text:p>DB6 DBX11.6</text:p>
          </table:table-cell>
          <table:table-cell table:style-name="ce194" office:value-type="string" calcext:value-type="string">
            <text:p>Motor start panel on response</text:p>
          </table:table-cell>
          <table:table-cell table:style-name="ce197" office:value-type="string" calcext:value-type="string">
            <text:p>status</text:p>
          </table:table-cell>
          <table:table-cell table:style-name="ce161" office:value-type="string" calcext:value-type="string">
            <text:p>MotorStartPanelOnResponse</text:p>
          </table:table-cell>
          <table:table-cell table:style-name="ce161" office:value-type="string" calcext:value-type="string">
            <text:p>панель управления двигателем на связи</text:p>
          </table:table-cell>
          <table:table-cell table:style-name="ce161" office:value-type="string" calcext:value-type="string">
            <text:p>Панель управления двигателем на связи</text:p>
          </table:table-cell>
          <table:table-cell table:style-name="ce198" office:value-type="string" calcext:value-type="string">
            <text:p>AlarmMessGroupFlag2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4">
          <table:table-cell/>
          <table:table-cell table:style-name="ce106" office:value-type="string" calcext:value-type="string">
            <text:p>DB6 DBX11.7</text:p>
          </table:table-cell>
          <table:table-cell table:style-name="ce194" office:value-type="string" calcext:value-type="string">
            <text:p>Local stop command</text:p>
          </table:table-cell>
          <table:table-cell table:style-name="ce197" office:value-type="string" calcext:value-type="string">
            <text:p>status</text:p>
          </table:table-cell>
          <table:table-cell table:style-name="ce161" office:value-type="string" calcext:value-type="string">
            <text:p>LocalStopCommand</text:p>
          </table:table-cell>
          <table:table-cell table:style-name="ce161" office:value-type="string" calcext:value-type="string">
            <text:p>местная команда стоп</text:p>
          </table:table-cell>
          <table:table-cell table:style-name="ce161" office:value-type="string" calcext:value-type="string">
            <text:p>Местная команда стоп</text:p>
          </table:table-cell>
          <table:table-cell table:style-name="ce198" office:value-type="string" calcext:value-type="string">
            <text:p>AlarmMessGroupFlag2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/>
          <table:table-cell table:style-name="ce167" office:value-type="string" calcext:value-type="string">
            <text:p>DB6 DBW8</text:p>
          </table:table-cell>
          <table:table-cell table:style-name="ce183" office:value-type="string" calcext:value-type="string">
            <text:p>Alarms group flag 1</text:p>
          </table:table-cell>
          <table:table-cell table:style-name="ce184" office:value-type="string" calcext:value-type="string">
            <text:p>danger</text:p>
          </table:table-cell>
          <table:table-cell table:style-name="ce166" office:value-type="string" calcext:value-type="string">
            <text:p>AlarmMessGroupFlag1</text:p>
          </table:table-cell>
          <table:table-cell table:style-name="ce166" table:number-columns-repeated="2"/>
          <table:table-cell table:style-name="ce166" office:value-type="string" calcext:value-type="string">
            <text:p>S7:[VetrolCompr_1]DB6,UINT8</text:p>
          </table:table-cell>
          <table:table-cell table:number-columns-repeated="8"/>
        </table:table-row>
        <table:table-row table:style-name="ro6">
          <table:table-cell/>
          <table:table-cell table:style-name="ce167" office:value-type="string" calcext:value-type="string">
            <text:p>DB6 DBW10</text:p>
          </table:table-cell>
          <table:table-cell table:style-name="ce183" office:value-type="string" calcext:value-type="string">
            <text:p>Alarms group flag 2</text:p>
          </table:table-cell>
          <table:table-cell table:style-name="ce184" office:value-type="string" calcext:value-type="string">
            <text:p>danger/status</text:p>
          </table:table-cell>
          <table:table-cell table:style-name="ce166" office:value-type="string" calcext:value-type="string">
            <text:p>AlarmMessGroupFlag2</text:p>
          </table:table-cell>
          <table:table-cell table:style-name="ce166" table:number-columns-repeated="2"/>
          <table:table-cell table:style-name="ce166" office:value-type="string" calcext:value-type="string">
            <text:p>S7:[VetrolCompr_1]DB6,UINT10</text:p>
          </table:table-cell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11"/>
        </table:table-row>
        <table:table-row table:style-name="ro4">
          <table:table-cell/>
          <table:table-cell table:style-name="Default"/>
          <table:table-cell table:style-name="ce111" office:value-type="string" calcext:value-type="string">
            <text:p>Oil supply temperature high danger</text:p>
          </table:table-cell>
          <table:table-cell table:style-name="Default"/>
          <table:table-cell table:style-name="Default" office:value-type="string" calcext:value-type="string">
            <text:p>OilSupplyTempHighAlarm</text:p>
          </table:table-cell>
          <table:table-cell office:value-type="string" calcext:value-type="string">
            <text:p>температура масла аварийно высока</text:p>
          </table:table-cell>
          <table:table-cell office:value-type="string" calcext:value-type="string">
            <text:p>Температура масла аварийно высока</text:p>
          </table:table-cell>
          <table:table-cell table:number-columns-repeated="9"/>
        </table:table-row>
        <table:table-row table:style-name="ro2" table:number-rows-repeated="3">
          <table:table-cell/>
          <table:table-cell table:style-name="Default" table:number-columns-repeated="4"/>
          <table:table-cell table:number-columns-repeated="11"/>
        </table:table-row>
        <table:table-row table:style-name="ro4">
          <table:table-cell table:style-name="ce80"/>
          <table:table-cell/>
          <table:table-cell table:style-name="ce185"/>
          <table:table-cell table:style-name="ce125"/>
          <table:table-cell table:number-columns-repeated="12"/>
        </table:table-row>
        <table:table-row table:style-name="ro4">
          <table:table-cell table:style-name="ce80"/>
          <table:table-cell/>
          <table:table-cell table:style-name="ce185"/>
          <table:table-cell table:style-name="ce125"/>
          <table:table-cell/>
          <table:table-cell table:style-name="ce80" table:number-columns-repeated="2"/>
          <table:table-cell table:number-columns-repeated="9"/>
        </table:table-row>
        <table:table-row table:style-name="ro4" table:number-rows-repeated="4">
          <table:table-cell table:style-name="ce80"/>
          <table:table-cell table:number-columns-repeated="4"/>
          <table:table-cell table:style-name="ce125"/>
          <table:table-cell table:style-name="ce185"/>
          <table:table-cell table:number-columns-repeated="9"/>
        </table:table-row>
        <table:table-row table:style-name="ro4" table:number-rows-repeated="13">
          <table:table-cell table:style-name="ce80"/>
          <table:table-cell table:number-columns-repeated="4"/>
          <table:table-cell table:style-name="ce80" table:number-columns-repeated="2"/>
          <table:table-cell table:number-columns-repeated="9"/>
        </table:table-row>
        <table:table-row table:style-name="ro4" table:number-rows-repeated="3">
          <table:table-cell table:style-name="ce80"/>
          <table:table-cell table:style-name="ce192"/>
          <table:table-cell table:number-columns-repeated="3"/>
          <table:table-cell table:style-name="ce80" table:number-columns-repeated="2"/>
          <table:table-cell table:number-columns-repeated="9"/>
        </table:table-row>
        <table:table-row table:style-name="ro4" table:number-rows-repeated="3">
          <table:table-cell table:style-name="ce80"/>
          <table:table-cell table:number-columns-repeated="4"/>
          <table:table-cell table:style-name="ce125"/>
          <table:table-cell table:style-name="ce185"/>
          <table:table-cell table:number-columns-repeated="9"/>
        </table:table-row>
        <table:table-row table:style-name="ro4" table:number-rows-repeated="2">
          <table:table-cell table:number-columns-repeated="4"/>
          <table:table-cell table:style-name="ce125" table:number-columns-repeated="2"/>
          <table:table-cell table:style-name="ce185"/>
          <table:table-cell table:number-columns-repeated="9"/>
        </table:table-row>
        <table:table-row table:style-name="ro4">
          <table:table-cell/>
          <table:table-cell table:style-name="ce80" table:number-columns-repeated="2"/>
          <table:table-cell/>
          <table:table-cell table:style-name="ce125" table:number-columns-repeated="3"/>
          <table:table-cell table:number-columns-repeated="9"/>
        </table:table-row>
      </table:table>
      <table:table table:name="Маски" table:style-name="ta1">
        <table:table-column table:style-name="co66" table:default-cell-style-name="Default"/>
        <table:table-column table:style-name="co40" table:number-columns-repeated="2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1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Узел OPC</text:p>
          </table:table-cell>
          <table:table-cell office:value-type="string" calcext:value-type="string">
            <text:p>Код в узле</text:p>
          </table:table-cell>
          <table:table-cell table:style-name="ce159" office:value-type="string" calcext:value-type="string">
            <text:p>Регистр</text:p>
          </table:table-cell>
          <table:table-cell table:style-name="ce159" office:value-type="string" calcext:value-type="string">
            <text:p>Бит</text:p>
          </table:table-cell>
          <table:table-cell table:style-name="ce159" office:value-type="string" calcext:value-type="string">
            <text:p>Класс</text:p>
          </table:table-cell>
          <table:table-cell table:style-name="ce159" office:value-type="string" calcext:value-type="string">
            <text:p>Поле</text:p>
          </table:table-cell>
          <table:table-cell table:style-name="ce159" office:value-type="string" calcext:value-type="string">
            <text:p>Объект</text:p>
          </table:table-cell>
          <table:table-cell table:number-columns-repeated="2"/>
          <table:table-cell table:style-name="ce155" office:value-type="string" calcext:value-type="string" table:number-columns-spanned="2" table:number-rows-spanned="1">
            <text:p>События</text:p>
          </table:table-cell>
          <table:covered-table-cell/>
          <table:table-cell table:number-columns-repeated="5"/>
        </table:table-row>
        <table:table-row table:style-name="ro2">
          <table:table-cell table:number-columns-repeated="2"/>
          <table:table-cell table:style-name="ce159" table:number-columns-repeated="5"/>
          <table:table-cell office:value-type="string" calcext:value-type="string">
            <office:annotation draw:style-name="gr7" draw:text-style-name="P4" svg:width="2.899cm" svg:height="1.873cm" svg:x="24.4cm" svg:y="0cm" draw:caption-point-x="-0.61cm" draw:caption-point-y="0.461cm">
              <dc:creator>&lt;анонимный&gt;</dc:creator>
              <dc:date>2026-05-18T00:00:00</dc:date>
              <text:p text:style-name="P3">Rtd данное в объекте AnalogInputControls</text:p>
            </office:annotation>
            <text:p>Групповой флаг</text:p>
          </table:table-cell>
          <table:table-cell office:value-type="string" calcext:value-type="string">
            <text:p>Номер бита в групповом флаге</text:p>
          </table:table-cell>
          <table:table-cell table:style-name="ce158" office:value-type="string" calcext:value-type="string">
            <text:p>0-&gt;1</text:p>
          </table:table-cell>
          <table:table-cell table:style-name="ce158" office:value-type="string" calcext:value-type="string">
            <text:p>1-&gt;0</text:p>
          </table:table-cell>
          <table:table-cell office:value-type="string" calcext:value-type="string">
            <text:p><text:s/>: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Разрешено</text:p>
          </table:table-cell>
          <table:table-cell office:value-type="string" calcext:value-type="string">
            <text:p>Заблокировано</text:p>
          </table:table-cell>
          <table:table-cell/>
        </table:table-row>
        <table:table-row table:style-name="ro2">
          <table:table-cell office:value-type="string" calcext:value-type="string">
            <text:p>AI_Enable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B1.DBX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1_IGVPosition</text:p>
          </table:table-cell>
          <table:table-cell table:formula="of:=COM.MICROSOFT.CONCAT(&quot;rtd&quot;;[.A3])" office:value-type="string" office:string-value="rtdAI_Enable3" calcext:value-type="string">
            <text:p>rtdAI_Enable3</text:p>
          </table:table-cell>
          <table:table-cell table:formula="of:=[.B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GV</text:p>
          </table:table-cell>
          <table:table-cell table:number-columns-repeated="2"/>
          <table:table-cell office:value-type="string" calcext:value-type="string">
            <text:p>"SetCmndSignal".feedbackSignalOrLoadPrcnt</text:p>
          </table:table-cell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10_MotorCurrent</text:p>
          </table:table-cell>
          <table:table-cell table:formula="of:=COM.MICROSOFT.CONCAT(&quot;rtd&quot;;[.A4])" office:value-type="string" office:string-value="rtdAI_Enable1" calcext:value-type="string">
            <text:p>rtdAI_Enable1</text:p>
          </table:table-cell>
          <table:table-cell table:formula="of:=[.B4]" office:value-type="float" office:value="1" calcext:value-type="float">
            <text:p>1</text:p>
          </table:table-cell>
          <table:table-cell table:formula="of:=COM.MICROSOFT.CONCAT([.N$2];[.$L$2];[.$L4];[.$M$2];[.$M4])" office:value-type="string" office:string-value="Разрешено : Ток двигателя TD140" calcext:value-type="string">
            <text:p>Разрешено : Ток двигателя TD140</text:p>
          </table:table-cell>
          <table:table-cell table:formula="of:=COM.MICROSOFT.CONCAT([.O$2];[.$L$2];[.$L4];[.$M$2];[.$M4])" office:value-type="string" office:string-value="Заблокировано : Ток двигателя TD140" calcext:value-type="string">
            <text:p>Заблокировано : Ток двигателя TD140</text:p>
          </table:table-cell>
          <table:table-cell office:value-type="string" calcext:value-type="string">
            <text:p>Ток двигателя</text:p>
          </table:table-cell>
          <table:table-cell office:value-type="string" calcext:value-type="string">
            <text:p>TD1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Control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B1.DBX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11_CoolingWaterSupplyPressure</text:p>
          </table:table-cell>
          <table:table-cell table:formula="of:=COM.MICROSOFT.CONCAT(&quot;rtd&quot;;[.A5])" office:value-type="string" office:string-value="rtdAI_Control1" calcext:value-type="string">
            <text:p>rtdAI_Control1</text:p>
          </table:table-cell>
          <table:table-cell table:formula="of:=[.B5]" office:value-type="float" office:value="10" calcext:value-type="float">
            <text:p>10</text:p>
          </table:table-cell>
          <table:table-cell table:formula="of:=COM.MICROSOFT.CONCAT([.N$2];[.$L$2];[.$L5];[.$M$2];[.$M5])" office:value-type="string" office:string-value="Разрешено : Давление воды PT301" calcext:value-type="string">
            <text:p>Разрешено : Давление воды PT301</text:p>
          </table:table-cell>
          <table:table-cell table:formula="of:=COM.MICROSOFT.CONCAT([.O$2];[.$L$2];[.$L5];[.$M$2];[.$M5])" office:value-type="string" office:string-value="Заблокировано : Давление воды PT301" calcext:value-type="string">
            <text:p>Заблокировано : Давление воды PT301</text:p>
          </table:table-cell>
          <table:table-cell office:value-type="string" calcext:value-type="string">
            <text:p>Давление воды</text:p>
          </table:table-cell>
          <table:table-cell office:value-type="string" calcext:value-type="string">
            <text:p>PT3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Control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B1.DBX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12_MotorBearingDEVibration</text:p>
          </table:table-cell>
          <table:table-cell table:formula="of:=COM.MICROSOFT.CONCAT(&quot;rtd&quot;;[.A6])" office:value-type="string" office:string-value="rtdAI_Control1" calcext:value-type="string">
            <text:p>rtdAI_Control1</text:p>
          </table:table-cell>
          <table:table-cell table:formula="of:=[.B6]" office:value-type="float" office:value="8" calcext:value-type="float">
            <text:p>8</text:p>
          </table:table-cell>
          <table:table-cell table:formula="of:=COM.MICROSOFT.CONCAT([.N$2];[.$L$2];[.$L6];[.$M$2];[.$M6])" office:value-type="string" office:string-value="Разрешено : Вибрация DE подшипника VT#5" calcext:value-type="string">
            <text:p>Разрешено : Вибрация DE подшипника VT#5</text:p>
          </table:table-cell>
          <table:table-cell table:formula="of:=COM.MICROSOFT.CONCAT([.O$2];[.$L$2];[.$L6];[.$M$2];[.$M6])" office:value-type="string" office:string-value="Заблокировано : Вибрация DE подшипника VT#5" calcext:value-type="string">
            <text:p>Заблокировано : Вибрация DE подшипника VT#5</text:p>
          </table:table-cell>
          <table:table-cell office:value-type="string" calcext:value-type="string">
            <text:p>Вибрация DE подшипника</text:p>
          </table:table-cell>
          <table:table-cell office:value-type="string" calcext:value-type="string">
            <text:p>VT#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Control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B1.DBX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13_MotorBearingNDEVibration</text:p>
          </table:table-cell>
          <table:table-cell table:formula="of:=COM.MICROSOFT.CONCAT(&quot;rtd&quot;;[.A7])" office:value-type="string" office:string-value="rtdAI_Control1" calcext:value-type="string">
            <text:p>rtdAI_Control1</text:p>
          </table:table-cell>
          <table:table-cell table:formula="of:=[.B7]" office:value-type="float" office:value="9" calcext:value-type="float">
            <text:p>9</text:p>
          </table:table-cell>
          <table:table-cell table:formula="of:=COM.MICROSOFT.CONCAT([.N$2];[.$L$2];[.$L7];[.$M$2];[.$M7])" office:value-type="string" office:string-value="Разрешено : Вибрация NDE подшипника VT#6" calcext:value-type="string">
            <text:p>Разрешено : Вибрация NDE подшипника VT#6</text:p>
          </table:table-cell>
          <table:table-cell table:formula="of:=COM.MICROSOFT.CONCAT([.O$2];[.$L$2];[.$L7];[.$M$2];[.$M7])" office:value-type="string" office:string-value="Заблокировано : Вибрация NDE подшипника VT#6" calcext:value-type="string">
            <text:p>Заблокировано : Вибрация NDE подшипника VT#6</text:p>
          </table:table-cell>
          <table:table-cell office:value-type="string" calcext:value-type="string">
            <text:p>Вибрация NDE подшипника</text:p>
          </table:table-cell>
          <table:table-cell office:value-type="string" calcext:value-type="string">
            <text:p>VT#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1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14_OilSupplyTemperature</text:p>
          </table:table-cell>
          <table:table-cell table:formula="of:=COM.MICROSOFT.CONCAT(&quot;rtd&quot;;[.A8])" office:value-type="string" office:string-value="rtdAI_Enable1" calcext:value-type="string">
            <text:p>rtdAI_Enable1</text:p>
          </table:table-cell>
          <table:table-cell table:formula="of:=[.B8]" office:value-type="float" office:value="5" calcext:value-type="float">
            <text:p>5</text:p>
          </table:table-cell>
          <table:table-cell table:formula="of:=COM.MICROSOFT.CONCAT([.N$2];[.$L$2];[.$L8];[.$M$2];[.$M8])" office:value-type="string" office:string-value="Разрешено : Температура масла TE130" calcext:value-type="string">
            <text:p>Разрешено : Температура масла TE130</text:p>
          </table:table-cell>
          <table:table-cell table:formula="of:=COM.MICROSOFT.CONCAT([.O$2];[.$L$2];[.$L8];[.$M$2];[.$M8])" office:value-type="string" office:string-value="Заблокировано : Температура масла TE130" calcext:value-type="string">
            <text:p>Заблокировано : Температура масла TE130</text:p>
          </table:table-cell>
          <table:table-cell office:value-type="string" calcext:value-type="string">
            <text:p>Температура масла</text:p>
          </table:table-cell>
          <table:table-cell office:value-type="string" calcext:value-type="string">
            <text:p>TE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1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15_Stage3InletTemperature</text:p>
          </table:table-cell>
          <table:table-cell table:formula="of:=COM.MICROSOFT.CONCAT(&quot;rtd&quot;;[.A9])" office:value-type="string" office:string-value="rtdAI_Enable1" calcext:value-type="string">
            <text:p>rtdAI_Enable1</text:p>
          </table:table-cell>
          <table:table-cell table:formula="of:=[.B9]" office:value-type="float" office:value="6" calcext:value-type="float">
            <text:p>6</text:p>
          </table:table-cell>
          <table:table-cell table:formula="of:=COM.MICROSOFT.CONCAT([.N$2];[.$L$2];[.$L9];[.$M$2];[.$M9])" office:value-type="string" office:string-value="Разрешено : Температура воздуха на входе 3 ступени TE231" calcext:value-type="string">
            <text:p>Разрешено : Температура воздуха на входе 3 ступени TE231</text:p>
          </table:table-cell>
          <table:table-cell table:formula="of:=COM.MICROSOFT.CONCAT([.O$2];[.$L$2];[.$L9];[.$M$2];[.$M9])" office:value-type="string" office:string-value="Заблокировано : Температура воздуха на входе 3 ступени TE231" calcext:value-type="string">
            <text:p>Заблокировано : Температура воздуха на входе 3 ступени TE231</text:p>
          </table:table-cell>
          <table:table-cell office:value-type="string" calcext:value-type="string">
            <text:p>Температура воздуха на входе 3 ступени</text:p>
          </table:table-cell>
          <table:table-cell office:value-type="string" calcext:value-type="string">
            <text:p>TE2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18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16_OilReservoirTemperature</text:p>
          </table:table-cell>
          <table:table-cell table:formula="of:=COM.MICROSOFT.CONCAT(&quot;rtd&quot;;[.A10])" office:value-type="string" office:string-value="rtdAI_Enable1" calcext:value-type="string">
            <text:p>rtdAI_Enable1</text:p>
          </table:table-cell>
          <table:table-cell table:formula="of:=[.B10]" office:value-type="float" office:value="7" calcext:value-type="float">
            <text:p>7</text:p>
          </table:table-cell>
          <table:table-cell table:formula="of:=COM.MICROSOFT.CONCAT([.N$2];[.$L$2];[.$L10];[.$M$2];[.$M10])" office:value-type="string" office:string-value="Разрешено : Температура масла в маслобаке TE101" calcext:value-type="string">
            <text:p>Разрешено : Температура масла в маслобаке TE101</text:p>
          </table:table-cell>
          <table:table-cell table:formula="of:=COM.MICROSOFT.CONCAT([.O$2];[.$L$2];[.$L10];[.$M$2];[.$M10])" office:value-type="string" office:string-value="Заблокировано : Температура масла в маслобаке TE101" calcext:value-type="string">
            <text:p>Заблокировано : Температура масла в маслобаке TE101</text:p>
          </table:table-cell>
          <table:table-cell office:value-type="string" calcext:value-type="string">
            <text:p>Температура масла в маслобаке</text:p>
          </table:table-cell>
          <table:table-cell office:value-type="string" calcext:value-type="string">
            <text:p>TE1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B1.DBX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17_MotorWindingRTemperature</text:p>
          </table:table-cell>
          <table:table-cell table:formula="of:=COM.MICROSOFT.CONCAT(&quot;rtd&quot;;[.A11])" office:value-type="string" office:string-value="rtdAI_Control2" calcext:value-type="string">
            <text:p>rtdAI_Control2</text:p>
          </table:table-cell>
          <table:table-cell table:formula="of:=[.B11]" office:value-type="float" office:value="13" calcext:value-type="float">
            <text:p>13</text:p>
          </table:table-cell>
          <table:table-cell table:formula="of:=COM.MICROSOFT.CONCAT([.N$2];[.$L$2];[.$L11];[.$M$2];[.$M11])" office:value-type="string" office:string-value="Разрешено : Температура обмотки двигателя &quot;R&quot; TE140" calcext:value-type="string">
            <text:p>Разрешено : Температура обмотки двигателя "R" TE140</text:p>
          </table:table-cell>
          <table:table-cell table:formula="of:=COM.MICROSOFT.CONCAT([.O$2];[.$L$2];[.$L11];[.$M$2];[.$M11])" office:value-type="string" office:string-value="Заблокировано : Температура обмотки двигателя &quot;R&quot; TE140" calcext:value-type="string">
            <text:p>Заблокировано : Температура обмотки двигателя "R" TE140</text:p>
          </table:table-cell>
          <table:table-cell office:value-type="string" calcext:value-type="string">
            <text:p>Температура обмотки двигателя "R"</text:p>
          </table:table-cell>
          <table:table-cell office:value-type="string" calcext:value-type="string">
            <text:p>TE1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B1.DBX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18_MotorBearingDETemperature</text:p>
          </table:table-cell>
          <table:table-cell table:formula="of:=COM.MICROSOFT.CONCAT(&quot;rtd&quot;;[.A12])" office:value-type="string" office:string-value="rtdAI_Control2" calcext:value-type="string">
            <text:p>rtdAI_Control2</text:p>
          </table:table-cell>
          <table:table-cell table:formula="of:=[.B12]" office:value-type="float" office:value="14" calcext:value-type="float">
            <text:p>14</text:p>
          </table:table-cell>
          <table:table-cell table:formula="of:=COM.MICROSOFT.CONCAT([.N$2];[.$L$2];[.$L12];[.$M$2];[.$M12])" office:value-type="string" office:string-value="Разрешено : Температура DE подшипника TE143" calcext:value-type="string">
            <text:p>Разрешено : Температура DE подшипника TE143</text:p>
          </table:table-cell>
          <table:table-cell table:formula="of:=COM.MICROSOFT.CONCAT([.O$2];[.$L$2];[.$L12];[.$M$2];[.$M12])" office:value-type="string" office:string-value="Заблокировано : Температура DE подшипника TE143" calcext:value-type="string">
            <text:p>Заблокировано : Температура DE подшипника TE143</text:p>
          </table:table-cell>
          <table:table-cell office:value-type="string" calcext:value-type="string">
            <text:p>Температура DE подшипника</text:p>
          </table:table-cell>
          <table:table-cell office:value-type="string" calcext:value-type="string">
            <text:p>TE1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B1.DBX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19_MotorBearingNDETemperature</text:p>
          </table:table-cell>
          <table:table-cell table:formula="of:=COM.MICROSOFT.CONCAT(&quot;rtd&quot;;[.A13])" office:value-type="string" office:string-value="rtdAI_Control2" calcext:value-type="string">
            <text:p>rtdAI_Control2</text:p>
          </table:table-cell>
          <table:table-cell table:formula="of:=[.B13]" office:value-type="float" office:value="15" calcext:value-type="float">
            <text:p>15</text:p>
          </table:table-cell>
          <table:table-cell table:formula="of:=COM.MICROSOFT.CONCAT([.N$2];[.$L$2];[.$L13];[.$M$2];[.$M13])" office:value-type="string" office:string-value="Разрешено : Температура NDE подшипника TE144" calcext:value-type="string">
            <text:p>Разрешено : Температура NDE подшипника TE144</text:p>
          </table:table-cell>
          <table:table-cell table:formula="of:=COM.MICROSOFT.CONCAT([.O$2];[.$L$2];[.$L13];[.$M$2];[.$M13])" office:value-type="string" office:string-value="Заблокировано : Температура NDE подшипника TE144" calcext:value-type="string">
            <text:p>Заблокировано : Температура NDE подшипника TE144</text:p>
          </table:table-cell>
          <table:table-cell office:value-type="string" calcext:value-type="string">
            <text:p>Температура NDE подшипника</text:p>
          </table:table-cell>
          <table:table-cell office:value-type="string" calcext:value-type="string">
            <text:p>TE1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2_BOVPosition</text:p>
          </table:table-cell>
          <table:table-cell table:formula="of:=COM.MICROSOFT.CONCAT(&quot;rtd&quot;;[.A14])" office:value-type="string" office:string-value="rtdAI_Enable1" calcext:value-type="string">
            <text:p>rtdAI_Enable1</text:p>
          </table:table-cell>
          <table:table-cell table:formula="of:=[.B14]" office:value-type="float" office:value="9" calcext:value-type="float">
            <text:p>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I_Enable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B1.DBX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20_Stage2InletTemperature</text:p>
          </table:table-cell>
          <table:table-cell table:formula="of:=COM.MICROSOFT.CONCAT(&quot;rtd&quot;;[.A15])" office:value-type="string" office:string-value="rtdAI_Enable2" calcext:value-type="string">
            <text:p>rtdAI_Enable2</text:p>
          </table:table-cell>
          <table:table-cell table:formula="of:=[.B15]" office:value-type="float" office:value="10" calcext:value-type="float">
            <text:p>10</text:p>
          </table:table-cell>
          <table:table-cell table:formula="of:=COM.MICROSOFT.CONCAT([.N$2];[.$L$2];[.$L15];[.$M$2];[.$M15])" office:value-type="string" office:string-value="Разрешено : Температура воздуха на входе 2 ступени TE221" calcext:value-type="string">
            <text:p>Разрешено : Температура воздуха на входе 2 ступени TE221</text:p>
          </table:table-cell>
          <table:table-cell table:formula="of:=COM.MICROSOFT.CONCAT([.O$2];[.$L$2];[.$L15];[.$M$2];[.$M15])" office:value-type="string" office:string-value="Заблокировано : Температура воздуха на входе 2 ступени TE221" calcext:value-type="string">
            <text:p>Заблокировано : Температура воздуха на входе 2 ступени TE221</text:p>
          </table:table-cell>
          <table:table-cell office:value-type="string" calcext:value-type="string">
            <text:p>Температура воздуха на входе 2 ступени</text:p>
          </table:table-cell>
          <table:table-cell office:value-type="string" calcext:value-type="string">
            <text:p>TE2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Enable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B1.DBX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21_N1OutletTemp</text:p>
          </table:table-cell>
          <table:table-cell table:formula="of:=COM.MICROSOFT.CONCAT(&quot;rtd&quot;;[.A16])" office:value-type="string" office:string-value="rtdAI_Enable2" calcext:value-type="string">
            <text:p>rtdAI_Enable2</text:p>
          </table:table-cell>
          <table:table-cell table:formula="of:=[.B16]" office:value-type="float" office:value="3" calcext:value-type="float">
            <text:p>3</text:p>
          </table:table-cell>
          <table:table-cell table:formula="of:=COM.MICROSOFT.CONCAT([.N$2];[.$L$2];[.$L16];[.$M$2];[.$M16])" office:value-type="string" office:string-value="Разрешено : Температура воздуха на выходе 1 ступени TE212" calcext:value-type="string">
            <text:p>Разрешено : Температура воздуха на выходе 1 ступени TE212</text:p>
          </table:table-cell>
          <table:table-cell table:formula="of:=COM.MICROSOFT.CONCAT([.O$2];[.$L$2];[.$L16];[.$M$2];[.$M16])" office:value-type="string" office:string-value="Заблокировано : Температура воздуха на выходе 1 ступени TE212" calcext:value-type="string">
            <text:p>Заблокировано : Температура воздуха на выходе 1 ступени TE212</text:p>
          </table:table-cell>
          <table:table-cell office:value-type="string" calcext:value-type="string">
            <text:p>Температура воздуха на выходе 1 ступени</text:p>
          </table:table-cell>
          <table:table-cell office:value-type="string" calcext:value-type="string">
            <text:p>TE2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Enable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B1.DBX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22_N2OutletTemp</text:p>
          </table:table-cell>
          <table:table-cell table:formula="of:=COM.MICROSOFT.CONCAT(&quot;rtd&quot;;[.A17])" office:value-type="string" office:string-value="rtdAI_Enable2" calcext:value-type="string">
            <text:p>rtdAI_Enable2</text:p>
          </table:table-cell>
          <table:table-cell table:formula="of:=[.B17]" office:value-type="float" office:value="4" calcext:value-type="float">
            <text:p>4</text:p>
          </table:table-cell>
          <table:table-cell table:formula="of:=COM.MICROSOFT.CONCAT([.N$2];[.$L$2];[.$L17];[.$M$2];[.$M17])" office:value-type="string" office:string-value="Разрешено : Температура воздуха на выходе 2 ступени TE222" calcext:value-type="string">
            <text:p>Разрешено : Температура воздуха на выходе 2 ступени TE222</text:p>
          </table:table-cell>
          <table:table-cell table:formula="of:=COM.MICROSOFT.CONCAT([.O$2];[.$L$2];[.$L17];[.$M$2];[.$M17])" office:value-type="string" office:string-value="Заблокировано : Температура воздуха на выходе 2 ступени TE222" calcext:value-type="string">
            <text:p>Заблокировано : Температура воздуха на выходе 2 ступени TE222</text:p>
          </table:table-cell>
          <table:table-cell office:value-type="string" calcext:value-type="string">
            <text:p>Температура воздуха на выходе 2 ступени</text:p>
          </table:table-cell>
          <table:table-cell office:value-type="string" calcext:value-type="string">
            <text:p>TE2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Enable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1.DBX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23_N3OutletTemp</text:p>
          </table:table-cell>
          <table:table-cell table:formula="of:=COM.MICROSOFT.CONCAT(&quot;rtd&quot;;[.A18])" office:value-type="string" office:string-value="rtdAI_Enable2" calcext:value-type="string">
            <text:p>rtdAI_Enable2</text:p>
          </table:table-cell>
          <table:table-cell table:formula="of:=[.B18]" office:value-type="float" office:value="5" calcext:value-type="float">
            <text:p>5</text:p>
          </table:table-cell>
          <table:table-cell table:formula="of:=COM.MICROSOFT.CONCAT([.N$2];[.$L$2];[.$L18];[.$M$2];[.$M18])" office:value-type="string" office:string-value="Разрешено : Температура воздуха на выходе 3 ступени TE232" calcext:value-type="string">
            <text:p>Разрешено : Температура воздуха на выходе 3 ступени TE232</text:p>
          </table:table-cell>
          <table:table-cell table:formula="of:=COM.MICROSOFT.CONCAT([.O$2];[.$L$2];[.$L18];[.$M$2];[.$M18])" office:value-type="string" office:string-value="Заблокировано : Температура воздуха на выходе 3 ступени TE232" calcext:value-type="string">
            <text:p>Заблокировано : Температура воздуха на выходе 3 ступени TE232</text:p>
          </table:table-cell>
          <table:table-cell office:value-type="string" calcext:value-type="string">
            <text:p>Температура воздуха на выходе 3 ступени</text:p>
          </table:table-cell>
          <table:table-cell office:value-type="string" calcext:value-type="string">
            <text:p>TE2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Enable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B1.DBX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24_CoolingWaterSupplyTemp</text:p>
          </table:table-cell>
          <table:table-cell table:formula="of:=COM.MICROSOFT.CONCAT(&quot;rtd&quot;;[.A19])" office:value-type="string" office:string-value="rtdAI_Enable2" calcext:value-type="string">
            <text:p>rtdAI_Enable2</text:p>
          </table:table-cell>
          <table:table-cell table:formula="of:=[.B19]" office:value-type="float" office:value="6" calcext:value-type="float">
            <text:p>6</text:p>
          </table:table-cell>
          <table:table-cell table:formula="of:=COM.MICROSOFT.CONCAT([.N$2];[.$L$2];[.$L19];[.$M$2];[.$M19])" office:value-type="string" office:string-value="Разрешено : Температура охлаждающей воды на входе TE301" calcext:value-type="string">
            <text:p>Разрешено : Температура охлаждающей воды на входе TE301</text:p>
          </table:table-cell>
          <table:table-cell table:formula="of:=COM.MICROSOFT.CONCAT([.O$2];[.$L$2];[.$L19];[.$M$2];[.$M19])" office:value-type="string" office:string-value="Заблокировано : Температура охлаждающей воды на входе TE301" calcext:value-type="string">
            <text:p>Заблокировано : Температура охлаждающей воды на входе TE301</text:p>
          </table:table-cell>
          <table:table-cell office:value-type="string" calcext:value-type="string">
            <text:p>Температура охлаждающей воды на входе</text:p>
          </table:table-cell>
          <table:table-cell office:value-type="string" calcext:value-type="string">
            <text:p>TE3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Enable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B1.DBX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25_CoolingWateReturnTemp</text:p>
          </table:table-cell>
          <table:table-cell table:formula="of:=COM.MICROSOFT.CONCAT(&quot;rtd&quot;;[.A20])" office:value-type="string" office:string-value="rtdAI_Enable3" calcext:value-type="string">
            <text:p>rtdAI_Enable3</text:p>
          </table:table-cell>
          <table:table-cell table:formula="of:=[.B20]" office:value-type="float" office:value="15" calcext:value-type="float">
            <text:p>15</text:p>
          </table:table-cell>
          <table:table-cell table:formula="of:=COM.MICROSOFT.CONCAT([.N$2];[.$L$2];[.$L20];[.$M$2];[.$M20])" office:value-type="string" office:string-value="Разрешено : Температура охлаждающей воды на выходе TE302" calcext:value-type="string">
            <text:p>Разрешено : Температура охлаждающей воды на выходе TE302</text:p>
          </table:table-cell>
          <table:table-cell table:formula="of:=COM.MICROSOFT.CONCAT([.O$2];[.$L$2];[.$L20];[.$M$2];[.$M20])" office:value-type="string" office:string-value="Заблокировано : Температура охлаждающей воды на выходе TE302" calcext:value-type="string">
            <text:p>Заблокировано : Температура охлаждающей воды на выходе TE302</text:p>
          </table:table-cell>
          <table:table-cell office:value-type="string" calcext:value-type="string">
            <text:p>Температура охлаждающей воды на выходе</text:p>
          </table:table-cell>
          <table:table-cell office:value-type="string" calcext:value-type="string">
            <text:p>TE3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Enable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B1.DBX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26_SystemTemperature</text:p>
          </table:table-cell>
          <table:table-cell table:formula="of:=COM.MICROSOFT.CONCAT(&quot;rtd&quot;;[.A21])" office:value-type="string" office:string-value="rtdAI_Enable2" calcext:value-type="string">
            <text:p>rtdAI_Enable2</text:p>
          </table:table-cell>
          <table:table-cell table:formula="of:=[.B21]" office:value-type="float" office:value="11" calcext:value-type="float">
            <text:p>1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3_SystemPressure</text:p>
          </table:table-cell>
          <table:table-cell table:formula="of:=COM.MICROSOFT.CONCAT(&quot;rtd&quot;;[.A22])" office:value-type="string" office:string-value="rtdAI_Enable1" calcext:value-type="string">
            <text:p>rtdAI_Enable1</text:p>
          </table:table-cell>
          <table:table-cell table:formula="of:=[.B22]" office:value-type="float" office:value="10" calcext:value-type="float">
            <text:p>10</text:p>
          </table:table-cell>
          <table:table-cell table:formula="of:=COM.MICROSOFT.CONCAT([.N$2];[.$L$2];[.$L22];[.$M$2];[.$M22])" office:value-type="string" office:string-value="Разрешено : Давление на напоре PT260" calcext:value-type="string">
            <text:p>Разрешено : Давление на напоре PT260</text:p>
          </table:table-cell>
          <table:table-cell table:formula="of:=COM.MICROSOFT.CONCAT([.O$2];[.$L$2];[.$L22];[.$M$2];[.$M22])" office:value-type="string" office:string-value="Заблокировано : Давление на напоре PT260" calcext:value-type="string">
            <text:p>Заблокировано : Давление на напоре PT260</text:p>
          </table:table-cell>
          <table:table-cell office:value-type="string" calcext:value-type="string">
            <text:p>Давление на напоре</text:p>
          </table:table-cell>
          <table:table-cell office:value-type="string" calcext:value-type="string">
            <text:p>PT2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1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4_Stage3DischargePressure</text:p>
          </table:table-cell>
          <table:table-cell table:formula="of:=COM.MICROSOFT.CONCAT(&quot;rtd&quot;;[.A23])" office:value-type="string" office:string-value="rtdAI_Enable1" calcext:value-type="string">
            <text:p>rtdAI_Enable1</text:p>
          </table:table-cell>
          <table:table-cell table:formula="of:=[.B23]" office:value-type="float" office:value="11" calcext:value-type="float">
            <text:p>11</text:p>
          </table:table-cell>
          <table:table-cell table:formula="of:=COM.MICROSOFT.CONCAT([.N$2];[.$L$2];[.$L23];[.$M$2];[.$M23])" office:value-type="string" office:string-value="Разрешено : Давление 3 ступени PT232" calcext:value-type="string">
            <text:p>Разрешено : Давление 3 ступени PT232</text:p>
          </table:table-cell>
          <table:table-cell table:formula="of:=COM.MICROSOFT.CONCAT([.O$2];[.$L$2];[.$L23];[.$M$2];[.$M23])" office:value-type="string" office:string-value="Заблокировано : Давление 3 ступени PT232" calcext:value-type="string">
            <text:p>Заблокировано : Давление 3 ступени PT232</text:p>
          </table:table-cell>
          <table:table-cell office:value-type="string" calcext:value-type="string">
            <text:p>Давление 3 ступени</text:p>
          </table:table-cell>
          <table:table-cell office:value-type="string" calcext:value-type="string">
            <text:p>PT2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1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5_OilSupplyPressure</text:p>
          </table:table-cell>
          <table:table-cell table:formula="of:=COM.MICROSOFT.CONCAT(&quot;rtd&quot;;[.A24])" office:value-type="string" office:string-value="rtdAI_Enable1" calcext:value-type="string">
            <text:p>rtdAI_Enable1</text:p>
          </table:table-cell>
          <table:table-cell table:formula="of:=[.B24]" office:value-type="float" office:value="12" calcext:value-type="float">
            <text:p>12</text:p>
          </table:table-cell>
          <table:table-cell table:formula="of:=COM.MICROSOFT.CONCAT([.N$2];[.$L$2];[.$L24];[.$M$2];[.$M24])" office:value-type="string" office:string-value="Разрешено : Давление масла PT130" calcext:value-type="string">
            <text:p>Разрешено : Давление масла PT130</text:p>
          </table:table-cell>
          <table:table-cell table:formula="of:=COM.MICROSOFT.CONCAT([.O$2];[.$L$2];[.$L24];[.$M$2];[.$M24])" office:value-type="string" office:string-value="Заблокировано : Давление масла PT130" calcext:value-type="string">
            <text:p>Заблокировано : Давление масла PT130</text:p>
          </table:table-cell>
          <table:table-cell office:value-type="string" calcext:value-type="string">
            <text:p>Давление масла</text:p>
          </table:table-cell>
          <table:table-cell office:value-type="string" calcext:value-type="string">
            <text:p>PT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1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6_Stage1Vibration</text:p>
          </table:table-cell>
          <table:table-cell table:formula="of:=COM.MICROSOFT.CONCAT(&quot;rtd&quot;;[.A25])" office:value-type="string" office:string-value="rtdAI_Enable1" calcext:value-type="string">
            <text:p>rtdAI_Enable1</text:p>
          </table:table-cell>
          <table:table-cell table:formula="of:=[.B25]" office:value-type="float" office:value="13" calcext:value-type="float">
            <text:p>13</text:p>
          </table:table-cell>
          <table:table-cell table:formula="of:=COM.MICROSOFT.CONCAT([.N$2];[.$L$2];[.$L25];[.$M$2];[.$M25])" office:value-type="string" office:string-value="Разрешено : Вибрация 1 ступени VT#1" calcext:value-type="string">
            <text:p>Разрешено : Вибрация 1 ступени VT#1</text:p>
          </table:table-cell>
          <table:table-cell table:formula="of:=COM.MICROSOFT.CONCAT([.O$2];[.$L$2];[.$L25];[.$M$2];[.$M25])" office:value-type="string" office:string-value="Заблокировано : Вибрация 1 ступени VT#1" calcext:value-type="string">
            <text:p>Заблокировано : Вибрация 1 ступени VT#1</text:p>
          </table:table-cell>
          <table:table-cell office:value-type="string" calcext:value-type="string">
            <text:p>Вибрация 1 ступени</text:p>
          </table:table-cell>
          <table:table-cell office:value-type="string" calcext:value-type="string">
            <text:p>VT#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1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7_Stage2Vibration</text:p>
          </table:table-cell>
          <table:table-cell table:formula="of:=COM.MICROSOFT.CONCAT(&quot;rtd&quot;;[.A26])" office:value-type="string" office:string-value="rtdAI_Enable1" calcext:value-type="string">
            <text:p>rtdAI_Enable1</text:p>
          </table:table-cell>
          <table:table-cell table:formula="of:=[.B26]" office:value-type="float" office:value="14" calcext:value-type="float">
            <text:p>14</text:p>
          </table:table-cell>
          <table:table-cell table:formula="of:=COM.MICROSOFT.CONCAT([.N$2];[.$L$2];[.$L26];[.$M$2];[.$M26])" office:value-type="string" office:string-value="Разрешено : Вибрация 2 ступени VT#2" calcext:value-type="string">
            <text:p>Разрешено : Вибрация 2 ступени VT#2</text:p>
          </table:table-cell>
          <table:table-cell table:formula="of:=COM.MICROSOFT.CONCAT([.O$2];[.$L$2];[.$L26];[.$M$2];[.$M26])" office:value-type="string" office:string-value="Заблокировано : Вибрация 2 ступени VT#2" calcext:value-type="string">
            <text:p>Заблокировано : Вибрация 2 ступени VT#2</text:p>
          </table:table-cell>
          <table:table-cell office:value-type="string" calcext:value-type="string">
            <text:p>Вибрация 2 ступени</text:p>
          </table:table-cell>
          <table:table-cell office:value-type="string" calcext:value-type="string">
            <text:p>VT#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18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8_Stage3Vibration</text:p>
          </table:table-cell>
          <table:table-cell table:formula="of:=COM.MICROSOFT.CONCAT(&quot;rtd&quot;;[.A27])" office:value-type="string" office:string-value="rtdAI_Enable1" calcext:value-type="string">
            <text:p>rtdAI_Enable1</text:p>
          </table:table-cell>
          <table:table-cell table:formula="of:=[.B27]" office:value-type="float" office:value="15" calcext:value-type="float">
            <text:p>15</text:p>
          </table:table-cell>
          <table:table-cell table:formula="of:=COM.MICROSOFT.CONCAT([.N$2];[.$L$2];[.$L27];[.$M$2];[.$M27])" office:value-type="string" office:string-value="Разрешено : Вибрация 3 ступени VT#3" calcext:value-type="string">
            <text:p>Разрешено : Вибрация 3 ступени VT#3</text:p>
          </table:table-cell>
          <table:table-cell table:formula="of:=COM.MICROSOFT.CONCAT([.O$2];[.$L$2];[.$L27];[.$M$2];[.$M27])" office:value-type="string" office:string-value="Заблокировано : Вибрация 3 ступени VT#3" calcext:value-type="string">
            <text:p>Заблокировано : Вибрация 3 ступени VT#3</text:p>
          </table:table-cell>
          <table:table-cell office:value-type="string" calcext:value-type="string">
            <text:p>Вибрация 3 ступени</text:p>
          </table:table-cell>
          <table:table-cell office:value-type="string" calcext:value-type="string">
            <text:p>VT#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Enable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B1.DBX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9_OilFilterDiffPressure</text:p>
          </table:table-cell>
          <table:table-cell table:formula="of:=COM.MICROSOFT.CONCAT(&quot;rtd&quot;;[.A28])" office:value-type="string" office:string-value="rtdAI_Enable2" calcext:value-type="string">
            <text:p>rtdAI_Enable2</text:p>
          </table:table-cell>
          <table:table-cell table:formula="of:=[.B28]" office:value-type="float" office:value="9" calcext:value-type="float">
            <text:p>9</text:p>
          </table:table-cell>
          <table:table-cell table:formula="of:=COM.MICROSOFT.CONCAT([.N$2];[.$L$2];[.$L28];[.$M$2];[.$M28])" office:value-type="string" office:string-value="Разрешено : Перепад давления масла на маслофильтре  PDT120" calcext:value-type="string">
            <text:p>Разрешено : Перепад давления масла на маслофильтре <text:s/>PDT120</text:p>
          </table:table-cell>
          <table:table-cell table:formula="of:=COM.MICROSOFT.CONCAT([.O$2];[.$L$2];[.$L28];[.$M$2];[.$M28])" office:value-type="string" office:string-value="Заблокировано : Перепад давления масла на маслофильтре  PDT120" calcext:value-type="string">
            <text:p>Заблокировано : Перепад давления масла на маслофильтре <text:s/>PDT120</text:p>
          </table:table-cell>
          <table:table-cell office:value-type="string" calcext:value-type="string">
            <text:p>Перепад давления масла на маслофильтре </text:p>
          </table:table-cell>
          <table:table-cell office:value-type="string" calcext:value-type="string">
            <text:p>PDT1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1_IGVPosition</text:p>
          </table:table-cell>
          <table:table-cell table:formula="of:=COM.MICROSOFT.CONCAT(&quot;rtd&quot;;[.A29])" office:value-type="string" office:string-value="rtdAI_WarnUse1" calcext:value-type="string">
            <text:p>rtdAI_WarnUse1</text:p>
          </table:table-cell>
          <table:table-cell table:formula="of:=[.B29]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2_BOVPosition</text:p>
          </table:table-cell>
          <table:table-cell table:formula="of:=COM.MICROSOFT.CONCAT(&quot;rtd&quot;;[.A30])" office:value-type="string" office:string-value="rtdAI_WarnUse1" calcext:value-type="string">
            <text:p>rtdAI_WarnUse1</text:p>
          </table:table-cell>
          <table:table-cell table:formula="of:=[.B30]" office:value-type="float" office:value="9" calcext:value-type="float">
            <text:p>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1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3_SystemPressure</text:p>
          </table:table-cell>
          <table:table-cell table:formula="of:=COM.MICROSOFT.CONCAT(&quot;rtd&quot;;[.A31])" office:value-type="string" office:string-value="rtdAI_WarnUse1" calcext:value-type="string">
            <text:p>rtdAI_WarnUse1</text:p>
          </table:table-cell>
          <table:table-cell table:formula="of:=[.B31]" office:value-type="float" office:value="10" calcext:value-type="float">
            <text:p>10</text:p>
          </table:table-cell>
          <table:table-cell table:formula="of:=COM.MICROSOFT.CONCAT([.N$31];[.$L$2];[.$L31];[.$M$2];[.$M31])" office:value-type="string" office:string-value="Предупреждение активировано : Давление на напоре PT260" calcext:value-type="string">
            <text:p>Предупреждение активировано : Давление на напоре PT260</text:p>
          </table:table-cell>
          <table:table-cell table:formula="of:=COM.MICROSOFT.CONCAT([.O$31];[.$L$2];[.$L31];[.$M$2];[.$M31])" office:value-type="string" office:string-value="Предупреждение отключено : Давление на напоре PT260" calcext:value-type="string">
            <text:p>Предупреждение отключено : Давление на напоре PT260</text:p>
          </table:table-cell>
          <table:table-cell office:value-type="string" calcext:value-type="string">
            <text:p>Давление на напоре</text:p>
          </table:table-cell>
          <table:table-cell office:value-type="string" calcext:value-type="string">
            <text:p>PT260</text:p>
          </table:table-cell>
          <table:table-cell office:value-type="string" calcext:value-type="string">
            <text:p>Предупреждение активировано</text:p>
          </table:table-cell>
          <table:table-cell office:value-type="string" calcext:value-type="string">
            <text:p>Предупреждение отключено</text:p>
          </table:table-cell>
          <table:table-cell/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4_Stage3DischargePressure</text:p>
          </table:table-cell>
          <table:table-cell table:formula="of:=COM.MICROSOFT.CONCAT(&quot;rtd&quot;;[.A32])" office:value-type="string" office:string-value="rtdAI_WarnUse1" calcext:value-type="string">
            <text:p>rtdAI_WarnUse1</text:p>
          </table:table-cell>
          <table:table-cell table:formula="of:=[.B32]" office:value-type="float" office:value="11" calcext:value-type="float">
            <text:p>11</text:p>
          </table:table-cell>
          <table:table-cell table:formula="of:=COM.MICROSOFT.CONCAT([.N$31];[.$L$2];[.$L32];[.$M$2];[.$M32])" office:value-type="string" office:string-value="Предупреждение активировано : Давление 3 ступени PT232" calcext:value-type="string">
            <text:p>Предупреждение активировано : Давление 3 ступени PT232</text:p>
          </table:table-cell>
          <table:table-cell table:formula="of:=COM.MICROSOFT.CONCAT([.O$31];[.$L$2];[.$L32];[.$M$2];[.$M32])" office:value-type="string" office:string-value="Предупреждение отключено : Давление 3 ступени PT232" calcext:value-type="string">
            <text:p>Предупреждение отключено : Давление 3 ступени PT232</text:p>
          </table:table-cell>
          <table:table-cell office:value-type="string" calcext:value-type="string">
            <text:p>Давление 3 ступени</text:p>
          </table:table-cell>
          <table:table-cell office:value-type="string" calcext:value-type="string">
            <text:p>PT2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1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5_OilSupplyPressure</text:p>
          </table:table-cell>
          <table:table-cell table:formula="of:=COM.MICROSOFT.CONCAT(&quot;rtd&quot;;[.A33])" office:value-type="string" office:string-value="rtdAI_WarnUse1" calcext:value-type="string">
            <text:p>rtdAI_WarnUse1</text:p>
          </table:table-cell>
          <table:table-cell table:formula="of:=[.B33]" office:value-type="float" office:value="12" calcext:value-type="float">
            <text:p>12</text:p>
          </table:table-cell>
          <table:table-cell table:formula="of:=COM.MICROSOFT.CONCAT([.N$31];[.$L$2];[.$L33];[.$M$2];[.$M33])" office:value-type="string" office:string-value="Предупреждение активировано : Давление масла PT130" calcext:value-type="string">
            <text:p>Предупреждение активировано : Давление масла PT130</text:p>
          </table:table-cell>
          <table:table-cell table:formula="of:=COM.MICROSOFT.CONCAT([.O$31];[.$L$2];[.$L33];[.$M$2];[.$M33])" office:value-type="string" office:string-value="Предупреждение отключено : Давление масла PT130" calcext:value-type="string">
            <text:p>Предупреждение отключено : Давление масла PT130</text:p>
          </table:table-cell>
          <table:table-cell office:value-type="string" calcext:value-type="string">
            <text:p>Давление масла</text:p>
          </table:table-cell>
          <table:table-cell office:value-type="string" calcext:value-type="string">
            <text:p>PT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1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6_Stage1Vibration</text:p>
          </table:table-cell>
          <table:table-cell table:formula="of:=COM.MICROSOFT.CONCAT(&quot;rtd&quot;;[.A34])" office:value-type="string" office:string-value="rtdAI_WarnUse1" calcext:value-type="string">
            <text:p>rtdAI_WarnUse1</text:p>
          </table:table-cell>
          <table:table-cell table:formula="of:=[.B34]" office:value-type="float" office:value="13" calcext:value-type="float">
            <text:p>13</text:p>
          </table:table-cell>
          <table:table-cell table:formula="of:=COM.MICROSOFT.CONCAT([.N$31];[.$L$2];[.$L34];[.$M$2];[.$M34])" office:value-type="string" office:string-value="Предупреждение активировано : Вибрация 1 ступени VT#1" calcext:value-type="string">
            <text:p>Предупреждение активировано : Вибрация 1 ступени VT#1</text:p>
          </table:table-cell>
          <table:table-cell table:formula="of:=COM.MICROSOFT.CONCAT([.O$31];[.$L$2];[.$L34];[.$M$2];[.$M34])" office:value-type="string" office:string-value="Предупреждение отключено : Вибрация 1 ступени VT#1" calcext:value-type="string">
            <text:p>Предупреждение отключено : Вибрация 1 ступени VT#1</text:p>
          </table:table-cell>
          <table:table-cell office:value-type="string" calcext:value-type="string">
            <text:p>Вибрация 1 ступени</text:p>
          </table:table-cell>
          <table:table-cell office:value-type="string" calcext:value-type="string">
            <text:p>VT#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1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7_Stage2Vibration</text:p>
          </table:table-cell>
          <table:table-cell table:formula="of:=COM.MICROSOFT.CONCAT(&quot;rtd&quot;;[.A35])" office:value-type="string" office:string-value="rtdAI_WarnUse1" calcext:value-type="string">
            <text:p>rtdAI_WarnUse1</text:p>
          </table:table-cell>
          <table:table-cell table:formula="of:=[.B35]" office:value-type="float" office:value="14" calcext:value-type="float">
            <text:p>14</text:p>
          </table:table-cell>
          <table:table-cell table:formula="of:=COM.MICROSOFT.CONCAT([.N$31];[.$L$2];[.$L35];[.$M$2];[.$M35])" office:value-type="string" office:string-value="Предупреждение активировано : Вибрация 2 ступени VT#2" calcext:value-type="string">
            <text:p>Предупреждение активировано : Вибрация 2 ступени VT#2</text:p>
          </table:table-cell>
          <table:table-cell table:formula="of:=COM.MICROSOFT.CONCAT([.O$31];[.$L$2];[.$L35];[.$M$2];[.$M35])" office:value-type="string" office:string-value="Предупреждение отключено : Вибрация 2 ступени VT#2" calcext:value-type="string">
            <text:p>Предупреждение отключено : Вибрация 2 ступени VT#2</text:p>
          </table:table-cell>
          <table:table-cell office:value-type="string" calcext:value-type="string">
            <text:p>Вибрация 2 ступени</text:p>
          </table:table-cell>
          <table:table-cell office:value-type="string" calcext:value-type="string">
            <text:p>VT#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1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8_Stage3Vibration</text:p>
          </table:table-cell>
          <table:table-cell table:formula="of:=COM.MICROSOFT.CONCAT(&quot;rtd&quot;;[.A36])" office:value-type="string" office:string-value="rtdAI_WarnUse1" calcext:value-type="string">
            <text:p>rtdAI_WarnUse1</text:p>
          </table:table-cell>
          <table:table-cell table:formula="of:=[.B36]" office:value-type="float" office:value="15" calcext:value-type="float">
            <text:p>15</text:p>
          </table:table-cell>
          <table:table-cell table:formula="of:=COM.MICROSOFT.CONCAT([.N$31];[.$L$2];[.$L36];[.$M$2];[.$M36])" office:value-type="string" office:string-value="Предупреждение активировано : Вибрация 3 ступени VT#3" calcext:value-type="string">
            <text:p>Предупреждение активировано : Вибрация 3 ступени VT#3</text:p>
          </table:table-cell>
          <table:table-cell table:formula="of:=COM.MICROSOFT.CONCAT([.O$31];[.$L$2];[.$L36];[.$M$2];[.$M36])" office:value-type="string" office:string-value="Предупреждение отключено : Вибрация 3 ступени VT#3" calcext:value-type="string">
            <text:p>Предупреждение отключено : Вибрация 3 ступени VT#3</text:p>
          </table:table-cell>
          <table:table-cell office:value-type="string" calcext:value-type="string">
            <text:p>Вибрация 3 ступени</text:p>
          </table:table-cell>
          <table:table-cell office:value-type="string" calcext:value-type="string">
            <text:p>VT#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B1.DBX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9_OilFilterDiffPressure</text:p>
          </table:table-cell>
          <table:table-cell table:formula="of:=COM.MICROSOFT.CONCAT(&quot;rtd&quot;;[.A37])" office:value-type="string" office:string-value="rtdAI_Control2" calcext:value-type="string">
            <text:p>rtdAI_Control2</text:p>
          </table:table-cell>
          <table:table-cell table:formula="of:=[.B37]" office:value-type="float" office:value="11" calcext:value-type="float">
            <text:p>11</text:p>
          </table:table-cell>
          <table:table-cell table:formula="of:=COM.MICROSOFT.CONCAT([.N$31];[.$L$2];[.$L37];[.$M$2];[.$M37])" office:value-type="string" office:string-value="Предупреждение активировано : Перепад давления масла на маслофильтре  PDT120" calcext:value-type="string">
            <text:p>Предупреждение активировано : Перепад давления масла на маслофильтре <text:s/>PDT120</text:p>
          </table:table-cell>
          <table:table-cell table:formula="of:=COM.MICROSOFT.CONCAT([.O$31];[.$L$2];[.$L37];[.$M$2];[.$M37])" office:value-type="string" office:string-value="Предупреждение отключено : Перепад давления масла на маслофильтре  PDT120" calcext:value-type="string">
            <text:p>Предупреждение отключено : Перепад давления масла на маслофильтре <text:s/>PDT120</text:p>
          </table:table-cell>
          <table:table-cell office:value-type="string" calcext:value-type="string">
            <text:p>Перепад давления масла на маслофильтре </text:p>
          </table:table-cell>
          <table:table-cell office:value-type="string" calcext:value-type="string">
            <text:p>PDT1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10_MotorCurrent</text:p>
          </table:table-cell>
          <table:table-cell table:formula="of:=COM.MICROSOFT.CONCAT(&quot;rtd&quot;;[.A38])" office:value-type="string" office:string-value="rtdAI_WarnUse1" calcext:value-type="string">
            <text:p>rtdAI_WarnUse1</text:p>
          </table:table-cell>
          <table:table-cell table:formula="of:=[.B38]" office:value-type="float" office:value="1" calcext:value-type="float">
            <text:p>1</text:p>
          </table:table-cell>
          <table:table-cell table:formula="of:=COM.MICROSOFT.CONCAT([.N$31];[.$L$2];[.$L38];[.$M$2];[.$M38])" office:value-type="string" office:string-value="Предупреждение активировано : Ток двигателя TD140" calcext:value-type="string">
            <text:p>Предупреждение активировано : Ток двигателя TD140</text:p>
          </table:table-cell>
          <table:table-cell table:formula="of:=COM.MICROSOFT.CONCAT([.O$31];[.$L$2];[.$L38];[.$M$2];[.$M38])" office:value-type="string" office:string-value="Предупреждение отключено : Ток двигателя TD140" calcext:value-type="string">
            <text:p>Предупреждение отключено : Ток двигателя TD140</text:p>
          </table:table-cell>
          <table:table-cell office:value-type="string" calcext:value-type="string">
            <text:p>Ток двигателя</text:p>
          </table:table-cell>
          <table:table-cell office:value-type="string" calcext:value-type="string">
            <text:p>TD1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Control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1.DBX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11_CoolingWaterSupplyPressure</text:p>
          </table:table-cell>
          <table:table-cell table:formula="of:=COM.MICROSOFT.CONCAT(&quot;rtd&quot;;[.A39])" office:value-type="string" office:string-value="rtdAI_Control1" calcext:value-type="string">
            <text:p>rtdAI_Control1</text:p>
          </table:table-cell>
          <table:table-cell table:formula="of:=[.B39]" office:value-type="float" office:value="2" calcext:value-type="float">
            <text:p>2</text:p>
          </table:table-cell>
          <table:table-cell table:formula="of:=COM.MICROSOFT.CONCAT([.N$31];[.$L$2];[.$L39];[.$M$2];[.$M39])" office:value-type="string" office:string-value="Предупреждение активировано : Давление воды PT301" calcext:value-type="string">
            <text:p>Предупреждение активировано : Давление воды PT301</text:p>
          </table:table-cell>
          <table:table-cell table:formula="of:=COM.MICROSOFT.CONCAT([.O$31];[.$L$2];[.$L39];[.$M$2];[.$M39])" office:value-type="string" office:string-value="Предупреждение отключено : Давление воды PT301" calcext:value-type="string">
            <text:p>Предупреждение отключено : Давление воды PT301</text:p>
          </table:table-cell>
          <table:table-cell office:value-type="string" calcext:value-type="string">
            <text:p>Давление воды</text:p>
          </table:table-cell>
          <table:table-cell office:value-type="string" calcext:value-type="string">
            <text:p>PT3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Control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B1.DBX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12_MotorBearingDEVibration</text:p>
          </table:table-cell>
          <table:table-cell table:formula="of:=COM.MICROSOFT.CONCAT(&quot;rtd&quot;;[.A40])" office:value-type="string" office:string-value="rtdAI_Control1" calcext:value-type="string">
            <text:p>rtdAI_Control1</text:p>
          </table:table-cell>
          <table:table-cell table:formula="of:=[.B40]" office:value-type="float" office:value="0" calcext:value-type="float">
            <text:p>0</text:p>
          </table:table-cell>
          <table:table-cell table:formula="of:=COM.MICROSOFT.CONCAT([.N$31];[.$L$2];[.$L40];[.$M$2];[.$M40])" office:value-type="string" office:string-value="Предупреждение активировано : Вибрация DE подшипника VT#5" calcext:value-type="string">
            <text:p>Предупреждение активировано : Вибрация DE подшипника VT#5</text:p>
          </table:table-cell>
          <table:table-cell table:formula="of:=COM.MICROSOFT.CONCAT([.O$31];[.$L$2];[.$L40];[.$M$2];[.$M40])" office:value-type="string" office:string-value="Предупреждение отключено : Вибрация DE подшипника VT#5" calcext:value-type="string">
            <text:p>Предупреждение отключено : Вибрация DE подшипника VT#5</text:p>
          </table:table-cell>
          <table:table-cell office:value-type="string" calcext:value-type="string">
            <text:p>Вибрация DE подшипника</text:p>
          </table:table-cell>
          <table:table-cell office:value-type="string" calcext:value-type="string">
            <text:p>VT#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Contro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1.DBX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13_MotorBearingNDEVibration</text:p>
          </table:table-cell>
          <table:table-cell table:formula="of:=COM.MICROSOFT.CONCAT(&quot;rtd&quot;;[.A41])" office:value-type="string" office:string-value="rtdAI_Control1" calcext:value-type="string">
            <text:p>rtdAI_Control1</text:p>
          </table:table-cell>
          <table:table-cell table:formula="of:=[.B41]" office:value-type="float" office:value="1" calcext:value-type="float">
            <text:p>1</text:p>
          </table:table-cell>
          <table:table-cell table:formula="of:=COM.MICROSOFT.CONCAT([.N$31];[.$L$2];[.$L41];[.$M$2];[.$M41])" office:value-type="string" office:string-value="Предупреждение активировано : Вибрация NDE подшипника VT#6" calcext:value-type="string">
            <text:p>Предупреждение активировано : Вибрация NDE подшипника VT#6</text:p>
          </table:table-cell>
          <table:table-cell table:formula="of:=COM.MICROSOFT.CONCAT([.O$31];[.$L$2];[.$L41];[.$M$2];[.$M41])" office:value-type="string" office:string-value="Предупреждение отключено : Вибрация NDE подшипника VT#6" calcext:value-type="string">
            <text:p>Предупреждение отключено : Вибрация NDE подшипника VT#6</text:p>
          </table:table-cell>
          <table:table-cell office:value-type="string" calcext:value-type="string">
            <text:p>Вибрация NDE подшипника</text:p>
          </table:table-cell>
          <table:table-cell office:value-type="string" calcext:value-type="string">
            <text:p>VT#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1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14_OilSupplyTemperature</text:p>
          </table:table-cell>
          <table:table-cell table:formula="of:=COM.MICROSOFT.CONCAT(&quot;rtd&quot;;[.A42])" office:value-type="string" office:string-value="rtdAI_WarnUse1" calcext:value-type="string">
            <text:p>rtdAI_WarnUse1</text:p>
          </table:table-cell>
          <table:table-cell table:formula="of:=[.B42]" office:value-type="float" office:value="5" calcext:value-type="float">
            <text:p>5</text:p>
          </table:table-cell>
          <table:table-cell table:formula="of:=COM.MICROSOFT.CONCAT([.N$31];[.$L$2];[.$L42];[.$M$2];[.$M42])" office:value-type="string" office:string-value="Предупреждение активировано : Температура масла TE130" calcext:value-type="string">
            <text:p>Предупреждение активировано : Температура масла TE130</text:p>
          </table:table-cell>
          <table:table-cell table:formula="of:=COM.MICROSOFT.CONCAT([.O$31];[.$L$2];[.$L42];[.$M$2];[.$M42])" office:value-type="string" office:string-value="Предупреждение отключено : Температура масла TE130" calcext:value-type="string">
            <text:p>Предупреждение отключено : Температура масла TE130</text:p>
          </table:table-cell>
          <table:table-cell office:value-type="string" calcext:value-type="string">
            <text:p>Температура масла</text:p>
          </table:table-cell>
          <table:table-cell office:value-type="string" calcext:value-type="string">
            <text:p>TE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1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15_Stage3InletTemperature</text:p>
          </table:table-cell>
          <table:table-cell table:formula="of:=COM.MICROSOFT.CONCAT(&quot;rtd&quot;;[.A43])" office:value-type="string" office:string-value="rtdAI_WarnUse1" calcext:value-type="string">
            <text:p>rtdAI_WarnUse1</text:p>
          </table:table-cell>
          <table:table-cell table:formula="of:=[.B43]" office:value-type="float" office:value="6" calcext:value-type="float">
            <text:p>6</text:p>
          </table:table-cell>
          <table:table-cell table:formula="of:=COM.MICROSOFT.CONCAT([.N$31];[.$L$2];[.$L43];[.$M$2];[.$M43])" office:value-type="string" office:string-value="Предупреждение активировано : Температура воздуха на входе 3 ступени TE231" calcext:value-type="string">
            <text:p>Предупреждение активировано : Температура воздуха на входе 3 ступени TE231</text:p>
          </table:table-cell>
          <table:table-cell table:formula="of:=COM.MICROSOFT.CONCAT([.O$31];[.$L$2];[.$L43];[.$M$2];[.$M43])" office:value-type="string" office:string-value="Предупреждение отключено : Температура воздуха на входе 3 ступени TE231" calcext:value-type="string">
            <text:p>Предупреждение отключено : Температура воздуха на входе 3 ступени TE231</text:p>
          </table:table-cell>
          <table:table-cell office:value-type="string" calcext:value-type="string">
            <text:p>Температура воздуха на входе 3 ступени</text:p>
          </table:table-cell>
          <table:table-cell office:value-type="string" calcext:value-type="string">
            <text:p>TE2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1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16_OilReservoirTemperature</text:p>
          </table:table-cell>
          <table:table-cell table:formula="of:=COM.MICROSOFT.CONCAT(&quot;rtd&quot;;[.A44])" office:value-type="string" office:string-value="rtdAI_WarnUse1" calcext:value-type="string">
            <text:p>rtdAI_WarnUse1</text:p>
          </table:table-cell>
          <table:table-cell table:formula="of:=[.B44]" office:value-type="float" office:value="7" calcext:value-type="float">
            <text:p>7</text:p>
          </table:table-cell>
          <table:table-cell table:formula="of:=COM.MICROSOFT.CONCAT([.N$31];[.$L$2];[.$L44];[.$M$2];[.$M44])" office:value-type="string" office:string-value="Предупреждение активировано : Температура масла в маслобаке TE101" calcext:value-type="string">
            <text:p>Предупреждение активировано : Температура масла в маслобаке TE101</text:p>
          </table:table-cell>
          <table:table-cell table:formula="of:=COM.MICROSOFT.CONCAT([.O$31];[.$L$2];[.$L44];[.$M$2];[.$M44])" office:value-type="string" office:string-value="Предупреждение отключено : Температура масла в маслобаке TE101" calcext:value-type="string">
            <text:p>Предупреждение отключено : Температура масла в маслобаке TE101</text:p>
          </table:table-cell>
          <table:table-cell office:value-type="string" calcext:value-type="string">
            <text:p>Температура масла в маслобаке</text:p>
          </table:table-cell>
          <table:table-cell office:value-type="string" calcext:value-type="string">
            <text:p>TE1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B1.DBX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17_MotorWindingRTemperature</text:p>
          </table:table-cell>
          <table:table-cell table:formula="of:=COM.MICROSOFT.CONCAT(&quot;rtd&quot;;[.A45])" office:value-type="string" office:string-value="rtdAI_Control2" calcext:value-type="string">
            <text:p>rtdAI_Control2</text:p>
          </table:table-cell>
          <table:table-cell table:formula="of:=[.B45]" office:value-type="float" office:value="0" calcext:value-type="float">
            <text:p>0</text:p>
          </table:table-cell>
          <table:table-cell table:formula="of:=COM.MICROSOFT.CONCAT([.N$31];[.$L$2];[.$L45];[.$M$2];[.$M45])" office:value-type="string" office:string-value="Предупреждение активировано : Температура обмотки двигателя &quot;R&quot; TE140" calcext:value-type="string">
            <text:p>Предупреждение активировано : Температура обмотки двигателя "R" TE140</text:p>
          </table:table-cell>
          <table:table-cell table:formula="of:=COM.MICROSOFT.CONCAT([.O$31];[.$L$2];[.$L45];[.$M$2];[.$M45])" office:value-type="string" office:string-value="Предупреждение отключено : Температура обмотки двигателя &quot;R&quot; TE140" calcext:value-type="string">
            <text:p>Предупреждение отключено : Температура обмотки двигателя "R" TE140</text:p>
          </table:table-cell>
          <table:table-cell office:value-type="string" calcext:value-type="string">
            <text:p>Температура обмотки двигателя "R"</text:p>
          </table:table-cell>
          <table:table-cell office:value-type="string" calcext:value-type="string">
            <text:p>TE1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1.DBX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18_MotorBearingDETemperature</text:p>
          </table:table-cell>
          <table:table-cell table:formula="of:=COM.MICROSOFT.CONCAT(&quot;rtd&quot;;[.A46])" office:value-type="string" office:string-value="rtdAI_Control2" calcext:value-type="string">
            <text:p>rtdAI_Control2</text:p>
          </table:table-cell>
          <table:table-cell table:formula="of:=[.B46]" office:value-type="float" office:value="2" calcext:value-type="float">
            <text:p>2</text:p>
          </table:table-cell>
          <table:table-cell table:formula="of:=COM.MICROSOFT.CONCAT([.N$31];[.$L$2];[.$L46];[.$M$2];[.$M46])" office:value-type="string" office:string-value="Предупреждение активировано : Температура DE подшипника TE143" calcext:value-type="string">
            <text:p>Предупреждение активировано : Температура DE подшипника TE143</text:p>
          </table:table-cell>
          <table:table-cell table:formula="of:=COM.MICROSOFT.CONCAT([.O$31];[.$L$2];[.$L46];[.$M$2];[.$M46])" office:value-type="string" office:string-value="Предупреждение отключено : Температура DE подшипника TE143" calcext:value-type="string">
            <text:p>Предупреждение отключено : Температура DE подшипника TE143</text:p>
          </table:table-cell>
          <table:table-cell office:value-type="string" calcext:value-type="string">
            <text:p>Температура DE подшипника</text:p>
          </table:table-cell>
          <table:table-cell office:value-type="string" calcext:value-type="string">
            <text:p>TE1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B1.DBX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19_MotorBearingNDETemperature</text:p>
          </table:table-cell>
          <table:table-cell table:formula="of:=COM.MICROSOFT.CONCAT(&quot;rtd&quot;;[.A47])" office:value-type="string" office:string-value="rtdAI_Control2" calcext:value-type="string">
            <text:p>rtdAI_Control2</text:p>
          </table:table-cell>
          <table:table-cell table:formula="of:=[.B47]" office:value-type="float" office:value="4" calcext:value-type="float">
            <text:p>4</text:p>
          </table:table-cell>
          <table:table-cell table:formula="of:=COM.MICROSOFT.CONCAT([.N$31];[.$L$2];[.$L47];[.$M$2];[.$M47])" office:value-type="string" office:string-value="Предупреждение активировано : Температура NDE подшипника TE144" calcext:value-type="string">
            <text:p>Предупреждение активировано : Температура NDE подшипника TE144</text:p>
          </table:table-cell>
          <table:table-cell table:formula="of:=COM.MICROSOFT.CONCAT([.O$31];[.$L$2];[.$L47];[.$M$2];[.$M47])" office:value-type="string" office:string-value="Предупреждение отключено : Температура NDE подшипника TE144" calcext:value-type="string">
            <text:p>Предупреждение отключено : Температура NDE подшипника TE144</text:p>
          </table:table-cell>
          <table:table-cell office:value-type="string" calcext:value-type="string">
            <text:p>Температура NDE подшипника</text:p>
          </table:table-cell>
          <table:table-cell office:value-type="string" calcext:value-type="string">
            <text:p>TE1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WarnUse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1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20_Stage2InletTemperature</text:p>
          </table:table-cell>
          <table:table-cell table:formula="of:=COM.MICROSOFT.CONCAT(&quot;rtd&quot;;[.A48])" office:value-type="string" office:string-value="rtdAI_WarnUse2" calcext:value-type="string">
            <text:p>rtdAI_WarnUse2</text:p>
          </table:table-cell>
          <table:table-cell table:formula="of:=[.B48]" office:value-type="float" office:value="11" calcext:value-type="float">
            <text:p>11</text:p>
          </table:table-cell>
          <table:table-cell table:formula="of:=COM.MICROSOFT.CONCAT([.N$31];[.$L$2];[.$L48];[.$M$2];[.$M48])" office:value-type="string" office:string-value="Предупреждение активировано : Температура воздуха на входе 2 ступени TE221" calcext:value-type="string">
            <text:p>Предупреждение активировано : Температура воздуха на входе 2 ступени TE221</text:p>
          </table:table-cell>
          <table:table-cell table:formula="of:=COM.MICROSOFT.CONCAT([.O$31];[.$L$2];[.$L48];[.$M$2];[.$M48])" office:value-type="string" office:string-value="Предупреждение отключено : Температура воздуха на входе 2 ступени TE221" calcext:value-type="string">
            <text:p>Предупреждение отключено : Температура воздуха на входе 2 ступени TE221</text:p>
          </table:table-cell>
          <table:table-cell office:value-type="string" calcext:value-type="string">
            <text:p>Температура воздуха на входе 2 ступени</text:p>
          </table:table-cell>
          <table:table-cell office:value-type="string" calcext:value-type="string">
            <text:p>TE2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WarnUse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1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21_N1OutletTemp</text:p>
          </table:table-cell>
          <table:table-cell table:formula="of:=COM.MICROSOFT.CONCAT(&quot;rtd&quot;;[.A49])" office:value-type="string" office:string-value="rtdAI_WarnUse2" calcext:value-type="string">
            <text:p>rtdAI_WarnUse2</text:p>
          </table:table-cell>
          <table:table-cell table:formula="of:=[.B49]" office:value-type="float" office:value="12" calcext:value-type="float">
            <text:p>12</text:p>
          </table:table-cell>
          <table:table-cell table:formula="of:=COM.MICROSOFT.CONCAT([.N$31];[.$L$2];[.$L49];[.$M$2];[.$M49])" office:value-type="string" office:string-value="Предупреждение активировано : Температура воздуха на выходе 1 ступени TE212" calcext:value-type="string">
            <text:p>Предупреждение активировано : Температура воздуха на выходе 1 ступени TE212</text:p>
          </table:table-cell>
          <table:table-cell table:formula="of:=COM.MICROSOFT.CONCAT([.O$31];[.$L$2];[.$L49];[.$M$2];[.$M49])" office:value-type="string" office:string-value="Предупреждение отключено : Температура воздуха на выходе 1 ступени TE212" calcext:value-type="string">
            <text:p>Предупреждение отключено : Температура воздуха на выходе 1 ступени TE212</text:p>
          </table:table-cell>
          <table:table-cell office:value-type="string" calcext:value-type="string">
            <text:p>Температура воздуха на выходе 1 ступени</text:p>
          </table:table-cell>
          <table:table-cell office:value-type="string" calcext:value-type="string">
            <text:p>TE2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WarnUse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1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22_N2OutletTemp</text:p>
          </table:table-cell>
          <table:table-cell table:formula="of:=COM.MICROSOFT.CONCAT(&quot;rtd&quot;;[.A50])" office:value-type="string" office:string-value="rtdAI_WarnUse2" calcext:value-type="string">
            <text:p>rtdAI_WarnUse2</text:p>
          </table:table-cell>
          <table:table-cell table:formula="of:=[.B50]" office:value-type="float" office:value="13" calcext:value-type="float">
            <text:p>13</text:p>
          </table:table-cell>
          <table:table-cell table:formula="of:=COM.MICROSOFT.CONCAT([.N$31];[.$L$2];[.$L50];[.$M$2];[.$M50])" office:value-type="string" office:string-value="Предупреждение активировано : Температура воздуха на выходе 2 ступени TE222" calcext:value-type="string">
            <text:p>Предупреждение активировано : Температура воздуха на выходе 2 ступени TE222</text:p>
          </table:table-cell>
          <table:table-cell table:formula="of:=COM.MICROSOFT.CONCAT([.O$31];[.$L$2];[.$L50];[.$M$2];[.$M50])" office:value-type="string" office:string-value="Предупреждение отключено : Температура воздуха на выходе 2 ступени TE222" calcext:value-type="string">
            <text:p>Предупреждение отключено : Температура воздуха на выходе 2 ступени TE222</text:p>
          </table:table-cell>
          <table:table-cell office:value-type="string" calcext:value-type="string">
            <text:p>Температура воздуха на выходе 2 ступени</text:p>
          </table:table-cell>
          <table:table-cell office:value-type="string" calcext:value-type="string">
            <text:p>TE2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WarnUse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1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23_N3OutletTemp</text:p>
          </table:table-cell>
          <table:table-cell table:formula="of:=COM.MICROSOFT.CONCAT(&quot;rtd&quot;;[.A51])" office:value-type="string" office:string-value="rtdAI_WarnUse2" calcext:value-type="string">
            <text:p>rtdAI_WarnUse2</text:p>
          </table:table-cell>
          <table:table-cell table:formula="of:=[.B51]" office:value-type="float" office:value="14" calcext:value-type="float">
            <text:p>14</text:p>
          </table:table-cell>
          <table:table-cell table:formula="of:=COM.MICROSOFT.CONCAT([.N$31];[.$L$2];[.$L51];[.$M$2];[.$M51])" office:value-type="string" office:string-value="Предупреждение активировано : Температура воздуха на выходе 3 ступени TE232" calcext:value-type="string">
            <text:p>Предупреждение активировано : Температура воздуха на выходе 3 ступени TE232</text:p>
          </table:table-cell>
          <table:table-cell table:formula="of:=COM.MICROSOFT.CONCAT([.O$31];[.$L$2];[.$L51];[.$M$2];[.$M51])" office:value-type="string" office:string-value="Предупреждение отключено : Температура воздуха на выходе 3 ступени TE232" calcext:value-type="string">
            <text:p>Предупреждение отключено : Температура воздуха на выходе 3 ступени TE232</text:p>
          </table:table-cell>
          <table:table-cell office:value-type="string" calcext:value-type="string">
            <text:p>Температура воздуха на выходе 3 ступени</text:p>
          </table:table-cell>
          <table:table-cell office:value-type="string" calcext:value-type="string">
            <text:p>TE2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WarnUse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B1.DBX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24_CoolingWaterSupplyTemp</text:p>
          </table:table-cell>
          <table:table-cell table:formula="of:=COM.MICROSOFT.CONCAT(&quot;rtd&quot;;[.A52])" office:value-type="string" office:string-value="rtdAI_WarnUse3" calcext:value-type="string">
            <text:p>rtdAI_WarnUse3</text:p>
          </table:table-cell>
          <table:table-cell table:formula="of:=[.B52]" office:value-type="float" office:value="14" calcext:value-type="float">
            <text:p>14</text:p>
          </table:table-cell>
          <table:table-cell table:formula="of:=COM.MICROSOFT.CONCAT([.N$31];[.$L$2];[.$L52];[.$M$2];[.$M52])" office:value-type="string" office:string-value="Предупреждение активировано : Температура охлаждающей воды на входе TE301" calcext:value-type="string">
            <text:p>Предупреждение активировано : Температура охлаждающей воды на входе TE301</text:p>
          </table:table-cell>
          <table:table-cell table:formula="of:=COM.MICROSOFT.CONCAT([.O$31];[.$L$2];[.$L52];[.$M$2];[.$M52])" office:value-type="string" office:string-value="Предупреждение отключено : Температура охлаждающей воды на входе TE301" calcext:value-type="string">
            <text:p>Предупреждение отключено : Температура охлаждающей воды на входе TE301</text:p>
          </table:table-cell>
          <table:table-cell office:value-type="string" calcext:value-type="string">
            <text:p>Температура охлаждающей воды на входе</text:p>
          </table:table-cell>
          <table:table-cell office:value-type="string" calcext:value-type="string">
            <text:p>TE3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WarnUse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B1.DBX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25_CoolingWateReturnTemp</text:p>
          </table:table-cell>
          <table:table-cell table:formula="of:=COM.MICROSOFT.CONCAT(&quot;rtd&quot;;[.A53])" office:value-type="string" office:string-value="rtdAI_WarnUse3" calcext:value-type="string">
            <text:p>rtdAI_WarnUse3</text:p>
          </table:table-cell>
          <table:table-cell table:formula="of:=[.B53]" office:value-type="float" office:value="0" calcext:value-type="float">
            <text:p>0</text:p>
          </table:table-cell>
          <table:table-cell table:formula="of:=COM.MICROSOFT.CONCAT([.N$31];[.$L$2];[.$L53];[.$M$2];[.$M53])" office:value-type="string" office:string-value="Предупреждение активировано : Температура охлаждающей воды на выходе TE302" calcext:value-type="string">
            <text:p>Предупреждение активировано : Температура охлаждающей воды на выходе TE302</text:p>
          </table:table-cell>
          <table:table-cell table:formula="of:=COM.MICROSOFT.CONCAT([.O$31];[.$L$2];[.$L53];[.$M$2];[.$M53])" office:value-type="string" office:string-value="Предупреждение отключено : Температура охлаждающей воды на выходе TE302" calcext:value-type="string">
            <text:p>Предупреждение отключено : Температура охлаждающей воды на выходе TE302</text:p>
          </table:table-cell>
          <table:table-cell office:value-type="string" calcext:value-type="string">
            <text:p>Температура охлаждающей воды на выходе</text:p>
          </table:table-cell>
          <table:table-cell office:value-type="string" calcext:value-type="string">
            <text:p>TE3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B1.DBX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26_SystemTemperature</text:p>
          </table:table-cell>
          <table:table-cell table:formula="of:=COM.MICROSOFT.CONCAT(&quot;rtd&quot;;[.A54])" office:value-type="string" office:string-value="rtdAI_Control2" calcext:value-type="string">
            <text:p>rtdAI_Control2</text:p>
          </table:table-cell>
          <table:table-cell table:formula="of:=[.B54]"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1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1_IGVPosition</text:p>
          </table:table-cell>
          <table:table-cell table:formula="of:=COM.MICROSOFT.CONCAT(&quot;rtd&quot;;[.A55])" office:value-type="string" office:string-value="rtdAI_AlarmUse1" calcext:value-type="string">
            <text:p>rtdAI_AlarmUse1</text:p>
          </table:table-cell>
          <table:table-cell table:formula="of:=[.B55]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2_BOVPosition</text:p>
          </table:table-cell>
          <table:table-cell table:formula="of:=COM.MICROSOFT.CONCAT(&quot;rtd&quot;;[.A56])" office:value-type="string" office:string-value="rtdAI_AlarmUse1" calcext:value-type="string">
            <text:p>rtdAI_AlarmUse1</text:p>
          </table:table-cell>
          <table:table-cell table:formula="of:=[.B56]" office:value-type="float" office:value="9" calcext:value-type="float">
            <text:p>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1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3_SystemPressure</text:p>
          </table:table-cell>
          <table:table-cell table:formula="of:=COM.MICROSOFT.CONCAT(&quot;rtd&quot;;[.A57])" office:value-type="string" office:string-value="rtdAI_AlarmUse1" calcext:value-type="string">
            <text:p>rtdAI_AlarmUse1</text:p>
          </table:table-cell>
          <table:table-cell table:formula="of:=[.B57]" office:value-type="float" office:value="10" calcext:value-type="float">
            <text:p>10</text:p>
          </table:table-cell>
          <table:table-cell table:formula="of:=COM.MICROSOFT.CONCAT([.N$57];[.$L$2];[.$L57];[.$M$2];[.$M57])" office:value-type="string" office:string-value="Авария активировано : Давление на напоре PT260" calcext:value-type="string">
            <text:p>Авария активировано : Давление на напоре PT260</text:p>
          </table:table-cell>
          <table:table-cell table:formula="of:=COM.MICROSOFT.CONCAT([.O$57];[.$L$2];[.$L57];[.$M$2];[.$M57])" office:value-type="string" office:string-value="Авария отключено : Давление на напоре PT260" calcext:value-type="string">
            <text:p>Авария отключено : Давление на напоре PT260</text:p>
          </table:table-cell>
          <table:table-cell office:value-type="string" calcext:value-type="string">
            <text:p>Давление на напоре</text:p>
          </table:table-cell>
          <table:table-cell office:value-type="string" calcext:value-type="string">
            <text:p>PT260</text:p>
          </table:table-cell>
          <table:table-cell office:value-type="string" calcext:value-type="string">
            <text:p>Авария активировано</text:p>
          </table:table-cell>
          <table:table-cell office:value-type="string" calcext:value-type="string">
            <text:p>Авария отключено</text:p>
          </table:table-cell>
          <table:table-cell/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4_Stage3DischargePressure</text:p>
          </table:table-cell>
          <table:table-cell table:formula="of:=COM.MICROSOFT.CONCAT(&quot;rtd&quot;;[.A58])" office:value-type="string" office:string-value="rtdAI_AlarmUse1" calcext:value-type="string">
            <text:p>rtdAI_AlarmUse1</text:p>
          </table:table-cell>
          <table:table-cell table:formula="of:=[.B58]" office:value-type="float" office:value="11" calcext:value-type="float">
            <text:p>11</text:p>
          </table:table-cell>
          <table:table-cell table:formula="of:=COM.MICROSOFT.CONCAT([.N$57];[.$L$2];[.$L58];[.$M$2];[.$M58])" office:value-type="string" office:string-value="Авария активировано : Давление 3 ступени PT232" calcext:value-type="string">
            <text:p>Авария активировано : Давление 3 ступени PT232</text:p>
          </table:table-cell>
          <table:table-cell table:formula="of:=COM.MICROSOFT.CONCAT([.O$57];[.$L$2];[.$L58];[.$M$2];[.$M58])" office:value-type="string" office:string-value="Авария отключено : Давление 3 ступени PT232" calcext:value-type="string">
            <text:p>Авария отключено : Давление 3 ступени PT232</text:p>
          </table:table-cell>
          <table:table-cell office:value-type="string" calcext:value-type="string">
            <text:p>Давление 3 ступени</text:p>
          </table:table-cell>
          <table:table-cell office:value-type="string" calcext:value-type="string">
            <text:p>PT2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1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5_OilSupplyPressure</text:p>
          </table:table-cell>
          <table:table-cell table:formula="of:=COM.MICROSOFT.CONCAT(&quot;rtd&quot;;[.A59])" office:value-type="string" office:string-value="rtdAI_AlarmUse1" calcext:value-type="string">
            <text:p>rtdAI_AlarmUse1</text:p>
          </table:table-cell>
          <table:table-cell table:formula="of:=[.B59]" office:value-type="float" office:value="12" calcext:value-type="float">
            <text:p>12</text:p>
          </table:table-cell>
          <table:table-cell table:formula="of:=COM.MICROSOFT.CONCAT([.N$57];[.$L$2];[.$L59];[.$M$2];[.$M59])" office:value-type="string" office:string-value="Авария активировано : Давление масла PT130" calcext:value-type="string">
            <text:p>Авария активировано : Давление масла PT130</text:p>
          </table:table-cell>
          <table:table-cell table:formula="of:=COM.MICROSOFT.CONCAT([.O$57];[.$L$2];[.$L59];[.$M$2];[.$M59])" office:value-type="string" office:string-value="Авария отключено : Давление масла PT130" calcext:value-type="string">
            <text:p>Авария отключено : Давление масла PT130</text:p>
          </table:table-cell>
          <table:table-cell office:value-type="string" calcext:value-type="string">
            <text:p>Давление масла</text:p>
          </table:table-cell>
          <table:table-cell office:value-type="string" calcext:value-type="string">
            <text:p>PT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1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6_Stage1Vibration</text:p>
          </table:table-cell>
          <table:table-cell table:formula="of:=COM.MICROSOFT.CONCAT(&quot;rtd&quot;;[.A60])" office:value-type="string" office:string-value="rtdAI_AlarmUse1" calcext:value-type="string">
            <text:p>rtdAI_AlarmUse1</text:p>
          </table:table-cell>
          <table:table-cell table:formula="of:=[.B60]" office:value-type="float" office:value="13" calcext:value-type="float">
            <text:p>13</text:p>
          </table:table-cell>
          <table:table-cell table:formula="of:=COM.MICROSOFT.CONCAT([.N$57];[.$L$2];[.$L60];[.$M$2];[.$M60])" office:value-type="string" office:string-value="Авария активировано : Вибрация 1 ступени VT#1" calcext:value-type="string">
            <text:p>Авария активировано : Вибрация 1 ступени VT#1</text:p>
          </table:table-cell>
          <table:table-cell table:formula="of:=COM.MICROSOFT.CONCAT([.O$57];[.$L$2];[.$L60];[.$M$2];[.$M60])" office:value-type="string" office:string-value="Авария отключено : Вибрация 1 ступени VT#1" calcext:value-type="string">
            <text:p>Авария отключено : Вибрация 1 ступени VT#1</text:p>
          </table:table-cell>
          <table:table-cell office:value-type="string" calcext:value-type="string">
            <text:p>Вибрация 1 ступени</text:p>
          </table:table-cell>
          <table:table-cell office:value-type="string" calcext:value-type="string">
            <text:p>VT#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1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7_Stage2Vibration</text:p>
          </table:table-cell>
          <table:table-cell table:formula="of:=COM.MICROSOFT.CONCAT(&quot;rtd&quot;;[.A61])" office:value-type="string" office:string-value="rtdAI_AlarmUse1" calcext:value-type="string">
            <text:p>rtdAI_AlarmUse1</text:p>
          </table:table-cell>
          <table:table-cell table:formula="of:=[.B61]" office:value-type="float" office:value="14" calcext:value-type="float">
            <text:p>14</text:p>
          </table:table-cell>
          <table:table-cell table:formula="of:=COM.MICROSOFT.CONCAT([.N$57];[.$L$2];[.$L61];[.$M$2];[.$M61])" office:value-type="string" office:string-value="Авария активировано : Вибрация 2 ступени VT#2" calcext:value-type="string">
            <text:p>Авария активировано : Вибрация 2 ступени VT#2</text:p>
          </table:table-cell>
          <table:table-cell table:formula="of:=COM.MICROSOFT.CONCAT([.O$57];[.$L$2];[.$L61];[.$M$2];[.$M61])" office:value-type="string" office:string-value="Авария отключено : Вибрация 2 ступени VT#2" calcext:value-type="string">
            <text:p>Авария отключено : Вибрация 2 ступени VT#2</text:p>
          </table:table-cell>
          <table:table-cell office:value-type="string" calcext:value-type="string">
            <text:p>Вибрация 2 ступени</text:p>
          </table:table-cell>
          <table:table-cell office:value-type="string" calcext:value-type="string">
            <text:p>VT#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1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8_Stage3Vibration</text:p>
          </table:table-cell>
          <table:table-cell table:formula="of:=COM.MICROSOFT.CONCAT(&quot;rtd&quot;;[.A62])" office:value-type="string" office:string-value="rtdAI_AlarmUse1" calcext:value-type="string">
            <text:p>rtdAI_AlarmUse1</text:p>
          </table:table-cell>
          <table:table-cell table:formula="of:=[.B62]" office:value-type="float" office:value="15" calcext:value-type="float">
            <text:p>15</text:p>
          </table:table-cell>
          <table:table-cell table:formula="of:=COM.MICROSOFT.CONCAT([.N$57];[.$L$2];[.$L62];[.$M$2];[.$M62])" office:value-type="string" office:string-value="Авария активировано : Вибрация 3 ступени VT#3" calcext:value-type="string">
            <text:p>Авария активировано : Вибрация 3 ступени VT#3</text:p>
          </table:table-cell>
          <table:table-cell table:formula="of:=COM.MICROSOFT.CONCAT([.O$57];[.$L$2];[.$L62];[.$M$2];[.$M62])" office:value-type="string" office:string-value="Авария отключено : Вибрация 3 ступени VT#3" calcext:value-type="string">
            <text:p>Авария отключено : Вибрация 3 ступени VT#3</text:p>
          </table:table-cell>
          <table:table-cell office:value-type="string" calcext:value-type="string">
            <text:p>Вибрация 3 ступени</text:p>
          </table:table-cell>
          <table:table-cell office:value-type="string" calcext:value-type="string">
            <text:p>VT#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9_OilFilterDiffPressure</text:p>
          </table:table-cell>
          <table:table-cell table:formula="of:=COM.MICROSOFT.CONCAT(&quot;rtd&quot;;[.A63])" office:value-type="string" office:string-value="rtdAI_AlarmUse1" calcext:value-type="string">
            <text:p>rtdAI_AlarmUse1</text:p>
          </table:table-cell>
          <table:table-cell table:formula="of:=[.B63]" office:value-type="float" office:value="0" calcext:value-type="float">
            <text:p>0</text:p>
          </table:table-cell>
          <table:table-cell table:formula="of:=COM.MICROSOFT.CONCAT([.N$57];[.$L$2];[.$L63];[.$M$2];[.$M63])" office:value-type="string" office:string-value="Авария активировано : Перепад давления масла на маслофильтре  PDT120" calcext:value-type="string">
            <text:p>Авария активировано : Перепад давления масла на маслофильтре <text:s/>PDT120</text:p>
          </table:table-cell>
          <table:table-cell table:formula="of:=COM.MICROSOFT.CONCAT([.O$57];[.$L$2];[.$L63];[.$M$2];[.$M63])" office:value-type="string" office:string-value="Авария отключено : Перепад давления масла на маслофильтре  PDT120" calcext:value-type="string">
            <text:p>Авария отключено : Перепад давления масла на маслофильтре <text:s/>PDT120</text:p>
          </table:table-cell>
          <table:table-cell office:value-type="string" calcext:value-type="string">
            <text:p>Перепад давления масла на маслофильтре </text:p>
          </table:table-cell>
          <table:table-cell office:value-type="string" calcext:value-type="string">
            <text:p>PDT1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B1.DBX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10_MotorCurrent</text:p>
          </table:table-cell>
          <table:table-cell table:formula="of:=COM.MICROSOFT.CONCAT(&quot;rtd&quot;;[.A64])" office:value-type="string" office:string-value="rtdAI_Control2" calcext:value-type="string">
            <text:p>rtdAI_Control2</text:p>
          </table:table-cell>
          <table:table-cell table:formula="of:=[.B64]" office:value-type="float" office:value="12" calcext:value-type="float">
            <text:p>12</text:p>
          </table:table-cell>
          <table:table-cell table:formula="of:=COM.MICROSOFT.CONCAT([.N$57];[.$L$2];[.$L64];[.$M$2];[.$M64])" office:value-type="string" office:string-value="Авария активировано : Ток двигателя TD140" calcext:value-type="string">
            <text:p>Авария активировано : Ток двигателя TD140</text:p>
          </table:table-cell>
          <table:table-cell table:formula="of:=COM.MICROSOFT.CONCAT([.O$57];[.$L$2];[.$L64];[.$M$2];[.$M64])" office:value-type="string" office:string-value="Авария отключено : Ток двигателя TD140" calcext:value-type="string">
            <text:p>Авария отключено : Ток двигателя TD140</text:p>
          </table:table-cell>
          <table:table-cell office:value-type="string" calcext:value-type="string">
            <text:p>Ток двигателя</text:p>
          </table:table-cell>
          <table:table-cell office:value-type="string" calcext:value-type="string">
            <text:p>TD1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1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11_CoolingWaterSupplyPressure</text:p>
          </table:table-cell>
          <table:table-cell table:formula="of:=COM.MICROSOFT.CONCAT(&quot;rtd&quot;;[.A65])" office:value-type="string" office:string-value="rtdAI_AlarmUse1" calcext:value-type="string">
            <text:p>rtdAI_AlarmUse1</text:p>
          </table:table-cell>
          <table:table-cell table:formula="of:=[.B65]" office:value-type="float" office:value="2" calcext:value-type="float">
            <text:p>2</text:p>
          </table:table-cell>
          <table:table-cell table:formula="of:=COM.MICROSOFT.CONCAT([.N$57];[.$L$2];[.$L65];[.$M$2];[.$M65])" office:value-type="string" office:string-value="Авария активировано : Давление воды PT301" calcext:value-type="string">
            <text:p>Авария активировано : Давление воды PT301</text:p>
          </table:table-cell>
          <table:table-cell table:formula="of:=COM.MICROSOFT.CONCAT([.O$57];[.$L$2];[.$L65];[.$M$2];[.$M65])" office:value-type="string" office:string-value="Авария отключено : Давление воды PT301" calcext:value-type="string">
            <text:p>Авария отключено : Давление воды PT301</text:p>
          </table:table-cell>
          <table:table-cell office:value-type="string" calcext:value-type="string">
            <text:p>Давление воды</text:p>
          </table:table-cell>
          <table:table-cell office:value-type="string" calcext:value-type="string">
            <text:p>PT3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AlarmUse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B1.DBX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12_MotorBearingDEVibration</text:p>
          </table:table-cell>
          <table:table-cell table:formula="of:=COM.MICROSOFT.CONCAT(&quot;rtd&quot;;[.A66])" office:value-type="string" office:string-value="rtdAI_AlarmUse3" calcext:value-type="string">
            <text:p>rtdAI_AlarmUse3</text:p>
          </table:table-cell>
          <table:table-cell table:formula="of:=[.B66]" office:value-type="float" office:value="8" calcext:value-type="float">
            <text:p>8</text:p>
          </table:table-cell>
          <table:table-cell table:formula="of:=COM.MICROSOFT.CONCAT([.N$57];[.$L$2];[.$L66];[.$M$2];[.$M66])" office:value-type="string" office:string-value="Авария активировано : Вибрация DE подшипника VT#5" calcext:value-type="string">
            <text:p>Авария активировано : Вибрация DE подшипника VT#5</text:p>
          </table:table-cell>
          <table:table-cell table:formula="of:=COM.MICROSOFT.CONCAT([.O$57];[.$L$2];[.$L66];[.$M$2];[.$M66])" office:value-type="string" office:string-value="Авария отключено : Вибрация DE подшипника VT#5" calcext:value-type="string">
            <text:p>Авария отключено : Вибрация DE подшипника VT#5</text:p>
          </table:table-cell>
          <table:table-cell office:value-type="string" calcext:value-type="string">
            <text:p>Вибрация DE подшипника</text:p>
          </table:table-cell>
          <table:table-cell office:value-type="string" calcext:value-type="string">
            <text:p>VT#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AlarmUse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B1.DBX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13_MotorBearingNDEVibration</text:p>
          </table:table-cell>
          <table:table-cell table:formula="of:=COM.MICROSOFT.CONCAT(&quot;rtd&quot;;[.A67])" office:value-type="string" office:string-value="rtdAI_AlarmUse3" calcext:value-type="string">
            <text:p>rtdAI_AlarmUse3</text:p>
          </table:table-cell>
          <table:table-cell table:formula="of:=[.B67]" office:value-type="float" office:value="9" calcext:value-type="float">
            <text:p>9</text:p>
          </table:table-cell>
          <table:table-cell table:formula="of:=COM.MICROSOFT.CONCAT([.N$57];[.$L$2];[.$L67];[.$M$2];[.$M67])" office:value-type="string" office:string-value="Авария активировано : Вибрация NDE подшипника VT#6" calcext:value-type="string">
            <text:p>Авария активировано : Вибрация NDE подшипника VT#6</text:p>
          </table:table-cell>
          <table:table-cell table:formula="of:=COM.MICROSOFT.CONCAT([.O$57];[.$L$2];[.$L67];[.$M$2];[.$M67])" office:value-type="string" office:string-value="Авария отключено : Вибрация NDE подшипника VT#6" calcext:value-type="string">
            <text:p>Авария отключено : Вибрация NDE подшипника VT#6</text:p>
          </table:table-cell>
          <table:table-cell office:value-type="string" calcext:value-type="string">
            <text:p>Вибрация NDE подшипника</text:p>
          </table:table-cell>
          <table:table-cell office:value-type="string" calcext:value-type="string">
            <text:p>VT#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1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14_OilSupplyTemperature</text:p>
          </table:table-cell>
          <table:table-cell table:formula="of:=COM.MICROSOFT.CONCAT(&quot;rtd&quot;;[.A68])" office:value-type="string" office:string-value="rtdAI_AlarmUse1" calcext:value-type="string">
            <text:p>rtdAI_AlarmUse1</text:p>
          </table:table-cell>
          <table:table-cell table:formula="of:=[.B68]" office:value-type="float" office:value="5" calcext:value-type="float">
            <text:p>5</text:p>
          </table:table-cell>
          <table:table-cell table:formula="of:=COM.MICROSOFT.CONCAT([.N$57];[.$L$2];[.$L68];[.$M$2];[.$M68])" office:value-type="string" office:string-value="Авария активировано : Температура масла TE130" calcext:value-type="string">
            <text:p>Авария активировано : Температура масла TE130</text:p>
          </table:table-cell>
          <table:table-cell table:formula="of:=COM.MICROSOFT.CONCAT([.O$57];[.$L$2];[.$L68];[.$M$2];[.$M68])" office:value-type="string" office:string-value="Авария отключено : Температура масла TE130" calcext:value-type="string">
            <text:p>Авария отключено : Температура масла TE130</text:p>
          </table:table-cell>
          <table:table-cell office:value-type="string" calcext:value-type="string">
            <text:p>Температура масла</text:p>
          </table:table-cell>
          <table:table-cell office:value-type="string" calcext:value-type="string">
            <text:p>TE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15_Stage3InletTemperature</text:p>
          </table:table-cell>
          <table:table-cell table:formula="of:=COM.MICROSOFT.CONCAT(&quot;rtd&quot;;[.A69])" office:value-type="string" office:string-value="rtdAI_AlarmUse1" calcext:value-type="string">
            <text:p>rtdAI_AlarmUse1</text:p>
          </table:table-cell>
          <table:table-cell table:formula="of:=[.B69]" office:value-type="float" office:value="6" calcext:value-type="float">
            <text:p>6</text:p>
          </table:table-cell>
          <table:table-cell table:formula="of:=COM.MICROSOFT.CONCAT([.N$57];[.$L$2];[.$L69];[.$M$2];[.$M69])" office:value-type="string" office:string-value="Авария активировано : Температура воздуха на входе 3 ступени TE231" calcext:value-type="string">
            <text:p>Авария активировано : Температура воздуха на входе 3 ступени TE231</text:p>
          </table:table-cell>
          <table:table-cell table:formula="of:=COM.MICROSOFT.CONCAT([.O$57];[.$L$2];[.$L69];[.$M$2];[.$M69])" office:value-type="string" office:string-value="Авария отключено : Температура воздуха на входе 3 ступени TE231" calcext:value-type="string">
            <text:p>Авария отключено : Температура воздуха на входе 3 ступени TE231</text:p>
          </table:table-cell>
          <table:table-cell office:value-type="string" calcext:value-type="string">
            <text:p>Температура воздуха на входе 3 ступени</text:p>
          </table:table-cell>
          <table:table-cell office:value-type="string" calcext:value-type="string">
            <text:p>TE2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1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16_OilReservoirTemperature</text:p>
          </table:table-cell>
          <table:table-cell table:formula="of:=COM.MICROSOFT.CONCAT(&quot;rtd&quot;;[.A70])" office:value-type="string" office:string-value="rtdAI_AlarmUse1" calcext:value-type="string">
            <text:p>rtdAI_AlarmUse1</text:p>
          </table:table-cell>
          <table:table-cell table:formula="of:=[.B70]" office:value-type="float" office:value="7" calcext:value-type="float">
            <text:p>7</text:p>
          </table:table-cell>
          <table:table-cell table:formula="of:=COM.MICROSOFT.CONCAT([.N$57];[.$L$2];[.$L70];[.$M$2];[.$M70])" office:value-type="string" office:string-value="Авария активировано : Температура масла в маслобаке TE101" calcext:value-type="string">
            <text:p>Авария активировано : Температура масла в маслобаке TE101</text:p>
          </table:table-cell>
          <table:table-cell table:formula="of:=COM.MICROSOFT.CONCAT([.O$57];[.$L$2];[.$L70];[.$M$2];[.$M70])" office:value-type="string" office:string-value="Авария отключено : Температура масла в маслобаке TE101" calcext:value-type="string">
            <text:p>Авария отключено : Температура масла в маслобаке TE101</text:p>
          </table:table-cell>
          <table:table-cell office:value-type="string" calcext:value-type="string">
            <text:p>Температура масла в маслобаке</text:p>
          </table:table-cell>
          <table:table-cell office:value-type="string" calcext:value-type="string">
            <text:p>TE1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1.DBX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17_MotorWindingRTemperature</text:p>
          </table:table-cell>
          <table:table-cell table:formula="of:=COM.MICROSOFT.CONCAT(&quot;rtd&quot;;[.A71])" office:value-type="string" office:string-value="rtdAI_Control2" calcext:value-type="string">
            <text:p>rtdAI_Control2</text:p>
          </table:table-cell>
          <table:table-cell table:formula="of:=[.B71]" office:value-type="float" office:value="1" calcext:value-type="float">
            <text:p>1</text:p>
          </table:table-cell>
          <table:table-cell table:formula="of:=COM.MICROSOFT.CONCAT([.N$57];[.$L$2];[.$L71];[.$M$2];[.$M71])" office:value-type="string" office:string-value="Авария активировано : Температура обмотки двигателя &quot;R&quot; TE140" calcext:value-type="string">
            <text:p>Авария активировано : Температура обмотки двигателя "R" TE140</text:p>
          </table:table-cell>
          <table:table-cell table:formula="of:=COM.MICROSOFT.CONCAT([.O$57];[.$L$2];[.$L71];[.$M$2];[.$M71])" office:value-type="string" office:string-value="Авария отключено : Температура обмотки двигателя &quot;R&quot; TE140" calcext:value-type="string">
            <text:p>Авария отключено : Температура обмотки двигателя "R" TE140</text:p>
          </table:table-cell>
          <table:table-cell office:value-type="string" calcext:value-type="string">
            <text:p>Температура обмотки двигателя "R"</text:p>
          </table:table-cell>
          <table:table-cell office:value-type="string" calcext:value-type="string">
            <text:p>TE1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B1.DBX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18_MotorBearingDETemperature</text:p>
          </table:table-cell>
          <table:table-cell table:formula="of:=COM.MICROSOFT.CONCAT(&quot;rtd&quot;;[.A72])" office:value-type="string" office:string-value="rtdAI_Control2" calcext:value-type="string">
            <text:p>rtdAI_Control2</text:p>
          </table:table-cell>
          <table:table-cell table:formula="of:=[.B72]" office:value-type="float" office:value="3" calcext:value-type="float">
            <text:p>3</text:p>
          </table:table-cell>
          <table:table-cell table:formula="of:=COM.MICROSOFT.CONCAT([.N$57];[.$L$2];[.$L72];[.$M$2];[.$M72])" office:value-type="string" office:string-value="Авария активировано : Температура DE подшипника TE143" calcext:value-type="string">
            <text:p>Авария активировано : Температура DE подшипника TE143</text:p>
          </table:table-cell>
          <table:table-cell table:formula="of:=COM.MICROSOFT.CONCAT([.O$57];[.$L$2];[.$L72];[.$M$2];[.$M72])" office:value-type="string" office:string-value="Авария отключено : Температура DE подшипника TE143" calcext:value-type="string">
            <text:p>Авария отключено : Температура DE подшипника TE143</text:p>
          </table:table-cell>
          <table:table-cell office:value-type="string" calcext:value-type="string">
            <text:p>Температура DE подшипника</text:p>
          </table:table-cell>
          <table:table-cell office:value-type="string" calcext:value-type="string">
            <text:p>TE1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1.DBX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19_MotorBearingNDETemperature</text:p>
          </table:table-cell>
          <table:table-cell table:formula="of:=COM.MICROSOFT.CONCAT(&quot;rtd&quot;;[.A73])" office:value-type="string" office:string-value="rtdAI_Control2" calcext:value-type="string">
            <text:p>rtdAI_Control2</text:p>
          </table:table-cell>
          <table:table-cell table:formula="of:=[.B73]" office:value-type="float" office:value="5" calcext:value-type="float">
            <text:p>5</text:p>
          </table:table-cell>
          <table:table-cell table:formula="of:=COM.MICROSOFT.CONCAT([.N$57];[.$L$2];[.$L73];[.$M$2];[.$M73])" office:value-type="string" office:string-value="Авария активировано : Температура NDE подшипника TE144" calcext:value-type="string">
            <text:p>Авария активировано : Температура NDE подшипника TE144</text:p>
          </table:table-cell>
          <table:table-cell table:formula="of:=COM.MICROSOFT.CONCAT([.O$57];[.$L$2];[.$L73];[.$M$2];[.$M73])" office:value-type="string" office:string-value="Авария отключено : Температура NDE подшипника TE144" calcext:value-type="string">
            <text:p>Авария отключено : Температура NDE подшипника TE144</text:p>
          </table:table-cell>
          <table:table-cell office:value-type="string" calcext:value-type="string">
            <text:p>Температура NDE подшипника</text:p>
          </table:table-cell>
          <table:table-cell office:value-type="string" calcext:value-type="string">
            <text:p>TE1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AlarmUse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1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20_Stage2InletTemperature</text:p>
          </table:table-cell>
          <table:table-cell table:formula="of:=COM.MICROSOFT.CONCAT(&quot;rtd&quot;;[.A74])" office:value-type="string" office:string-value="rtdAI_AlarmUse2" calcext:value-type="string">
            <text:p>rtdAI_AlarmUse2</text:p>
          </table:table-cell>
          <table:table-cell table:formula="of:=[.B74]" office:value-type="float" office:value="11" calcext:value-type="float">
            <text:p>11</text:p>
          </table:table-cell>
          <table:table-cell table:formula="of:=COM.MICROSOFT.CONCAT([.N$57];[.$L$2];[.$L74];[.$M$2];[.$M74])" office:value-type="string" office:string-value="Авария активировано : Температура воздуха на входе 2 ступени TE221" calcext:value-type="string">
            <text:p>Авария активировано : Температура воздуха на входе 2 ступени TE221</text:p>
          </table:table-cell>
          <table:table-cell table:formula="of:=COM.MICROSOFT.CONCAT([.O$57];[.$L$2];[.$L74];[.$M$2];[.$M74])" office:value-type="string" office:string-value="Авария отключено : Температура воздуха на входе 2 ступени TE221" calcext:value-type="string">
            <text:p>Авария отключено : Температура воздуха на входе 2 ступени TE221</text:p>
          </table:table-cell>
          <table:table-cell office:value-type="string" calcext:value-type="string">
            <text:p>Температура воздуха на входе 2 ступени</text:p>
          </table:table-cell>
          <table:table-cell office:value-type="string" calcext:value-type="string">
            <text:p>TE2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AlarmUse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1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21_N1OutletTemp</text:p>
          </table:table-cell>
          <table:table-cell table:formula="of:=COM.MICROSOFT.CONCAT(&quot;rtd&quot;;[.A75])" office:value-type="string" office:string-value="rtdAI_AlarmUse2" calcext:value-type="string">
            <text:p>rtdAI_AlarmUse2</text:p>
          </table:table-cell>
          <table:table-cell table:formula="of:=[.B75]" office:value-type="float" office:value="12" calcext:value-type="float">
            <text:p>12</text:p>
          </table:table-cell>
          <table:table-cell table:formula="of:=COM.MICROSOFT.CONCAT([.N$57];[.$L$2];[.$L75];[.$M$2];[.$M75])" office:value-type="string" office:string-value="Авария активировано : Температура воздуха на выходе 1 ступени TE212" calcext:value-type="string">
            <text:p>Авария активировано : Температура воздуха на выходе 1 ступени TE212</text:p>
          </table:table-cell>
          <table:table-cell table:formula="of:=COM.MICROSOFT.CONCAT([.O$57];[.$L$2];[.$L75];[.$M$2];[.$M75])" office:value-type="string" office:string-value="Авария отключено : Температура воздуха на выходе 1 ступени TE212" calcext:value-type="string">
            <text:p>Авария отключено : Температура воздуха на выходе 1 ступени TE212</text:p>
          </table:table-cell>
          <table:table-cell office:value-type="string" calcext:value-type="string">
            <text:p>Температура воздуха на выходе 1 ступени</text:p>
          </table:table-cell>
          <table:table-cell office:value-type="string" calcext:value-type="string">
            <text:p>TE2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AlarmUse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1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22_N2OutletTemp</text:p>
          </table:table-cell>
          <table:table-cell table:formula="of:=COM.MICROSOFT.CONCAT(&quot;rtd&quot;;[.A76])" office:value-type="string" office:string-value="rtdAI_AlarmUse2" calcext:value-type="string">
            <text:p>rtdAI_AlarmUse2</text:p>
          </table:table-cell>
          <table:table-cell table:formula="of:=[.B76]" office:value-type="float" office:value="13" calcext:value-type="float">
            <text:p>13</text:p>
          </table:table-cell>
          <table:table-cell table:formula="of:=COM.MICROSOFT.CONCAT([.N$57];[.$L$2];[.$L76];[.$M$2];[.$M76])" office:value-type="string" office:string-value="Авария активировано : Температура воздуха на выходе 2 ступени TE222" calcext:value-type="string">
            <text:p>Авария активировано : Температура воздуха на выходе 2 ступени TE222</text:p>
          </table:table-cell>
          <table:table-cell table:formula="of:=COM.MICROSOFT.CONCAT([.O$57];[.$L$2];[.$L76];[.$M$2];[.$M76])" office:value-type="string" office:string-value="Авария отключено : Температура воздуха на выходе 2 ступени TE222" calcext:value-type="string">
            <text:p>Авария отключено : Температура воздуха на выходе 2 ступени TE222</text:p>
          </table:table-cell>
          <table:table-cell office:value-type="string" calcext:value-type="string">
            <text:p>Температура воздуха на выходе 2 ступени</text:p>
          </table:table-cell>
          <table:table-cell office:value-type="string" calcext:value-type="string">
            <text:p>TE2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AlarmUse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1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23_N3OutletTemp</text:p>
          </table:table-cell>
          <table:table-cell table:formula="of:=COM.MICROSOFT.CONCAT(&quot;rtd&quot;;[.A77])" office:value-type="string" office:string-value="rtdAI_AlarmUse2" calcext:value-type="string">
            <text:p>rtdAI_AlarmUse2</text:p>
          </table:table-cell>
          <table:table-cell table:formula="of:=[.B77]" office:value-type="float" office:value="14" calcext:value-type="float">
            <text:p>14</text:p>
          </table:table-cell>
          <table:table-cell table:formula="of:=COM.MICROSOFT.CONCAT([.N$57];[.$L$2];[.$L77];[.$M$2];[.$M77])" office:value-type="string" office:string-value="Авария активировано : Температура воздуха на выходе 3 ступени TE232" calcext:value-type="string">
            <text:p>Авария активировано : Температура воздуха на выходе 3 ступени TE232</text:p>
          </table:table-cell>
          <table:table-cell table:formula="of:=COM.MICROSOFT.CONCAT([.O$57];[.$L$2];[.$L77];[.$M$2];[.$M77])" office:value-type="string" office:string-value="Авария отключено : Температура воздуха на выходе 3 ступени TE232" calcext:value-type="string">
            <text:p>Авария отключено : Температура воздуха на выходе 3 ступени TE232</text:p>
          </table:table-cell>
          <table:table-cell office:value-type="string" calcext:value-type="string">
            <text:p>Температура воздуха на выходе 3 ступени</text:p>
          </table:table-cell>
          <table:table-cell office:value-type="string" calcext:value-type="string">
            <text:p>TE2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AlarmUse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1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24_CoolingWaterSupplyTemp</text:p>
          </table:table-cell>
          <table:table-cell table:formula="of:=COM.MICROSOFT.CONCAT(&quot;rtd&quot;;[.A78])" office:value-type="string" office:string-value="rtdAI_AlarmUse2" calcext:value-type="string">
            <text:p>rtdAI_AlarmUse2</text:p>
          </table:table-cell>
          <table:table-cell table:formula="of:=[.B78]" office:value-type="float" office:value="15" calcext:value-type="float">
            <text:p>15</text:p>
          </table:table-cell>
          <table:table-cell table:formula="of:=COM.MICROSOFT.CONCAT([.N$57];[.$L$2];[.$L78];[.$M$2];[.$M78])" office:value-type="string" office:string-value="Авария активировано : Температура охлаждающей воды на входе TE301" calcext:value-type="string">
            <text:p>Авария активировано : Температура охлаждающей воды на входе TE301</text:p>
          </table:table-cell>
          <table:table-cell table:formula="of:=COM.MICROSOFT.CONCAT([.O$57];[.$L$2];[.$L78];[.$M$2];[.$M78])" office:value-type="string" office:string-value="Авария отключено : Температура охлаждающей воды на входе TE301" calcext:value-type="string">
            <text:p>Авария отключено : Температура охлаждающей воды на входе TE301</text:p>
          </table:table-cell>
          <table:table-cell office:value-type="string" calcext:value-type="string">
            <text:p>Температура охлаждающей воды на входе</text:p>
          </table:table-cell>
          <table:table-cell office:value-type="string" calcext:value-type="string">
            <text:p>TE3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AlarmUs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25_CoolingWateReturnTemp</text:p>
          </table:table-cell>
          <table:table-cell table:formula="of:=COM.MICROSOFT.CONCAT(&quot;rtd&quot;;[.A79])" office:value-type="string" office:string-value="rtdAI_AlarmUse2" calcext:value-type="string">
            <text:p>rtdAI_AlarmUse2</text:p>
          </table:table-cell>
          <table:table-cell table:formula="of:=[.B79]" office:value-type="float" office:value="0" calcext:value-type="float">
            <text:p>0</text:p>
          </table:table-cell>
          <table:table-cell table:formula="of:=COM.MICROSOFT.CONCAT([.N$57];[.$L$2];[.$L79];[.$M$2];[.$M79])" office:value-type="string" office:string-value="Авария активировано : Температура охлаждающей воды на выходе TE302" calcext:value-type="string">
            <text:p>Авария активировано : Температура охлаждающей воды на выходе TE302</text:p>
          </table:table-cell>
          <table:table-cell table:formula="of:=COM.MICROSOFT.CONCAT([.O$57];[.$L$2];[.$L79];[.$M$2];[.$M79])" office:value-type="string" office:string-value="Авария отключено : Температура охлаждающей воды на выходе TE302" calcext:value-type="string">
            <text:p>Авария отключено : Температура охлаждающей воды на выходе TE302</text:p>
          </table:table-cell>
          <table:table-cell office:value-type="string" calcext:value-type="string">
            <text:p>Температура охлаждающей воды на выходе</text:p>
          </table:table-cell>
          <table:table-cell office:value-type="string" calcext:value-type="string">
            <text:p>TE3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_AlarmUse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26_SystemTemperature</text:p>
          </table:table-cell>
          <table:table-cell table:formula="of:=COM.MICROSOFT.CONCAT(&quot;rtd&quot;;[.A80])" office:value-type="string" office:string-value="rtdAI_AlarmUse2" calcext:value-type="string">
            <text:p>rtdAI_AlarmUse2</text:p>
          </table:table-cell>
          <table:table-cell table:formula="of:=[.B80]" office:value-type="float" office:value="1" calcext:value-type="float">
            <text:p>1</text:p>
          </table:table-cell>
          <table:table-cell table:number-columns-repeated="7"/>
        </table:table-row>
      </table:table>
      <table:table table:name="Панель VS Схемы.pdf" table:style-name="ta1">
        <table:table-column table:style-name="co1" table:default-cell-style-name="Default"/>
        <table:table-column table:style-name="co1" table:default-cell-style-name="ce199"/>
        <table:table-column table:style-name="co1" table:default-cell-style-name="ce200"/>
        <table:table-column table:style-name="co1" table:number-columns-repeated="3" table:default-cell-style-name="Default"/>
        <table:table-column table:style-name="co78" table:default-cell-style-name="Default"/>
        <table:table-column table:style-name="co1" table:number-columns-repeated="2" table:default-cell-style-name="Default"/>
        <table:table-column table:style-name="co78" table:default-cell-style-name="Default"/>
        <table:table-column table:style-name="co1" table:number-columns-repeated="2" table:default-cell-style-name="Default"/>
        <table:table-column table:style-name="co79" table:default-cell-style-name="Default"/>
        <table:table-column table:style-name="co1" table:default-cell-style-name="Default"/>
        <table:table-row table:style-name="ro2">
          <table:table-cell/>
          <table:table-cell table:style-name="Default" office:value-type="string" calcext:value-type="string">
            <text:p><text:span text:style-name="T10">Панел</text:span>ь</text:p>
          </table:table-cell>
          <table:table-cell table:style-name="Default"/>
          <table:table-cell office:value-type="string" calcext:value-type="string">
            <text:p>Схемы.pdf</text:p>
          </table:table-cell>
          <table:table-cell table:number-columns-repeated="2"/>
          <table:table-cell office:value-type="string" calcext:value-type="string">
            <text:p>PLC</text:p>
          </table:table-cell>
          <table:table-cell table:number-columns-repeated="7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slot 3 (4-20 mA)</text:p>
          </table:table-cell>
          <table:table-cell table:number-columns-repeated="1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PT260</text:p>
          </table:table-cell>
          <table:table-cell/>
          <table:table-cell office:value-type="string" calcext:value-type="string">
            <text:p>PT260</text:p>
          </table:table-cell>
          <table:table-cell office:value-type="string" calcext:value-type="string">
            <text:p>IW304</text:p>
          </table:table-cell>
          <table:table-cell table:number-columns-repeated="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T232</text:p>
          </table:table-cell>
          <table:table-cell/>
          <table:table-cell office:value-type="string" calcext:value-type="string">
            <text:p>PT232</text:p>
          </table:table-cell>
          <table:table-cell office:value-type="string" calcext:value-type="string">
            <text:p>IW306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T130</text:p>
          </table:table-cell>
          <table:table-cell/>
          <table:table-cell office:value-type="string" calcext:value-type="string">
            <text:p>PT130</text:p>
          </table:table-cell>
          <table:table-cell office:value-type="string" calcext:value-type="string">
            <text:p>IW308</text:p>
          </table:table-cell>
          <table:table-cell table:number-columns-repeated="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T1X</text:p>
          </table:table-cell>
          <table:table-cell/>
          <table:table-cell office:value-type="string" calcext:value-type="string">
            <text:p>VT1X</text:p>
          </table:table-cell>
          <table:table-cell office:value-type="string" calcext:value-type="string">
            <text:p>IW310</text:p>
          </table:table-cell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VT2X</text:p>
          </table:table-cell>
          <table:table-cell/>
          <table:table-cell office:value-type="string" calcext:value-type="string">
            <text:p>VT2X</text:p>
          </table:table-cell>
          <table:table-cell office:value-type="string" calcext:value-type="string">
            <text:p>IW312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T3X</text:p>
          </table:table-cell>
          <table:table-cell/>
          <table:table-cell office:value-type="string" calcext:value-type="string">
            <text:p>VT3X</text:p>
          </table:table-cell>
          <table:table-cell office:value-type="string" calcext:value-type="string">
            <text:p>IW314</text:p>
          </table:table-cell>
          <table:table-cell table:number-columns-repeated="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DT120</text:p>
          </table:table-cell>
          <table:table-cell/>
          <table:table-cell office:value-type="string" calcext:value-type="string">
            <text:p>PDT120</text:p>
          </table:table-cell>
          <table:table-cell office:value-type="string" calcext:value-type="string">
            <text:p>IW316</text:p>
          </table:table-cell>
          <table:table-cell table:number-columns-repeated="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D140</text:p>
          </table:table-cell>
          <table:table-cell/>
          <table:table-cell office:value-type="string" calcext:value-type="string">
            <text:p>TD140</text:p>
          </table:table-cell>
          <table:table-cell office:value-type="string" calcext:value-type="string">
            <text:p>IW31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table:number-columns-repeated="2"/>
          <table:table-cell table:style-name="Default" office:value-type="string" calcext:value-type="string">
            <text:p>slot 4 (4-20 mA)</text:p>
          </table:table-cell>
          <table:table-cell table:number-columns-repeated="1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X203FB (IGV)</text:p>
          </table:table-cell>
          <table:table-cell/>
          <table:table-cell office:value-type="string" calcext:value-type="string">
            <text:p>IGV</text:p>
          </table:table-cell>
          <table:table-cell office:value-type="string" calcext:value-type="string">
            <text:p>IW336</text:p>
          </table:table-cell>
          <table:table-cell table:number-columns-repeated="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PARE</text:p>
          </table:table-cell>
          <table:table-cell/>
          <table:table-cell office:value-type="string" calcext:value-type="string">
            <text:p>SPARE</text:p>
          </table:table-cell>
          <table:table-cell office:value-type="string" calcext:value-type="string">
            <text:p>IW338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PARE</text:p>
          </table:table-cell>
          <table:table-cell/>
          <table:table-cell office:value-type="string" calcext:value-type="string">
            <text:p>SPARE</text:p>
          </table:table-cell>
          <table:table-cell office:value-type="string" calcext:value-type="string">
            <text:p>IW340</text:p>
          </table:table-cell>
          <table:table-cell table:number-columns-repeated="8"/>
          <table:table-cell table:style-name="ce1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PARE</text:p>
          </table:table-cell>
          <table:table-cell/>
          <table:table-cell office:value-type="string" calcext:value-type="string">
            <text:p>SPARE</text:p>
          </table:table-cell>
          <table:table-cell office:value-type="string" calcext:value-type="string">
            <text:p>IW342</text:p>
          </table:table-cell>
          <table:table-cell table:number-columns-repeated="8"/>
          <table:table-cell table:style-name="ce1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VT5X</text:p>
          </table:table-cell>
          <table:table-cell table:style-name="ce201"/>
          <table:table-cell office:value-type="string" calcext:value-type="string">
            <text:p>SPARE</text:p>
          </table:table-cell>
          <table:table-cell office:value-type="string" calcext:value-type="string">
            <text:p>IW344</text:p>
          </table:table-cell>
          <table:table-cell table:number-columns-repeated="8"/>
          <table:table-cell table:style-name="ce1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T6X</text:p>
          </table:table-cell>
          <table:table-cell table:style-name="ce201"/>
          <table:table-cell office:value-type="string" calcext:value-type="string">
            <text:p>SPARE</text:p>
          </table:table-cell>
          <table:table-cell office:value-type="string" calcext:value-type="string">
            <text:p>IW346</text:p>
          </table:table-cell>
          <table:table-cell table:number-columns-repeated="8"/>
          <table:table-cell table:style-name="ce20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T301</text:p>
          </table:table-cell>
          <table:table-cell table:style-name="ce201"/>
          <table:table-cell office:value-type="string" calcext:value-type="string">
            <text:p>SPARE</text:p>
          </table:table-cell>
          <table:table-cell office:value-type="string" calcext:value-type="string">
            <text:p>IW348</text:p>
          </table:table-cell>
          <table:table-cell office:value-type="string" calcext:value-type="string">
            <text:p>*</text:p>
          </table:table-cell>
          <table:table-cell table:number-columns-repeated="7"/>
          <table:table-cell table:style-name="ce20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PARE</text:p>
          </table:table-cell>
          <table:table-cell/>
          <table:table-cell office:value-type="string" calcext:value-type="string">
            <text:p>SPARE</text:p>
          </table:table-cell>
          <table:table-cell office:value-type="string" calcext:value-type="string">
            <text:p>IW350</text:p>
          </table:table-cell>
          <table:table-cell table:number-columns-repeated="8"/>
          <table:table-cell table:style-name="ce209"/>
        </table:table-row>
        <table:table-row table:style-name="ro2"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table:number-columns-repeated="2"/>
          <table:table-cell table:style-name="Default" office:value-type="string" calcext:value-type="string">
            <text:p>slot 5 (RTD Sensor -200..650 °C)</text:p>
          </table:table-cell>
          <table:table-cell table:number-columns-repeated="3"/>
          <table:table-cell office:value-type="string" calcext:value-type="string">
            <text:p>warnAddress</text:p>
          </table:table-cell>
          <table:table-cell office:value-type="string" calcext:value-type="string">
            <text:p>warnValue</text:p>
          </table:table-cell>
          <table:table-cell office:value-type="string" calcext:value-type="string">
            <text:p><text:span text:style-name="T11">warnEx</text:span><text:span text:style-name="T12">i</text:span>st</text:p>
          </table:table-cell>
          <table:table-cell office:value-type="string" calcext:value-type="string">
            <text:p>alarmAddress</text:p>
          </table:table-cell>
          <table:table-cell office:value-type="string" calcext:value-type="string">
            <text:p>alarmValue</text:p>
          </table:table-cell>
          <table:table-cell office:value-type="string" calcext:value-type="string">
            <text:p><text:span text:style-name="T11">alarmEx</text:span><text:span text:style-name="T12">i</text:span>st</text:p>
          </table:table-cell>
          <table:table-cell office:value-type="string" calcext:value-type="string">
            <text:p>Возможный датчик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TE130</text:p>
          </table:table-cell>
          <table:table-cell/>
          <table:table-cell office:value-type="string" calcext:value-type="string">
            <text:p>TE130</text:p>
          </table:table-cell>
          <table:table-cell office:value-type="string" calcext:value-type="string">
            <text:p>IW320</text:p>
          </table:table-cell>
          <table:table-cell table:number-columns-repeated="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231</text:p>
          </table:table-cell>
          <table:table-cell/>
          <table:table-cell office:value-type="string" calcext:value-type="string">
            <text:p>TE231</text:p>
          </table:table-cell>
          <table:table-cell office:value-type="string" calcext:value-type="string">
            <text:p>IW32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B59.DBW13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5.7</text:p>
          </table:table-cell>
          <table:table-cell office:value-type="string" calcext:value-type="string">
            <text:p>DB60.DBW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9.7</text:p>
          </table:table-cell>
          <table:table-cell office:value-type="string" calcext:value-type="string">
            <text:p>TE23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101</text:p>
          </table:table-cell>
          <table:table-cell/>
          <table:table-cell office:value-type="string" calcext:value-type="string">
            <text:p>TE101</text:p>
          </table:table-cell>
          <table:table-cell office:value-type="string" calcext:value-type="string">
            <text:p>IW32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B59.DBW132</text:p>
          </table:table-cell>
          <table:table-cell table:style-name="ce208" office:value-type="float" office:value="16" calcext:value-type="float">
            <text:p>16</text:p>
          </table:table-cell>
          <table:table-cell office:value-type="string" calcext:value-type="string">
            <text:p>M6.0</text:p>
          </table:table-cell>
          <table:table-cell table:number-columns-repeated="3"/>
          <table:table-cell office:value-type="string" calcext:value-type="string">
            <text:p>TE101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140</text:p>
          </table:table-cell>
          <table:table-cell/>
          <table:table-cell office:value-type="string" calcext:value-type="string">
            <text:p>TE140</text:p>
          </table:table-cell>
          <table:table-cell office:value-type="string" calcext:value-type="string">
            <text:p>IW32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B59.DBW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6.1</text:p>
          </table:table-cell>
          <table:table-cell office:value-type="string" calcext:value-type="string">
            <text:p>DB60.DBW3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10.1</text:p>
          </table:table-cell>
          <table:table-cell office:value-type="string" calcext:value-type="string">
            <text:p>TE140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E143</text:p>
          </table:table-cell>
          <table:table-cell/>
          <table:table-cell office:value-type="string" calcext:value-type="string">
            <text:p>TE143</text:p>
          </table:table-cell>
          <table:table-cell office:value-type="string" calcext:value-type="string">
            <text:p>IW32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B59.DBW14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6.6</text:p>
          </table:table-cell>
          <table:table-cell office:value-type="string" calcext:value-type="string">
            <text:p>DB60.DBW4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10.6</text:p>
          </table:table-cell>
          <table:table-cell office:value-type="string" calcext:value-type="string">
            <text:p>TE143/TE14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E144</text:p>
          </table:table-cell>
          <table:table-cell/>
          <table:table-cell office:value-type="string" calcext:value-type="string">
            <text:p>TE144</text:p>
          </table:table-cell>
          <table:table-cell office:value-type="string" calcext:value-type="string">
            <text:p>IW33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B59.DBW14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6.7</text:p>
          </table:table-cell>
          <table:table-cell office:value-type="string" calcext:value-type="string">
            <text:p>DB60.DBW4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10.7</text:p>
          </table:table-cell>
          <table:table-cell office:value-type="string" calcext:value-type="string">
            <text:p>TE143/TE144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E221</text:p>
          </table:table-cell>
          <table:table-cell/>
          <table:table-cell office:value-type="string" calcext:value-type="string">
            <text:p>TE221</text:p>
          </table:table-cell>
          <table:table-cell office:value-type="string" calcext:value-type="string">
            <text:p>IW33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B59.DBW14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6.4</text:p>
          </table:table-cell>
          <table:table-cell office:value-type="string" calcext:value-type="string">
            <text:p>DB60.DBW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10.4</text:p>
          </table:table-cell>
          <table:table-cell office:value-type="string" calcext:value-type="string">
            <text:p>TE22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PARE</text:p>
          </table:table-cell>
          <table:table-cell/>
          <table:table-cell office:value-type="string" calcext:value-type="string">
            <text:p>SPARE</text:p>
          </table:table-cell>
          <table:table-cell office:value-type="string" calcext:value-type="string">
            <text:p>IW33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B59.DBW14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6.5</text:p>
          </table:table-cell>
          <table:table-cell office:value-type="string" calcext:value-type="string">
            <text:p>DB60.DBW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0.5</text:p>
          </table:table-cell>
          <table:table-cell table:style-name="ce113" office:value-type="string" calcext:value-type="string">
            <text:p>TE130 ??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table:number-columns-repeated="2"/>
          <table:table-cell table:style-name="Default" office:value-type="string" calcext:value-type="string">
            <text:p>slot 6 (RTD Sensor -200..650 °C)</text:p>
          </table:table-cell>
          <table:table-cell table:number-columns-repeated="1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PARE</text:p>
          </table:table-cell>
          <table:table-cell table:style-name="ce201"/>
          <table:table-cell office:value-type="string" calcext:value-type="string">
            <text:p>PT301</text:p>
          </table:table-cell>
          <table:table-cell office:value-type="string" calcext:value-type="string">
            <text:p>IW352</text:p>
          </table:table-cell>
          <table:table-cell office:value-type="string" calcext:value-type="string">
            <text:p>*</text:p>
          </table:table-cell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212</text:p>
          </table:table-cell>
          <table:table-cell table:style-name="ce201"/>
          <table:table-cell office:value-type="string" calcext:value-type="string">
            <text:p>VT5X</text:p>
          </table:table-cell>
          <table:table-cell office:value-type="string" calcext:value-type="string">
            <text:p>IW354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222</text:p>
          </table:table-cell>
          <table:table-cell table:style-name="ce201"/>
          <table:table-cell office:value-type="string" calcext:value-type="string">
            <text:p>VT6X</text:p>
          </table:table-cell>
          <table:table-cell office:value-type="string" calcext:value-type="string">
            <text:p>IW356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232</text:p>
          </table:table-cell>
          <table:table-cell table:style-name="ce201"/>
          <table:table-cell office:value-type="string" calcext:value-type="string">
            <text:p>TE212</text:p>
          </table:table-cell>
          <table:table-cell office:value-type="string" calcext:value-type="string">
            <text:p>IW358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--</text:p>
          </table:table-cell>
          <table:table-cell table:number-columns-repeated="2"/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E301</text:p>
          </table:table-cell>
          <table:table-cell table:style-name="ce201"/>
          <table:table-cell office:value-type="string" calcext:value-type="string">
            <text:p>TE222</text:p>
          </table:table-cell>
          <table:table-cell office:value-type="string" calcext:value-type="string">
            <text:p>IW360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--</text:p>
          </table:table-cell>
          <table:table-cell table:number-columns-repeated="2"/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E302</text:p>
          </table:table-cell>
          <table:table-cell table:style-name="ce201"/>
          <table:table-cell office:value-type="string" calcext:value-type="string">
            <text:p>TE232</text:p>
          </table:table-cell>
          <table:table-cell office:value-type="string" calcext:value-type="string">
            <text:p>IW362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--</text:p>
          </table:table-cell>
          <table:table-cell table:number-columns-repeated="2"/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PARE</text:p>
          </table:table-cell>
          <table:table-cell table:style-name="ce201"/>
          <table:table-cell office:value-type="string" calcext:value-type="string">
            <text:p>TE301</text:p>
          </table:table-cell>
          <table:table-cell office:value-type="string" calcext:value-type="string">
            <text:p>IW364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PARE</text:p>
          </table:table-cell>
          <table:table-cell table:style-name="ce201"/>
          <table:table-cell office:value-type="string" calcext:value-type="string">
            <text:p>TE302</text:p>
          </table:table-cell>
          <table:table-cell office:value-type="string" calcext:value-type="string">
            <text:p>IW366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2"/>
          <table:table-cell table:number-columns-repeated="11"/>
        </table:table-row>
        <table:table-row table:style-name="ro2">
          <table:table-cell/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office:value-type="string" calcext:value-type="string">
            <text:p>ai_IGVposition</text:p>
          </table:table-cell>
          <table:table-cell table:formula="of:=CONCATENATE([.B45];[.E45])" office:value-type="string" office:string-value="2ai_IGVposition" calcext:value-type="string">
            <text:p>2ai_IGVposition</text:p>
          </table:table-cell>
          <table:table-cell office:value-type="string" calcext:value-type="string">
            <text:p>ai_TE130_oilSupplyTemperature</text:p>
          </table:table-cell>
          <table:table-cell table:number-columns-repeated="2"/>
          <table:table-cell table:formula="of:=CONCATENATE([.B45];[.G45])" office:value-type="string" office:string-value="2ai_TE130_oilSupplyTemperature" calcext:value-type="string">
            <text:p>2ai_TE130_oilSupplyTemperature</text:p>
          </table:table-cell>
          <table:table-cell table:number-columns-repeated="4"/>
        </table:table-row>
        <table:table-row table:style-name="ro2">
          <table:table-cell/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office:value-type="string" calcext:value-type="string">
            <text:p>spare322</text:p>
          </table:table-cell>
          <table:table-cell table:formula="of:=CONCATENATE([.B46];[.E46])" office:value-type="string" office:string-value="2spare322" calcext:value-type="string">
            <text:p>2spare322</text:p>
          </table:table-cell>
          <table:table-cell office:value-type="string" calcext:value-type="string">
            <text:p>ai_TE231_stage3InletTemprature</text:p>
          </table:table-cell>
          <table:table-cell table:number-columns-repeated="2"/>
          <table:table-cell table:formula="of:=CONCATENATE([.B46];[.G46])" office:value-type="string" office:string-value="2ai_TE231_stage3InletTemprature" calcext:value-type="string">
            <text:p>2ai_TE231_stage3InletTemprature</text:p>
          </table:table-cell>
          <table:table-cell table:number-columns-repeated="4"/>
        </table:table-row>
        <table:table-row table:style-name="ro2">
          <table:table-cell/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office:value-type="string" calcext:value-type="string">
            <text:p>spare324</text:p>
          </table:table-cell>
          <table:table-cell table:formula="of:=CONCATENATE([.B47];[.E47])" office:value-type="string" office:string-value="2spare324" calcext:value-type="string">
            <text:p>2spare324</text:p>
          </table:table-cell>
          <table:table-cell office:value-type="string" calcext:value-type="string">
            <text:p>ai_TE101_oilReservoirTemperature</text:p>
          </table:table-cell>
          <table:table-cell table:number-columns-repeated="2"/>
          <table:table-cell table:formula="of:=CONCATENATE([.B47];[.G47])" office:value-type="string" office:string-value="2ai_TE101_oilReservoirTemperature" calcext:value-type="string">
            <text:p>2ai_TE101_oilReservoirTemperature</text:p>
          </table:table-cell>
          <table:table-cell table:number-columns-repeated="4"/>
        </table:table-row>
        <table:table-row table:style-name="ro2">
          <table:table-cell/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office:value-type="string" calcext:value-type="string">
            <text:p>spare326</text:p>
          </table:table-cell>
          <table:table-cell table:formula="of:=CONCATENATE([.B48];[.E48])" office:value-type="string" office:string-value="2spare326" calcext:value-type="string">
            <text:p>2spare326</text:p>
          </table:table-cell>
          <table:table-cell office:value-type="string" calcext:value-type="string">
            <text:p>ai_TE140_motorWinding_R_Temperature</text:p>
          </table:table-cell>
          <table:table-cell table:number-columns-repeated="2"/>
          <table:table-cell table:formula="of:=CONCATENATE([.B48];[.G48])" office:value-type="string" office:string-value="2ai_TE140_motorWinding_R_Temperature" calcext:value-type="string">
            <text:p>2ai_TE140_motorWinding_R_Temperature</text:p>
          </table:table-cell>
          <table:table-cell table:number-columns-repeated="4"/>
        </table:table-row>
        <table:table-row table:style-name="ro2">
          <table:table-cell/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office:value-type="string" calcext:value-type="string">
            <text:p>spare328</text:p>
          </table:table-cell>
          <table:table-cell table:formula="of:=CONCATENATE([.B49];[.E49])" office:value-type="string" office:string-value="2spare328" calcext:value-type="string">
            <text:p>2spare328</text:p>
          </table:table-cell>
          <table:table-cell office:value-type="string" calcext:value-type="string">
            <text:p>ai_TE143_motorBearing_DE_Temperature</text:p>
          </table:table-cell>
          <table:table-cell table:number-columns-repeated="2"/>
          <table:table-cell table:formula="of:=CONCATENATE([.B49];[.G49])" office:value-type="string" office:string-value="2ai_TE143_motorBearing_DE_Temperature" calcext:value-type="string">
            <text:p>2ai_TE143_motorBearing_DE_Temperature</text:p>
          </table:table-cell>
          <table:table-cell table:number-columns-repeated="4"/>
        </table:table-row>
        <table:table-row table:style-name="ro2">
          <table:table-cell/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office:value-type="string" calcext:value-type="string">
            <text:p>spare330</text:p>
          </table:table-cell>
          <table:table-cell table:formula="of:=CONCATENATE([.B50];[.E50])" office:value-type="string" office:string-value="2spare330" calcext:value-type="string">
            <text:p>2spare330</text:p>
          </table:table-cell>
          <table:table-cell office:value-type="string" calcext:value-type="string">
            <text:p>ai_TE144_motorBearing_NDE_Temperature</text:p>
          </table:table-cell>
          <table:table-cell table:number-columns-repeated="2"/>
          <table:table-cell table:formula="of:=CONCATENATE([.B50];[.G50])" office:value-type="string" office:string-value="2ai_TE144_motorBearing_NDE_Temperature" calcext:value-type="string">
            <text:p>2ai_TE144_motorBearing_NDE_Temperature</text:p>
          </table:table-cell>
          <table:table-cell table:number-columns-repeated="4"/>
        </table:table-row>
        <table:table-row table:style-name="ro2">
          <table:table-cell/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office:value-type="string" calcext:value-type="string">
            <text:p>spare332</text:p>
          </table:table-cell>
          <table:table-cell table:formula="of:=CONCATENATE([.B51];[.E51])" office:value-type="string" office:string-value="2spare332" calcext:value-type="string">
            <text:p>2spare332</text:p>
          </table:table-cell>
          <table:table-cell office:value-type="string" calcext:value-type="string">
            <text:p>ai_TE221_stage2InletTemperature</text:p>
          </table:table-cell>
          <table:table-cell table:number-columns-repeated="2"/>
          <table:table-cell table:formula="of:=CONCATENATE([.B51];[.G51])" office:value-type="string" office:string-value="2ai_TE221_stage2InletTemperature" calcext:value-type="string">
            <text:p>2ai_TE221_stage2InletTemperature</text:p>
          </table:table-cell>
          <table:table-cell table:number-columns-repeated="4"/>
        </table:table-row>
        <table:table-row table:style-name="ro2">
          <table:table-cell/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office:value-type="string" calcext:value-type="string">
            <text:p>spare334</text:p>
          </table:table-cell>
          <table:table-cell table:formula="of:=CONCATENATE([.B52];[.E52])" office:value-type="string" office:string-value="2spare334" calcext:value-type="string">
            <text:p>2spare334</text:p>
          </table:table-cell>
          <table:table-cell office:value-type="string" calcext:value-type="string">
            <text:p>spare350</text:p>
          </table:table-cell>
          <table:table-cell table:number-columns-repeated="2"/>
          <table:table-cell table:formula="of:=CONCATENATE([.B52];[.G52])" office:value-type="string" office:string-value="2spare350" calcext:value-type="string">
            <text:p>2spare350</text:p>
          </table:table-cell>
          <table:table-cell table:number-columns-repeated="4"/>
        </table:table-row>
      </table:table>
      <table:table table:name="Warnings" table:style-name="ta1">
        <office:forms form:automatic-focus="false" form:apply-design-mode="false"/>
        <table:table-column table:style-name="co17" table:default-cell-style-name="ce80"/>
        <table:table-column table:style-name="co80" table:default-cell-style-name="ce105"/>
        <table:table-column table:style-name="co81" table:default-cell-style-name="ce80"/>
        <table:table-column table:style-name="co82" table:default-cell-style-name="ce80"/>
        <table:table-column table:style-name="co83" table:default-cell-style-name="ce80"/>
        <table:table-column table:style-name="co84" table:default-cell-style-name="ce80"/>
        <table:table-column table:style-name="co85" table:default-cell-style-name="ce80"/>
        <table:table-column table:style-name="co86" table:default-cell-style-name="ce80"/>
        <table:table-column table:style-name="co87" table:default-cell-style-name="ce80"/>
        <table:table-column table:style-name="co88" table:default-cell-style-name="ce80"/>
        <table:table-column table:style-name="co1" table:number-columns-repeated="2" table:default-cell-style-name="ce80"/>
        <table:table-column table:style-name="co89" table:default-cell-style-name="ce80"/>
        <table:table-column table:style-name="co90" table:default-cell-style-name="ce80"/>
        <table:table-column table:style-name="co1" table:number-columns-repeated="1010" table:default-cell-style-name="ce80"/>
        <table:table-row table:style-name="ro2">
          <table:table-cell office:value-type="string" calcext:value-type="string">
            <text:p>my version</text:p>
          </table:table-cell>
          <table:table-cell table:style-name="ce104" office:value-type="string" calcext:value-type="string">
            <text:p>Код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Описание</text:p>
          </table:table-cell>
          <table:table-cell office:value-type="string" calcext:value-type="string">
            <text:p>0-&gt;1</text:p>
          </table:table-cell>
          <table:table-cell office:value-type="string" calcext:value-type="string">
            <text:p>1-&gt;0</text:p>
          </table:table-cell>
          <table:table-cell office:value-type="string" calcext:value-type="string">
            <text:p>Поле</text:p>
          </table:table-cell>
          <table:table-cell office:value-type="string" calcext:value-type="string">
            <text:p>Объект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03" table:formula="of:=IF((ISBLANK([$Предупреждения.H3]))OR(ISBLANK([$Предупреждения.I3]));&quot;&quot;;CONCATENATE(&quot;rtd&quot;;[$Предупреждения.H3]))" office:value-type="string" office:string-value="rtdWarningMessGroupFlag1" calcext:value-type="string">
            <text:p>rtdWarningMessGroupFlag1</text:p>
          </table:table-cell>
          <table:table-cell table:style-name="ce103" table:formula="of:=IF((ISBLANK([$Предупреждения.H3]))OR(ISBLANK([$Предупреждения.I3]));&quot;&quot;;[$Предупреждения.I3])" office:value-type="float" office:value="8" calcext:value-type="float">
            <text:p>8</text:p>
          </table:table-cell>
          <table:table-cell table:formula="of:=IF((ISBLANK([$Предупреждения.$H3]))OR(ISBLANK([$Предупреждения.$I3]));&quot;&quot;;[$Предупреждения.E3])" office:value-type="string" office:string-value="SurgeWarning" calcext:value-type="string">
            <text:p>SurgeWarning</text:p>
          </table:table-cell>
          <table:table-cell table:formula="of:=IF((ISBLANK([$Предупреждения.$H3]))OR(ISBLANK([$Предупреждения.$I3]));&quot;&quot;;[$Предупреждения.F3])" office:value-type="string" office:string-value="предпомпаж" calcext:value-type="string">
            <text:p>предпомпаж</text:p>
          </table:table-cell>
          <table:table-cell table:formula="of:=IF((ISBLANK([$Предупреждения.$H3]))OR(ISBLANK([$Предупреждения.$I3]));&quot;&quot;;[$Предупреждения.G3])" office:value-type="string" office:string-value="Предпомпаж" calcext:value-type="string">
            <text:p>Предпомпаж</text:p>
          </table:table-cell>
          <table:table-cell table:formula="of:=IF((ISBLANK([$Предупреждения.$H3]))OR(ISBLANK([$Предупреждения.$I3]));&quot;&quot;;[$Предупреждения.J3])" office:value-type="string" office:string-value="Предупреждение : Предпомпаж  " calcext:value-type="string">
            <text:p>Предупреждение : Предпомпаж <text:s/></text:p>
          </table:table-cell>
          <table:table-cell table:formula="of:=IF((ISBLANK([$Предупреждения.$H3]))OR(ISBLANK([$Предупреждения.$I3]))OR(ISBLANK([$Предупреждения.K3]));&quot;&quot;;[$Предупреждения.K3])">
            <text:p/>
          </table:table-cell>
          <table:table-cell table:formula="of:=IF((ISBLANK([$Предупреждения.$H3]))OR(ISBLANK([$Предупреждения.$I3]))OR(ISBLANK([$Предупреждения.L3]));&quot;&quot;;[$Предупреждения.L3])">
            <text:p/>
          </table:table-cell>
          <table:table-cell table:formula="of:=IF((ISBLANK([$Предупреждения.$H3]))OR(ISBLANK([$Предупреждения.$I3]))OR(ISBLANK([$Предупреждения.M3]));&quot;&quot;;[$Предупреждения.M3])">
            <text:p/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4]))OR(ISBLANK([$Предупреждения.I4]));&quot;&quot;;CONCATENATE(&quot;rtd&quot;;[$Предупреждения.H4]))" office:value-type="string" office:string-value="rtdWarningMessGroupFlag1" calcext:value-type="string">
            <text:p>rtdWarningMessGroupFlag1</text:p>
          </table:table-cell>
          <table:table-cell table:style-name="ce103" table:formula="of:=IF((ISBLANK([$Предупреждения.H4]))OR(ISBLANK([$Предупреждения.I4]));&quot;&quot;;[$Предупреждения.I4])" office:value-type="float" office:value="10" calcext:value-type="float">
            <text:p>10</text:p>
          </table:table-cell>
          <table:table-cell table:formula="of:=IF((ISBLANK([$Предупреждения.H4]))OR(ISBLANK([$Предупреждения.I4]));&quot;&quot;;[$Предупреждения.E4])" office:value-type="string" office:string-value="OilLevelAlarmLow" calcext:value-type="string">
            <text:p>OilLevelAlarmLow</text:p>
          </table:table-cell>
          <table:table-cell table:formula="of:=IF((ISBLANK([$Предупреждения.$H4]))OR(ISBLANK([$Предупреждения.$I4]));&quot;&quot;;[$Предупреждения.F4])" office:value-type="string" office:string-value="уровень масла авария низкий" calcext:value-type="string">
            <text:p>уровень масла авария низкий</text:p>
          </table:table-cell>
          <table:table-cell table:formula="of:=IF((ISBLANK([$Предупреждения.$H4]))OR(ISBLANK([$Предупреждения.$I4]));&quot;&quot;;[$Предупреждения.G4])" office:value-type="string" office:string-value="Уровень масла аварийно низкий" calcext:value-type="string">
            <text:p>Уровень масла аварийно низкий</text:p>
          </table:table-cell>
          <table:table-cell table:formula="of:=IF((ISBLANK([$Предупреждения.$H4]))OR(ISBLANK([$Предупреждения.$I4]));&quot;&quot;;[$Предупреждения.J4])" office:value-type="string" office:string-value="Предупреждение : Уровень масла  низкий" calcext:value-type="string">
            <text:p>Предупреждение : Уровень масла <text:s/>низкий</text:p>
          </table:table-cell>
          <table:table-cell table:formula="of:=IF((ISBLANK([$Предупреждения.$H4]))OR(ISBLANK([$Предупреждения.$I4]))OR(ISBLANK([$Предупреждения.K4]));&quot;&quot;;[$Предупреждения.K4])">
            <text:p/>
          </table:table-cell>
          <table:table-cell table:formula="of:=IF((ISBLANK([$Предупреждения.$H4]))OR(ISBLANK([$Предупреждения.$I4]))OR(ISBLANK([$Предупреждения.L4]));&quot;&quot;;[$Предупреждения.L4])">
            <text:p/>
          </table:table-cell>
          <table:table-cell table:formula="of:=IF((ISBLANK([$Предупреждения.$H4]))OR(ISBLANK([$Предупреждения.$I4]))OR(ISBLANK([$Предупреждения.M4]));&quot;&quot;;[$Предупреждения.M4])">
            <text:p/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5]))OR(ISBLANK([$Предупреждения.I5]));&quot;&quot;;CONCATENATE(&quot;rtd&quot;;[$Предупреждения.H5]))" office:value-type="string" office:string-value="rtdWarningMessGroupFlag1" calcext:value-type="string">
            <text:p>rtdWarningMessGroupFlag1</text:p>
          </table:table-cell>
          <table:table-cell table:style-name="ce103" table:formula="of:=IF((ISBLANK([$Предупреждения.H5]))OR(ISBLANK([$Предупреждения.I5]));&quot;&quot;;[$Предупреждения.I5])" office:value-type="float" office:value="11" calcext:value-type="float">
            <text:p>11</text:p>
          </table:table-cell>
          <table:table-cell table:formula="of:=IF((ISBLANK([$Предупреждения.H5]))OR(ISBLANK([$Предупреждения.I5]));&quot;&quot;;[$Предупреждения.E5])" office:value-type="string" office:string-value="CoolingWaterFlowAlarm" calcext:value-type="string">
            <text:p>CoolingWaterFlowAlarm</text:p>
          </table:table-cell>
          <table:table-cell table:formula="of:=IF((ISBLANK([$Предупреждения.$H5]))OR(ISBLANK([$Предупреждения.$I5]));&quot;&quot;;[$Предупреждения.F5])" office:value-type="string" office:string-value="нет протока воды" calcext:value-type="string">
            <text:p>нет протока воды</text:p>
          </table:table-cell>
          <table:table-cell table:formula="of:=IF((ISBLANK([$Предупреждения.$H5]))OR(ISBLANK([$Предупреждения.$I5]));&quot;&quot;;[$Предупреждения.G5])" office:value-type="string" office:string-value="Нет протока охлаждающей воды" calcext:value-type="string">
            <text:p>Нет протока охлаждающей воды</text:p>
          </table:table-cell>
          <table:table-cell table:formula="of:=IF((ISBLANK([$Предупреждения.$H5]))OR(ISBLANK([$Предупреждения.$I5]));&quot;&quot;;[$Предупреждения.J5])" office:value-type="string" office:string-value="Предупреждение : Нет протока воды  " calcext:value-type="string">
            <text:p>Предупреждение : Нет протока воды <text:s/></text:p>
          </table:table-cell>
          <table:table-cell table:formula="of:=IF((ISBLANK([$Предупреждения.$H5]))OR(ISBLANK([$Предупреждения.$I5]))OR(ISBLANK([$Предупреждения.K5]));&quot;&quot;;[$Предупреждения.K5])">
            <text:p/>
          </table:table-cell>
          <table:table-cell table:formula="of:=IF((ISBLANK([$Предупреждения.$H5]))OR(ISBLANK([$Предупреждения.$I5]))OR(ISBLANK([$Предупреждения.L5]));&quot;&quot;;[$Предупреждения.L5])">
            <text:p/>
          </table:table-cell>
          <table:table-cell table:formula="of:=IF((ISBLANK([$Предупреждения.$H5]))OR(ISBLANK([$Предупреждения.$I5]))OR(ISBLANK([$Предупреждения.M5]));&quot;&quot;;[$Предупреждения.M5])">
            <text:p/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6]))OR(ISBLANK([$Предупреждения.I6]));&quot;&quot;;CONCATENATE(&quot;rtd&quot;;[$Предупреждения.H6]))" office:value-type="string" office:string-value="rtdWarningMessGroupFlag1" calcext:value-type="string">
            <text:p>rtdWarningMessGroupFlag1</text:p>
          </table:table-cell>
          <table:table-cell table:style-name="ce103" table:formula="of:=IF((ISBLANK([$Предупреждения.H6]))OR(ISBLANK([$Предупреждения.I6]));&quot;&quot;;[$Предупреждения.I6])" office:value-type="float" office:value="12" calcext:value-type="float">
            <text:p>12</text:p>
          </table:table-cell>
          <table:table-cell table:formula="of:=IF((ISBLANK([$Предупреждения.H6]))OR(ISBLANK([$Предупреждения.I6]));&quot;&quot;;[$Предупреждения.E6])" office:value-type="string" office:string-value="AirFilterDiffPressureHighAlarm" calcext:value-type="string">
            <text:p>AirFilterDiffPressureHighAlarm</text:p>
          </table:table-cell>
          <table:table-cell table:formula="of:=IF((ISBLANK([$Предупреждения.$H6]))OR(ISBLANK([$Предупреждения.$I6]));&quot;&quot;;[$Предупреждения.F6])" office:value-type="string" office:string-value="высокий перепад на воздушном фильтре" calcext:value-type="string">
            <text:p>высокий перепад на воздушном фильтре</text:p>
          </table:table-cell>
          <table:table-cell table:formula="of:=IF((ISBLANK([$Предупреждения.$H6]))OR(ISBLANK([$Предупреждения.$I6]));&quot;&quot;;[$Предупреждения.G6])" office:value-type="string" office:string-value="Высокий перепад давления на воздушном фильтре" calcext:value-type="string">
            <text:p>Высокий перепад давления на воздушном фильтре</text:p>
          </table:table-cell>
          <table:table-cell table:formula="of:=IF((ISBLANK([$Предупреждения.$H6]))OR(ISBLANK([$Предупреждения.$I6]));&quot;&quot;;[$Предупреждения.J6])" office:value-type="string" office:string-value="Предупреждение : Перепад давления на воздушном фильтре  высокий" calcext:value-type="string">
            <text:p>Предупреждение : Перепад давления на воздушном фильтре <text:s/>высокий</text:p>
          </table:table-cell>
          <table:table-cell table:formula="of:=IF((ISBLANK([$Предупреждения.$H6]))OR(ISBLANK([$Предупреждения.$I6]))OR(ISBLANK([$Предупреждения.K6]));&quot;&quot;;[$Предупреждения.K6])">
            <text:p/>
          </table:table-cell>
          <table:table-cell table:formula="of:=IF((ISBLANK([$Предупреждения.$H6]))OR(ISBLANK([$Предупреждения.$I6]))OR(ISBLANK([$Предупреждения.L6]));&quot;&quot;;[$Предупреждения.L6])">
            <text:p/>
          </table:table-cell>
          <table:table-cell table:formula="of:=IF((ISBLANK([$Предупреждения.$H6]))OR(ISBLANK([$Предупреждения.$I6]))OR(ISBLANK([$Предупреждения.M6]));&quot;&quot;;[$Предупреждения.M6])">
            <text:p/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7]))OR(ISBLANK([$Предупреждения.I7]));&quot;&quot;;CONCATENATE(&quot;rtd&quot;;[$Предупреждения.H7]))" office:value-type="string" office:string-value="rtdWarningMessGroupFlag1" calcext:value-type="string">
            <text:p>rtdWarningMessGroupFlag1</text:p>
          </table:table-cell>
          <table:table-cell table:style-name="ce103" table:formula="of:=IF((ISBLANK([$Предупреждения.H7]))OR(ISBLANK([$Предупреждения.I7]));&quot;&quot;;[$Предупреждения.I7])" office:value-type="float" office:value="13" calcext:value-type="float">
            <text:p>13</text:p>
          </table:table-cell>
          <table:table-cell table:formula="of:=IF((ISBLANK([$Предупреждения.H7]))OR(ISBLANK([$Предупреждения.I7]));&quot;&quot;;[$Предупреждения.E7])" office:value-type="string" office:string-value="OilFilterDiffPressureHighAlarm" calcext:value-type="string">
            <text:p>OilFilterDiffPressureHighAlarm</text:p>
          </table:table-cell>
          <table:table-cell table:formula="of:=IF((ISBLANK([$Предупреждения.$H7]))OR(ISBLANK([$Предупреждения.$I7]));&quot;&quot;;[$Предупреждения.F7])" office:value-type="string" office:string-value="высокий перепад на масляном фильтре" calcext:value-type="string">
            <text:p>высокий перепад на масляном фильтре</text:p>
          </table:table-cell>
          <table:table-cell table:formula="of:=IF((ISBLANK([$Предупреждения.$H7]))OR(ISBLANK([$Предупреждения.$I7]));&quot;&quot;;[$Предупреждения.G7])" office:value-type="string" office:string-value="Высокий перепад давления на масляном фильтре" calcext:value-type="string">
            <text:p>Высокий перепад давления на масляном фильтре</text:p>
          </table:table-cell>
          <table:table-cell table:formula="of:=IF((ISBLANK([$Предупреждения.$H7]))OR(ISBLANK([$Предупреждения.$I7]));&quot;&quot;;[$Предупреждения.J7])" office:value-type="string" office:string-value="Предупреждение : Перепад давления масла на маслофильтре  PDT120 высокий" calcext:value-type="string">
            <text:p>Предупреждение : Перепад давления масла на маслофильтре <text:s/>PDT120 высокий</text:p>
          </table:table-cell>
          <table:table-cell table:formula="of:=IF((ISBLANK([$Предупреждения.$H7]))OR(ISBLANK([$Предупреждения.$I7]))OR(ISBLANK([$Предупреждения.K7]));&quot;&quot;;[$Предупреждения.K7])">
            <text:p/>
          </table:table-cell>
          <table:table-cell table:formula="of:=IF((ISBLANK([$Предупреждения.$H7]))OR(ISBLANK([$Предупреждения.$I7]))OR(ISBLANK([$Предупреждения.L7]));&quot;&quot;;[$Предупреждения.L7])" office:value-type="string" office:string-value="rtdWarnExist" calcext:value-type="string">
            <text:p>rtdWarnExist</text:p>
          </table:table-cell>
          <table:table-cell table:formula="of:=IF((ISBLANK([$Предупреждения.$H7]))OR(ISBLANK([$Предупреждения.$I7]))OR(ISBLANK([$Предупреждения.M7]));&quot;&quot;;[$Предупреждения.M7])" office:value-type="string" office:string-value="ai9_OilFilterDiffPressure" calcext:value-type="string">
            <text:p>ai9_OilFilterDiffPressure</text:p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8]))OR(ISBLANK([$Предупреждения.I8]));&quot;&quot;;CONCATENATE(&quot;rtd&quot;;[$Предупреждения.H8]))" office:value-type="string" office:string-value="rtdWarningMessGroupFlag1" calcext:value-type="string">
            <text:p>rtdWarningMessGroupFlag1</text:p>
          </table:table-cell>
          <table:table-cell table:style-name="ce103" table:formula="of:=IF((ISBLANK([$Предупреждения.H8]))OR(ISBLANK([$Предупреждения.I8]));&quot;&quot;;[$Предупреждения.I8])" office:value-type="float" office:value="14" calcext:value-type="float">
            <text:p>14</text:p>
          </table:table-cell>
          <table:table-cell table:formula="of:=IF((ISBLANK([$Предупреждения.H8]))OR(ISBLANK([$Предупреждения.I8]));&quot;&quot;;[$Предупреждения.E8])" office:value-type="string" office:string-value="OilPumpOverload" calcext:value-type="string">
            <text:p>OilPumpOverload</text:p>
          </table:table-cell>
          <table:table-cell table:formula="of:=IF((ISBLANK([$Предупреждения.$H8]))OR(ISBLANK([$Предупреждения.$I8]));&quot;&quot;;[$Предупреждения.F8])" office:value-type="string" office:string-value="перегруз маслонасоса" calcext:value-type="string">
            <text:p>перегруз маслонасоса</text:p>
          </table:table-cell>
          <table:table-cell table:formula="of:=IF((ISBLANK([$Предупреждения.$H8]))OR(ISBLANK([$Предупреждения.$I8]));&quot;&quot;;[$Предупреждения.G8])" office:value-type="string" office:string-value="Маслонасос перегружен" calcext:value-type="string">
            <text:p>Маслонасос перегружен</text:p>
          </table:table-cell>
          <table:table-cell table:formula="of:=IF((ISBLANK([$Предупреждения.$H8]))OR(ISBLANK([$Предупреждения.$I8]));&quot;&quot;;[$Предупреждения.J8])" office:value-type="string" office:string-value="Предупреждение : Перегрузка маслонасоса  " calcext:value-type="string">
            <text:p>Предупреждение : Перегрузка маслонасоса <text:s/></text:p>
          </table:table-cell>
          <table:table-cell table:formula="of:=IF((ISBLANK([$Предупреждения.$H8]))OR(ISBLANK([$Предупреждения.$I8]))OR(ISBLANK([$Предупреждения.K8]));&quot;&quot;;[$Предупреждения.K8])">
            <text:p/>
          </table:table-cell>
          <table:table-cell table:formula="of:=IF((ISBLANK([$Предупреждения.$H8]))OR(ISBLANK([$Предупреждения.$I8]))OR(ISBLANK([$Предупреждения.L8]));&quot;&quot;;[$Предупреждения.L8])">
            <text:p/>
          </table:table-cell>
          <table:table-cell table:formula="of:=IF((ISBLANK([$Предупреждения.$H8]))OR(ISBLANK([$Предупреждения.$I8]))OR(ISBLANK([$Предупреждения.M8]));&quot;&quot;;[$Предупреждения.M8])">
            <text:p/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9]))OR(ISBLANK([$Предупреждения.I9]));&quot;&quot;;CONCATENATE(&quot;rtd&quot;;[$Предупреждения.H9]))" office:value-type="string" office:string-value="rtdWarningMessGroupFlag1" calcext:value-type="string">
            <text:p>rtdWarningMessGroupFlag1</text:p>
          </table:table-cell>
          <table:table-cell table:style-name="ce103" table:formula="of:=IF((ISBLANK([$Предупреждения.H9]))OR(ISBLANK([$Предупреждения.I9]));&quot;&quot;;[$Предупреждения.I9])" office:value-type="float" office:value="15" calcext:value-type="float">
            <text:p>15</text:p>
          </table:table-cell>
          <table:table-cell table:formula="of:=IF((ISBLANK([$Предупреждения.H9]))OR(ISBLANK([$Предупреждения.I9]));&quot;&quot;;[$Предупреждения.E9])" office:value-type="string" office:string-value="VacuumPumpOverload" calcext:value-type="string">
            <text:p>VacuumPumpOverload</text:p>
          </table:table-cell>
          <table:table-cell table:formula="of:=IF((ISBLANK([$Предупреждения.$H9]))OR(ISBLANK([$Предупреждения.$I9]));&quot;&quot;;[$Предупреждения.F9])" office:value-type="string" office:string-value="перегруз вакуумного насоса" calcext:value-type="string">
            <text:p>перегруз вакуумного насоса</text:p>
          </table:table-cell>
          <table:table-cell table:formula="of:=IF((ISBLANK([$Предупреждения.$H9]))OR(ISBLANK([$Предупреждения.$I9]));&quot;&quot;;[$Предупреждения.G9])" office:value-type="string" office:string-value="Вакуумный насос перегружен" calcext:value-type="string">
            <text:p>Вакуумный насос перегружен</text:p>
          </table:table-cell>
          <table:table-cell table:formula="of:=IF((ISBLANK([$Предупреждения.$H9]))OR(ISBLANK([$Предупреждения.$I9]));&quot;&quot;;[$Предупреждения.J9])" office:value-type="string" office:string-value="Предупреждение : Перегрузка вакуумного насоса  " calcext:value-type="string">
            <text:p>Предупреждение : Перегрузка вакуумного насоса <text:s/></text:p>
          </table:table-cell>
          <table:table-cell table:formula="of:=IF((ISBLANK([$Предупреждения.$H9]))OR(ISBLANK([$Предупреждения.$I9]))OR(ISBLANK([$Предупреждения.K9]));&quot;&quot;;[$Предупреждения.K9])">
            <text:p/>
          </table:table-cell>
          <table:table-cell table:formula="of:=IF((ISBLANK([$Предупреждения.$H9]))OR(ISBLANK([$Предупреждения.$I9]))OR(ISBLANK([$Предупреждения.L9]));&quot;&quot;;[$Предупреждения.L9])">
            <text:p/>
          </table:table-cell>
          <table:table-cell table:formula="of:=IF((ISBLANK([$Предупреждения.$H9]))OR(ISBLANK([$Предупреждения.$I9]))OR(ISBLANK([$Предупреждения.M9]));&quot;&quot;;[$Предупреждения.M9])">
            <text:p/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10]))OR(ISBLANK([$Предупреждения.I10]));&quot;&quot;;CONCATENATE(&quot;rtd&quot;;[$Предупреждения.H10]))" office:value-type="string" office:string-value="rtdWarningMessGroupFlag1" calcext:value-type="string">
            <text:p>rtdWarningMessGroupFlag1</text:p>
          </table:table-cell>
          <table:table-cell table:style-name="ce103" table:formula="of:=IF((ISBLANK([$Предупреждения.H10]))OR(ISBLANK([$Предупреждения.I10]));&quot;&quot;;[$Предупреждения.I10])" office:value-type="float" office:value="0" calcext:value-type="float">
            <text:p>0</text:p>
          </table:table-cell>
          <table:table-cell table:formula="of:=IF((ISBLANK([$Предупреждения.H10]))OR(ISBLANK([$Предупреждения.I10]));&quot;&quot;;[$Предупреждения.E10])" office:value-type="string" office:string-value="OilSupplyPressureLowAlarm" calcext:value-type="string">
            <text:p>OilSupplyPressureLowAlarm</text:p>
          </table:table-cell>
          <table:table-cell table:formula="of:=IF((ISBLANK([$Предупреждения.$H10]))OR(ISBLANK([$Предупреждения.$I10]));&quot;&quot;;[$Предупреждения.F10])" office:value-type="string" office:string-value="давление масла низко" calcext:value-type="string">
            <text:p>давление масла низко</text:p>
          </table:table-cell>
          <table:table-cell table:formula="of:=IF((ISBLANK([$Предупреждения.$H10]))OR(ISBLANK([$Предупреждения.$I10]));&quot;&quot;;[$Предупреждения.G10])" office:value-type="string" office:string-value="Давление масла низко" calcext:value-type="string">
            <text:p>Давление масла низко</text:p>
          </table:table-cell>
          <table:table-cell table:formula="of:=IF((ISBLANK([$Предупреждения.$H10]))OR(ISBLANK([$Предупреждения.$I10]));&quot;&quot;;[$Предупреждения.J10])" office:value-type="string" office:string-value="Предупреждение : Давление масла PT130 низкое" calcext:value-type="string">
            <text:p>Предупреждение : Давление масла PT130 низкое</text:p>
          </table:table-cell>
          <table:table-cell table:formula="of:=IF((ISBLANK([$Предупреждения.$H10]))OR(ISBLANK([$Предупреждения.$I10]))OR(ISBLANK([$Предупреждения.K10]));&quot;&quot;;[$Предупреждения.K10])">
            <text:p/>
          </table:table-cell>
          <table:table-cell table:formula="of:=IF((ISBLANK([$Предупреждения.$H10]))OR(ISBLANK([$Предупреждения.$I10]))OR(ISBLANK([$Предупреждения.L10]));&quot;&quot;;[$Предупреждения.L10])" office:value-type="string" office:string-value="rtdWarnExist" calcext:value-type="string">
            <text:p>rtdWarnExist</text:p>
          </table:table-cell>
          <table:table-cell table:formula="of:=IF((ISBLANK([$Предупреждения.$H10]))OR(ISBLANK([$Предупреждения.$I10]))OR(ISBLANK([$Предупреждения.M10]));&quot;&quot;;[$Предупреждения.M10])" office:value-type="string" office:string-value="ai5_OilSupplyPressure" calcext:value-type="string">
            <text:p>ai5_OilSupplyPressure</text:p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11]))OR(ISBLANK([$Предупреждения.I11]));&quot;&quot;;CONCATENATE(&quot;rtd&quot;;[$Предупреждения.H11]))" office:value-type="string" office:string-value="rtdWarningMessGroupFlag1" calcext:value-type="string">
            <text:p>rtdWarningMessGroupFlag1</text:p>
          </table:table-cell>
          <table:table-cell table:style-name="ce103" table:formula="of:=IF((ISBLANK([$Предупреждения.H11]))OR(ISBLANK([$Предупреждения.I11]));&quot;&quot;;[$Предупреждения.I11])" office:value-type="float" office:value="1" calcext:value-type="float">
            <text:p>1</text:p>
          </table:table-cell>
          <table:table-cell table:formula="of:=IF((ISBLANK([$Предупреждения.H11]))OR(ISBLANK([$Предупреждения.I11]));&quot;&quot;;[$Предупреждения.E11])" office:value-type="string" office:string-value="VibrationStage1HighAlarm" calcext:value-type="string">
            <text:p>VibrationStage1HighAlarm</text:p>
          </table:table-cell>
          <table:table-cell table:formula="of:=IF((ISBLANK([$Предупреждения.$H11]))OR(ISBLANK([$Предупреждения.$I11]));&quot;&quot;;[$Предупреждения.F11])" office:value-type="string" office:string-value="вибрация ступени 1 высока" calcext:value-type="string">
            <text:p>вибрация ступени 1 высока</text:p>
          </table:table-cell>
          <table:table-cell table:formula="of:=IF((ISBLANK([$Предупреждения.$H11]))OR(ISBLANK([$Предупреждения.$I11]));&quot;&quot;;[$Предупреждения.G11])" office:value-type="string" office:string-value="Вибрация ступени 1X высокая" calcext:value-type="string">
            <text:p>Вибрация ступени 1X высокая</text:p>
          </table:table-cell>
          <table:table-cell table:formula="of:=IF((ISBLANK([$Предупреждения.$H11]))OR(ISBLANK([$Предупреждения.$I11]));&quot;&quot;;[$Предупреждения.J11])" office:value-type="string" office:string-value="Предупреждение : Вибрация 1 ступени VT#1 " calcext:value-type="string">
            <text:p>Предупреждение : Вибрация 1 ступени VT#1 </text:p>
          </table:table-cell>
          <table:table-cell table:formula="of:=IF((ISBLANK([$Предупреждения.$H11]))OR(ISBLANK([$Предупреждения.$I11]))OR(ISBLANK([$Предупреждения.K11]));&quot;&quot;;[$Предупреждения.K11])">
            <text:p/>
          </table:table-cell>
          <table:table-cell table:formula="of:=IF((ISBLANK([$Предупреждения.$H11]))OR(ISBLANK([$Предупреждения.$I11]))OR(ISBLANK([$Предупреждения.L11]));&quot;&quot;;[$Предупреждения.L11])" office:value-type="string" office:string-value="rtdWarnExist" calcext:value-type="string">
            <text:p>rtdWarnExist</text:p>
          </table:table-cell>
          <table:table-cell table:formula="of:=IF((ISBLANK([$Предупреждения.$H11]))OR(ISBLANK([$Предупреждения.$I11]))OR(ISBLANK([$Предупреждения.M11]));&quot;&quot;;[$Предупреждения.M11])" office:value-type="string" office:string-value="ai6_Stage1Vibration" calcext:value-type="string">
            <text:p>ai6_Stage1Vibration</text:p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12]))OR(ISBLANK([$Предупреждения.I12]));&quot;&quot;;CONCATENATE(&quot;rtd&quot;;[$Предупреждения.H12]))" office:value-type="string" office:string-value="rtdWarningMessGroupFlag1" calcext:value-type="string">
            <text:p>rtdWarningMessGroupFlag1</text:p>
          </table:table-cell>
          <table:table-cell table:style-name="ce103" table:formula="of:=IF((ISBLANK([$Предупреждения.H12]))OR(ISBLANK([$Предупреждения.I12]));&quot;&quot;;[$Предупреждения.I12])" office:value-type="float" office:value="2" calcext:value-type="float">
            <text:p>2</text:p>
          </table:table-cell>
          <table:table-cell table:formula="of:=IF((ISBLANK([$Предупреждения.H12]))OR(ISBLANK([$Предупреждения.I12]));&quot;&quot;;[$Предупреждения.E12])" office:value-type="string" office:string-value="VibrationStage2HighAlarm" calcext:value-type="string">
            <text:p>VibrationStage2HighAlarm</text:p>
          </table:table-cell>
          <table:table-cell table:formula="of:=IF((ISBLANK([$Предупреждения.$H12]))OR(ISBLANK([$Предупреждения.$I12]));&quot;&quot;;[$Предупреждения.F12])" office:value-type="string" office:string-value="вибрация ступени 2 высока" calcext:value-type="string">
            <text:p>вибрация ступени 2 высока</text:p>
          </table:table-cell>
          <table:table-cell table:formula="of:=IF((ISBLANK([$Предупреждения.$H12]))OR(ISBLANK([$Предупреждения.$I12]));&quot;&quot;;[$Предупреждения.G12])" office:value-type="string" office:string-value="Вибрация ступени 2X высокая" calcext:value-type="string">
            <text:p>Вибрация ступени 2X высокая</text:p>
          </table:table-cell>
          <table:table-cell table:formula="of:=IF((ISBLANK([$Предупреждения.$H12]))OR(ISBLANK([$Предупреждения.$I12]));&quot;&quot;;[$Предупреждения.J12])" office:value-type="string" office:string-value="Предупреждение : Вибрация 2 ступени VT#2 " calcext:value-type="string">
            <text:p>Предупреждение : Вибрация 2 ступени VT#2 </text:p>
          </table:table-cell>
          <table:table-cell table:formula="of:=IF((ISBLANK([$Предупреждения.$H12]))OR(ISBLANK([$Предупреждения.$I12]))OR(ISBLANK([$Предупреждения.K12]));&quot;&quot;;[$Предупреждения.K12])">
            <text:p/>
          </table:table-cell>
          <table:table-cell table:formula="of:=IF((ISBLANK([$Предупреждения.$H12]))OR(ISBLANK([$Предупреждения.$I12]))OR(ISBLANK([$Предупреждения.L12]));&quot;&quot;;[$Предупреждения.L12])" office:value-type="string" office:string-value="rtdWarnExist" calcext:value-type="string">
            <text:p>rtdWarnExist</text:p>
          </table:table-cell>
          <table:table-cell table:formula="of:=IF((ISBLANK([$Предупреждения.$H12]))OR(ISBLANK([$Предупреждения.$I12]))OR(ISBLANK([$Предупреждения.M12]));&quot;&quot;;[$Предупреждения.M12])" office:value-type="string" office:string-value="ai7_Stage2Vibration" calcext:value-type="string">
            <text:p>ai7_Stage2Vibration</text:p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13]))OR(ISBLANK([$Предупреждения.I13]));&quot;&quot;;CONCATENATE(&quot;rtd&quot;;[$Предупреждения.H13]))" office:value-type="string" office:string-value="rtdWarningMessGroupFlag1" calcext:value-type="string">
            <text:p>rtdWarningMessGroupFlag1</text:p>
          </table:table-cell>
          <table:table-cell table:style-name="ce103" table:formula="of:=IF((ISBLANK([$Предупреждения.H13]))OR(ISBLANK([$Предупреждения.I13]));&quot;&quot;;[$Предупреждения.I13])" office:value-type="float" office:value="3" calcext:value-type="float">
            <text:p>3</text:p>
          </table:table-cell>
          <table:table-cell table:formula="of:=IF((ISBLANK([$Предупреждения.H13]))OR(ISBLANK([$Предупреждения.I13]));&quot;&quot;;[$Предупреждения.E13])" office:value-type="string" office:string-value="VibrationStage3HighAlarm" calcext:value-type="string">
            <text:p>VibrationStage3HighAlarm</text:p>
          </table:table-cell>
          <table:table-cell table:formula="of:=IF((ISBLANK([$Предупреждения.$H13]))OR(ISBLANK([$Предупреждения.$I13]));&quot;&quot;;[$Предупреждения.F13])" office:value-type="string" office:string-value="вибрация ступени 3 высока" calcext:value-type="string">
            <text:p>вибрация ступени 3 высока</text:p>
          </table:table-cell>
          <table:table-cell table:formula="of:=IF((ISBLANK([$Предупреждения.$H13]))OR(ISBLANK([$Предупреждения.$I13]));&quot;&quot;;[$Предупреждения.G13])" office:value-type="string" office:string-value="Вибрация ступени 3X высокая" calcext:value-type="string">
            <text:p>Вибрация ступени 3X высокая</text:p>
          </table:table-cell>
          <table:table-cell table:formula="of:=IF((ISBLANK([$Предупреждения.$H13]))OR(ISBLANK([$Предупреждения.$I13]));&quot;&quot;;[$Предупреждения.J13])" office:value-type="string" office:string-value="Предупреждение : Вибрация 3 ступени VT#3 " calcext:value-type="string">
            <text:p>Предупреждение : Вибрация 3 ступени VT#3 </text:p>
          </table:table-cell>
          <table:table-cell table:formula="of:=IF((ISBLANK([$Предупреждения.$H13]))OR(ISBLANK([$Предупреждения.$I13]))OR(ISBLANK([$Предупреждения.K13]));&quot;&quot;;[$Предупреждения.K13])">
            <text:p/>
          </table:table-cell>
          <table:table-cell table:formula="of:=IF((ISBLANK([$Предупреждения.$H13]))OR(ISBLANK([$Предупреждения.$I13]))OR(ISBLANK([$Предупреждения.L13]));&quot;&quot;;[$Предупреждения.L13])" office:value-type="string" office:string-value="rtdWarnExist" calcext:value-type="string">
            <text:p>rtdWarnExist</text:p>
          </table:table-cell>
          <table:table-cell table:formula="of:=IF((ISBLANK([$Предупреждения.$H13]))OR(ISBLANK([$Предупреждения.$I13]))OR(ISBLANK([$Предупреждения.M13]));&quot;&quot;;[$Предупреждения.M13])" office:value-type="string" office:string-value="ai8_Stage3Vibration" calcext:value-type="string">
            <text:p>ai8_Stage3Vibration</text:p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14]))OR(ISBLANK([$Предупреждения.I14]));&quot;&quot;;CONCATENATE(&quot;rtd&quot;;[$Предупреждения.H14]))" office:value-type="string" office:string-value="rtdWarningMessGroupFlag1" calcext:value-type="string">
            <text:p>rtdWarningMessGroupFlag1</text:p>
          </table:table-cell>
          <table:table-cell table:style-name="ce103" table:formula="of:=IF((ISBLANK([$Предупреждения.H14]))OR(ISBLANK([$Предупреждения.I14]));&quot;&quot;;[$Предупреждения.I14])" office:value-type="float" office:value="4" calcext:value-type="float">
            <text:p>4</text:p>
          </table:table-cell>
          <table:table-cell table:formula="of:=IF((ISBLANK([$Предупреждения.H14]))OR(ISBLANK([$Предупреждения.I14]));&quot;&quot;;[$Предупреждения.E14])" office:value-type="string" office:string-value="MotorBearing_DE_VibrationAlarm" calcext:value-type="string">
            <text:p>MotorBearing_DE_VibrationAlarm</text:p>
          </table:table-cell>
          <table:table-cell table:formula="of:=IF((ISBLANK([$Предупреждения.$H14]))OR(ISBLANK([$Предупреждения.$I14]));&quot;&quot;;[$Предупреждения.F14])" office:value-type="string" office:string-value="вибрация подшипника на приводном конце высока" calcext:value-type="string">
            <text:p>вибрация подшипника на приводном конце высока</text:p>
          </table:table-cell>
          <table:table-cell table:formula="of:=IF((ISBLANK([$Предупреждения.$H14]))OR(ISBLANK([$Предупреждения.$I14]));&quot;&quot;;[$Предупреждения.G14])" office:value-type="string" office:string-value="Вибрация подшипника на приводном конце двигателя высока" calcext:value-type="string">
            <text:p>Вибрация подшипника на приводном конце двигателя высока</text:p>
          </table:table-cell>
          <table:table-cell table:formula="of:=IF((ISBLANK([$Предупреждения.$H14]))OR(ISBLANK([$Предупреждения.$I14]));&quot;&quot;;[$Предупреждения.J14])" office:value-type="string" office:string-value="Предупреждение : Вибрация DE подшипника VT#5 высокая" calcext:value-type="string">
            <text:p>Предупреждение : Вибрация DE подшипника VT#5 высокая</text:p>
          </table:table-cell>
          <table:table-cell table:formula="of:=IF((ISBLANK([$Предупреждения.$H14]))OR(ISBLANK([$Предупреждения.$I14]))OR(ISBLANK([$Предупреждения.K14]));&quot;&quot;;[$Предупреждения.K14])">
            <text:p/>
          </table:table-cell>
          <table:table-cell table:formula="of:=IF((ISBLANK([$Предупреждения.$H14]))OR(ISBLANK([$Предупреждения.$I14]))OR(ISBLANK([$Предупреждения.L14]));&quot;&quot;;[$Предупреждения.L14])" office:value-type="string" office:string-value="rtdWarnExist" calcext:value-type="string">
            <text:p>rtdWarnExist</text:p>
          </table:table-cell>
          <table:table-cell table:formula="of:=IF((ISBLANK([$Предупреждения.$H14]))OR(ISBLANK([$Предупреждения.$I14]))OR(ISBLANK([$Предупреждения.M14]));&quot;&quot;;[$Предупреждения.M14])" office:value-type="string" office:string-value="ai12_MotorBearingDEVibration" calcext:value-type="string">
            <text:p>ai12_MotorBearingDEVibration</text:p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15]))OR(ISBLANK([$Предупреждения.I15]));&quot;&quot;;CONCATENATE(&quot;rtd&quot;;[$Предупреждения.H15]))" office:value-type="string" office:string-value="rtdWarningMessGroupFlag1" calcext:value-type="string">
            <text:p>rtdWarningMessGroupFlag1</text:p>
          </table:table-cell>
          <table:table-cell table:style-name="ce103" table:formula="of:=IF((ISBLANK([$Предупреждения.H15]))OR(ISBLANK([$Предупреждения.I15]));&quot;&quot;;[$Предупреждения.I15])" office:value-type="float" office:value="5" calcext:value-type="float">
            <text:p>5</text:p>
          </table:table-cell>
          <table:table-cell table:formula="of:=IF((ISBLANK([$Предупреждения.H15]))OR(ISBLANK([$Предупреждения.I15]));&quot;&quot;;[$Предупреждения.E15])" office:value-type="string" office:string-value="MotorCurrentHighAlarm" calcext:value-type="string">
            <text:p>MotorCurrentHighAlarm</text:p>
          </table:table-cell>
          <table:table-cell table:formula="of:=IF((ISBLANK([$Предупреждения.$H15]))OR(ISBLANK([$Предупреждения.$I15]));&quot;&quot;;[$Предупреждения.F15])" office:value-type="string" office:string-value="ток двигателя высокий" calcext:value-type="string">
            <text:p>ток двигателя высокий</text:p>
          </table:table-cell>
          <table:table-cell table:formula="of:=IF((ISBLANK([$Предупреждения.$H15]))OR(ISBLANK([$Предупреждения.$I15]));&quot;&quot;;[$Предупреждения.G15])" office:value-type="string" office:string-value="Ток двигателя высокий" calcext:value-type="string">
            <text:p>Ток двигателя высокий</text:p>
          </table:table-cell>
          <table:table-cell table:formula="of:=IF((ISBLANK([$Предупреждения.$H15]))OR(ISBLANK([$Предупреждения.$I15]));&quot;&quot;;[$Предупреждения.J15])" office:value-type="string" office:string-value="Предупреждение : Ток двигателя TD140 " calcext:value-type="string">
            <text:p>Предупреждение : Ток двигателя TD140 </text:p>
          </table:table-cell>
          <table:table-cell table:formula="of:=IF((ISBLANK([$Предупреждения.$H15]))OR(ISBLANK([$Предупреждения.$I15]))OR(ISBLANK([$Предупреждения.K15]));&quot;&quot;;[$Предупреждения.K15])">
            <text:p/>
          </table:table-cell>
          <table:table-cell table:formula="of:=IF((ISBLANK([$Предупреждения.$H15]))OR(ISBLANK([$Предупреждения.$I15]))OR(ISBLANK([$Предупреждения.L15]));&quot;&quot;;[$Предупреждения.L15])" office:value-type="string" office:string-value="rtdWarnExist" calcext:value-type="string">
            <text:p>rtdWarnExist</text:p>
          </table:table-cell>
          <table:table-cell table:formula="of:=IF((ISBLANK([$Предупреждения.$H15]))OR(ISBLANK([$Предупреждения.$I15]))OR(ISBLANK([$Предупреждения.M15]));&quot;&quot;;[$Предупреждения.M15])" office:value-type="string" office:string-value="ai10_MotorCurrent" calcext:value-type="string">
            <text:p>ai10_MotorCurrent</text:p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16]))OR(ISBLANK([$Предупреждения.I16]));&quot;&quot;;CONCATENATE(&quot;rtd&quot;;[$Предупреждения.H16]))" office:value-type="string" office:string-value="rtdWarningMessGroupFlag1" calcext:value-type="string">
            <text:p>rtdWarningMessGroupFlag1</text:p>
          </table:table-cell>
          <table:table-cell table:style-name="ce103" table:formula="of:=IF((ISBLANK([$Предупреждения.H16]))OR(ISBLANK([$Предупреждения.I16]));&quot;&quot;;[$Предупреждения.I16])" office:value-type="float" office:value="6" calcext:value-type="float">
            <text:p>6</text:p>
          </table:table-cell>
          <table:table-cell table:formula="of:=IF((ISBLANK([$Предупреждения.H16]))OR(ISBLANK([$Предупреждения.I16]));&quot;&quot;;[$Предупреждения.E16])" office:value-type="string" office:string-value="OilSupplyTempHighAlarm" calcext:value-type="string">
            <text:p>OilSupplyTempHighAlarm</text:p>
          </table:table-cell>
          <table:table-cell table:formula="of:=IF((ISBLANK([$Предупреждения.$H16]))OR(ISBLANK([$Предупреждения.$I16]));&quot;&quot;;[$Предупреждения.F16])" office:value-type="string" office:string-value="температура масла высока" calcext:value-type="string">
            <text:p>температура масла высока</text:p>
          </table:table-cell>
          <table:table-cell table:formula="of:=IF((ISBLANK([$Предупреждения.$H16]))OR(ISBLANK([$Предупреждения.$I16]));&quot;&quot;;[$Предупреждения.G16])" office:value-type="string" office:string-value="Температура масла высокая" calcext:value-type="string">
            <text:p>Температура масла высокая</text:p>
          </table:table-cell>
          <table:table-cell table:formula="of:=IF((ISBLANK([$Предупреждения.$H16]))OR(ISBLANK([$Предупреждения.$I16]));&quot;&quot;;[$Предупреждения.J16])" office:value-type="string" office:string-value="Предупреждение : Температура масла TE130 высокая" calcext:value-type="string">
            <text:p>Предупреждение : Температура масла TE130 высокая</text:p>
          </table:table-cell>
          <table:table-cell table:formula="of:=IF((ISBLANK([$Предупреждения.$H16]))OR(ISBLANK([$Предупреждения.$I16]))OR(ISBLANK([$Предупреждения.K16]));&quot;&quot;;[$Предупреждения.K16])">
            <text:p/>
          </table:table-cell>
          <table:table-cell table:formula="of:=IF((ISBLANK([$Предупреждения.$H16]))OR(ISBLANK([$Предупреждения.$I16]))OR(ISBLANK([$Предупреждения.L16]));&quot;&quot;;[$Предупреждения.L16])" office:value-type="string" office:string-value="rtdWarnExist" calcext:value-type="string">
            <text:p>rtdWarnExist</text:p>
          </table:table-cell>
          <table:table-cell table:formula="of:=IF((ISBLANK([$Предупреждения.$H16]))OR(ISBLANK([$Предупреждения.$I16]))OR(ISBLANK([$Предупреждения.M16]));&quot;&quot;;[$Предупреждения.M16])" office:value-type="string" office:string-value="ai14_OilSupplyTemperature" calcext:value-type="string">
            <text:p>ai14_OilSupplyTemperature</text:p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17]))OR(ISBLANK([$Предупреждения.I17]));&quot;&quot;;CONCATENATE(&quot;rtd&quot;;[$Предупреждения.H17]))" office:value-type="string" office:string-value="rtdWarningMessGroupFlag1" calcext:value-type="string">
            <text:p>rtdWarningMessGroupFlag1</text:p>
          </table:table-cell>
          <table:table-cell table:style-name="ce103" table:formula="of:=IF((ISBLANK([$Предупреждения.H17]))OR(ISBLANK([$Предупреждения.I17]));&quot;&quot;;[$Предупреждения.I17])" office:value-type="float" office:value="7" calcext:value-type="float">
            <text:p>7</text:p>
          </table:table-cell>
          <table:table-cell table:formula="of:=IF((ISBLANK([$Предупреждения.H17]))OR(ISBLANK([$Предупреждения.I17]));&quot;&quot;;[$Предупреждения.E17])" office:value-type="string" office:string-value="Stage3InletTempHighAlarm" calcext:value-type="string">
            <text:p>Stage3InletTempHighAlarm</text:p>
          </table:table-cell>
          <table:table-cell table:formula="of:=IF((ISBLANK([$Предупреждения.$H17]))OR(ISBLANK([$Предупреждения.$I17]));&quot;&quot;;[$Предупреждения.F17])" office:value-type="string" office:string-value="температура входа ступени 3 высока" calcext:value-type="string">
            <text:p>температура входа ступени 3 высока</text:p>
          </table:table-cell>
          <table:table-cell table:formula="of:=IF((ISBLANK([$Предупреждения.$H17]))OR(ISBLANK([$Предупреждения.$I17]));&quot;&quot;;[$Предупреждения.G17])" office:value-type="string" office:string-value="Температура на входе ступени 3 высокая" calcext:value-type="string">
            <text:p>Температура на входе ступени 3 высокая</text:p>
          </table:table-cell>
          <table:table-cell table:formula="of:=IF((ISBLANK([$Предупреждения.$H17]))OR(ISBLANK([$Предупреждения.$I17]));&quot;&quot;;[$Предупреждения.J17])" office:value-type="string" office:string-value="Предупреждение : Температура воздуха на входе 3 ступени TE231 высокая" calcext:value-type="string">
            <text:p>Предупреждение : Температура воздуха на входе 3 ступени TE231 высокая</text:p>
          </table:table-cell>
          <table:table-cell table:formula="of:=IF((ISBLANK([$Предупреждения.$H17]))OR(ISBLANK([$Предупреждения.$I17]))OR(ISBLANK([$Предупреждения.K17]));&quot;&quot;;[$Предупреждения.K17])">
            <text:p/>
          </table:table-cell>
          <table:table-cell table:formula="of:=IF((ISBLANK([$Предупреждения.$H17]))OR(ISBLANK([$Предупреждения.$I17]))OR(ISBLANK([$Предупреждения.L17]));&quot;&quot;;[$Предупреждения.L17])" office:value-type="string" office:string-value="rtdWarnExist" calcext:value-type="string">
            <text:p>rtdWarnExist</text:p>
          </table:table-cell>
          <table:table-cell table:formula="of:=IF((ISBLANK([$Предупреждения.$H17]))OR(ISBLANK([$Предупреждения.$I17]))OR(ISBLANK([$Предупреждения.M17]));&quot;&quot;;[$Предупреждения.M17])" office:value-type="string" office:string-value="ai15_Stage3InletTemperature" calcext:value-type="string">
            <text:p>ai15_Stage3InletTemperature</text:p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18]))OR(ISBLANK([$Предупреждения.I18]));&quot;&quot;;CONCATENATE(&quot;rtd&quot;;[$Предупреждения.H18]))" office:value-type="string" office:string-value="rtdWarningMessGroupFlag2" calcext:value-type="string">
            <text:p>rtdWarningMessGroupFlag2</text:p>
          </table:table-cell>
          <table:table-cell table:style-name="ce103" table:formula="of:=IF((ISBLANK([$Предупреждения.H18]))OR(ISBLANK([$Предупреждения.I18]));&quot;&quot;;[$Предупреждения.I18])" office:value-type="float" office:value="8" calcext:value-type="float">
            <text:p>8</text:p>
          </table:table-cell>
          <table:table-cell table:formula="of:=IF((ISBLANK([$Предупреждения.H18]))OR(ISBLANK([$Предупреждения.I18]));&quot;&quot;;[$Предупреждения.E18])" office:value-type="string" office:string-value="OilReservoirTempLowAlarm" calcext:value-type="string">
            <text:p>OilReservoirTempLowAlarm</text:p>
          </table:table-cell>
          <table:table-cell table:formula="of:=IF((ISBLANK([$Предупреждения.$H18]))OR(ISBLANK([$Предупреждения.$I18]));&quot;&quot;;[$Предупреждения.F18])" office:value-type="string" office:string-value="температура в маслобаке низка" calcext:value-type="string">
            <text:p>температура в маслобаке низка</text:p>
          </table:table-cell>
          <table:table-cell table:formula="of:=IF((ISBLANK([$Предупреждения.$H18]))OR(ISBLANK([$Предупреждения.$I18]));&quot;&quot;;[$Предупреждения.G18])" office:value-type="string" office:string-value="Температура в маслобаке низкая" calcext:value-type="string">
            <text:p>Температура в маслобаке низкая</text:p>
          </table:table-cell>
          <table:table-cell table:formula="of:=IF((ISBLANK([$Предупреждения.$H18]))OR(ISBLANK([$Предупреждения.$I18]));&quot;&quot;;[$Предупреждения.J18])" office:value-type="string" office:string-value="Предупреждение : Температура масла в маслобаке TE101 низкая" calcext:value-type="string">
            <text:p>Предупреждение : Температура масла в маслобаке TE101 низкая</text:p>
          </table:table-cell>
          <table:table-cell table:formula="of:=IF((ISBLANK([$Предупреждения.$H18]))OR(ISBLANK([$Предупреждения.$I18]))OR(ISBLANK([$Предупреждения.K18]));&quot;&quot;;[$Предупреждения.K18])">
            <text:p/>
          </table:table-cell>
          <table:table-cell table:formula="of:=IF((ISBLANK([$Предупреждения.$H18]))OR(ISBLANK([$Предупреждения.$I18]))OR(ISBLANK([$Предупреждения.L18]));&quot;&quot;;[$Предупреждения.L18])" office:value-type="string" office:string-value="rtdWarnExist" calcext:value-type="string">
            <text:p>rtdWarnExist</text:p>
          </table:table-cell>
          <table:table-cell table:formula="of:=IF((ISBLANK([$Предупреждения.$H18]))OR(ISBLANK([$Предупреждения.$I18]))OR(ISBLANK([$Предупреждения.M18]));&quot;&quot;;[$Предупреждения.M18])" office:value-type="string" office:string-value="ai16_OilReservoirTemperature" calcext:value-type="string">
            <text:p>ai16_OilReservoirTemperature</text:p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19]))OR(ISBLANK([$Предупреждения.I19]));&quot;&quot;;CONCATENATE(&quot;rtd&quot;;[$Предупреждения.H19]))" office:value-type="string" office:string-value="rtdWarningMessGroupFlag2" calcext:value-type="string">
            <text:p>rtdWarningMessGroupFlag2</text:p>
          </table:table-cell>
          <table:table-cell table:style-name="ce103" table:formula="of:=IF((ISBLANK([$Предупреждения.H19]))OR(ISBLANK([$Предупреждения.I19]));&quot;&quot;;[$Предупреждения.I19])" office:value-type="float" office:value="9" calcext:value-type="float">
            <text:p>9</text:p>
          </table:table-cell>
          <table:table-cell table:formula="of:=IF((ISBLANK([$Предупреждения.H19]))OR(ISBLANK([$Предупреждения.I19]));&quot;&quot;;[$Предупреждения.E19])" office:value-type="string" office:string-value="MotorCoil_R_TempHighAlarm" calcext:value-type="string">
            <text:p>MotorCoil_R_TempHighAlarm</text:p>
          </table:table-cell>
          <table:table-cell table:formula="of:=IF((ISBLANK([$Предупреждения.$H19]))OR(ISBLANK([$Предупреждения.$I19]));&quot;&quot;;[$Предупреждения.F19])" office:value-type="string" office:string-value="температура обмотки Р двигателя высока" calcext:value-type="string">
            <text:p>температура обмотки Р двигателя высока</text:p>
          </table:table-cell>
          <table:table-cell table:formula="of:=IF((ISBLANK([$Предупреждения.$H19]))OR(ISBLANK([$Предупреждения.$I19]));&quot;&quot;;[$Предупреждения.G19])" office:value-type="string" office:string-value="Температура обмотки «Р» двигателя высокая" calcext:value-type="string">
            <text:p>Температура обмотки «Р» двигателя высокая</text:p>
          </table:table-cell>
          <table:table-cell table:formula="of:=IF((ISBLANK([$Предупреждения.$H19]))OR(ISBLANK([$Предупреждения.$I19]));&quot;&quot;;[$Предупреждения.J19])" office:value-type="string" office:string-value="Предупреждение : Температура обмотки двигателя &quot;R&quot; TE140 высокая" calcext:value-type="string">
            <text:p>Предупреждение : Температура обмотки двигателя "R" TE140 высокая</text:p>
          </table:table-cell>
          <table:table-cell table:formula="of:=IF((ISBLANK([$Предупреждения.$H19]))OR(ISBLANK([$Предупреждения.$I19]))OR(ISBLANK([$Предупреждения.K19]));&quot;&quot;;[$Предупреждения.K19])">
            <text:p/>
          </table:table-cell>
          <table:table-cell table:formula="of:=IF((ISBLANK([$Предупреждения.$H19]))OR(ISBLANK([$Предупреждения.$I19]))OR(ISBLANK([$Предупреждения.L19]));&quot;&quot;;[$Предупреждения.L19])" office:value-type="string" office:string-value="rtdWarnExist" calcext:value-type="string">
            <text:p>rtdWarnExist</text:p>
          </table:table-cell>
          <table:table-cell table:formula="of:=IF((ISBLANK([$Предупреждения.$H19]))OR(ISBLANK([$Предупреждения.$I19]))OR(ISBLANK([$Предупреждения.M19]));&quot;&quot;;[$Предупреждения.M19])" office:value-type="string" office:string-value="ai17_MotorWindingRTemperature" calcext:value-type="string">
            <text:p>ai17_MotorWindingRTemperature</text:p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20]))OR(ISBLANK([$Предупреждения.I20]));&quot;&quot;;CONCATENATE(&quot;rtd&quot;;[$Предупреждения.H20]))">
            <text:p/>
          </table:table-cell>
          <table:table-cell table:style-name="ce103" table:formula="of:=IF((ISBLANK([$Предупреждения.H20]))OR(ISBLANK([$Предупреждения.I20]));&quot;&quot;;[$Предупреждения.I20])">
            <text:p/>
          </table:table-cell>
          <table:table-cell table:formula="of:=IF((ISBLANK([$Предупреждения.H20]))OR(ISBLANK([$Предупреждения.I20]));&quot;&quot;;[$Предупреждения.E20])">
            <text:p/>
          </table:table-cell>
          <table:table-cell table:formula="of:=IF((ISBLANK([$Предупреждения.$H20]))OR(ISBLANK([$Предупреждения.$I20]));&quot;&quot;;[$Предупреждения.F20])">
            <text:p/>
          </table:table-cell>
          <table:table-cell table:formula="of:=IF((ISBLANK([$Предупреждения.$H20]))OR(ISBLANK([$Предупреждения.$I20]));&quot;&quot;;[$Предупреждения.G20])">
            <text:p/>
          </table:table-cell>
          <table:table-cell table:formula="of:=IF((ISBLANK([$Предупреждения.$H20]))OR(ISBLANK([$Предупреждения.$I20]));&quot;&quot;;[$Предупреждения.J20])">
            <text:p/>
          </table:table-cell>
          <table:table-cell table:formula="of:=IF((ISBLANK([$Предупреждения.$H20]))OR(ISBLANK([$Предупреждения.$I20]))OR(ISBLANK([$Предупреждения.K20]));&quot;&quot;;[$Предупреждения.K20])">
            <text:p/>
          </table:table-cell>
          <table:table-cell table:formula="of:=IF((ISBLANK([$Предупреждения.$H20]))OR(ISBLANK([$Предупреждения.$I20]))OR(ISBLANK([$Предупреждения.L20]));&quot;&quot;;[$Предупреждения.L20])">
            <text:p/>
          </table:table-cell>
          <table:table-cell table:formula="of:=IF((ISBLANK([$Предупреждения.$H20]))OR(ISBLANK([$Предупреждения.$I20]))OR(ISBLANK([$Предупреждения.M20]));&quot;&quot;;[$Предупреждения.M20])">
            <text:p/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21]))OR(ISBLANK([$Предупреждения.I21]));&quot;&quot;;CONCATENATE(&quot;rtd&quot;;[$Предупреждения.H21]))">
            <text:p/>
          </table:table-cell>
          <table:table-cell table:style-name="ce103" table:formula="of:=IF((ISBLANK([$Предупреждения.H21]))OR(ISBLANK([$Предупреждения.I21]));&quot;&quot;;[$Предупреждения.I21])">
            <text:p/>
          </table:table-cell>
          <table:table-cell table:formula="of:=IF((ISBLANK([$Предупреждения.H21]))OR(ISBLANK([$Предупреждения.I21]));&quot;&quot;;[$Предупреждения.E21])">
            <text:p/>
          </table:table-cell>
          <table:table-cell table:formula="of:=IF((ISBLANK([$Предупреждения.$H21]))OR(ISBLANK([$Предупреждения.$I21]));&quot;&quot;;[$Предупреждения.F21])">
            <text:p/>
          </table:table-cell>
          <table:table-cell table:formula="of:=IF((ISBLANK([$Предупреждения.$H21]))OR(ISBLANK([$Предупреждения.$I21]));&quot;&quot;;[$Предупреждения.G21])">
            <text:p/>
          </table:table-cell>
          <table:table-cell table:formula="of:=IF((ISBLANK([$Предупреждения.$H21]))OR(ISBLANK([$Предупреждения.$I21]));&quot;&quot;;[$Предупреждения.J21])">
            <text:p/>
          </table:table-cell>
          <table:table-cell table:formula="of:=IF((ISBLANK([$Предупреждения.$H21]))OR(ISBLANK([$Предупреждения.$I21]))OR(ISBLANK([$Предупреждения.K21]));&quot;&quot;;[$Предупреждения.K21])">
            <text:p/>
          </table:table-cell>
          <table:table-cell table:formula="of:=IF((ISBLANK([$Предупреждения.$H21]))OR(ISBLANK([$Предупреждения.$I21]))OR(ISBLANK([$Предупреждения.L21]));&quot;&quot;;[$Предупреждения.L21])">
            <text:p/>
          </table:table-cell>
          <table:table-cell table:formula="of:=IF((ISBLANK([$Предупреждения.$H21]))OR(ISBLANK([$Предупреждения.$I21]))OR(ISBLANK([$Предупреждения.M21]));&quot;&quot;;[$Предупреждения.M21])">
            <text:p/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22]))OR(ISBLANK([$Предупреждения.I22]));&quot;&quot;;CONCATENATE(&quot;rtd&quot;;[$Предупреждения.H22]))" office:value-type="string" office:string-value="rtdWarningMessGroupFlag2" calcext:value-type="string">
            <text:p>rtdWarningMessGroupFlag2</text:p>
          </table:table-cell>
          <table:table-cell table:style-name="ce103" table:formula="of:=IF((ISBLANK([$Предупреждения.H22]))OR(ISBLANK([$Предупреждения.I22]));&quot;&quot;;[$Предупреждения.I22])" office:value-type="float" office:value="12" calcext:value-type="float">
            <text:p>12</text:p>
          </table:table-cell>
          <table:table-cell table:formula="of:=IF((ISBLANK([$Предупреждения.H22]))OR(ISBLANK([$Предупреждения.I22]));&quot;&quot;;[$Предупреждения.E22])" office:value-type="string" office:string-value="Stage2InletTempHighAlarm" calcext:value-type="string">
            <text:p>Stage2InletTempHighAlarm</text:p>
          </table:table-cell>
          <table:table-cell table:formula="of:=IF((ISBLANK([$Предупреждения.$H22]))OR(ISBLANK([$Предупреждения.$I22]));&quot;&quot;;[$Предупреждения.F22])" office:value-type="string" office:string-value="температура входа ступени 2 высока" calcext:value-type="string">
            <text:p>температура входа ступени 2 высока</text:p>
          </table:table-cell>
          <table:table-cell table:formula="of:=IF((ISBLANK([$Предупреждения.$H22]))OR(ISBLANK([$Предупреждения.$I22]));&quot;&quot;;[$Предупреждения.G22])" office:value-type="string" office:string-value="Температура на входе ступени 2 высокая" calcext:value-type="string">
            <text:p>Температура на входе ступени 2 высокая</text:p>
          </table:table-cell>
          <table:table-cell table:formula="of:=IF((ISBLANK([$Предупреждения.$H22]))OR(ISBLANK([$Предупреждения.$I22]));&quot;&quot;;[$Предупреждения.J22])" office:value-type="string" office:string-value="Предупреждение : Температура воздуха на входе 2 ступени TE221 высокая" calcext:value-type="string">
            <text:p>Предупреждение : Температура воздуха на входе 2 ступени TE221 высокая</text:p>
          </table:table-cell>
          <table:table-cell table:formula="of:=IF((ISBLANK([$Предупреждения.$H22]))OR(ISBLANK([$Предупреждения.$I22]))OR(ISBLANK([$Предупреждения.K22]));&quot;&quot;;[$Предупреждения.K22])">
            <text:p/>
          </table:table-cell>
          <table:table-cell table:formula="of:=IF((ISBLANK([$Предупреждения.$H22]))OR(ISBLANK([$Предупреждения.$I22]))OR(ISBLANK([$Предупреждения.L22]));&quot;&quot;;[$Предупреждения.L22])" office:value-type="string" office:string-value="rtdWarnExist" calcext:value-type="string">
            <text:p>rtdWarnExist</text:p>
          </table:table-cell>
          <table:table-cell table:formula="of:=IF((ISBLANK([$Предупреждения.$H22]))OR(ISBLANK([$Предупреждения.$I22]))OR(ISBLANK([$Предупреждения.M22]));&quot;&quot;;[$Предупреждения.M22])" office:value-type="string" office:string-value="ai20_Stage2InletTemperature" calcext:value-type="string">
            <text:p>ai20_Stage2InletTemperature</text:p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23]))OR(ISBLANK([$Предупреждения.I23]));&quot;&quot;;CONCATENATE(&quot;rtd&quot;;[$Предупреждения.H23]))">
            <text:p/>
          </table:table-cell>
          <table:table-cell table:style-name="ce103" table:formula="of:=IF((ISBLANK([$Предупреждения.H23]))OR(ISBLANK([$Предупреждения.I23]));&quot;&quot;;[$Предупреждения.I23])">
            <text:p/>
          </table:table-cell>
          <table:table-cell table:formula="of:=IF((ISBLANK([$Предупреждения.H23]))OR(ISBLANK([$Предупреждения.I23]));&quot;&quot;;[$Предупреждения.E23])">
            <text:p/>
          </table:table-cell>
          <table:table-cell table:formula="of:=IF((ISBLANK([$Предупреждения.$H23]))OR(ISBLANK([$Предупреждения.$I23]));&quot;&quot;;[$Предупреждения.F23])">
            <text:p/>
          </table:table-cell>
          <table:table-cell table:formula="of:=IF((ISBLANK([$Предупреждения.$H23]))OR(ISBLANK([$Предупреждения.$I23]));&quot;&quot;;[$Предупреждения.G23])">
            <text:p/>
          </table:table-cell>
          <table:table-cell table:formula="of:=IF((ISBLANK([$Предупреждения.$H23]))OR(ISBLANK([$Предупреждения.$I23]));&quot;&quot;;[$Предупреждения.J23])">
            <text:p/>
          </table:table-cell>
          <table:table-cell table:formula="of:=IF((ISBLANK([$Предупреждения.$H23]))OR(ISBLANK([$Предупреждения.$I23]))OR(ISBLANK([$Предупреждения.K23]));&quot;&quot;;[$Предупреждения.K23])">
            <text:p/>
          </table:table-cell>
          <table:table-cell table:formula="of:=IF((ISBLANK([$Предупреждения.$H23]))OR(ISBLANK([$Предупреждения.$I23]))OR(ISBLANK([$Предупреждения.L23]));&quot;&quot;;[$Предупреждения.L23])">
            <text:p/>
          </table:table-cell>
          <table:table-cell table:formula="of:=IF((ISBLANK([$Предупреждения.$H23]))OR(ISBLANK([$Предупреждения.$I23]))OR(ISBLANK([$Предупреждения.M23]));&quot;&quot;;[$Предупреждения.M23])">
            <text:p/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24]))OR(ISBLANK([$Предупреждения.I24]));&quot;&quot;;CONCATENATE(&quot;rtd&quot;;[$Предупреждения.H24]))" office:value-type="string" office:string-value="rtdWarningMessGroupFlag2" calcext:value-type="string">
            <text:p>rtdWarningMessGroupFlag2</text:p>
          </table:table-cell>
          <table:table-cell table:style-name="ce103" table:formula="of:=IF((ISBLANK([$Предупреждения.H24]))OR(ISBLANK([$Предупреждения.I24]));&quot;&quot;;[$Предупреждения.I24])" office:value-type="float" office:value="14" calcext:value-type="float">
            <text:p>14</text:p>
          </table:table-cell>
          <table:table-cell table:formula="of:=IF((ISBLANK([$Предупреждения.H24]))OR(ISBLANK([$Предупреждения.I24]));&quot;&quot;;[$Предупреждения.E24])" office:value-type="string" office:string-value="MotorBearing_DE_TempHighAlarm" calcext:value-type="string">
            <text:p>MotorBearing_DE_TempHighAlarm</text:p>
          </table:table-cell>
          <table:table-cell table:formula="of:=IF((ISBLANK([$Предупреждения.$H24]))OR(ISBLANK([$Предупреждения.$I24]));&quot;&quot;;[$Предупреждения.F24])" office:value-type="string" office:string-value="температура подшипника со стороны редуктора высока" calcext:value-type="string">
            <text:p>температура подшипника со стороны редуктора высока</text:p>
          </table:table-cell>
          <table:table-cell table:formula="of:=IF((ISBLANK([$Предупреждения.$H24]))OR(ISBLANK([$Предупреждения.$I24]));&quot;&quot;;[$Предупреждения.G24])" office:value-type="string" office:string-value="Температура подшипника двигателя со стороны редуктора высока" calcext:value-type="string">
            <text:p>Температура подшипника двигателя со стороны редуктора высока</text:p>
          </table:table-cell>
          <table:table-cell table:formula="of:=IF((ISBLANK([$Предупреждения.$H24]))OR(ISBLANK([$Предупреждения.$I24]));&quot;&quot;;[$Предупреждения.J24])" office:value-type="string" office:string-value="Предупреждение : Температура DE подшипника TE143 высокая" calcext:value-type="string">
            <text:p>Предупреждение : Температура DE подшипника TE143 высокая</text:p>
          </table:table-cell>
          <table:table-cell table:formula="of:=IF((ISBLANK([$Предупреждения.$H24]))OR(ISBLANK([$Предупреждения.$I24]))OR(ISBLANK([$Предупреждения.K24]));&quot;&quot;;[$Предупреждения.K24])">
            <text:p/>
          </table:table-cell>
          <table:table-cell table:formula="of:=IF((ISBLANK([$Предупреждения.$H24]))OR(ISBLANK([$Предупреждения.$I24]))OR(ISBLANK([$Предупреждения.L24]));&quot;&quot;;[$Предупреждения.L24])" office:value-type="string" office:string-value="rtdWarnExist" calcext:value-type="string">
            <text:p>rtdWarnExist</text:p>
          </table:table-cell>
          <table:table-cell table:formula="of:=IF((ISBLANK([$Предупреждения.$H24]))OR(ISBLANK([$Предупреждения.$I24]))OR(ISBLANK([$Предупреждения.M24]));&quot;&quot;;[$Предупреждения.M24])" office:value-type="string" office:string-value="ai18_MotorBearingDETemperature" calcext:value-type="string">
            <text:p>ai18_MotorBearingDETemperature</text:p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25]))OR(ISBLANK([$Предупреждения.I25]));&quot;&quot;;CONCATENATE(&quot;rtd&quot;;[$Предупреждения.H25]))" office:value-type="string" office:string-value="rtdWarningMessGroupFlag2" calcext:value-type="string">
            <text:p>rtdWarningMessGroupFlag2</text:p>
          </table:table-cell>
          <table:table-cell table:style-name="ce103" table:formula="of:=IF((ISBLANK([$Предупреждения.H25]))OR(ISBLANK([$Предупреждения.I25]));&quot;&quot;;[$Предупреждения.I25])" office:value-type="float" office:value="15" calcext:value-type="float">
            <text:p>15</text:p>
          </table:table-cell>
          <table:table-cell table:formula="of:=IF((ISBLANK([$Предупреждения.H25]))OR(ISBLANK([$Предупреждения.I25]));&quot;&quot;;[$Предупреждения.E25])" office:value-type="string" office:string-value="MotorBearing_NDE_TempHighAlarm" calcext:value-type="string">
            <text:p>MotorBearing_NDE_TempHighAlarm</text:p>
          </table:table-cell>
          <table:table-cell table:formula="of:=IF((ISBLANK([$Предупреждения.$H25]))OR(ISBLANK([$Предупреждения.$I25]));&quot;&quot;;[$Предупреждения.F25])" office:value-type="string" office:string-value="температура подшипника с торца высока" calcext:value-type="string">
            <text:p>температура подшипника с торца высока</text:p>
          </table:table-cell>
          <table:table-cell table:formula="of:=IF((ISBLANK([$Предупреждения.$H25]))OR(ISBLANK([$Предупреждения.$I25]));&quot;&quot;;[$Предупреждения.G25])" office:value-type="string" office:string-value="Температура подшипника двигателя с торца высока" calcext:value-type="string">
            <text:p>Температура подшипника двигателя с торца высока</text:p>
          </table:table-cell>
          <table:table-cell table:formula="of:=IF((ISBLANK([$Предупреждения.$H25]))OR(ISBLANK([$Предупреждения.$I25]));&quot;&quot;;[$Предупреждения.J25])" office:value-type="string" office:string-value="Предупреждение : Температура NDE подшипника TE144 высокая" calcext:value-type="string">
            <text:p>Предупреждение : Температура NDE подшипника TE144 высокая</text:p>
          </table:table-cell>
          <table:table-cell table:formula="of:=IF((ISBLANK([$Предупреждения.$H25]))OR(ISBLANK([$Предупреждения.$I25]))OR(ISBLANK([$Предупреждения.K25]));&quot;&quot;;[$Предупреждения.K25])">
            <text:p/>
          </table:table-cell>
          <table:table-cell table:formula="of:=IF((ISBLANK([$Предупреждения.$H25]))OR(ISBLANK([$Предупреждения.$I25]))OR(ISBLANK([$Предупреждения.L25]));&quot;&quot;;[$Предупреждения.L25])" office:value-type="string" office:string-value="rtdWarnExist" calcext:value-type="string">
            <text:p>rtdWarnExist</text:p>
          </table:table-cell>
          <table:table-cell table:formula="of:=IF((ISBLANK([$Предупреждения.$H25]))OR(ISBLANK([$Предупреждения.$I25]))OR(ISBLANK([$Предупреждения.M25]));&quot;&quot;;[$Предупреждения.M25])" office:value-type="string" office:string-value="ai19_MotorBearingNDETemperature" calcext:value-type="string">
            <text:p>ai19_MotorBearingNDETemperature</text:p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26]))OR(ISBLANK([$Предупреждения.I26]));&quot;&quot;;CONCATENATE(&quot;rtd&quot;;[$Предупреждения.H26]))" office:value-type="string" office:string-value="rtdWarningMessGroupFlag2" calcext:value-type="string">
            <text:p>rtdWarningMessGroupFlag2</text:p>
          </table:table-cell>
          <table:table-cell table:style-name="ce103" table:formula="of:=IF((ISBLANK([$Предупреждения.H26]))OR(ISBLANK([$Предупреждения.I26]));&quot;&quot;;[$Предупреждения.I26])" office:value-type="float" office:value="0" calcext:value-type="float">
            <text:p>0</text:p>
          </table:table-cell>
          <table:table-cell table:formula="of:=IF((ISBLANK([$Предупреждения.H26]))OR(ISBLANK([$Предупреждения.I26]));&quot;&quot;;[$Предупреждения.E26])" office:value-type="string" office:string-value="CoolingWaterSupplyTempAlarm" calcext:value-type="string">
            <text:p>CoolingWaterSupplyTempAlarm</text:p>
          </table:table-cell>
          <table:table-cell table:formula="of:=IF((ISBLANK([$Предупреждения.$H26]))OR(ISBLANK([$Предупреждения.$I26]));&quot;&quot;;[$Предупреждения.F26])" office:value-type="string" office:string-value="температура охлаждающей воды высока" calcext:value-type="string">
            <text:p>температура охлаждающей воды высока</text:p>
          </table:table-cell>
          <table:table-cell table:formula="of:=IF((ISBLANK([$Предупреждения.$H26]))OR(ISBLANK([$Предупреждения.$I26]));&quot;&quot;;[$Предупреждения.G26])" office:value-type="string" office:string-value="Температура на подаче охлаждающей воды высока" calcext:value-type="string">
            <text:p>Температура на подаче охлаждающей воды высока</text:p>
          </table:table-cell>
          <table:table-cell table:formula="of:=IF((ISBLANK([$Предупреждения.$H26]))OR(ISBLANK([$Предупреждения.$I26]));&quot;&quot;;[$Предупреждения.J26])" office:value-type="string" office:string-value="Предупреждение : Температура охлаждающей воды на входе TE301 высокая" calcext:value-type="string">
            <text:p>Предупреждение : Температура охлаждающей воды на входе TE301 высокая</text:p>
          </table:table-cell>
          <table:table-cell table:formula="of:=IF((ISBLANK([$Предупреждения.$H26]))OR(ISBLANK([$Предупреждения.$I26]))OR(ISBLANK([$Предупреждения.K26]));&quot;&quot;;[$Предупреждения.K26])">
            <text:p/>
          </table:table-cell>
          <table:table-cell table:formula="of:=IF((ISBLANK([$Предупреждения.$H26]))OR(ISBLANK([$Предупреждения.$I26]))OR(ISBLANK([$Предупреждения.L26]));&quot;&quot;;[$Предупреждения.L26])" office:value-type="string" office:string-value="rtdWarnExist" calcext:value-type="string">
            <text:p>rtdWarnExist</text:p>
          </table:table-cell>
          <table:table-cell table:formula="of:=IF((ISBLANK([$Предупреждения.$H26]))OR(ISBLANK([$Предупреждения.$I26]))OR(ISBLANK([$Предупреждения.M26]));&quot;&quot;;[$Предупреждения.M26])" office:value-type="string" office:string-value="ai24_CoolingWaterSupplyTemp" calcext:value-type="string">
            <text:p>ai24_CoolingWaterSupplyTemp</text:p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27]))OR(ISBLANK([$Предупреждения.I27]));&quot;&quot;;CONCATENATE(&quot;rtd&quot;;[$Предупреждения.H27]))" office:value-type="string" office:string-value="rtdWarningMessGroupFlag2" calcext:value-type="string">
            <text:p>rtdWarningMessGroupFlag2</text:p>
          </table:table-cell>
          <table:table-cell table:style-name="ce103" table:formula="of:=IF((ISBLANK([$Предупреждения.H27]))OR(ISBLANK([$Предупреждения.I27]));&quot;&quot;;[$Предупреждения.I27])" office:value-type="float" office:value="1" calcext:value-type="float">
            <text:p>1</text:p>
          </table:table-cell>
          <table:table-cell table:formula="of:=IF((ISBLANK([$Предупреждения.H27]))OR(ISBLANK([$Предупреждения.I27]));&quot;&quot;;[$Предупреждения.E27])" office:value-type="string" office:string-value="CoolingWaterReturnTempAlarm" calcext:value-type="string">
            <text:p>CoolingWaterReturnTempAlarm</text:p>
          </table:table-cell>
          <table:table-cell table:formula="of:=IF((ISBLANK([$Предупреждения.$H27]))OR(ISBLANK([$Предупреждения.$I27]));&quot;&quot;;[$Предупреждения.F27])" office:value-type="string" office:string-value="температура возвратной воды высока" calcext:value-type="string">
            <text:p>температура возвратной воды высока</text:p>
          </table:table-cell>
          <table:table-cell table:formula="of:=IF((ISBLANK([$Предупреждения.$H27]))OR(ISBLANK([$Предупреждения.$I27]));&quot;&quot;;[$Предупреждения.G27])" office:value-type="string" office:string-value="Температура на возврате охлаждающей воды высока" calcext:value-type="string">
            <text:p>Температура на возврате охлаждающей воды высока</text:p>
          </table:table-cell>
          <table:table-cell table:formula="of:=IF((ISBLANK([$Предупреждения.$H27]))OR(ISBLANK([$Предупреждения.$I27]));&quot;&quot;;[$Предупреждения.J27])" office:value-type="string" office:string-value="Предупреждение : Температура охлаждающей воды на выходе TE302 высокая" calcext:value-type="string">
            <text:p>Предупреждение : Температура охлаждающей воды на выходе TE302 высокая</text:p>
          </table:table-cell>
          <table:table-cell table:formula="of:=IF((ISBLANK([$Предупреждения.$H27]))OR(ISBLANK([$Предупреждения.$I27]))OR(ISBLANK([$Предупреждения.K27]));&quot;&quot;;[$Предупреждения.K27])">
            <text:p/>
          </table:table-cell>
          <table:table-cell table:formula="of:=IF((ISBLANK([$Предупреждения.$H27]))OR(ISBLANK([$Предупреждения.$I27]))OR(ISBLANK([$Предупреждения.L27]));&quot;&quot;;[$Предупреждения.L27])" office:value-type="string" office:string-value="rtdWarnExist" calcext:value-type="string">
            <text:p>rtdWarnExist</text:p>
          </table:table-cell>
          <table:table-cell table:formula="of:=IF((ISBLANK([$Предупреждения.$H27]))OR(ISBLANK([$Предупреждения.$I27]))OR(ISBLANK([$Предупреждения.M27]));&quot;&quot;;[$Предупреждения.M27])" office:value-type="string" office:string-value="ai25_CoolingWateReturnTemp" calcext:value-type="string">
            <text:p>ai25_CoolingWateReturnTemp</text:p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28]))OR(ISBLANK([$Предупреждения.I28]));&quot;&quot;;CONCATENATE(&quot;rtd&quot;;[$Предупреждения.H28]))" office:value-type="string" office:string-value="rtdWarningMessGroupFlag2" calcext:value-type="string">
            <text:p>rtdWarningMessGroupFlag2</text:p>
          </table:table-cell>
          <table:table-cell table:style-name="ce103" table:formula="of:=IF((ISBLANK([$Предупреждения.H28]))OR(ISBLANK([$Предупреждения.I28]));&quot;&quot;;[$Предупреждения.I28])" office:value-type="float" office:value="2" calcext:value-type="float">
            <text:p>2</text:p>
          </table:table-cell>
          <table:table-cell table:formula="of:=IF((ISBLANK([$Предупреждения.H28]))OR(ISBLANK([$Предупреждения.I28]));&quot;&quot;;[$Предупреждения.E28])" office:value-type="string" office:string-value="CoolingFanOverloadWarn" calcext:value-type="string">
            <text:p>CoolingFanOverloadWarn</text:p>
          </table:table-cell>
          <table:table-cell table:formula="of:=IF((ISBLANK([$Предупреждения.$H28]))OR(ISBLANK([$Предупреждения.$I28]));&quot;&quot;;[$Предупреждения.F28])" office:value-type="string" office:string-value="перегруз вентилятора" calcext:value-type="string">
            <text:p>перегруз вентилятора</text:p>
          </table:table-cell>
          <table:table-cell table:formula="of:=IF((ISBLANK([$Предупреждения.$H28]))OR(ISBLANK([$Предупреждения.$I28]));&quot;&quot;;[$Предупреждения.G28])" office:value-type="string" office:string-value="Охлаждающий вентилятор перегружен" calcext:value-type="string">
            <text:p>Охлаждающий вентилятор перегружен</text:p>
          </table:table-cell>
          <table:table-cell table:formula="of:=IF((ISBLANK([$Предупреждения.$H28]))OR(ISBLANK([$Предупреждения.$I28]));&quot;&quot;;[$Предупреждения.J28])" office:value-type="string" office:string-value="Предупреждение : Перегрузка вентилятора  " calcext:value-type="string">
            <text:p>Предупреждение : Перегрузка вентилятора <text:s/></text:p>
          </table:table-cell>
          <table:table-cell table:formula="of:=IF((ISBLANK([$Предупреждения.$H28]))OR(ISBLANK([$Предупреждения.$I28]))OR(ISBLANK([$Предупреждения.K28]));&quot;&quot;;[$Предупреждения.K28])">
            <text:p/>
          </table:table-cell>
          <table:table-cell table:formula="of:=IF((ISBLANK([$Предупреждения.$H28]))OR(ISBLANK([$Предупреждения.$I28]))OR(ISBLANK([$Предупреждения.L28]));&quot;&quot;;[$Предупреждения.L28])">
            <text:p/>
          </table:table-cell>
          <table:table-cell table:formula="of:=IF((ISBLANK([$Предупреждения.$H28]))OR(ISBLANK([$Предупреждения.$I28]))OR(ISBLANK([$Предупреждения.M28]));&quot;&quot;;[$Предупреждения.M28])">
            <text:p/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29]))OR(ISBLANK([$Предупреждения.I29]));&quot;&quot;;CONCATENATE(&quot;rtd&quot;;[$Предупреждения.H29]))">
            <text:p/>
          </table:table-cell>
          <table:table-cell table:style-name="ce103" table:formula="of:=IF((ISBLANK([$Предупреждения.H29]))OR(ISBLANK([$Предупреждения.I29]));&quot;&quot;;[$Предупреждения.I29])">
            <text:p/>
          </table:table-cell>
          <table:table-cell table:formula="of:=IF((ISBLANK([$Предупреждения.H29]))OR(ISBLANK([$Предупреждения.I29]));&quot;&quot;;[$Предупреждения.E29])">
            <text:p/>
          </table:table-cell>
          <table:table-cell table:formula="of:=IF((ISBLANK([$Предупреждения.$H29]))OR(ISBLANK([$Предупреждения.$I29]));&quot;&quot;;[$Предупреждения.F29])">
            <text:p/>
          </table:table-cell>
          <table:table-cell table:formula="of:=IF((ISBLANK([$Предупреждения.$H29]))OR(ISBLANK([$Предупреждения.$I29]));&quot;&quot;;[$Предупреждения.G29])">
            <text:p/>
          </table:table-cell>
          <table:table-cell table:formula="of:=IF((ISBLANK([$Предупреждения.$H29]))OR(ISBLANK([$Предупреждения.$I29]));&quot;&quot;;[$Предупреждения.J29])">
            <text:p/>
          </table:table-cell>
          <table:table-cell table:formula="of:=IF((ISBLANK([$Предупреждения.$H29]))OR(ISBLANK([$Предупреждения.$I29]))OR(ISBLANK([$Предупреждения.K29]));&quot;&quot;;[$Предупреждения.K29])">
            <text:p/>
          </table:table-cell>
          <table:table-cell table:formula="of:=IF((ISBLANK([$Предупреждения.$H29]))OR(ISBLANK([$Предупреждения.$I29]))OR(ISBLANK([$Предупреждения.L29]));&quot;&quot;;[$Предупреждения.L29])">
            <text:p/>
          </table:table-cell>
          <table:table-cell table:formula="of:=IF((ISBLANK([$Предупреждения.$H29]))OR(ISBLANK([$Предупреждения.$I29]))OR(ISBLANK([$Предупреждения.M29]));&quot;&quot;;[$Предупреждения.M29])">
            <text:p/>
          </table:table-cell>
          <table:table-cell table:style-name="Default"/>
          <table:table-cell table:number-columns-repeated="1014"/>
        </table:table-row>
        <table:table-row table:style-name="ro2">
          <table:table-cell table:style-name="ce103" table:formula="of:=IF((ISBLANK([$Предупреждения.H30]))OR(ISBLANK([$Предупреждения.I30]));&quot;&quot;;CONCATENATE(&quot;rtd&quot;;[$Предупреждения.H30]))" office:value-type="string" office:string-value="rtdWarningMessGroupFlag2" calcext:value-type="string">
            <text:p>rtdWarningMessGroupFlag2</text:p>
          </table:table-cell>
          <table:table-cell table:style-name="ce103" table:formula="of:=IF((ISBLANK([$Предупреждения.H30]))OR(ISBLANK([$Предупреждения.I30]));&quot;&quot;;[$Предупреждения.I30])" office:value-type="float" office:value="4" calcext:value-type="float">
            <text:p>4</text:p>
          </table:table-cell>
          <table:table-cell table:formula="of:=IF((ISBLANK([$Предупреждения.H30]))OR(ISBLANK([$Предупреждения.I30]));&quot;&quot;;[$Предупреждения.E30])" office:value-type="string" office:string-value="MotorBearing_NDE_VibrationAlarm" calcext:value-type="string">
            <text:p>MotorBearing_NDE_VibrationAlarm</text:p>
          </table:table-cell>
          <table:table-cell table:formula="of:=IF((ISBLANK([$Предупреждения.$H30]))OR(ISBLANK([$Предупреждения.$I30]));&quot;&quot;;[$Предупреждения.F30])" office:value-type="string" office:string-value="вибрация подшипника на глухом конце высока" calcext:value-type="string">
            <text:p>вибрация подшипника на глухом конце высока</text:p>
          </table:table-cell>
          <table:table-cell table:formula="of:=IF((ISBLANK([$Предупреждения.$H30]))OR(ISBLANK([$Предупреждения.$I30]));&quot;&quot;;[$Предупреждения.G30])" office:value-type="string" office:string-value="Вибрация подшипника на глухом конце двигателя высока" calcext:value-type="string">
            <text:p>Вибрация подшипника на глухом конце двигателя высока</text:p>
          </table:table-cell>
          <table:table-cell table:formula="of:=IF((ISBLANK([$Предупреждения.$H30]))OR(ISBLANK([$Предупреждения.$I30]));&quot;&quot;;[$Предупреждения.J30])" office:value-type="string" office:string-value="Предупреждение : Вибрация NDE подшипника VT#6 высокая" calcext:value-type="string">
            <text:p>Предупреждение : Вибрация NDE подшипника VT#6 высокая</text:p>
          </table:table-cell>
          <table:table-cell table:formula="of:=IF((ISBLANK([$Предупреждения.$H30]))OR(ISBLANK([$Предупреждения.$I30]))OR(ISBLANK([$Предупреждения.K30]));&quot;&quot;;[$Предупреждения.K30])">
            <text:p/>
          </table:table-cell>
          <table:table-cell table:formula="of:=IF((ISBLANK([$Предупреждения.$H30]))OR(ISBLANK([$Предупреждения.$I30]))OR(ISBLANK([$Предупреждения.L30]));&quot;&quot;;[$Предупреждения.L30])" office:value-type="string" office:string-value="rtdWarnExist" calcext:value-type="string">
            <text:p>rtdWarnExist</text:p>
          </table:table-cell>
          <table:table-cell table:formula="of:=IF((ISBLANK([$Предупреждения.$H30]))OR(ISBLANK([$Предупреждения.$I30]))OR(ISBLANK([$Предупреждения.M30]));&quot;&quot;;[$Предупреждения.M30])" office:value-type="string" office:string-value="ai13_MotorBearingNDEVibration" calcext:value-type="string">
            <text:p>ai13_MotorBearingNDEVibration</text:p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31]))OR(ISBLANK([$Предупреждения.I31]));&quot;&quot;;CONCATENATE(&quot;rtd&quot;;[$Предупреждения.H31]))">
            <text:p/>
          </table:table-cell>
          <table:table-cell table:style-name="ce103" table:formula="of:=IF((ISBLANK([$Предупреждения.H31]))OR(ISBLANK([$Предупреждения.I31]));&quot;&quot;;[$Предупреждения.I31])">
            <text:p/>
          </table:table-cell>
          <table:table-cell table:formula="of:=IF((ISBLANK([$Предупреждения.H31]))OR(ISBLANK([$Предупреждения.I31]));&quot;&quot;;[$Предупреждения.E31])">
            <text:p/>
          </table:table-cell>
          <table:table-cell table:formula="of:=IF((ISBLANK([$Предупреждения.$H31]))OR(ISBLANK([$Предупреждения.$I31]));&quot;&quot;;[$Предупреждения.F31])">
            <text:p/>
          </table:table-cell>
          <table:table-cell table:formula="of:=IF((ISBLANK([$Предупреждения.$H31]))OR(ISBLANK([$Предупреждения.$I31]));&quot;&quot;;[$Предупреждения.G31])">
            <text:p/>
          </table:table-cell>
          <table:table-cell table:formula="of:=IF((ISBLANK([$Предупреждения.$H31]))OR(ISBLANK([$Предупреждения.$I31]));&quot;&quot;;[$Предупреждения.J31])">
            <text:p/>
          </table:table-cell>
          <table:table-cell table:formula="of:=IF((ISBLANK([$Предупреждения.$H31]))OR(ISBLANK([$Предупреждения.$I31]))OR(ISBLANK([$Предупреждения.K31]));&quot;&quot;;[$Предупреждения.K31])">
            <text:p/>
          </table:table-cell>
          <table:table-cell table:formula="of:=IF((ISBLANK([$Предупреждения.$H31]))OR(ISBLANK([$Предупреждения.$I31]))OR(ISBLANK([$Предупреждения.L31]));&quot;&quot;;[$Предупреждения.L31])">
            <text:p/>
          </table:table-cell>
          <table:table-cell table:formula="of:=IF((ISBLANK([$Предупреждения.$H31]))OR(ISBLANK([$Предупреждения.$I31]))OR(ISBLANK([$Предупреждения.M31]));&quot;&quot;;[$Предупреждения.M31])">
            <text:p/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32]))OR(ISBLANK([$Предупреждения.I32]));&quot;&quot;;CONCATENATE(&quot;rtd&quot;;[$Предупреждения.H32]))" office:value-type="string" office:string-value="rtdWarningMessGroupFlag2" calcext:value-type="string">
            <text:p>rtdWarningMessGroupFlag2</text:p>
          </table:table-cell>
          <table:table-cell table:style-name="ce103" table:formula="of:=IF((ISBLANK([$Предупреждения.H32]))OR(ISBLANK([$Предупреждения.I32]));&quot;&quot;;[$Предупреждения.I32])" office:value-type="float" office:value="6" calcext:value-type="float">
            <text:p>6</text:p>
          </table:table-cell>
          <table:table-cell table:formula="of:=IF((ISBLANK([$Предупреждения.H32]))OR(ISBLANK([$Предупреждения.I32]));&quot;&quot;;[$Предупреждения.E32])" office:value-type="string" office:string-value="ExistEventMessages3" calcext:value-type="string">
            <text:p>ExistEventMessages3</text:p>
          </table:table-cell>
          <table:table-cell table:formula="of:=IF((ISBLANK([$Предупреждения.$H32]))OR(ISBLANK([$Предупреждения.$I32]));&quot;&quot;;[$Предупреждения.F32])" office:value-type="string" office:string-value="есть предупреждение в группе 3" calcext:value-type="string">
            <text:p>есть предупреждение в группе 3</text:p>
          </table:table-cell>
          <table:table-cell table:formula="of:=IF((ISBLANK([$Предупреждения.$H32]))OR(ISBLANK([$Предупреждения.$I32]));&quot;&quot;;[$Предупреждения.G32])" office:value-type="string" office:string-value="Есть предупреждение в группе 3 (вне диапазона)" calcext:value-type="string">
            <text:p>Есть предупреждение в группе 3 (вне диапазона)</text:p>
          </table:table-cell>
          <table:table-cell table:formula="of:=IF((ISBLANK([$Предупреждения.$H32]))OR(ISBLANK([$Предупреждения.$I32]));&quot;&quot;;[$Предупреждения.J32])" office:value-type="string" office:string-value="Предупреждение : Есть предупреждение в группе 3 (вне диапазона)  " calcext:value-type="string">
            <text:p>Предупреждение : Есть предупреждение в группе 3 (вне диапазона) <text:s/></text:p>
          </table:table-cell>
          <table:table-cell table:formula="of:=IF((ISBLANK([$Предупреждения.$H32]))OR(ISBLANK([$Предупреждения.$I32]))OR(ISBLANK([$Предупреждения.K32]));&quot;&quot;;[$Предупреждения.K32])">
            <text:p/>
          </table:table-cell>
          <table:table-cell table:formula="of:=IF((ISBLANK([$Предупреждения.$H32]))OR(ISBLANK([$Предупреждения.$I32]))OR(ISBLANK([$Предупреждения.L32]));&quot;&quot;;[$Предупреждения.L32])">
            <text:p/>
          </table:table-cell>
          <table:table-cell table:formula="of:=IF((ISBLANK([$Предупреждения.$H32]))OR(ISBLANK([$Предупреждения.$I32]))OR(ISBLANK([$Предупреждения.M32]));&quot;&quot;;[$Предупреждения.M32])">
            <text:p/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33]))OR(ISBLANK([$Предупреждения.I33]));&quot;&quot;;CONCATENATE(&quot;rtd&quot;;[$Предупреждения.H33]))" office:value-type="string" office:string-value="rtdWarningMessGroupFlag2" calcext:value-type="string">
            <text:p>rtdWarningMessGroupFlag2</text:p>
          </table:table-cell>
          <table:table-cell table:style-name="ce103" table:formula="of:=IF((ISBLANK([$Предупреждения.H33]))OR(ISBLANK([$Предупреждения.I33]));&quot;&quot;;[$Предупреждения.I33])" office:value-type="float" office:value="7" calcext:value-type="float">
            <text:p>7</text:p>
          </table:table-cell>
          <table:table-cell table:formula="of:=IF((ISBLANK([$Предупреждения.H33]))OR(ISBLANK([$Предупреждения.I33]));&quot;&quot;;[$Предупреждения.E33])" office:value-type="string" office:string-value="ExistEventMessages1_2" calcext:value-type="string">
            <text:p>ExistEventMessages1_2</text:p>
          </table:table-cell>
          <table:table-cell table:formula="of:=IF((ISBLANK([$Предупреждения.$H33]))OR(ISBLANK([$Предупреждения.$I33]));&quot;&quot;;[$Предупреждения.F33])" office:value-type="string" office:string-value="есть предупреждение в группах 1, 2" calcext:value-type="string">
            <text:p>есть предупреждение в группах 1, 2</text:p>
          </table:table-cell>
          <table:table-cell table:formula="of:=IF((ISBLANK([$Предупреждения.$H33]))OR(ISBLANK([$Предупреждения.$I33]));&quot;&quot;;[$Предупреждения.G33])" office:value-type="string" office:string-value="Есть предупреждение в группах 1, 2 (вне диапазона)" calcext:value-type="string">
            <text:p>Есть предупреждение в группах 1, 2 (вне диапазона)</text:p>
          </table:table-cell>
          <table:table-cell table:formula="of:=IF((ISBLANK([$Предупреждения.$H33]))OR(ISBLANK([$Предупреждения.$I33]));&quot;&quot;;[$Предупреждения.J33])" office:value-type="string" office:string-value="Предупреждение : Есть предупреждение в группах 1, 2 (вне диапазона)  " calcext:value-type="string">
            <text:p>Предупреждение : Есть предупреждение в группах 1, 2 (вне диапазона) <text:s/></text:p>
          </table:table-cell>
          <table:table-cell table:formula="of:=IF((ISBLANK([$Предупреждения.$H33]))OR(ISBLANK([$Предупреждения.$I33]))OR(ISBLANK([$Предупреждения.K33]));&quot;&quot;;[$Предупреждения.K33])">
            <text:p/>
          </table:table-cell>
          <table:table-cell table:formula="of:=IF((ISBLANK([$Предупреждения.$H33]))OR(ISBLANK([$Предупреждения.$I33]))OR(ISBLANK([$Предупреждения.L33]));&quot;&quot;;[$Предупреждения.L33])">
            <text:p/>
          </table:table-cell>
          <table:table-cell table:formula="of:=IF((ISBLANK([$Предупреждения.$H33]))OR(ISBLANK([$Предупреждения.$I33]))OR(ISBLANK([$Предупреждения.M33]));&quot;&quot;;[$Предупреждения.M33])">
            <text:p/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34]))OR(ISBLANK([$Предупреждения.I34]));&quot;&quot;;CONCATENATE(&quot;rtd&quot;;[$Предупреждения.H34]))">
            <text:p/>
          </table:table-cell>
          <table:table-cell table:style-name="ce103" table:formula="of:=IF((ISBLANK([$Предупреждения.H34]))OR(ISBLANK([$Предупреждения.I34]));&quot;&quot;;[$Предупреждения.I34])">
            <text:p/>
          </table:table-cell>
          <table:table-cell table:formula="of:=IF((ISBLANK([$Предупреждения.H34]))OR(ISBLANK([$Предупреждения.I34]));&quot;&quot;;[$Предупреждения.E34])">
            <text:p/>
          </table:table-cell>
          <table:table-cell table:formula="of:=IF((ISBLANK([$Предупреждения.$H34]))OR(ISBLANK([$Предупреждения.$I34]));&quot;&quot;;[$Предупреждения.F34])">
            <text:p/>
          </table:table-cell>
          <table:table-cell table:formula="of:=IF((ISBLANK([$Предупреждения.$H34]))OR(ISBLANK([$Предупреждения.$I34]));&quot;&quot;;[$Предупреждения.G34])">
            <text:p/>
          </table:table-cell>
          <table:table-cell table:formula="of:=IF((ISBLANK([$Предупреждения.$H34]))OR(ISBLANK([$Предупреждения.$I34]));&quot;&quot;;[$Предупреждения.J34])">
            <text:p/>
          </table:table-cell>
          <table:table-cell table:formula="of:=IF((ISBLANK([$Предупреждения.$H34]))OR(ISBLANK([$Предупреждения.$I34]))OR(ISBLANK([$Предупреждения.K34]));&quot;&quot;;[$Предупреждения.K34])">
            <text:p/>
          </table:table-cell>
          <table:table-cell table:formula="of:=IF((ISBLANK([$Предупреждения.$H34]))OR(ISBLANK([$Предупреждения.$I34]))OR(ISBLANK([$Предупреждения.L34]));&quot;&quot;;[$Предупреждения.L34])">
            <text:p/>
          </table:table-cell>
          <table:table-cell table:formula="of:=IF((ISBLANK([$Предупреждения.$H34]))OR(ISBLANK([$Предупреждения.$I34]))OR(ISBLANK([$Предупреждения.M34]));&quot;&quot;;[$Предупреждения.M34])">
            <text:p/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35]))OR(ISBLANK([$Предупреждения.I35]));&quot;&quot;;CONCATENATE(&quot;rtd&quot;;[$Предупреждения.H35]))">
            <text:p/>
          </table:table-cell>
          <table:table-cell table:style-name="ce103" table:formula="of:=IF((ISBLANK([$Предупреждения.H35]))OR(ISBLANK([$Предупреждения.I35]));&quot;&quot;;[$Предупреждения.I35])">
            <text:p/>
          </table:table-cell>
          <table:table-cell table:formula="of:=IF((ISBLANK([$Предупреждения.H35]))OR(ISBLANK([$Предупреждения.I35]));&quot;&quot;;[$Предупреждения.E35])">
            <text:p/>
          </table:table-cell>
          <table:table-cell table:formula="of:=IF((ISBLANK([$Предупреждения.$H35]))OR(ISBLANK([$Предупреждения.$I35]));&quot;&quot;;[$Предупреждения.F35])">
            <text:p/>
          </table:table-cell>
          <table:table-cell table:formula="of:=IF((ISBLANK([$Предупреждения.$H35]))OR(ISBLANK([$Предупреждения.$I35]));&quot;&quot;;[$Предупреждения.G35])">
            <text:p/>
          </table:table-cell>
          <table:table-cell table:formula="of:=IF((ISBLANK([$Предупреждения.$H35]))OR(ISBLANK([$Предупреждения.$I35]));&quot;&quot;;[$Предупреждения.J35])">
            <text:p/>
          </table:table-cell>
          <table:table-cell table:formula="of:=IF((ISBLANK([$Предупреждения.$H35]))OR(ISBLANK([$Предупреждения.$I35]))OR(ISBLANK([$Предупреждения.K35]));&quot;&quot;;[$Предупреждения.K35])">
            <text:p/>
          </table:table-cell>
          <table:table-cell table:formula="of:=IF((ISBLANK([$Предупреждения.$H35]))OR(ISBLANK([$Предупреждения.$I35]))OR(ISBLANK([$Предупреждения.L35]));&quot;&quot;;[$Предупреждения.L35])">
            <text:p/>
          </table:table-cell>
          <table:table-cell table:formula="of:=IF((ISBLANK([$Предупреждения.$H35]))OR(ISBLANK([$Предупреждения.$I35]))OR(ISBLANK([$Предупреждения.M35]));&quot;&quot;;[$Предупреждения.M35])">
            <text:p/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36]))OR(ISBLANK([$Предупреждения.I36]));&quot;&quot;;CONCATENATE(&quot;rtd&quot;;[$Предупреждения.H36]))">
            <text:p/>
          </table:table-cell>
          <table:table-cell table:style-name="ce103" table:formula="of:=IF((ISBLANK([$Предупреждения.H36]))OR(ISBLANK([$Предупреждения.I36]));&quot;&quot;;[$Предупреждения.I36])">
            <text:p/>
          </table:table-cell>
          <table:table-cell table:formula="of:=IF((ISBLANK([$Предупреждения.H36]))OR(ISBLANK([$Предупреждения.I36]));&quot;&quot;;[$Предупреждения.E36])">
            <text:p/>
          </table:table-cell>
          <table:table-cell table:formula="of:=IF((ISBLANK([$Предупреждения.$H36]))OR(ISBLANK([$Предупреждения.$I36]));&quot;&quot;;[$Предупреждения.F36])">
            <text:p/>
          </table:table-cell>
          <table:table-cell table:formula="of:=IF((ISBLANK([$Предупреждения.$H36]))OR(ISBLANK([$Предупреждения.$I36]));&quot;&quot;;[$Предупреждения.G36])">
            <text:p/>
          </table:table-cell>
          <table:table-cell table:formula="of:=IF((ISBLANK([$Предупреждения.$H36]))OR(ISBLANK([$Предупреждения.$I36]));&quot;&quot;;[$Предупреждения.J36])">
            <text:p/>
          </table:table-cell>
          <table:table-cell table:formula="of:=IF((ISBLANK([$Предупреждения.$H36]))OR(ISBLANK([$Предупреждения.$I36]))OR(ISBLANK([$Предупреждения.K36]));&quot;&quot;;[$Предупреждения.K36])">
            <text:p/>
          </table:table-cell>
          <table:table-cell table:formula="of:=IF((ISBLANK([$Предупреждения.$H36]))OR(ISBLANK([$Предупреждения.$I36]))OR(ISBLANK([$Предупреждения.L36]));&quot;&quot;;[$Предупреждения.L36])">
            <text:p/>
          </table:table-cell>
          <table:table-cell table:formula="of:=IF((ISBLANK([$Предупреждения.$H36]))OR(ISBLANK([$Предупреждения.$I36]))OR(ISBLANK([$Предупреждения.M36]));&quot;&quot;;[$Предупреждения.M36])">
            <text:p/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37]))OR(ISBLANK([$Предупреждения.I37]));&quot;&quot;;CONCATENATE(&quot;rtd&quot;;[$Предупреждения.H37]))">
            <text:p/>
          </table:table-cell>
          <table:table-cell table:style-name="ce103" table:formula="of:=IF((ISBLANK([$Предупреждения.H37]))OR(ISBLANK([$Предупреждения.I37]));&quot;&quot;;[$Предупреждения.I37])">
            <text:p/>
          </table:table-cell>
          <table:table-cell table:formula="of:=IF((ISBLANK([$Предупреждения.H37]))OR(ISBLANK([$Предупреждения.I37]));&quot;&quot;;[$Предупреждения.E37])">
            <text:p/>
          </table:table-cell>
          <table:table-cell table:formula="of:=IF((ISBLANK([$Предупреждения.$H37]))OR(ISBLANK([$Предупреждения.$I37]));&quot;&quot;;[$Предупреждения.F37])">
            <text:p/>
          </table:table-cell>
          <table:table-cell table:formula="of:=IF((ISBLANK([$Предупреждения.$H37]))OR(ISBLANK([$Предупреждения.$I37]));&quot;&quot;;[$Предупреждения.G37])">
            <text:p/>
          </table:table-cell>
          <table:table-cell table:formula="of:=IF((ISBLANK([$Предупреждения.$H37]))OR(ISBLANK([$Предупреждения.$I37]));&quot;&quot;;[$Предупреждения.J37])">
            <text:p/>
          </table:table-cell>
          <table:table-cell table:formula="of:=IF((ISBLANK([$Предупреждения.$H37]))OR(ISBLANK([$Предупреждения.$I37]))OR(ISBLANK([$Предупреждения.K37]));&quot;&quot;;[$Предупреждения.K37])">
            <text:p/>
          </table:table-cell>
          <table:table-cell table:formula="of:=IF((ISBLANK([$Предупреждения.$H37]))OR(ISBLANK([$Предупреждения.$I37]))OR(ISBLANK([$Предупреждения.L37]));&quot;&quot;;[$Предупреждения.L37])">
            <text:p/>
          </table:table-cell>
          <table:table-cell table:formula="of:=IF((ISBLANK([$Предупреждения.$H37]))OR(ISBLANK([$Предупреждения.$I37]))OR(ISBLANK([$Предупреждения.M37]));&quot;&quot;;[$Предупреждения.M37])">
            <text:p/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38]))OR(ISBLANK([$Предупреждения.I38]));&quot;&quot;;CONCATENATE(&quot;rtd&quot;;[$Предупреждения.H38]))">
            <text:p/>
          </table:table-cell>
          <table:table-cell table:style-name="ce103" table:formula="of:=IF((ISBLANK([$Предупреждения.H38]))OR(ISBLANK([$Предупреждения.I38]));&quot;&quot;;[$Предупреждения.I38])">
            <text:p/>
          </table:table-cell>
          <table:table-cell table:formula="of:=IF((ISBLANK([$Предупреждения.H38]))OR(ISBLANK([$Предупреждения.I38]));&quot;&quot;;[$Предупреждения.E38])">
            <text:p/>
          </table:table-cell>
          <table:table-cell table:formula="of:=IF((ISBLANK([$Предупреждения.$H38]))OR(ISBLANK([$Предупреждения.$I38]));&quot;&quot;;[$Предупреждения.F38])">
            <text:p/>
          </table:table-cell>
          <table:table-cell table:formula="of:=IF((ISBLANK([$Предупреждения.$H38]))OR(ISBLANK([$Предупреждения.$I38]));&quot;&quot;;[$Предупреждения.G38])">
            <text:p/>
          </table:table-cell>
          <table:table-cell table:formula="of:=IF((ISBLANK([$Предупреждения.$H38]))OR(ISBLANK([$Предупреждения.$I38]));&quot;&quot;;[$Предупреждения.J38])">
            <text:p/>
          </table:table-cell>
          <table:table-cell table:formula="of:=IF((ISBLANK([$Предупреждения.$H38]))OR(ISBLANK([$Предупреждения.$I38]))OR(ISBLANK([$Предупреждения.K38]));&quot;&quot;;[$Предупреждения.K38])">
            <text:p/>
          </table:table-cell>
          <table:table-cell table:formula="of:=IF((ISBLANK([$Предупреждения.$H38]))OR(ISBLANK([$Предупреждения.$I38]))OR(ISBLANK([$Предупреждения.L38]));&quot;&quot;;[$Предупреждения.L38])">
            <text:p/>
          </table:table-cell>
          <table:table-cell table:formula="of:=IF((ISBLANK([$Предупреждения.$H38]))OR(ISBLANK([$Предупреждения.$I38]))OR(ISBLANK([$Предупреждения.M38]));&quot;&quot;;[$Предупреждения.M38])">
            <text:p/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39]))OR(ISBLANK([$Предупреждения.I39]));&quot;&quot;;CONCATENATE(&quot;rtd&quot;;[$Предупреждения.H39]))">
            <text:p/>
          </table:table-cell>
          <table:table-cell table:style-name="ce103" table:formula="of:=IF((ISBLANK([$Предупреждения.H39]))OR(ISBLANK([$Предупреждения.I39]));&quot;&quot;;[$Предупреждения.I39])">
            <text:p/>
          </table:table-cell>
          <table:table-cell table:formula="of:=IF((ISBLANK([$Предупреждения.H39]))OR(ISBLANK([$Предупреждения.I39]));&quot;&quot;;[$Предупреждения.E39])">
            <text:p/>
          </table:table-cell>
          <table:table-cell table:formula="of:=IF((ISBLANK([$Предупреждения.$H39]))OR(ISBLANK([$Предупреждения.$I39]));&quot;&quot;;[$Предупреждения.F39])">
            <text:p/>
          </table:table-cell>
          <table:table-cell table:formula="of:=IF((ISBLANK([$Предупреждения.$H39]))OR(ISBLANK([$Предупреждения.$I39]));&quot;&quot;;[$Предупреждения.G39])">
            <text:p/>
          </table:table-cell>
          <table:table-cell table:formula="of:=IF((ISBLANK([$Предупреждения.$H39]))OR(ISBLANK([$Предупреждения.$I39]));&quot;&quot;;[$Предупреждения.J39])">
            <text:p/>
          </table:table-cell>
          <table:table-cell table:formula="of:=IF((ISBLANK([$Предупреждения.$H39]))OR(ISBLANK([$Предупреждения.$I39]))OR(ISBLANK([$Предупреждения.K39]));&quot;&quot;;[$Предупреждения.K39])">
            <text:p/>
          </table:table-cell>
          <table:table-cell table:formula="of:=IF((ISBLANK([$Предупреждения.$H39]))OR(ISBLANK([$Предупреждения.$I39]))OR(ISBLANK([$Предупреждения.L39]));&quot;&quot;;[$Предупреждения.L39])">
            <text:p/>
          </table:table-cell>
          <table:table-cell table:formula="of:=IF((ISBLANK([$Предупреждения.$H39]))OR(ISBLANK([$Предупреждения.$I39]))OR(ISBLANK([$Предупреждения.M39]));&quot;&quot;;[$Предупреждения.M39])">
            <text:p/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40]))OR(ISBLANK([$Предупреждения.I40]));&quot;&quot;;CONCATENATE(&quot;rtd&quot;;[$Предупреждения.H40]))">
            <text:p/>
          </table:table-cell>
          <table:table-cell table:style-name="ce103" table:formula="of:=IF((ISBLANK([$Предупреждения.H40]))OR(ISBLANK([$Предупреждения.I40]));&quot;&quot;;[$Предупреждения.I40])">
            <text:p/>
          </table:table-cell>
          <table:table-cell table:formula="of:=IF((ISBLANK([$Предупреждения.H40]))OR(ISBLANK([$Предупреждения.I40]));&quot;&quot;;[$Предупреждения.E40])">
            <text:p/>
          </table:table-cell>
          <table:table-cell table:formula="of:=IF((ISBLANK([$Предупреждения.$H40]))OR(ISBLANK([$Предупреждения.$I40]));&quot;&quot;;[$Предупреждения.F40])">
            <text:p/>
          </table:table-cell>
          <table:table-cell table:formula="of:=IF((ISBLANK([$Предупреждения.$H40]))OR(ISBLANK([$Предупреждения.$I40]));&quot;&quot;;[$Предупреждения.G40])">
            <text:p/>
          </table:table-cell>
          <table:table-cell table:formula="of:=IF((ISBLANK([$Предупреждения.$H40]))OR(ISBLANK([$Предупреждения.$I40]));&quot;&quot;;[$Предупреждения.J40])">
            <text:p/>
          </table:table-cell>
          <table:table-cell table:formula="of:=IF((ISBLANK([$Предупреждения.$H40]))OR(ISBLANK([$Предупреждения.$I40]))OR(ISBLANK([$Предупреждения.K40]));&quot;&quot;;[$Предупреждения.K40])">
            <text:p/>
          </table:table-cell>
          <table:table-cell table:formula="of:=IF((ISBLANK([$Предупреждения.$H40]))OR(ISBLANK([$Предупреждения.$I40]))OR(ISBLANK([$Предупреждения.L40]));&quot;&quot;;[$Предупреждения.L40])">
            <text:p/>
          </table:table-cell>
          <table:table-cell table:formula="of:=IF((ISBLANK([$Предупреждения.$H40]))OR(ISBLANK([$Предупреждения.$I40]))OR(ISBLANK([$Предупреждения.M40]));&quot;&quot;;[$Предупреждения.M40])">
            <text:p/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41]))OR(ISBLANK([$Предупреждения.I41]));&quot;&quot;;CONCATENATE(&quot;rtd&quot;;[$Предупреждения.H41]))">
            <text:p/>
          </table:table-cell>
          <table:table-cell table:style-name="ce103" table:formula="of:=IF((ISBLANK([$Предупреждения.H41]))OR(ISBLANK([$Предупреждения.I41]));&quot;&quot;;[$Предупреждения.I41])">
            <text:p/>
          </table:table-cell>
          <table:table-cell table:formula="of:=IF((ISBLANK([$Предупреждения.H41]))OR(ISBLANK([$Предупреждения.I41]));&quot;&quot;;[$Предупреждения.E41])">
            <text:p/>
          </table:table-cell>
          <table:table-cell table:formula="of:=IF((ISBLANK([$Предупреждения.$H41]))OR(ISBLANK([$Предупреждения.$I41]));&quot;&quot;;[$Предупреждения.F41])">
            <text:p/>
          </table:table-cell>
          <table:table-cell table:formula="of:=IF((ISBLANK([$Предупреждения.$H41]))OR(ISBLANK([$Предупреждения.$I41]));&quot;&quot;;[$Предупреждения.G41])">
            <text:p/>
          </table:table-cell>
          <table:table-cell table:formula="of:=IF((ISBLANK([$Предупреждения.$H41]))OR(ISBLANK([$Предупреждения.$I41]));&quot;&quot;;[$Предупреждения.J41])">
            <text:p/>
          </table:table-cell>
          <table:table-cell table:formula="of:=IF((ISBLANK([$Предупреждения.$H41]))OR(ISBLANK([$Предупреждения.$I41]))OR(ISBLANK([$Предупреждения.K41]));&quot;&quot;;[$Предупреждения.K41])">
            <text:p/>
          </table:table-cell>
          <table:table-cell table:formula="of:=IF((ISBLANK([$Предупреждения.$H41]))OR(ISBLANK([$Предупреждения.$I41]))OR(ISBLANK([$Предупреждения.L41]));&quot;&quot;;[$Предупреждения.L41])">
            <text:p/>
          </table:table-cell>
          <table:table-cell table:formula="of:=IF((ISBLANK([$Предупреждения.$H41]))OR(ISBLANK([$Предупреждения.$I41]))OR(ISBLANK([$Предупреждения.M41]));&quot;&quot;;[$Предупреждения.M41])">
            <text:p/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42]))OR(ISBLANK([$Предупреждения.I42]));&quot;&quot;;CONCATENATE(&quot;rtd&quot;;[$Предупреждения.H42]))">
            <text:p/>
          </table:table-cell>
          <table:table-cell table:style-name="ce103" table:formula="of:=IF((ISBLANK([$Предупреждения.H42]))OR(ISBLANK([$Предупреждения.I42]));&quot;&quot;;[$Предупреждения.I42])">
            <text:p/>
          </table:table-cell>
          <table:table-cell table:formula="of:=IF((ISBLANK([$Предупреждения.H42]))OR(ISBLANK([$Предупреждения.I42]));&quot;&quot;;[$Предупреждения.E42])">
            <text:p/>
          </table:table-cell>
          <table:table-cell table:formula="of:=IF((ISBLANK([$Предупреждения.$H42]))OR(ISBLANK([$Предупреждения.$I42]));&quot;&quot;;[$Предупреждения.F42])">
            <text:p/>
          </table:table-cell>
          <table:table-cell table:formula="of:=IF((ISBLANK([$Предупреждения.$H42]))OR(ISBLANK([$Предупреждения.$I42]));&quot;&quot;;[$Предупреждения.G42])">
            <text:p/>
          </table:table-cell>
          <table:table-cell table:formula="of:=IF((ISBLANK([$Предупреждения.$H42]))OR(ISBLANK([$Предупреждения.$I42]));&quot;&quot;;[$Предупреждения.J42])">
            <text:p/>
          </table:table-cell>
          <table:table-cell table:formula="of:=IF((ISBLANK([$Предупреждения.$H42]))OR(ISBLANK([$Предупреждения.$I42]))OR(ISBLANK([$Предупреждения.K42]));&quot;&quot;;[$Предупреждения.K42])">
            <text:p/>
          </table:table-cell>
          <table:table-cell table:formula="of:=IF((ISBLANK([$Предупреждения.$H42]))OR(ISBLANK([$Предупреждения.$I42]))OR(ISBLANK([$Предупреждения.L42]));&quot;&quot;;[$Предупреждения.L42])">
            <text:p/>
          </table:table-cell>
          <table:table-cell table:formula="of:=IF((ISBLANK([$Предупреждения.$H42]))OR(ISBLANK([$Предупреждения.$I42]))OR(ISBLANK([$Предупреждения.M42]));&quot;&quot;;[$Предупреждения.M42])">
            <text:p/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43]))OR(ISBLANK([$Предупреждения.I43]));&quot;&quot;;CONCATENATE(&quot;rtd&quot;;[$Предупреждения.H43]))">
            <text:p/>
          </table:table-cell>
          <table:table-cell table:style-name="ce103" table:formula="of:=IF((ISBLANK([$Предупреждения.H43]))OR(ISBLANK([$Предупреждения.I43]));&quot;&quot;;[$Предупреждения.I43])">
            <text:p/>
          </table:table-cell>
          <table:table-cell table:formula="of:=IF((ISBLANK([$Предупреждения.H43]))OR(ISBLANK([$Предупреждения.I43]));&quot;&quot;;[$Предупреждения.E43])">
            <text:p/>
          </table:table-cell>
          <table:table-cell table:formula="of:=IF((ISBLANK([$Предупреждения.$H43]))OR(ISBLANK([$Предупреждения.$I43]));&quot;&quot;;[$Предупреждения.F43])">
            <text:p/>
          </table:table-cell>
          <table:table-cell table:formula="of:=IF((ISBLANK([$Предупреждения.$H43]))OR(ISBLANK([$Предупреждения.$I43]));&quot;&quot;;[$Предупреждения.G43])">
            <text:p/>
          </table:table-cell>
          <table:table-cell table:formula="of:=IF((ISBLANK([$Предупреждения.$H43]))OR(ISBLANK([$Предупреждения.$I43]));&quot;&quot;;[$Предупреждения.J43])">
            <text:p/>
          </table:table-cell>
          <table:table-cell table:formula="of:=IF((ISBLANK([$Предупреждения.$H43]))OR(ISBLANK([$Предупреждения.$I43]))OR(ISBLANK([$Предупреждения.K43]));&quot;&quot;;[$Предупреждения.K43])">
            <text:p/>
          </table:table-cell>
          <table:table-cell table:formula="of:=IF((ISBLANK([$Предупреждения.$H43]))OR(ISBLANK([$Предупреждения.$I43]))OR(ISBLANK([$Предупреждения.L43]));&quot;&quot;;[$Предупреждения.L43])">
            <text:p/>
          </table:table-cell>
          <table:table-cell table:formula="of:=IF((ISBLANK([$Предупреждения.$H43]))OR(ISBLANK([$Предупреждения.$I43]))OR(ISBLANK([$Предупреждения.M43]));&quot;&quot;;[$Предупреждения.M43])">
            <text:p/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44]))OR(ISBLANK([$Предупреждения.I44]));&quot;&quot;;CONCATENATE(&quot;rtd&quot;;[$Предупреждения.H44]))">
            <text:p/>
          </table:table-cell>
          <table:table-cell table:style-name="ce103" table:formula="of:=IF((ISBLANK([$Предупреждения.H44]))OR(ISBLANK([$Предупреждения.I44]));&quot;&quot;;[$Предупреждения.I44])">
            <text:p/>
          </table:table-cell>
          <table:table-cell table:formula="of:=IF((ISBLANK([$Предупреждения.H44]))OR(ISBLANK([$Предупреждения.I44]));&quot;&quot;;[$Предупреждения.E44])">
            <text:p/>
          </table:table-cell>
          <table:table-cell table:formula="of:=IF((ISBLANK([$Предупреждения.$H44]))OR(ISBLANK([$Предупреждения.$I44]));&quot;&quot;;[$Предупреждения.F44])">
            <text:p/>
          </table:table-cell>
          <table:table-cell table:formula="of:=IF((ISBLANK([$Предупреждения.$H44]))OR(ISBLANK([$Предупреждения.$I44]));&quot;&quot;;[$Предупреждения.G44])">
            <text:p/>
          </table:table-cell>
          <table:table-cell table:formula="of:=IF((ISBLANK([$Предупреждения.$H44]))OR(ISBLANK([$Предупреждения.$I44]));&quot;&quot;;[$Предупреждения.J44])">
            <text:p/>
          </table:table-cell>
          <table:table-cell table:formula="of:=IF((ISBLANK([$Предупреждения.$H44]))OR(ISBLANK([$Предупреждения.$I44]))OR(ISBLANK([$Предупреждения.K44]));&quot;&quot;;[$Предупреждения.K44])">
            <text:p/>
          </table:table-cell>
          <table:table-cell table:formula="of:=IF((ISBLANK([$Предупреждения.$H44]))OR(ISBLANK([$Предупреждения.$I44]))OR(ISBLANK([$Предупреждения.L44]));&quot;&quot;;[$Предупреждения.L44])">
            <text:p/>
          </table:table-cell>
          <table:table-cell table:formula="of:=IF((ISBLANK([$Предупреждения.$H44]))OR(ISBLANK([$Предупреждения.$I44]))OR(ISBLANK([$Предупреждения.M44]));&quot;&quot;;[$Предупреждения.M44])">
            <text:p/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45]))OR(ISBLANK([$Предупреждения.I45]));&quot;&quot;;CONCATENATE(&quot;rtd&quot;;[$Предупреждения.H45]))" office:value-type="string" office:string-value="rtdMaintenanceGroupFlag" calcext:value-type="string">
            <text:p>rtdMaintenanceGroupFlag</text:p>
          </table:table-cell>
          <table:table-cell table:style-name="ce103" table:formula="of:=IF((ISBLANK([$Предупреждения.H45]))OR(ISBLANK([$Предупреждения.I45]));&quot;&quot;;[$Предупреждения.I45])" office:value-type="float" office:value="1" calcext:value-type="float">
            <text:p>1</text:p>
          </table:table-cell>
          <table:table-cell table:formula="of:=IF((ISBLANK([$Предупреждения.H45]))OR(ISBLANK([$Предупреждения.I45]));&quot;&quot;;[$Предупреждения.E45])" office:value-type="string" office:string-value="MT_injectGreaseIntoTheCoupling" calcext:value-type="string">
            <text:p>MT_injectGreaseIntoTheCoupling</text:p>
          </table:table-cell>
          <table:table-cell table:formula="of:=IF((ISBLANK([$Предупреждения.$H45]))OR(ISBLANK([$Предупреждения.$I45]));&quot;&quot;;[$Предупреждения.F45])" office:value-type="string" office:string-value="ремонт смажьте соединения" calcext:value-type="string">
            <text:p>ремонт смажьте соединения</text:p>
          </table:table-cell>
          <table:table-cell table:formula="of:=IF((ISBLANK([$Предупреждения.$H45]))OR(ISBLANK([$Предупреждения.$I45]));&quot;&quot;;[$Предупреждения.G45])" office:value-type="string" office:string-value="Требуется обслуживание: смажьте соединения" calcext:value-type="string">
            <text:p>Требуется обслуживание: смажьте соединения</text:p>
          </table:table-cell>
          <table:table-cell table:formula="of:=IF((ISBLANK([$Предупреждения.$H45]))OR(ISBLANK([$Предупреждения.$I45]));&quot;&quot;;[$Предупреждения.J45])" office:value-type="string" office:string-value="Обслуживание : смажьте соединения  " calcext:value-type="string">
            <text:p>Обслуживание : смажьте соединения <text:s/></text:p>
          </table:table-cell>
          <table:table-cell table:formula="of:=IF((ISBLANK([$Предупреждения.$H45]))OR(ISBLANK([$Предупреждения.$I45]))OR(ISBLANK([$Предупреждения.K45]));&quot;&quot;;[$Предупреждения.K45])">
            <text:p/>
          </table:table-cell>
          <table:table-cell table:formula="of:=IF((ISBLANK([$Предупреждения.$H45]))OR(ISBLANK([$Предупреждения.$I45]))OR(ISBLANK([$Предупреждения.L45]));&quot;&quot;;[$Предупреждения.L45])">
            <text:p/>
          </table:table-cell>
          <table:table-cell table:formula="of:=IF((ISBLANK([$Предупреждения.$H45]))OR(ISBLANK([$Предупреждения.$I45]))OR(ISBLANK([$Предупреждения.M45]));&quot;&quot;;[$Предупреждения.M45])">
            <text:p/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46]))OR(ISBLANK([$Предупреждения.I46]));&quot;&quot;;CONCATENATE(&quot;rtd&quot;;[$Предупреждения.H46]))" office:value-type="string" office:string-value="rtdMaintenanceGroupFlag" calcext:value-type="string">
            <text:p>rtdMaintenanceGroupFlag</text:p>
          </table:table-cell>
          <table:table-cell table:style-name="ce103" table:formula="of:=IF((ISBLANK([$Предупреждения.H46]))OR(ISBLANK([$Предупреждения.I46]));&quot;&quot;;[$Предупреждения.I46])" office:value-type="float" office:value="2" calcext:value-type="float">
            <text:p>2</text:p>
          </table:table-cell>
          <table:table-cell table:formula="of:=IF((ISBLANK([$Предупреждения.H46]))OR(ISBLANK([$Предупреждения.I46]));&quot;&quot;;[$Предупреждения.E46])" office:value-type="string" office:string-value="MT_replaceLubricationOil" calcext:value-type="string">
            <text:p>MT_replaceLubricationOil</text:p>
          </table:table-cell>
          <table:table-cell table:formula="of:=IF((ISBLANK([$Предупреждения.$H46]))OR(ISBLANK([$Предупреждения.$I46]));&quot;&quot;;[$Предупреждения.F46])" office:value-type="string" office:string-value="ремонт замена смазки" calcext:value-type="string">
            <text:p>ремонт замена смазки</text:p>
          </table:table-cell>
          <table:table-cell table:formula="of:=IF((ISBLANK([$Предупреждения.$H46]))OR(ISBLANK([$Предупреждения.$I46]));&quot;&quot;;[$Предупреждения.G46])" office:value-type="string" office:string-value="Требуется обслуживание: замените смазку" calcext:value-type="string">
            <text:p>Требуется обслуживание: замените смазку</text:p>
          </table:table-cell>
          <table:table-cell table:formula="of:=IF((ISBLANK([$Предупреждения.$H46]))OR(ISBLANK([$Предупреждения.$I46]));&quot;&quot;;[$Предупреждения.J46])" office:value-type="string" office:string-value="Обслуживание : требуется замена смазки  " calcext:value-type="string">
            <text:p>Обслуживание : требуется замена смазки <text:s/></text:p>
          </table:table-cell>
          <table:table-cell table:formula="of:=IF((ISBLANK([$Предупреждения.$H46]))OR(ISBLANK([$Предупреждения.$I46]))OR(ISBLANK([$Предупреждения.K46]));&quot;&quot;;[$Предупреждения.K46])">
            <text:p/>
          </table:table-cell>
          <table:table-cell table:formula="of:=IF((ISBLANK([$Предупреждения.$H46]))OR(ISBLANK([$Предупреждения.$I46]))OR(ISBLANK([$Предупреждения.L46]));&quot;&quot;;[$Предупреждения.L46])">
            <text:p/>
          </table:table-cell>
          <table:table-cell table:formula="of:=IF((ISBLANK([$Предупреждения.$H46]))OR(ISBLANK([$Предупреждения.$I46]))OR(ISBLANK([$Предупреждения.M46]));&quot;&quot;;[$Предупреждения.M46])">
            <text:p/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47]))OR(ISBLANK([$Предупреждения.I47]));&quot;&quot;;CONCATENATE(&quot;rtd&quot;;[$Предупреждения.H47]))" office:value-type="string" office:string-value="rtdMaintenanceGroupFlag" calcext:value-type="string">
            <text:p>rtdMaintenanceGroupFlag</text:p>
          </table:table-cell>
          <table:table-cell table:style-name="ce103" table:formula="of:=IF((ISBLANK([$Предупреждения.H47]))OR(ISBLANK([$Предупреждения.I47]));&quot;&quot;;[$Предупреждения.I47])" office:value-type="float" office:value="3" calcext:value-type="float">
            <text:p>3</text:p>
          </table:table-cell>
          <table:table-cell table:formula="of:=IF((ISBLANK([$Предупреждения.H47]))OR(ISBLANK([$Предупреждения.I47]));&quot;&quot;;[$Предупреждения.E47])" office:value-type="string" office:string-value="MT_replaceLubOilInsideOfMotorBrg" calcext:value-type="string">
            <text:p>MT_replaceLubOilInsideOfMotorBrg</text:p>
          </table:table-cell>
          <table:table-cell table:formula="of:=IF((ISBLANK([$Предупреждения.$H47]))OR(ISBLANK([$Предупреждения.$I47]));&quot;&quot;;[$Предупреждения.F47])" office:value-type="string" office:string-value="ремонт заменить смазку подшипников двигателя" calcext:value-type="string">
            <text:p>ремонт заменить смазку подшипников двигателя</text:p>
          </table:table-cell>
          <table:table-cell table:formula="of:=IF((ISBLANK([$Предупреждения.$H47]))OR(ISBLANK([$Предупреждения.$I47]));&quot;&quot;;[$Предупреждения.G47])" office:value-type="string" office:string-value="Требуется обслуживание: заменить смазку подшипников двигателя" calcext:value-type="string">
            <text:p>Требуется обслуживание: заменить смазку подшипников двигателя</text:p>
          </table:table-cell>
          <table:table-cell table:formula="of:=IF((ISBLANK([$Предупреждения.$H47]))OR(ISBLANK([$Предупреждения.$I47]));&quot;&quot;;[$Предупреждения.J47])" office:value-type="string" office:string-value="Обслуживание : заменить масло в подшипниках двигателя  " calcext:value-type="string">
            <text:p>Обслуживание : заменить масло в подшипниках двигателя <text:s/></text:p>
          </table:table-cell>
          <table:table-cell table:formula="of:=IF((ISBLANK([$Предупреждения.$H47]))OR(ISBLANK([$Предупреждения.$I47]))OR(ISBLANK([$Предупреждения.K47]));&quot;&quot;;[$Предупреждения.K47])">
            <text:p/>
          </table:table-cell>
          <table:table-cell table:formula="of:=IF((ISBLANK([$Предупреждения.$H47]))OR(ISBLANK([$Предупреждения.$I47]))OR(ISBLANK([$Предупреждения.L47]));&quot;&quot;;[$Предупреждения.L47])">
            <text:p/>
          </table:table-cell>
          <table:table-cell table:formula="of:=IF((ISBLANK([$Предупреждения.$H47]))OR(ISBLANK([$Предупреждения.$I47]))OR(ISBLANK([$Предупреждения.M47]));&quot;&quot;;[$Предупреждения.M47])">
            <text:p/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48]))OR(ISBLANK([$Предупреждения.I48]));&quot;&quot;;CONCATENATE(&quot;rtd&quot;;[$Предупреждения.H48]))" office:value-type="string" office:string-value="rtdMaintenanceGroupFlag" calcext:value-type="string">
            <text:p>rtdMaintenanceGroupFlag</text:p>
          </table:table-cell>
          <table:table-cell table:style-name="ce103" table:formula="of:=IF((ISBLANK([$Предупреждения.H48]))OR(ISBLANK([$Предупреждения.I48]));&quot;&quot;;[$Предупреждения.I48])" office:value-type="float" office:value="4" calcext:value-type="float">
            <text:p>4</text:p>
          </table:table-cell>
          <table:table-cell table:formula="of:=IF((ISBLANK([$Предупреждения.H48]))OR(ISBLANK([$Предупреждения.I48]));&quot;&quot;;[$Предупреждения.E48])" office:value-type="string" office:string-value="MT_injectGreaseIntoTheMotorBrg" calcext:value-type="string">
            <text:p>MT_injectGreaseIntoTheMotorBrg</text:p>
          </table:table-cell>
          <table:table-cell table:formula="of:=IF((ISBLANK([$Предупреждения.$H48]))OR(ISBLANK([$Предупреждения.$I48]));&quot;&quot;;[$Предупреждения.F48])" office:value-type="string" office:string-value="ремонт смазать подшипники двигателя" calcext:value-type="string">
            <text:p>ремонт смазать подшипники двигателя</text:p>
          </table:table-cell>
          <table:table-cell table:formula="of:=IF((ISBLANK([$Предупреждения.$H48]))OR(ISBLANK([$Предупреждения.$I48]));&quot;&quot;;[$Предупреждения.G48])" office:value-type="string" office:string-value="Требуется обслуживание: смазать подшипники двигателя" calcext:value-type="string">
            <text:p>Требуется обслуживание: смазать подшипники двигателя</text:p>
          </table:table-cell>
          <table:table-cell table:formula="of:=IF((ISBLANK([$Предупреждения.$H48]))OR(ISBLANK([$Предупреждения.$I48]));&quot;&quot;;[$Предупреждения.J48])" office:value-type="string" office:string-value="Обслуживание : ввести смазку в подшипники двигателя  " calcext:value-type="string">
            <text:p>Обслуживание : ввести смазку в подшипники двигателя <text:s/></text:p>
          </table:table-cell>
          <table:table-cell table:formula="of:=IF((ISBLANK([$Предупреждения.$H48]))OR(ISBLANK([$Предупреждения.$I48]))OR(ISBLANK([$Предупреждения.K48]));&quot;&quot;;[$Предупреждения.K48])">
            <text:p/>
          </table:table-cell>
          <table:table-cell table:formula="of:=IF((ISBLANK([$Предупреждения.$H48]))OR(ISBLANK([$Предупреждения.$I48]))OR(ISBLANK([$Предупреждения.L48]));&quot;&quot;;[$Предупреждения.L48])">
            <text:p/>
          </table:table-cell>
          <table:table-cell table:formula="of:=IF((ISBLANK([$Предупреждения.$H48]))OR(ISBLANK([$Предупреждения.$I48]))OR(ISBLANK([$Предупреждения.M48]));&quot;&quot;;[$Предупреждения.M48])">
            <text:p/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49]))OR(ISBLANK([$Предупреждения.I49]));&quot;&quot;;CONCATENATE(&quot;rtd&quot;;[$Предупреждения.H49]))" office:value-type="string" office:string-value="rtdMaintenanceGroupFlag" calcext:value-type="string">
            <text:p>rtdMaintenanceGroupFlag</text:p>
          </table:table-cell>
          <table:table-cell table:style-name="ce103" table:formula="of:=IF((ISBLANK([$Предупреждения.H49]))OR(ISBLANK([$Предупреждения.I49]));&quot;&quot;;[$Предупреждения.I49])" office:value-type="float" office:value="5" calcext:value-type="float">
            <text:p>5</text:p>
          </table:table-cell>
          <table:table-cell table:formula="of:=IF((ISBLANK([$Предупреждения.H49]))OR(ISBLANK([$Предупреждения.I49]));&quot;&quot;;[$Предупреждения.E49])" office:value-type="string" office:string-value="MT_checkElectricIGV" calcext:value-type="string">
            <text:p>MT_checkElectricIGV</text:p>
          </table:table-cell>
          <table:table-cell table:formula="of:=IF((ISBLANK([$Предупреждения.$H49]))OR(ISBLANK([$Предупреждения.$I49]));&quot;&quot;;[$Предупреждения.F49])" office:value-type="string" office:string-value="ремонт проверить электрику напр.аппарата" calcext:value-type="string">
            <text:p>ремонт проверить электрику напр.аппарата</text:p>
          </table:table-cell>
          <table:table-cell table:formula="of:=IF((ISBLANK([$Предупреждения.$H49]))OR(ISBLANK([$Предупреждения.$I49]));&quot;&quot;;[$Предупреждения.G49])" office:value-type="string" office:string-value="Требуется обслуживание: проверить электрику направляющего аппарата" calcext:value-type="string">
            <text:p>Требуется обслуживание: проверить электрику направляющего аппарата</text:p>
          </table:table-cell>
          <table:table-cell table:formula="of:=IF((ISBLANK([$Предупреждения.$H49]))OR(ISBLANK([$Предупреждения.$I49]));&quot;&quot;;[$Предупреждения.J49])" office:value-type="string" office:string-value="Обслуживание : проверить электрику направляющего аппарата  " calcext:value-type="string">
            <text:p>Обслуживание : проверить электрику направляющего аппарата <text:s/></text:p>
          </table:table-cell>
          <table:table-cell table:formula="of:=IF((ISBLANK([$Предупреждения.$H49]))OR(ISBLANK([$Предупреждения.$I49]))OR(ISBLANK([$Предупреждения.K49]));&quot;&quot;;[$Предупреждения.K49])">
            <text:p/>
          </table:table-cell>
          <table:table-cell table:formula="of:=IF((ISBLANK([$Предупреждения.$H49]))OR(ISBLANK([$Предупреждения.$I49]))OR(ISBLANK([$Предупреждения.L49]));&quot;&quot;;[$Предупреждения.L49])">
            <text:p/>
          </table:table-cell>
          <table:table-cell table:formula="of:=IF((ISBLANK([$Предупреждения.$H49]))OR(ISBLANK([$Предупреждения.$I49]))OR(ISBLANK([$Предупреждения.M49]));&quot;&quot;;[$Предупреждения.M49])">
            <text:p/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50]))OR(ISBLANK([$Предупреждения.I50]));&quot;&quot;;CONCATENATE(&quot;rtd&quot;;[$Предупреждения.H50]))" office:value-type="string" office:string-value="rtdMaintenanceGroupFlag" calcext:value-type="string">
            <text:p>rtdMaintenanceGroupFlag</text:p>
          </table:table-cell>
          <table:table-cell table:style-name="ce103" table:formula="of:=IF((ISBLANK([$Предупреждения.H50]))OR(ISBLANK([$Предупреждения.I50]));&quot;&quot;;[$Предупреждения.I50])" office:value-type="float" office:value="6" calcext:value-type="float">
            <text:p>6</text:p>
          </table:table-cell>
          <table:table-cell table:formula="of:=IF((ISBLANK([$Предупреждения.H50]))OR(ISBLANK([$Предупреждения.I50]));&quot;&quot;;[$Предупреждения.E50])" office:value-type="string" office:string-value="MT_checkBOV_Assy" calcext:value-type="string">
            <text:p>MT_checkBOV_Assy</text:p>
          </table:table-cell>
          <table:table-cell table:formula="of:=IF((ISBLANK([$Предупреждения.$H50]))OR(ISBLANK([$Предупреждения.$I50]));&quot;&quot;;[$Предупреждения.F50])" office:value-type="string" office:string-value="ремонт проверить сборку помпажн.клапана" calcext:value-type="string">
            <text:p>ремонт проверить сборку помпажн.клапана</text:p>
          </table:table-cell>
          <table:table-cell table:formula="of:=IF((ISBLANK([$Предупреждения.$H50]))OR(ISBLANK([$Предупреждения.$I50]));&quot;&quot;;[$Предупреждения.G50])" office:value-type="string" office:string-value="Требуется обслуживание: проверить сборку помпажного клапана" calcext:value-type="string">
            <text:p>Требуется обслуживание: проверить сборку помпажного клапана</text:p>
          </table:table-cell>
          <table:table-cell table:formula="of:=IF((ISBLANK([$Предупреждения.$H50]))OR(ISBLANK([$Предупреждения.$I50]));&quot;&quot;;[$Предупреждения.J50])" office:value-type="string" office:string-value="Обслуживание : проверить сборку продувочного клапана  " calcext:value-type="string">
            <text:p>Обслуживание : проверить сборку продувочного клапана <text:s/></text:p>
          </table:table-cell>
          <table:table-cell table:formula="of:=IF((ISBLANK([$Предупреждения.$H50]))OR(ISBLANK([$Предупреждения.$I50]))OR(ISBLANK([$Предупреждения.K50]));&quot;&quot;;[$Предупреждения.K50])">
            <text:p/>
          </table:table-cell>
          <table:table-cell table:formula="of:=IF((ISBLANK([$Предупреждения.$H50]))OR(ISBLANK([$Предупреждения.$I50]))OR(ISBLANK([$Предупреждения.L50]));&quot;&quot;;[$Предупреждения.L50])">
            <text:p/>
          </table:table-cell>
          <table:table-cell table:formula="of:=IF((ISBLANK([$Предупреждения.$H50]))OR(ISBLANK([$Предупреждения.$I50]))OR(ISBLANK([$Предупреждения.M50]));&quot;&quot;;[$Предупреждения.M50])">
            <text:p/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51]))OR(ISBLANK([$Предупреждения.I51]));&quot;&quot;;CONCATENATE(&quot;rtd&quot;;[$Предупреждения.H51]))">
            <text:p/>
          </table:table-cell>
          <table:table-cell table:style-name="ce103" table:formula="of:=IF((ISBLANK([$Предупреждения.H51]))OR(ISBLANK([$Предупреждения.I51]));&quot;&quot;;[$Предупреждения.I51])">
            <text:p/>
          </table:table-cell>
          <table:table-cell table:formula="of:=IF((ISBLANK([$Предупреждения.H51]))OR(ISBLANK([$Предупреждения.I51]));&quot;&quot;;[$Предупреждения.E51])">
            <text:p/>
          </table:table-cell>
          <table:table-cell table:formula="of:=IF((ISBLANK([$Предупреждения.$H51]))OR(ISBLANK([$Предупреждения.$I51]));&quot;&quot;;[$Предупреждения.F51])">
            <text:p/>
          </table:table-cell>
          <table:table-cell table:formula="of:=IF((ISBLANK([$Предупреждения.$H51]))OR(ISBLANK([$Предупреждения.$I51]));&quot;&quot;;[$Предупреждения.G51])">
            <text:p/>
          </table:table-cell>
          <table:table-cell table:formula="of:=IF((ISBLANK([$Предупреждения.$H51]))OR(ISBLANK([$Предупреждения.$I51]));&quot;&quot;;[$Предупреждения.J51])">
            <text:p/>
          </table:table-cell>
          <table:table-cell table:formula="of:=IF((ISBLANK([$Предупреждения.$H51]))OR(ISBLANK([$Предупреждения.$I51]))OR(ISBLANK([$Предупреждения.K51]));&quot;&quot;;[$Предупреждения.K51])">
            <text:p/>
          </table:table-cell>
          <table:table-cell table:formula="of:=IF((ISBLANK([$Предупреждения.$H51]))OR(ISBLANK([$Предупреждения.$I51]))OR(ISBLANK([$Предупреждения.L51]));&quot;&quot;;[$Предупреждения.L51])">
            <text:p/>
          </table:table-cell>
          <table:table-cell table:formula="of:=IF((ISBLANK([$Предупреждения.$H51]))OR(ISBLANK([$Предупреждения.$I51]))OR(ISBLANK([$Предупреждения.M51]));&quot;&quot;;[$Предупреждения.M51])">
            <text:p/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52]))OR(ISBLANK([$Предупреждения.I52]));&quot;&quot;;CONCATENATE(&quot;rtd&quot;;[$Предупреждения.H52]))">
            <text:p/>
          </table:table-cell>
          <table:table-cell table:style-name="ce103" table:formula="of:=IF((ISBLANK([$Предупреждения.H52]))OR(ISBLANK([$Предупреждения.I52]));&quot;&quot;;[$Предупреждения.I52])">
            <text:p/>
          </table:table-cell>
          <table:table-cell table:formula="of:=IF((ISBLANK([$Предупреждения.H52]))OR(ISBLANK([$Предупреждения.I52]));&quot;&quot;;[$Предупреждения.E52])">
            <text:p/>
          </table:table-cell>
          <table:table-cell table:formula="of:=IF((ISBLANK([$Предупреждения.$H52]))OR(ISBLANK([$Предупреждения.$I52]));&quot;&quot;;[$Предупреждения.F52])">
            <text:p/>
          </table:table-cell>
          <table:table-cell table:formula="of:=IF((ISBLANK([$Предупреждения.$H52]))OR(ISBLANK([$Предупреждения.$I52]));&quot;&quot;;[$Предупреждения.G52])">
            <text:p/>
          </table:table-cell>
          <table:table-cell table:formula="of:=IF((ISBLANK([$Предупреждения.$H52]))OR(ISBLANK([$Предупреждения.$I52]));&quot;&quot;;[$Предупреждения.J52])">
            <text:p/>
          </table:table-cell>
          <table:table-cell table:formula="of:=IF((ISBLANK([$Предупреждения.$H52]))OR(ISBLANK([$Предупреждения.$I52]))OR(ISBLANK([$Предупреждения.K52]));&quot;&quot;;[$Предупреждения.K52])">
            <text:p/>
          </table:table-cell>
          <table:table-cell table:formula="of:=IF((ISBLANK([$Предупреждения.$H52]))OR(ISBLANK([$Предупреждения.$I52]))OR(ISBLANK([$Предупреждения.L52]));&quot;&quot;;[$Предупреждения.L52])">
            <text:p/>
          </table:table-cell>
          <table:table-cell table:formula="of:=IF((ISBLANK([$Предупреждения.$H52]))OR(ISBLANK([$Предупреждения.$I52]))OR(ISBLANK([$Предупреждения.M52]));&quot;&quot;;[$Предупреждения.M52])">
            <text:p/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53]))OR(ISBLANK([$Предупреждения.I53]));&quot;&quot;;CONCATENATE(&quot;rtd&quot;;[$Предупреждения.H53]))">
            <text:p/>
          </table:table-cell>
          <table:table-cell table:style-name="ce103" table:formula="of:=IF((ISBLANK([$Предупреждения.H53]))OR(ISBLANK([$Предупреждения.I53]));&quot;&quot;;[$Предупреждения.I53])">
            <text:p/>
          </table:table-cell>
          <table:table-cell table:formula="of:=IF((ISBLANK([$Предупреждения.H53]))OR(ISBLANK([$Предупреждения.I53]));&quot;&quot;;[$Предупреждения.E53])">
            <text:p/>
          </table:table-cell>
          <table:table-cell table:formula="of:=IF((ISBLANK([$Предупреждения.$H53]))OR(ISBLANK([$Предупреждения.$I53]));&quot;&quot;;[$Предупреждения.F53])">
            <text:p/>
          </table:table-cell>
          <table:table-cell table:formula="of:=IF((ISBLANK([$Предупреждения.$H53]))OR(ISBLANK([$Предупреждения.$I53]));&quot;&quot;;[$Предупреждения.G53])">
            <text:p/>
          </table:table-cell>
          <table:table-cell table:formula="of:=IF((ISBLANK([$Предупреждения.$H53]))OR(ISBLANK([$Предупреждения.$I53]));&quot;&quot;;[$Предупреждения.J53])">
            <text:p/>
          </table:table-cell>
          <table:table-cell table:formula="of:=IF((ISBLANK([$Предупреждения.$H53]))OR(ISBLANK([$Предупреждения.$I53]))OR(ISBLANK([$Предупреждения.K53]));&quot;&quot;;[$Предупреждения.K53])">
            <text:p/>
          </table:table-cell>
          <table:table-cell table:formula="of:=IF((ISBLANK([$Предупреждения.$H53]))OR(ISBLANK([$Предупреждения.$I53]))OR(ISBLANK([$Предупреждения.L53]));&quot;&quot;;[$Предупреждения.L53])">
            <text:p/>
          </table:table-cell>
          <table:table-cell table:formula="of:=IF((ISBLANK([$Предупреждения.$H53]))OR(ISBLANK([$Предупреждения.$I53]))OR(ISBLANK([$Предупреждения.M53]));&quot;&quot;;[$Предупреждения.M53])">
            <text:p/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54]))OR(ISBLANK([$Предупреждения.I54]));&quot;&quot;;CONCATENATE(&quot;rtd&quot;;[$Предупреждения.H54]))">
            <text:p/>
          </table:table-cell>
          <table:table-cell table:style-name="ce103" table:formula="of:=IF((ISBLANK([$Предупреждения.H54]))OR(ISBLANK([$Предупреждения.I54]));&quot;&quot;;[$Предупреждения.I54])">
            <text:p/>
          </table:table-cell>
          <table:table-cell table:formula="of:=IF((ISBLANK([$Предупреждения.H54]))OR(ISBLANK([$Предупреждения.I54]));&quot;&quot;;[$Предупреждения.E54])">
            <text:p/>
          </table:table-cell>
          <table:table-cell table:formula="of:=IF((ISBLANK([$Предупреждения.$H54]))OR(ISBLANK([$Предупреждения.$I54]));&quot;&quot;;[$Предупреждения.F54])">
            <text:p/>
          </table:table-cell>
          <table:table-cell table:formula="of:=IF((ISBLANK([$Предупреждения.$H54]))OR(ISBLANK([$Предупреждения.$I54]));&quot;&quot;;[$Предупреждения.G54])">
            <text:p/>
          </table:table-cell>
          <table:table-cell table:formula="of:=IF((ISBLANK([$Предупреждения.$H54]))OR(ISBLANK([$Предупреждения.$I54]));&quot;&quot;;[$Предупреждения.J54])">
            <text:p/>
          </table:table-cell>
          <table:table-cell table:formula="of:=IF((ISBLANK([$Предупреждения.$H54]))OR(ISBLANK([$Предупреждения.$I54]))OR(ISBLANK([$Предупреждения.K54]));&quot;&quot;;[$Предупреждения.K54])">
            <text:p/>
          </table:table-cell>
          <table:table-cell table:formula="of:=IF((ISBLANK([$Предупреждения.$H54]))OR(ISBLANK([$Предупреждения.$I54]))OR(ISBLANK([$Предупреждения.L54]));&quot;&quot;;[$Предупреждения.L54])">
            <text:p/>
          </table:table-cell>
          <table:table-cell table:formula="of:=IF((ISBLANK([$Предупреждения.$H54]))OR(ISBLANK([$Предупреждения.$I54]))OR(ISBLANK([$Предупреждения.M54]));&quot;&quot;;[$Предупреждения.M54])">
            <text:p/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55]))OR(ISBLANK([$Предупреждения.I55]));&quot;&quot;;CONCATENATE(&quot;rtd&quot;;[$Предупреждения.H55]))">
            <text:p/>
          </table:table-cell>
          <table:table-cell table:style-name="ce103" table:formula="of:=IF((ISBLANK([$Предупреждения.H55]))OR(ISBLANK([$Предупреждения.I55]));&quot;&quot;;[$Предупреждения.I55])">
            <text:p/>
          </table:table-cell>
          <table:table-cell table:formula="of:=IF((ISBLANK([$Предупреждения.H55]))OR(ISBLANK([$Предупреждения.I55]));&quot;&quot;;[$Предупреждения.E55])">
            <text:p/>
          </table:table-cell>
          <table:table-cell table:formula="of:=IF((ISBLANK([$Предупреждения.$H55]))OR(ISBLANK([$Предупреждения.$I55]));&quot;&quot;;[$Предупреждения.F55])">
            <text:p/>
          </table:table-cell>
          <table:table-cell table:formula="of:=IF((ISBLANK([$Предупреждения.$H55]))OR(ISBLANK([$Предупреждения.$I55]));&quot;&quot;;[$Предупреждения.G55])">
            <text:p/>
          </table:table-cell>
          <table:table-cell table:formula="of:=IF((ISBLANK([$Предупреждения.$H55]))OR(ISBLANK([$Предупреждения.$I55]));&quot;&quot;;[$Предупреждения.J55])">
            <text:p/>
          </table:table-cell>
          <table:table-cell table:formula="of:=IF((ISBLANK([$Предупреждения.$H55]))OR(ISBLANK([$Предупреждения.$I55]))OR(ISBLANK([$Предупреждения.K55]));&quot;&quot;;[$Предупреждения.K55])">
            <text:p/>
          </table:table-cell>
          <table:table-cell table:formula="of:=IF((ISBLANK([$Предупреждения.$H55]))OR(ISBLANK([$Предупреждения.$I55]))OR(ISBLANK([$Предупреждения.L55]));&quot;&quot;;[$Предупреждения.L55])">
            <text:p/>
          </table:table-cell>
          <table:table-cell table:formula="of:=IF((ISBLANK([$Предупреждения.$H55]))OR(ISBLANK([$Предупреждения.$I55]))OR(ISBLANK([$Предупреждения.M55]));&quot;&quot;;[$Предупреждения.M55])">
            <text:p/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56]))OR(ISBLANK([$Предупреждения.I56]));&quot;&quot;;CONCATENATE(&quot;rtd&quot;;[$Предупреждения.H56]))">
            <text:p/>
          </table:table-cell>
          <table:table-cell table:style-name="ce103" table:formula="of:=IF((ISBLANK([$Предупреждения.H56]))OR(ISBLANK([$Предупреждения.I56]));&quot;&quot;;[$Предупреждения.I56])">
            <text:p/>
          </table:table-cell>
          <table:table-cell table:formula="of:=IF((ISBLANK([$Предупреждения.H56]))OR(ISBLANK([$Предупреждения.I56]));&quot;&quot;;[$Предупреждения.E56])">
            <text:p/>
          </table:table-cell>
          <table:table-cell table:formula="of:=IF((ISBLANK([$Предупреждения.$H56]))OR(ISBLANK([$Предупреждения.$I56]));&quot;&quot;;[$Предупреждения.F56])">
            <text:p/>
          </table:table-cell>
          <table:table-cell table:formula="of:=IF((ISBLANK([$Предупреждения.$H56]))OR(ISBLANK([$Предупреждения.$I56]));&quot;&quot;;[$Предупреждения.G56])">
            <text:p/>
          </table:table-cell>
          <table:table-cell table:formula="of:=IF((ISBLANK([$Предупреждения.$H56]))OR(ISBLANK([$Предупреждения.$I56]));&quot;&quot;;[$Предупреждения.J56])">
            <text:p/>
          </table:table-cell>
          <table:table-cell table:formula="of:=IF((ISBLANK([$Предупреждения.$H56]))OR(ISBLANK([$Предупреждения.$I56]))OR(ISBLANK([$Предупреждения.K56]));&quot;&quot;;[$Предупреждения.K56])">
            <text:p/>
          </table:table-cell>
          <table:table-cell table:formula="of:=IF((ISBLANK([$Предупреждения.$H56]))OR(ISBLANK([$Предупреждения.$I56]))OR(ISBLANK([$Предупреждения.L56]));&quot;&quot;;[$Предупреждения.L56])">
            <text:p/>
          </table:table-cell>
          <table:table-cell table:formula="of:=IF((ISBLANK([$Предупреждения.$H56]))OR(ISBLANK([$Предупреждения.$I56]))OR(ISBLANK([$Предупреждения.M56]));&quot;&quot;;[$Предупреждения.M56])">
            <text:p/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57]))OR(ISBLANK([$Предупреждения.I57]));&quot;&quot;;CONCATENATE(&quot;rtd&quot;;[$Предупреждения.H57]))" office:value-type="string" office:string-value="rtdEventMessGroupFlag2" calcext:value-type="string">
            <text:p>rtdEventMessGroupFlag2</text:p>
          </table:table-cell>
          <table:table-cell table:style-name="ce103" table:formula="of:=IF((ISBLANK([$Предупреждения.H57]))OR(ISBLANK([$Предупреждения.I57]));&quot;&quot;;[$Предупреждения.I57])" office:value-type="float" office:value="8" calcext:value-type="float">
            <text:p>8</text:p>
          </table:table-cell>
          <table:table-cell table:formula="of:=IF((ISBLANK([$Предупреждения.H57]))OR(ISBLANK([$Предупреждения.I57]));&quot;&quot;;[$Предупреждения.E57])" office:value-type="string" office:string-value="SystemPressAnalogFault" calcext:value-type="string">
            <text:p>SystemPressAnalogFault</text:p>
          </table:table-cell>
          <table:table-cell table:formula="of:=IF((ISBLANK([$Предупреждения.$H57]))OR(ISBLANK([$Предупреждения.$I57]));&quot;&quot;;[$Предупреждения.F57])" office:value-type="string" office:string-value="вне диапазона системное давление" calcext:value-type="string">
            <text:p>вне диапазона системное давление</text:p>
          </table:table-cell>
          <table:table-cell table:formula="of:=IF((ISBLANK([$Предупреждения.$H57]))OR(ISBLANK([$Предупреждения.$I57]));&quot;&quot;;[$Предупреждения.G57])" office:value-type="string" office:string-value="Сигнал вне допустимого диапазона: системное давление" calcext:value-type="string">
            <text:p>Сигнал вне допустимого диапазона: системное давление</text:p>
          </table:table-cell>
          <table:table-cell table:formula="of:=IF((ISBLANK([$Предупреждения.$H57]))OR(ISBLANK([$Предупреждения.$I57]));&quot;&quot;;[$Предупреждения.J57])" office:value-type="string" office:string-value="Вне диапазона : Давление на напоре PT260 " calcext:value-type="string">
            <text:p>Вне диапазона : Давление на напоре PT260 </text:p>
          </table:table-cell>
          <table:table-cell table:formula="of:=IF((ISBLANK([$Предупреждения.$H57]))OR(ISBLANK([$Предупреждения.$I57]))OR(ISBLANK([$Предупреждения.K57]));&quot;&quot;;[$Предупреждения.K57])">
            <text:p/>
          </table:table-cell>
          <table:table-cell table:formula="of:=IF((ISBLANK([$Предупреждения.$H57]))OR(ISBLANK([$Предупреждения.$I57]))OR(ISBLANK([$Предупреждения.L57]));&quot;&quot;;[$Предупреждения.L57])" office:value-type="string" office:string-value="rtdOutRange" calcext:value-type="string">
            <text:p>rtdOutRange</text:p>
          </table:table-cell>
          <table:table-cell table:formula="of:=IF((ISBLANK([$Предупреждения.$H57]))OR(ISBLANK([$Предупреждения.$I57]))OR(ISBLANK([$Предупреждения.M57]));&quot;&quot;;[$Предупреждения.M57])" office:value-type="string" office:string-value="ai3_SystemPressure" calcext:value-type="string">
            <text:p>ai3_SystemPressure</text:p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58]))OR(ISBLANK([$Предупреждения.I58]));&quot;&quot;;CONCATENATE(&quot;rtd&quot;;[$Предупреждения.H58]))" office:value-type="string" office:string-value="rtdEventMessGroupFlag2" calcext:value-type="string">
            <text:p>rtdEventMessGroupFlag2</text:p>
          </table:table-cell>
          <table:table-cell table:style-name="ce103" table:formula="of:=IF((ISBLANK([$Предупреждения.H58]))OR(ISBLANK([$Предупреждения.I58]));&quot;&quot;;[$Предупреждения.I58])" office:value-type="float" office:value="9" calcext:value-type="float">
            <text:p>9</text:p>
          </table:table-cell>
          <table:table-cell table:formula="of:=IF((ISBLANK([$Предупреждения.H58]))OR(ISBLANK([$Предупреждения.I58]));&quot;&quot;;[$Предупреждения.E58])" office:value-type="string" office:string-value="DischPressAnalogFault" calcext:value-type="string">
            <text:p>DischPressAnalogFault</text:p>
          </table:table-cell>
          <table:table-cell table:formula="of:=IF((ISBLANK([$Предупреждения.$H58]))OR(ISBLANK([$Предупреждения.$I58]));&quot;&quot;;[$Предупреждения.F58])" office:value-type="string" office:string-value="вне диапазона давление на выходе" calcext:value-type="string">
            <text:p>вне диапазона давление на выходе</text:p>
          </table:table-cell>
          <table:table-cell table:formula="of:=IF((ISBLANK([$Предупреждения.$H58]))OR(ISBLANK([$Предупреждения.$I58]));&quot;&quot;;[$Предупреждения.G58])" office:value-type="string" office:string-value="Сигнал вне допустимого диапазона: давление на выходе" calcext:value-type="string">
            <text:p>Сигнал вне допустимого диапазона: давление на выходе</text:p>
          </table:table-cell>
          <table:table-cell table:formula="of:=IF((ISBLANK([$Предупреждения.$H58]))OR(ISBLANK([$Предупреждения.$I58]));&quot;&quot;;[$Предупреждения.J58])" office:value-type="string" office:string-value="Вне диапазона : Давление 3 ступени PT232 " calcext:value-type="string">
            <text:p>Вне диапазона : Давление 3 ступени PT232 </text:p>
          </table:table-cell>
          <table:table-cell table:formula="of:=IF((ISBLANK([$Предупреждения.$H58]))OR(ISBLANK([$Предупреждения.$I58]))OR(ISBLANK([$Предупреждения.K58]));&quot;&quot;;[$Предупреждения.K58])">
            <text:p/>
          </table:table-cell>
          <table:table-cell table:formula="of:=IF((ISBLANK([$Предупреждения.$H58]))OR(ISBLANK([$Предупреждения.$I58]))OR(ISBLANK([$Предупреждения.L58]));&quot;&quot;;[$Предупреждения.L58])" office:value-type="string" office:string-value="rtdOutRange" calcext:value-type="string">
            <text:p>rtdOutRange</text:p>
          </table:table-cell>
          <table:table-cell table:formula="of:=IF((ISBLANK([$Предупреждения.$H58]))OR(ISBLANK([$Предупреждения.$I58]))OR(ISBLANK([$Предупреждения.M58]));&quot;&quot;;[$Предупреждения.M58])" office:value-type="string" office:string-value="ai4_Stage3DischargePressure" calcext:value-type="string">
            <text:p>ai4_Stage3DischargePressure</text:p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59]))OR(ISBLANK([$Предупреждения.I59]));&quot;&quot;;CONCATENATE(&quot;rtd&quot;;[$Предупреждения.H59]))" office:value-type="string" office:string-value="rtdEventMessGroupFlag2" calcext:value-type="string">
            <text:p>rtdEventMessGroupFlag2</text:p>
          </table:table-cell>
          <table:table-cell table:style-name="ce103" table:formula="of:=IF((ISBLANK([$Предупреждения.H59]))OR(ISBLANK([$Предупреждения.I59]));&quot;&quot;;[$Предупреждения.I59])" office:value-type="float" office:value="10" calcext:value-type="float">
            <text:p>10</text:p>
          </table:table-cell>
          <table:table-cell table:formula="of:=IF((ISBLANK([$Предупреждения.H59]))OR(ISBLANK([$Предупреждения.I59]));&quot;&quot;;[$Предупреждения.E59])" office:value-type="string" office:string-value="OilSupplyPressAnalogFault" calcext:value-type="string">
            <text:p>OilSupplyPressAnalogFault</text:p>
          </table:table-cell>
          <table:table-cell table:formula="of:=IF((ISBLANK([$Предупреждения.$H59]))OR(ISBLANK([$Предупреждения.$I59]));&quot;&quot;;[$Предупреждения.F59])" office:value-type="string" office:string-value="вне диапазона давление масла" calcext:value-type="string">
            <text:p>вне диапазона давление масла</text:p>
          </table:table-cell>
          <table:table-cell table:formula="of:=IF((ISBLANK([$Предупреждения.$H59]))OR(ISBLANK([$Предупреждения.$I59]));&quot;&quot;;[$Предупреждения.G59])" office:value-type="string" office:string-value="Сигнал вне допустимого диапазона: давление масла" calcext:value-type="string">
            <text:p>Сигнал вне допустимого диапазона: давление масла</text:p>
          </table:table-cell>
          <table:table-cell table:formula="of:=IF((ISBLANK([$Предупреждения.$H59]))OR(ISBLANK([$Предупреждения.$I59]));&quot;&quot;;[$Предупреждения.J59])" office:value-type="string" office:string-value="Вне диапазона : Давление масла PT130 " calcext:value-type="string">
            <text:p>Вне диапазона : Давление масла PT130 </text:p>
          </table:table-cell>
          <table:table-cell table:formula="of:=IF((ISBLANK([$Предупреждения.$H59]))OR(ISBLANK([$Предупреждения.$I59]))OR(ISBLANK([$Предупреждения.K59]));&quot;&quot;;[$Предупреждения.K59])">
            <text:p/>
          </table:table-cell>
          <table:table-cell table:formula="of:=IF((ISBLANK([$Предупреждения.$H59]))OR(ISBLANK([$Предупреждения.$I59]))OR(ISBLANK([$Предупреждения.L59]));&quot;&quot;;[$Предупреждения.L59])" office:value-type="string" office:string-value="rtdOutRange" calcext:value-type="string">
            <text:p>rtdOutRange</text:p>
          </table:table-cell>
          <table:table-cell table:formula="of:=IF((ISBLANK([$Предупреждения.$H59]))OR(ISBLANK([$Предупреждения.$I59]))OR(ISBLANK([$Предупреждения.M59]));&quot;&quot;;[$Предупреждения.M59])" office:value-type="string" office:string-value="ai5_OilSupplyPressure" calcext:value-type="string">
            <text:p>ai5_OilSupplyPressure</text:p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60]))OR(ISBLANK([$Предупреждения.I60]));&quot;&quot;;CONCATENATE(&quot;rtd&quot;;[$Предупреждения.H60]))" office:value-type="string" office:string-value="rtdEventMessGroupFlag2" calcext:value-type="string">
            <text:p>rtdEventMessGroupFlag2</text:p>
          </table:table-cell>
          <table:table-cell table:style-name="ce103" table:formula="of:=IF((ISBLANK([$Предупреждения.H60]))OR(ISBLANK([$Предупреждения.I60]));&quot;&quot;;[$Предупреждения.I60])" office:value-type="float" office:value="11" calcext:value-type="float">
            <text:p>11</text:p>
          </table:table-cell>
          <table:table-cell table:formula="of:=IF((ISBLANK([$Предупреждения.H60]))OR(ISBLANK([$Предупреждения.I60]));&quot;&quot;;[$Предупреждения.E60])" office:value-type="string" office:string-value="Vib1AnalogFault" calcext:value-type="string">
            <text:p>Vib1AnalogFault</text:p>
          </table:table-cell>
          <table:table-cell table:formula="of:=IF((ISBLANK([$Предупреждения.$H60]))OR(ISBLANK([$Предупреждения.$I60]));&quot;&quot;;[$Предупреждения.F60])" office:value-type="string" office:string-value="вне диапазона вибрация 1" calcext:value-type="string">
            <text:p>вне диапазона вибрация 1</text:p>
          </table:table-cell>
          <table:table-cell table:formula="of:=IF((ISBLANK([$Предупреждения.$H60]))OR(ISBLANK([$Предупреждения.$I60]));&quot;&quot;;[$Предупреждения.G60])" office:value-type="string" office:string-value="Сигнал вне допустимого диапазона: вибрация 1" calcext:value-type="string">
            <text:p>Сигнал вне допустимого диапазона: вибрация 1</text:p>
          </table:table-cell>
          <table:table-cell table:formula="of:=IF((ISBLANK([$Предупреждения.$H60]))OR(ISBLANK([$Предупреждения.$I60]));&quot;&quot;;[$Предупреждения.J60])" office:value-type="string" office:string-value="Вне диапазона : Вибрация 1 ступени VT#1 " calcext:value-type="string">
            <text:p>Вне диапазона : Вибрация 1 ступени VT#1 </text:p>
          </table:table-cell>
          <table:table-cell table:formula="of:=IF((ISBLANK([$Предупреждения.$H60]))OR(ISBLANK([$Предупреждения.$I60]))OR(ISBLANK([$Предупреждения.K60]));&quot;&quot;;[$Предупреждения.K60])">
            <text:p/>
          </table:table-cell>
          <table:table-cell table:formula="of:=IF((ISBLANK([$Предупреждения.$H60]))OR(ISBLANK([$Предупреждения.$I60]))OR(ISBLANK([$Предупреждения.L60]));&quot;&quot;;[$Предупреждения.L60])" office:value-type="string" office:string-value="rtdOutRange" calcext:value-type="string">
            <text:p>rtdOutRange</text:p>
          </table:table-cell>
          <table:table-cell table:formula="of:=IF((ISBLANK([$Предупреждения.$H60]))OR(ISBLANK([$Предупреждения.$I60]))OR(ISBLANK([$Предупреждения.M60]));&quot;&quot;;[$Предупреждения.M60])" office:value-type="string" office:string-value="ai6_Stage1Vibration" calcext:value-type="string">
            <text:p>ai6_Stage1Vibration</text:p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61]))OR(ISBLANK([$Предупреждения.I61]));&quot;&quot;;CONCATENATE(&quot;rtd&quot;;[$Предупреждения.H61]))" office:value-type="string" office:string-value="rtdEventMessGroupFlag2" calcext:value-type="string">
            <text:p>rtdEventMessGroupFlag2</text:p>
          </table:table-cell>
          <table:table-cell table:style-name="ce103" table:formula="of:=IF((ISBLANK([$Предупреждения.H61]))OR(ISBLANK([$Предупреждения.I61]));&quot;&quot;;[$Предупреждения.I61])" office:value-type="float" office:value="12" calcext:value-type="float">
            <text:p>12</text:p>
          </table:table-cell>
          <table:table-cell table:formula="of:=IF((ISBLANK([$Предупреждения.H61]))OR(ISBLANK([$Предупреждения.I61]));&quot;&quot;;[$Предупреждения.E61])" office:value-type="string" office:string-value="Vib2AnalogFault" calcext:value-type="string">
            <text:p>Vib2AnalogFault</text:p>
          </table:table-cell>
          <table:table-cell table:formula="of:=IF((ISBLANK([$Предупреждения.$H61]))OR(ISBLANK([$Предупреждения.$I61]));&quot;&quot;;[$Предупреждения.F61])" office:value-type="string" office:string-value="вне диапазона вибрация 2" calcext:value-type="string">
            <text:p>вне диапазона вибрация 2</text:p>
          </table:table-cell>
          <table:table-cell table:formula="of:=IF((ISBLANK([$Предупреждения.$H61]))OR(ISBLANK([$Предупреждения.$I61]));&quot;&quot;;[$Предупреждения.G61])" office:value-type="string" office:string-value="Сигнал вне допустимого диапазона: вибрация 2" calcext:value-type="string">
            <text:p>Сигнал вне допустимого диапазона: вибрация 2</text:p>
          </table:table-cell>
          <table:table-cell table:formula="of:=IF((ISBLANK([$Предупреждения.$H61]))OR(ISBLANK([$Предупреждения.$I61]));&quot;&quot;;[$Предупреждения.J61])" office:value-type="string" office:string-value="Вне диапазона : Вибрация 2 ступени VT#2 " calcext:value-type="string">
            <text:p>Вне диапазона : Вибрация 2 ступени VT#2 </text:p>
          </table:table-cell>
          <table:table-cell table:formula="of:=IF((ISBLANK([$Предупреждения.$H61]))OR(ISBLANK([$Предупреждения.$I61]))OR(ISBLANK([$Предупреждения.K61]));&quot;&quot;;[$Предупреждения.K61])">
            <text:p/>
          </table:table-cell>
          <table:table-cell table:formula="of:=IF((ISBLANK([$Предупреждения.$H61]))OR(ISBLANK([$Предупреждения.$I61]))OR(ISBLANK([$Предупреждения.L61]));&quot;&quot;;[$Предупреждения.L61])" office:value-type="string" office:string-value="rtdOutRange" calcext:value-type="string">
            <text:p>rtdOutRange</text:p>
          </table:table-cell>
          <table:table-cell table:formula="of:=IF((ISBLANK([$Предупреждения.$H61]))OR(ISBLANK([$Предупреждения.$I61]))OR(ISBLANK([$Предупреждения.M61]));&quot;&quot;;[$Предупреждения.M61])" office:value-type="string" office:string-value="ai7_Stage2Vibration" calcext:value-type="string">
            <text:p>ai7_Stage2Vibration</text:p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62]))OR(ISBLANK([$Предупреждения.I62]));&quot;&quot;;CONCATENATE(&quot;rtd&quot;;[$Предупреждения.H62]))" office:value-type="string" office:string-value="rtdEventMessGroupFlag2" calcext:value-type="string">
            <text:p>rtdEventMessGroupFlag2</text:p>
          </table:table-cell>
          <table:table-cell table:style-name="ce103" table:formula="of:=IF((ISBLANK([$Предупреждения.H62]))OR(ISBLANK([$Предупреждения.I62]));&quot;&quot;;[$Предупреждения.I62])" office:value-type="float" office:value="13" calcext:value-type="float">
            <text:p>13</text:p>
          </table:table-cell>
          <table:table-cell table:formula="of:=IF((ISBLANK([$Предупреждения.H62]))OR(ISBLANK([$Предупреждения.I62]));&quot;&quot;;[$Предупреждения.E62])" office:value-type="string" office:string-value="Vib3AnalogFault" calcext:value-type="string">
            <text:p>Vib3AnalogFault</text:p>
          </table:table-cell>
          <table:table-cell table:formula="of:=IF((ISBLANK([$Предупреждения.$H62]))OR(ISBLANK([$Предупреждения.$I62]));&quot;&quot;;[$Предупреждения.F62])" office:value-type="string" office:string-value="вне диапазона вибрация 3" calcext:value-type="string">
            <text:p>вне диапазона вибрация 3</text:p>
          </table:table-cell>
          <table:table-cell table:formula="of:=IF((ISBLANK([$Предупреждения.$H62]))OR(ISBLANK([$Предупреждения.$I62]));&quot;&quot;;[$Предупреждения.G62])" office:value-type="string" office:string-value="Сигнал вне допустимого диапазона: вибрация 3" calcext:value-type="string">
            <text:p>Сигнал вне допустимого диапазона: вибрация 3</text:p>
          </table:table-cell>
          <table:table-cell table:formula="of:=IF((ISBLANK([$Предупреждения.$H62]))OR(ISBLANK([$Предупреждения.$I62]));&quot;&quot;;[$Предупреждения.J62])" office:value-type="string" office:string-value="Вне диапазона : Вибрация 3 ступени VT#3 " calcext:value-type="string">
            <text:p>Вне диапазона : Вибрация 3 ступени VT#3 </text:p>
          </table:table-cell>
          <table:table-cell table:formula="of:=IF((ISBLANK([$Предупреждения.$H62]))OR(ISBLANK([$Предупреждения.$I62]))OR(ISBLANK([$Предупреждения.K62]));&quot;&quot;;[$Предупреждения.K62])">
            <text:p/>
          </table:table-cell>
          <table:table-cell table:formula="of:=IF((ISBLANK([$Предупреждения.$H62]))OR(ISBLANK([$Предупреждения.$I62]))OR(ISBLANK([$Предупреждения.L62]));&quot;&quot;;[$Предупреждения.L62])" office:value-type="string" office:string-value="rtdOutRange" calcext:value-type="string">
            <text:p>rtdOutRange</text:p>
          </table:table-cell>
          <table:table-cell table:formula="of:=IF((ISBLANK([$Предупреждения.$H62]))OR(ISBLANK([$Предупреждения.$I62]))OR(ISBLANK([$Предупреждения.M62]));&quot;&quot;;[$Предупреждения.M62])" office:value-type="string" office:string-value="ai8_Stage3Vibration" calcext:value-type="string">
            <text:p>ai8_Stage3Vibration</text:p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63]))OR(ISBLANK([$Предупреждения.I63]));&quot;&quot;;CONCATENATE(&quot;rtd&quot;;[$Предупреждения.H63]))" office:value-type="string" office:string-value="rtdEventMessGroupFlag2" calcext:value-type="string">
            <text:p>rtdEventMessGroupFlag2</text:p>
          </table:table-cell>
          <table:table-cell table:style-name="ce103" table:formula="of:=IF((ISBLANK([$Предупреждения.H63]))OR(ISBLANK([$Предупреждения.I63]));&quot;&quot;;[$Предупреждения.I63])" office:value-type="float" office:value="14" calcext:value-type="float">
            <text:p>14</text:p>
          </table:table-cell>
          <table:table-cell table:formula="of:=IF((ISBLANK([$Предупреждения.H63]))OR(ISBLANK([$Предупреждения.I63]));&quot;&quot;;[$Предупреждения.E63])" office:value-type="string" office:string-value="OilFilterDiffPressAnalogFault" calcext:value-type="string">
            <text:p>OilFilterDiffPressAnalogFault</text:p>
          </table:table-cell>
          <table:table-cell table:formula="of:=IF((ISBLANK([$Предупреждения.$H63]))OR(ISBLANK([$Предупреждения.$I63]));&quot;&quot;;[$Предупреждения.F63])" office:value-type="string" office:string-value="вне диапазона перепад на маслофильтре" calcext:value-type="string">
            <text:p>вне диапазона перепад на маслофильтре</text:p>
          </table:table-cell>
          <table:table-cell table:formula="of:=IF((ISBLANK([$Предупреждения.$H63]))OR(ISBLANK([$Предупреждения.$I63]));&quot;&quot;;[$Предупреждения.G63])" office:value-type="string" office:string-value="Сигнал вне допустимого диапазона: перепад на маслофильтре" calcext:value-type="string">
            <text:p>Сигнал вне допустимого диапазона: перепад на маслофильтре</text:p>
          </table:table-cell>
          <table:table-cell table:formula="of:=IF((ISBLANK([$Предупреждения.$H63]))OR(ISBLANK([$Предупреждения.$I63]));&quot;&quot;;[$Предупреждения.J63])" office:value-type="string" office:string-value="Вне диапазона : Перепад давления масла на маслофильтре  PD120 " calcext:value-type="string">
            <text:p>Вне диапазона : Перепад давления масла на маслофильтре <text:s/>PD120 </text:p>
          </table:table-cell>
          <table:table-cell table:formula="of:=IF((ISBLANK([$Предупреждения.$H63]))OR(ISBLANK([$Предупреждения.$I63]))OR(ISBLANK([$Предупреждения.K63]));&quot;&quot;;[$Предупреждения.K63])">
            <text:p/>
          </table:table-cell>
          <table:table-cell table:formula="of:=IF((ISBLANK([$Предупреждения.$H63]))OR(ISBLANK([$Предупреждения.$I63]))OR(ISBLANK([$Предупреждения.L63]));&quot;&quot;;[$Предупреждения.L63])" office:value-type="string" office:string-value="rtdOutRange" calcext:value-type="string">
            <text:p>rtdOutRange</text:p>
          </table:table-cell>
          <table:table-cell table:formula="of:=IF((ISBLANK([$Предупреждения.$H63]))OR(ISBLANK([$Предупреждения.$I63]))OR(ISBLANK([$Предупреждения.M63]));&quot;&quot;;[$Предупреждения.M63])" office:value-type="string" office:string-value="ai9_OilFilterDiffPressure" calcext:value-type="string">
            <text:p>ai9_OilFilterDiffPressure</text:p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64]))OR(ISBLANK([$Предупреждения.I64]));&quot;&quot;;CONCATENATE(&quot;rtd&quot;;[$Предупреждения.H64]))" office:value-type="string" office:string-value="rtdEventMessGroupFlag2" calcext:value-type="string">
            <text:p>rtdEventMessGroupFlag2</text:p>
          </table:table-cell>
          <table:table-cell table:style-name="ce103" table:formula="of:=IF((ISBLANK([$Предупреждения.H64]))OR(ISBLANK([$Предупреждения.I64]));&quot;&quot;;[$Предупреждения.I64])" office:value-type="float" office:value="15" calcext:value-type="float">
            <text:p>15</text:p>
          </table:table-cell>
          <table:table-cell table:formula="of:=IF((ISBLANK([$Предупреждения.H64]))OR(ISBLANK([$Предупреждения.I64]));&quot;&quot;;[$Предупреждения.E64])" office:value-type="string" office:string-value="MotorCurrentAnalogFault" calcext:value-type="string">
            <text:p>MotorCurrentAnalogFault</text:p>
          </table:table-cell>
          <table:table-cell table:formula="of:=IF((ISBLANK([$Предупреждения.$H64]))OR(ISBLANK([$Предупреждения.$I64]));&quot;&quot;;[$Предупреждения.F64])" office:value-type="string" office:string-value="вне диапазона ток двигателя" calcext:value-type="string">
            <text:p>вне диапазона ток двигателя</text:p>
          </table:table-cell>
          <table:table-cell table:formula="of:=IF((ISBLANK([$Предупреждения.$H64]))OR(ISBLANK([$Предупреждения.$I64]));&quot;&quot;;[$Предупреждения.G64])" office:value-type="string" office:string-value="Сигнал вне допустимого диапазона: ток двигателя" calcext:value-type="string">
            <text:p>Сигнал вне допустимого диапазона: ток двигателя</text:p>
          </table:table-cell>
          <table:table-cell table:formula="of:=IF((ISBLANK([$Предупреждения.$H64]))OR(ISBLANK([$Предупреждения.$I64]));&quot;&quot;;[$Предупреждения.J64])" office:value-type="string" office:string-value="Вне диапазона : Ток двигателя TD240 " calcext:value-type="string">
            <text:p>Вне диапазона : Ток двигателя TD240 </text:p>
          </table:table-cell>
          <table:table-cell table:formula="of:=IF((ISBLANK([$Предупреждения.$H64]))OR(ISBLANK([$Предупреждения.$I64]))OR(ISBLANK([$Предупреждения.K64]));&quot;&quot;;[$Предупреждения.K64])">
            <text:p/>
          </table:table-cell>
          <table:table-cell table:formula="of:=IF((ISBLANK([$Предупреждения.$H64]))OR(ISBLANK([$Предупреждения.$I64]))OR(ISBLANK([$Предупреждения.L64]));&quot;&quot;;[$Предупреждения.L64])" office:value-type="string" office:string-value="rtdOutRange" calcext:value-type="string">
            <text:p>rtdOutRange</text:p>
          </table:table-cell>
          <table:table-cell table:formula="of:=IF((ISBLANK([$Предупреждения.$H64]))OR(ISBLANK([$Предупреждения.$I64]))OR(ISBLANK([$Предупреждения.M64]));&quot;&quot;;[$Предупреждения.M64])" office:value-type="string" office:string-value="ai10_MotorCurrent" calcext:value-type="string">
            <text:p>ai10_MotorCurrent</text:p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65]))OR(ISBLANK([$Предупреждения.I65]));&quot;&quot;;CONCATENATE(&quot;rtd&quot;;[$Предупреждения.H65]))" office:value-type="string" office:string-value="rtdEventMessGroupFlag2" calcext:value-type="string">
            <text:p>rtdEventMessGroupFlag2</text:p>
          </table:table-cell>
          <table:table-cell table:style-name="ce103" table:formula="of:=IF((ISBLANK([$Предупреждения.H65]))OR(ISBLANK([$Предупреждения.I65]));&quot;&quot;;[$Предупреждения.I65])" office:value-type="float" office:value="0" calcext:value-type="float">
            <text:p>0</text:p>
          </table:table-cell>
          <table:table-cell table:formula="of:=IF((ISBLANK([$Предупреждения.H65]))OR(ISBLANK([$Предупреждения.I65]));&quot;&quot;;[$Предупреждения.E65])" office:value-type="string" office:string-value="IgvSignalFault" calcext:value-type="string">
            <text:p>IgvSignalFault</text:p>
          </table:table-cell>
          <table:table-cell table:formula="of:=IF((ISBLANK([$Предупреждения.$H65]))OR(ISBLANK([$Предупреждения.$I65]));&quot;&quot;;[$Предупреждения.F65])" office:value-type="string" office:string-value="вне диапазона положение напр.аппарата" calcext:value-type="string">
            <text:p>вне диапазона положение напр.аппарата</text:p>
          </table:table-cell>
          <table:table-cell table:formula="of:=IF((ISBLANK([$Предупреждения.$H65]))OR(ISBLANK([$Предупреждения.$I65]));&quot;&quot;;[$Предупреждения.G65])" office:value-type="string" office:string-value="Сигнал вне допустимого диапазона: положение направляющего аппарата" calcext:value-type="string">
            <text:p>Сигнал вне допустимого диапазона: положение направляющего аппарата</text:p>
          </table:table-cell>
          <table:table-cell table:formula="of:=IF((ISBLANK([$Предупреждения.$H65]))OR(ISBLANK([$Предупреждения.$I65]));&quot;&quot;;[$Предупреждения.J65])" office:value-type="string" office:string-value="Вне диапазона : Положение направляющего аппарата IGV " calcext:value-type="string">
            <text:p>Вне диапазона : Положение направляющего аппарата IGV </text:p>
          </table:table-cell>
          <table:table-cell table:formula="of:=IF((ISBLANK([$Предупреждения.$H65]))OR(ISBLANK([$Предупреждения.$I65]))OR(ISBLANK([$Предупреждения.K65]));&quot;&quot;;[$Предупреждения.K65])">
            <text:p/>
          </table:table-cell>
          <table:table-cell table:formula="of:=IF((ISBLANK([$Предупреждения.$H65]))OR(ISBLANK([$Предупреждения.$I65]))OR(ISBLANK([$Предупреждения.L65]));&quot;&quot;;[$Предупреждения.L65])" office:value-type="string" office:string-value="rtdOutRange" calcext:value-type="string">
            <text:p>rtdOutRange</text:p>
          </table:table-cell>
          <table:table-cell table:formula="of:=IF((ISBLANK([$Предупреждения.$H65]))OR(ISBLANK([$Предупреждения.$I65]))OR(ISBLANK([$Предупреждения.M65]));&quot;&quot;;[$Предупреждения.M65])" office:value-type="string" office:string-value="ai1_IGVPosition" calcext:value-type="string">
            <text:p>ai1_IGVPosition</text:p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66]))OR(ISBLANK([$Предупреждения.I66]));&quot;&quot;;CONCATENATE(&quot;rtd&quot;;[$Предупреждения.H66]))">
            <text:p/>
          </table:table-cell>
          <table:table-cell table:style-name="ce103" table:formula="of:=IF((ISBLANK([$Предупреждения.H66]))OR(ISBLANK([$Предупреждения.I66]));&quot;&quot;;[$Предупреждения.I66])">
            <text:p/>
          </table:table-cell>
          <table:table-cell table:formula="of:=IF((ISBLANK([$Предупреждения.H66]))OR(ISBLANK([$Предупреждения.I66]));&quot;&quot;;[$Предупреждения.E66])">
            <text:p/>
          </table:table-cell>
          <table:table-cell table:formula="of:=IF((ISBLANK([$Предупреждения.$H66]))OR(ISBLANK([$Предупреждения.$I66]));&quot;&quot;;[$Предупреждения.F66])">
            <text:p/>
          </table:table-cell>
          <table:table-cell table:formula="of:=IF((ISBLANK([$Предупреждения.$H66]))OR(ISBLANK([$Предупреждения.$I66]));&quot;&quot;;[$Предупреждения.G66])">
            <text:p/>
          </table:table-cell>
          <table:table-cell table:formula="of:=IF((ISBLANK([$Предупреждения.$H66]))OR(ISBLANK([$Предупреждения.$I66]));&quot;&quot;;[$Предупреждения.J66])">
            <text:p/>
          </table:table-cell>
          <table:table-cell table:formula="of:=IF((ISBLANK([$Предупреждения.$H66]))OR(ISBLANK([$Предупреждения.$I66]))OR(ISBLANK([$Предупреждения.K66]));&quot;&quot;;[$Предупреждения.K66])">
            <text:p/>
          </table:table-cell>
          <table:table-cell table:formula="of:=IF((ISBLANK([$Предупреждения.$H66]))OR(ISBLANK([$Предупреждения.$I66]))OR(ISBLANK([$Предупреждения.L66]));&quot;&quot;;[$Предупреждения.L66])">
            <text:p/>
          </table:table-cell>
          <table:table-cell table:formula="of:=IF((ISBLANK([$Предупреждения.$H66]))OR(ISBLANK([$Предупреждения.$I66]))OR(ISBLANK([$Предупреждения.M66]));&quot;&quot;;[$Предупреждения.M66])">
            <text:p/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67]))OR(ISBLANK([$Предупреждения.I67]));&quot;&quot;;CONCATENATE(&quot;rtd&quot;;[$Предупреждения.H67]))">
            <text:p/>
          </table:table-cell>
          <table:table-cell table:style-name="ce103" table:formula="of:=IF((ISBLANK([$Предупреждения.H67]))OR(ISBLANK([$Предупреждения.I67]));&quot;&quot;;[$Предупреждения.I67])">
            <text:p/>
          </table:table-cell>
          <table:table-cell table:formula="of:=IF((ISBLANK([$Предупреждения.H67]))OR(ISBLANK([$Предупреждения.I67]));&quot;&quot;;[$Предупреждения.E67])">
            <text:p/>
          </table:table-cell>
          <table:table-cell table:formula="of:=IF((ISBLANK([$Предупреждения.$H67]))OR(ISBLANK([$Предупреждения.$I67]));&quot;&quot;;[$Предупреждения.F67])">
            <text:p/>
          </table:table-cell>
          <table:table-cell table:formula="of:=IF((ISBLANK([$Предупреждения.$H67]))OR(ISBLANK([$Предупреждения.$I67]));&quot;&quot;;[$Предупреждения.G67])">
            <text:p/>
          </table:table-cell>
          <table:table-cell table:formula="of:=IF((ISBLANK([$Предупреждения.$H67]))OR(ISBLANK([$Предупреждения.$I67]));&quot;&quot;;[$Предупреждения.J67])">
            <text:p/>
          </table:table-cell>
          <table:table-cell table:formula="of:=IF((ISBLANK([$Предупреждения.$H67]))OR(ISBLANK([$Предупреждения.$I67]))OR(ISBLANK([$Предупреждения.K67]));&quot;&quot;;[$Предупреждения.K67])">
            <text:p/>
          </table:table-cell>
          <table:table-cell table:formula="of:=IF((ISBLANK([$Предупреждения.$H67]))OR(ISBLANK([$Предупреждения.$I67]))OR(ISBLANK([$Предупреждения.L67]));&quot;&quot;;[$Предупреждения.L67])">
            <text:p/>
          </table:table-cell>
          <table:table-cell table:formula="of:=IF((ISBLANK([$Предупреждения.$H67]))OR(ISBLANK([$Предупреждения.$I67]))OR(ISBLANK([$Предупреждения.M67]));&quot;&quot;;[$Предупреждения.M67])">
            <text:p/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68]))OR(ISBLANK([$Предупреждения.I68]));&quot;&quot;;CONCATENATE(&quot;rtd&quot;;[$Предупреждения.H68]))">
            <text:p/>
          </table:table-cell>
          <table:table-cell table:style-name="ce103" table:formula="of:=IF((ISBLANK([$Предупреждения.H68]))OR(ISBLANK([$Предупреждения.I68]));&quot;&quot;;[$Предупреждения.I68])">
            <text:p/>
          </table:table-cell>
          <table:table-cell table:formula="of:=IF((ISBLANK([$Предупреждения.H68]))OR(ISBLANK([$Предупреждения.I68]));&quot;&quot;;[$Предупреждения.E68])">
            <text:p/>
          </table:table-cell>
          <table:table-cell table:formula="of:=IF((ISBLANK([$Предупреждения.$H68]))OR(ISBLANK([$Предупреждения.$I68]));&quot;&quot;;[$Предупреждения.F68])">
            <text:p/>
          </table:table-cell>
          <table:table-cell table:formula="of:=IF((ISBLANK([$Предупреждения.$H68]))OR(ISBLANK([$Предупреждения.$I68]));&quot;&quot;;[$Предупреждения.G68])">
            <text:p/>
          </table:table-cell>
          <table:table-cell table:formula="of:=IF((ISBLANK([$Предупреждения.$H68]))OR(ISBLANK([$Предупреждения.$I68]));&quot;&quot;;[$Предупреждения.J68])">
            <text:p/>
          </table:table-cell>
          <table:table-cell table:formula="of:=IF((ISBLANK([$Предупреждения.$H68]))OR(ISBLANK([$Предупреждения.$I68]))OR(ISBLANK([$Предупреждения.K68]));&quot;&quot;;[$Предупреждения.K68])">
            <text:p/>
          </table:table-cell>
          <table:table-cell table:formula="of:=IF((ISBLANK([$Предупреждения.$H68]))OR(ISBLANK([$Предупреждения.$I68]))OR(ISBLANK([$Предупреждения.L68]));&quot;&quot;;[$Предупреждения.L68])">
            <text:p/>
          </table:table-cell>
          <table:table-cell table:formula="of:=IF((ISBLANK([$Предупреждения.$H68]))OR(ISBLANK([$Предупреждения.$I68]))OR(ISBLANK([$Предупреждения.M68]));&quot;&quot;;[$Предупреждения.M68])">
            <text:p/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69]))OR(ISBLANK([$Предупреждения.I69]));&quot;&quot;;CONCATENATE(&quot;rtd&quot;;[$Предупреждения.H69]))" office:value-type="string" office:string-value="rtdEventMessGroupFlag2" calcext:value-type="string">
            <text:p>rtdEventMessGroupFlag2</text:p>
          </table:table-cell>
          <table:table-cell table:style-name="ce103" table:formula="of:=IF((ISBLANK([$Предупреждения.H69]))OR(ISBLANK([$Предупреждения.I69]));&quot;&quot;;[$Предупреждения.I69])" office:value-type="float" office:value="4" calcext:value-type="float">
            <text:p>4</text:p>
          </table:table-cell>
          <table:table-cell table:formula="of:=IF((ISBLANK([$Предупреждения.H69]))OR(ISBLANK([$Предупреждения.I69]));&quot;&quot;;[$Предупреждения.E69])" office:value-type="string" office:string-value="MotorBearingDriveEndVibration" calcext:value-type="string">
            <text:p>MotorBearingDriveEndVibration</text:p>
          </table:table-cell>
          <table:table-cell table:formula="of:=IF((ISBLANK([$Предупреждения.$H69]))OR(ISBLANK([$Предупреждения.$I69]));&quot;&quot;;[$Предупреждения.F69])" office:value-type="string" office:string-value="вне диапазона вибрация двигателя со стороны редуктора" calcext:value-type="string">
            <text:p>вне диапазона вибрация двигателя со стороны редуктора</text:p>
          </table:table-cell>
          <table:table-cell table:formula="of:=IF((ISBLANK([$Предупреждения.$H69]))OR(ISBLANK([$Предупреждения.$I69]));&quot;&quot;;[$Предупреждения.G69])" office:value-type="string" office:string-value="Сигнал вне допустимого диапазона: вибрация двигателя со стороны редуктора" calcext:value-type="string">
            <text:p>Сигнал вне допустимого диапазона: вибрация двигателя со стороны редуктора</text:p>
          </table:table-cell>
          <table:table-cell table:formula="of:=IF((ISBLANK([$Предупреждения.$H69]))OR(ISBLANK([$Предупреждения.$I69]));&quot;&quot;;[$Предупреждения.J69])" office:value-type="string" office:string-value="Вне диапазона : Вибрация двигателя со стороны редуктора VT5 " calcext:value-type="string">
            <text:p>Вне диапазона : Вибрация двигателя со стороны редуктора VT5 </text:p>
          </table:table-cell>
          <table:table-cell table:formula="of:=IF((ISBLANK([$Предупреждения.$H69]))OR(ISBLANK([$Предупреждения.$I69]))OR(ISBLANK([$Предупреждения.K69]));&quot;&quot;;[$Предупреждения.K69])">
            <text:p/>
          </table:table-cell>
          <table:table-cell table:formula="of:=IF((ISBLANK([$Предупреждения.$H69]))OR(ISBLANK([$Предупреждения.$I69]))OR(ISBLANK([$Предупреждения.L69]));&quot;&quot;;[$Предупреждения.L69])" office:value-type="string" office:string-value="rtdOutRange" calcext:value-type="string">
            <text:p>rtdOutRange</text:p>
          </table:table-cell>
          <table:table-cell table:formula="of:=IF((ISBLANK([$Предупреждения.$H69]))OR(ISBLANK([$Предупреждения.$I69]))OR(ISBLANK([$Предупреждения.M69]));&quot;&quot;;[$Предупреждения.M69])" office:value-type="string" office:string-value="ai12_MotorBearingDEVibration" calcext:value-type="string">
            <text:p>ai12_MotorBearingDEVibration</text:p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70]))OR(ISBLANK([$Предупреждения.I70]));&quot;&quot;;CONCATENATE(&quot;rtd&quot;;[$Предупреждения.H70]))" office:value-type="string" office:string-value="rtdEventMessGroupFlag2" calcext:value-type="string">
            <text:p>rtdEventMessGroupFlag2</text:p>
          </table:table-cell>
          <table:table-cell table:style-name="ce103" table:formula="of:=IF((ISBLANK([$Предупреждения.H70]))OR(ISBLANK([$Предупреждения.I70]));&quot;&quot;;[$Предупреждения.I70])" office:value-type="float" office:value="5" calcext:value-type="float">
            <text:p>5</text:p>
          </table:table-cell>
          <table:table-cell table:formula="of:=IF((ISBLANK([$Предупреждения.H70]))OR(ISBLANK([$Предупреждения.I70]));&quot;&quot;;[$Предупреждения.E70])" office:value-type="string" office:string-value="MotorBearingNonDriveEndVibration" calcext:value-type="string">
            <text:p>MotorBearingNonDriveEndVibration</text:p>
          </table:table-cell>
          <table:table-cell table:formula="of:=IF((ISBLANK([$Предупреждения.$H70]))OR(ISBLANK([$Предупреждения.$I70]));&quot;&quot;;[$Предупреждения.F70])" office:value-type="string" office:string-value="вне диапазона вибрация двигателя с глухого конца" calcext:value-type="string">
            <text:p>вне диапазона вибрация двигателя с глухого конца</text:p>
          </table:table-cell>
          <table:table-cell table:formula="of:=IF((ISBLANK([$Предупреждения.$H70]))OR(ISBLANK([$Предупреждения.$I70]));&quot;&quot;;[$Предупреждения.G70])" office:value-type="string" office:string-value="Сигнал вне допустимого диапазона: вибрация двигателя с глухого конца" calcext:value-type="string">
            <text:p>Сигнал вне допустимого диапазона: вибрация двигателя с глухого конца</text:p>
          </table:table-cell>
          <table:table-cell table:formula="of:=IF((ISBLANK([$Предупреждения.$H70]))OR(ISBLANK([$Предупреждения.$I70]));&quot;&quot;;[$Предупреждения.J70])" office:value-type="string" office:string-value="Вне диапазона : Вибрация двигателя с глухого конца VT6 " calcext:value-type="string">
            <text:p>Вне диапазона : Вибрация двигателя с глухого конца VT6 </text:p>
          </table:table-cell>
          <table:table-cell table:formula="of:=IF((ISBLANK([$Предупреждения.$H70]))OR(ISBLANK([$Предупреждения.$I70]))OR(ISBLANK([$Предупреждения.K70]));&quot;&quot;;[$Предупреждения.K70])">
            <text:p/>
          </table:table-cell>
          <table:table-cell table:formula="of:=IF((ISBLANK([$Предупреждения.$H70]))OR(ISBLANK([$Предупреждения.$I70]))OR(ISBLANK([$Предупреждения.L70]));&quot;&quot;;[$Предупреждения.L70])" office:value-type="string" office:string-value="rtdOutRange" calcext:value-type="string">
            <text:p>rtdOutRange</text:p>
          </table:table-cell>
          <table:table-cell table:formula="of:=IF((ISBLANK([$Предупреждения.$H70]))OR(ISBLANK([$Предупреждения.$I70]))OR(ISBLANK([$Предупреждения.M70]));&quot;&quot;;[$Предупреждения.M70])" office:value-type="string" office:string-value="ai13_MotorBearingNDEVibration" calcext:value-type="string">
            <text:p>ai13_MotorBearingNDEVibration</text:p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71]))OR(ISBLANK([$Предупреждения.I71]));&quot;&quot;;CONCATENATE(&quot;rtd&quot;;[$Предупреждения.H71]))" office:value-type="string" office:string-value="rtdEventMessGroupFlag2" calcext:value-type="string">
            <text:p>rtdEventMessGroupFlag2</text:p>
          </table:table-cell>
          <table:table-cell table:style-name="ce103" table:formula="of:=IF((ISBLANK([$Предупреждения.H71]))OR(ISBLANK([$Предупреждения.I71]));&quot;&quot;;[$Предупреждения.I71])" office:value-type="float" office:value="6" calcext:value-type="float">
            <text:p>6</text:p>
          </table:table-cell>
          <table:table-cell table:formula="of:=IF((ISBLANK([$Предупреждения.H71]))OR(ISBLANK([$Предупреждения.I71]));&quot;&quot;;[$Предупреждения.E71])" office:value-type="string" office:string-value="CoolingWaterInletPressAnalogFault" calcext:value-type="string">
            <text:p>CoolingWaterInletPressAnalogFault</text:p>
          </table:table-cell>
          <table:table-cell table:formula="of:=IF((ISBLANK([$Предупреждения.$H71]))OR(ISBLANK([$Предупреждения.$I71]));&quot;&quot;;[$Предупреждения.F71])" office:value-type="string" office:string-value="вне диапазона давление охлаждающей воды" calcext:value-type="string">
            <text:p>вне диапазона давление охлаждающей воды</text:p>
          </table:table-cell>
          <table:table-cell table:formula="of:=IF((ISBLANK([$Предупреждения.$H71]))OR(ISBLANK([$Предупреждения.$I71]));&quot;&quot;;[$Предупреждения.G71])" office:value-type="string" office:string-value="Сигнал вне допустимого диапазона: давление на подаче охлаждающей воды" calcext:value-type="string">
            <text:p>Сигнал вне допустимого диапазона: давление на подаче охлаждающей воды</text:p>
          </table:table-cell>
          <table:table-cell table:formula="of:=IF((ISBLANK([$Предупреждения.$H71]))OR(ISBLANK([$Предупреждения.$I71]));&quot;&quot;;[$Предупреждения.J71])" office:value-type="string" office:string-value="Вне диапазона : Давление воды PT301 " calcext:value-type="string">
            <text:p>Вне диапазона : Давление воды PT301 </text:p>
          </table:table-cell>
          <table:table-cell table:formula="of:=IF((ISBLANK([$Предупреждения.$H71]))OR(ISBLANK([$Предупреждения.$I71]))OR(ISBLANK([$Предупреждения.K71]));&quot;&quot;;[$Предупреждения.K71])">
            <text:p/>
          </table:table-cell>
          <table:table-cell table:formula="of:=IF((ISBLANK([$Предупреждения.$H71]))OR(ISBLANK([$Предупреждения.$I71]))OR(ISBLANK([$Предупреждения.L71]));&quot;&quot;;[$Предупреждения.L71])" office:value-type="string" office:string-value="rtdOutRange" calcext:value-type="string">
            <text:p>rtdOutRange</text:p>
          </table:table-cell>
          <table:table-cell table:formula="of:=IF((ISBLANK([$Предупреждения.$H71]))OR(ISBLANK([$Предупреждения.$I71]))OR(ISBLANK([$Предупреждения.M71]));&quot;&quot;;[$Предупреждения.M71])" office:value-type="string" office:string-value="ai11_CoolingWaterSupplyPressure" calcext:value-type="string">
            <text:p>ai11_CoolingWaterSupplyPressure</text:p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72]))OR(ISBLANK([$Предупреждения.I72]));&quot;&quot;;CONCATENATE(&quot;rtd&quot;;[$Предупреждения.H72]))" office:value-type="string" office:string-value="rtdEventMessGroupFlag3" calcext:value-type="string">
            <text:p>rtdEventMessGroupFlag3</text:p>
          </table:table-cell>
          <table:table-cell table:style-name="ce103" table:formula="of:=IF((ISBLANK([$Предупреждения.H72]))OR(ISBLANK([$Предупреждения.I72]));&quot;&quot;;[$Предупреждения.I72])" office:value-type="float" office:value="8" calcext:value-type="float">
            <text:p>8</text:p>
          </table:table-cell>
          <table:table-cell table:formula="of:=IF((ISBLANK([$Предупреждения.H72]))OR(ISBLANK([$Предупреждения.I72]));&quot;&quot;;[$Предупреждения.E72])" office:value-type="string" office:string-value="OilSupplyTempSignalFault" calcext:value-type="string">
            <text:p>OilSupplyTempSignalFault</text:p>
          </table:table-cell>
          <table:table-cell table:formula="of:=IF((ISBLANK([$Предупреждения.$H72]))OR(ISBLANK([$Предупреждения.$I72]));&quot;&quot;;[$Предупреждения.F72])" office:value-type="string" office:string-value="вне диапазона температура масла" calcext:value-type="string">
            <text:p>вне диапазона температура масла</text:p>
          </table:table-cell>
          <table:table-cell table:formula="of:=IF((ISBLANK([$Предупреждения.$H72]))OR(ISBLANK([$Предупреждения.$I72]));&quot;&quot;;[$Предупреждения.G72])" office:value-type="string" office:string-value="Сигнал вне допустимого диапазона: температура масла" calcext:value-type="string">
            <text:p>Сигнал вне допустимого диапазона: температура масла</text:p>
          </table:table-cell>
          <table:table-cell table:formula="of:=IF((ISBLANK([$Предупреждения.$H72]))OR(ISBLANK([$Предупреждения.$I72]));&quot;&quot;;[$Предупреждения.J72])" office:value-type="string" office:string-value="Вне диапазона : Температура масла TE130 " calcext:value-type="string">
            <text:p>Вне диапазона : Температура масла TE130 </text:p>
          </table:table-cell>
          <table:table-cell table:formula="of:=IF((ISBLANK([$Предупреждения.$H72]))OR(ISBLANK([$Предупреждения.$I72]))OR(ISBLANK([$Предупреждения.K72]));&quot;&quot;;[$Предупреждения.K72])">
            <text:p/>
          </table:table-cell>
          <table:table-cell table:formula="of:=IF((ISBLANK([$Предупреждения.$H72]))OR(ISBLANK([$Предупреждения.$I72]))OR(ISBLANK([$Предупреждения.L72]));&quot;&quot;;[$Предупреждения.L72])" office:value-type="string" office:string-value="rtdOutRange" calcext:value-type="string">
            <text:p>rtdOutRange</text:p>
          </table:table-cell>
          <table:table-cell table:formula="of:=IF((ISBLANK([$Предупреждения.$H72]))OR(ISBLANK([$Предупреждения.$I72]))OR(ISBLANK([$Предупреждения.M72]));&quot;&quot;;[$Предупреждения.M72])" office:value-type="string" office:string-value="ai14_OilSupplyTemperature" calcext:value-type="string">
            <text:p>ai14_OilSupplyTemperature</text:p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73]))OR(ISBLANK([$Предупреждения.I73]));&quot;&quot;;CONCATENATE(&quot;rtd&quot;;[$Предупреждения.H73]))" office:value-type="string" office:string-value="rtdEventMessGroupFlag3" calcext:value-type="string">
            <text:p>rtdEventMessGroupFlag3</text:p>
          </table:table-cell>
          <table:table-cell table:style-name="ce103" table:formula="of:=IF((ISBLANK([$Предупреждения.H73]))OR(ISBLANK([$Предупреждения.I73]));&quot;&quot;;[$Предупреждения.I73])" office:value-type="float" office:value="9" calcext:value-type="float">
            <text:p>9</text:p>
          </table:table-cell>
          <table:table-cell table:formula="of:=IF((ISBLANK([$Предупреждения.H73]))OR(ISBLANK([$Предупреждения.I73]));&quot;&quot;;[$Предупреждения.E73])" office:value-type="string" office:string-value="Num3InletTempSignalFault" calcext:value-type="string">
            <text:p>Num3InletTempSignalFault</text:p>
          </table:table-cell>
          <table:table-cell table:formula="of:=IF((ISBLANK([$Предупреждения.$H73]))OR(ISBLANK([$Предупреждения.$I73]));&quot;&quot;;[$Предупреждения.F73])" office:value-type="string" office:string-value="вне диапазона температура входа ступени 3" calcext:value-type="string">
            <text:p>вне диапазона температура входа ступени 3</text:p>
          </table:table-cell>
          <table:table-cell table:formula="of:=IF((ISBLANK([$Предупреждения.$H73]))OR(ISBLANK([$Предупреждения.$I73]));&quot;&quot;;[$Предупреждения.G73])" office:value-type="string" office:string-value="Сигнал вне допустимого диапазона: температура на входе ступени 3" calcext:value-type="string">
            <text:p>Сигнал вне допустимого диапазона: температура на входе ступени 3</text:p>
          </table:table-cell>
          <table:table-cell table:formula="of:=IF((ISBLANK([$Предупреждения.$H73]))OR(ISBLANK([$Предупреждения.$I73]));&quot;&quot;;[$Предупреждения.J73])" office:value-type="string" office:string-value="Вне диапазона : Температура воздуха на входе 3 ступени TE231 " calcext:value-type="string">
            <text:p>Вне диапазона : Температура воздуха на входе 3 ступени TE231 </text:p>
          </table:table-cell>
          <table:table-cell table:formula="of:=IF((ISBLANK([$Предупреждения.$H73]))OR(ISBLANK([$Предупреждения.$I73]))OR(ISBLANK([$Предупреждения.K73]));&quot;&quot;;[$Предупреждения.K73])">
            <text:p/>
          </table:table-cell>
          <table:table-cell table:formula="of:=IF((ISBLANK([$Предупреждения.$H73]))OR(ISBLANK([$Предупреждения.$I73]))OR(ISBLANK([$Предупреждения.L73]));&quot;&quot;;[$Предупреждения.L73])" office:value-type="string" office:string-value="rtdOutRange" calcext:value-type="string">
            <text:p>rtdOutRange</text:p>
          </table:table-cell>
          <table:table-cell table:formula="of:=IF((ISBLANK([$Предупреждения.$H73]))OR(ISBLANK([$Предупреждения.$I73]))OR(ISBLANK([$Предупреждения.M73]));&quot;&quot;;[$Предупреждения.M73])" office:value-type="string" office:string-value="ai15_Stage3InletTemperature" calcext:value-type="string">
            <text:p>ai15_Stage3InletTemperature</text:p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74]))OR(ISBLANK([$Предупреждения.I74]));&quot;&quot;;CONCATENATE(&quot;rtd&quot;;[$Предупреждения.H74]))" office:value-type="string" office:string-value="rtdEventMessGroupFlag3" calcext:value-type="string">
            <text:p>rtdEventMessGroupFlag3</text:p>
          </table:table-cell>
          <table:table-cell table:style-name="ce103" table:formula="of:=IF((ISBLANK([$Предупреждения.H74]))OR(ISBLANK([$Предупреждения.I74]));&quot;&quot;;[$Предупреждения.I74])" office:value-type="float" office:value="10" calcext:value-type="float">
            <text:p>10</text:p>
          </table:table-cell>
          <table:table-cell table:formula="of:=IF((ISBLANK([$Предупреждения.H74]))OR(ISBLANK([$Предупреждения.I74]));&quot;&quot;;[$Предупреждения.E74])" office:value-type="string" office:string-value="OilResvTempSignalFault" calcext:value-type="string">
            <text:p>OilResvTempSignalFault</text:p>
          </table:table-cell>
          <table:table-cell table:formula="of:=IF((ISBLANK([$Предупреждения.$H74]))OR(ISBLANK([$Предупреждения.$I74]));&quot;&quot;;[$Предупреждения.F74])" office:value-type="string" office:string-value="вне диапазона температура масла резерв" calcext:value-type="string">
            <text:p>вне диапазона температура масла резерв</text:p>
          </table:table-cell>
          <table:table-cell table:formula="of:=IF((ISBLANK([$Предупреждения.$H74]))OR(ISBLANK([$Предупреждения.$I74]));&quot;&quot;;[$Предупреждения.G74])" office:value-type="string" office:string-value="Сигнал вне допустимого диапазона: температура масла, резерв" calcext:value-type="string">
            <text:p>Сигнал вне допустимого диапазона: температура масла, резерв</text:p>
          </table:table-cell>
          <table:table-cell table:formula="of:=IF((ISBLANK([$Предупреждения.$H74]))OR(ISBLANK([$Предупреждения.$I74]));&quot;&quot;;[$Предупреждения.J74])" office:value-type="string" office:string-value="Вне диапазона : Температура масла в маслобаке TE101 " calcext:value-type="string">
            <text:p>Вне диапазона : Температура масла в маслобаке TE101 </text:p>
          </table:table-cell>
          <table:table-cell table:formula="of:=IF((ISBLANK([$Предупреждения.$H74]))OR(ISBLANK([$Предупреждения.$I74]))OR(ISBLANK([$Предупреждения.K74]));&quot;&quot;;[$Предупреждения.K74])">
            <text:p/>
          </table:table-cell>
          <table:table-cell table:formula="of:=IF((ISBLANK([$Предупреждения.$H74]))OR(ISBLANK([$Предупреждения.$I74]))OR(ISBLANK([$Предупреждения.L74]));&quot;&quot;;[$Предупреждения.L74])" office:value-type="string" office:string-value="rtdOutRange" calcext:value-type="string">
            <text:p>rtdOutRange</text:p>
          </table:table-cell>
          <table:table-cell table:formula="of:=IF((ISBLANK([$Предупреждения.$H74]))OR(ISBLANK([$Предупреждения.$I74]))OR(ISBLANK([$Предупреждения.M74]));&quot;&quot;;[$Предупреждения.M74])" office:value-type="string" office:string-value="ai16_OilReservoirTemperature" calcext:value-type="string">
            <text:p>ai16_OilReservoirTemperature</text:p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75]))OR(ISBLANK([$Предупреждения.I75]));&quot;&quot;;CONCATENATE(&quot;rtd&quot;;[$Предупреждения.H75]))" office:value-type="string" office:string-value="rtdEventMessGroupFlag3" calcext:value-type="string">
            <text:p>rtdEventMessGroupFlag3</text:p>
          </table:table-cell>
          <table:table-cell table:style-name="ce103" table:formula="of:=IF((ISBLANK([$Предупреждения.H75]))OR(ISBLANK([$Предупреждения.I75]));&quot;&quot;;[$Предупреждения.I75])" office:value-type="float" office:value="11" calcext:value-type="float">
            <text:p>11</text:p>
          </table:table-cell>
          <table:table-cell table:formula="of:=IF((ISBLANK([$Предупреждения.H75]))OR(ISBLANK([$Предупреждения.I75]));&quot;&quot;;[$Предупреждения.E75])" office:value-type="string" office:string-value="Motor_R_TempSignalFault" calcext:value-type="string">
            <text:p>Motor_R_TempSignalFault</text:p>
          </table:table-cell>
          <table:table-cell table:formula="of:=IF((ISBLANK([$Предупреждения.$H75]))OR(ISBLANK([$Предупреждения.$I75]));&quot;&quot;;[$Предупреждения.F75])" office:value-type="string" office:string-value="вне диапазона температура обмотки Р" calcext:value-type="string">
            <text:p>вне диапазона температура обмотки Р</text:p>
          </table:table-cell>
          <table:table-cell table:formula="of:=IF((ISBLANK([$Предупреждения.$H75]))OR(ISBLANK([$Предупреждения.$I75]));&quot;&quot;;[$Предупреждения.G75])" office:value-type="string" office:string-value="Сигнал вне допустимого диапазона: температура обмотки «Р» двигателя" calcext:value-type="string">
            <text:p>Сигнал вне допустимого диапазона: температура обмотки «Р» двигателя</text:p>
          </table:table-cell>
          <table:table-cell table:formula="of:=IF((ISBLANK([$Предупреждения.$H75]))OR(ISBLANK([$Предупреждения.$I75]));&quot;&quot;;[$Предупреждения.J75])" office:value-type="string" office:string-value="Вне диапазона : Температура обмотки двигателя &quot;R&quot; TE140 " calcext:value-type="string">
            <text:p>Вне диапазона : Температура обмотки двигателя "R" TE140 </text:p>
          </table:table-cell>
          <table:table-cell table:formula="of:=IF((ISBLANK([$Предупреждения.$H75]))OR(ISBLANK([$Предупреждения.$I75]))OR(ISBLANK([$Предупреждения.K75]));&quot;&quot;;[$Предупреждения.K75])">
            <text:p/>
          </table:table-cell>
          <table:table-cell table:formula="of:=IF((ISBLANK([$Предупреждения.$H75]))OR(ISBLANK([$Предупреждения.$I75]))OR(ISBLANK([$Предупреждения.L75]));&quot;&quot;;[$Предупреждения.L75])" office:value-type="string" office:string-value="rtdOutRange" calcext:value-type="string">
            <text:p>rtdOutRange</text:p>
          </table:table-cell>
          <table:table-cell table:formula="of:=IF((ISBLANK([$Предупреждения.$H75]))OR(ISBLANK([$Предупреждения.$I75]))OR(ISBLANK([$Предупреждения.M75]));&quot;&quot;;[$Предупреждения.M75])" office:value-type="string" office:string-value="ai17_MotorWindingRTemperature" calcext:value-type="string">
            <text:p>ai17_MotorWindingRTemperature</text:p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76]))OR(ISBLANK([$Предупреждения.I76]));&quot;&quot;;CONCATENATE(&quot;rtd&quot;;[$Предупреждения.H76]))" office:value-type="string" office:string-value="rtdEventMessGroupFlag3" calcext:value-type="string">
            <text:p>rtdEventMessGroupFlag3</text:p>
          </table:table-cell>
          <table:table-cell table:style-name="ce103" table:formula="of:=IF((ISBLANK([$Предупреждения.H76]))OR(ISBLANK([$Предупреждения.I76]));&quot;&quot;;[$Предупреждения.I76])" office:value-type="float" office:value="12" calcext:value-type="float">
            <text:p>12</text:p>
          </table:table-cell>
          <table:table-cell table:formula="of:=IF((ISBLANK([$Предупреждения.H76]))OR(ISBLANK([$Предупреждения.I76]));&quot;&quot;;[$Предупреждения.E76])" office:value-type="string" office:string-value="Motor_DE_TempSignalFault" calcext:value-type="string">
            <text:p>Motor_DE_TempSignalFault</text:p>
          </table:table-cell>
          <table:table-cell table:formula="of:=IF((ISBLANK([$Предупреждения.$H76]))OR(ISBLANK([$Предупреждения.$I76]));&quot;&quot;;[$Предупреждения.F76])" office:value-type="string" office:string-value="вне диапазона температура привод.конца двигателя" calcext:value-type="string">
            <text:p>вне диапазона температура привод.конца двигателя</text:p>
          </table:table-cell>
          <table:table-cell table:formula="of:=IF((ISBLANK([$Предупреждения.$H76]))OR(ISBLANK([$Предупреждения.$I76]));&quot;&quot;;[$Предупреждения.G76])" office:value-type="string" office:string-value="Сигнал вне допустимого диапазона: температура приводного конца двигателя" calcext:value-type="string">
            <text:p>Сигнал вне допустимого диапазона: температура приводного конца двигателя</text:p>
          </table:table-cell>
          <table:table-cell table:formula="of:=IF((ISBLANK([$Предупреждения.$H76]))OR(ISBLANK([$Предупреждения.$I76]));&quot;&quot;;[$Предупреждения.J76])" office:value-type="string" office:string-value="Вне диапазона : Температура DE подшипника TE143 " calcext:value-type="string">
            <text:p>Вне диапазона : Температура DE подшипника TE143 </text:p>
          </table:table-cell>
          <table:table-cell table:formula="of:=IF((ISBLANK([$Предупреждения.$H76]))OR(ISBLANK([$Предупреждения.$I76]))OR(ISBLANK([$Предупреждения.K76]));&quot;&quot;;[$Предупреждения.K76])">
            <text:p/>
          </table:table-cell>
          <table:table-cell table:formula="of:=IF((ISBLANK([$Предупреждения.$H76]))OR(ISBLANK([$Предупреждения.$I76]))OR(ISBLANK([$Предупреждения.L76]));&quot;&quot;;[$Предупреждения.L76])" office:value-type="string" office:string-value="rtdOutRange" calcext:value-type="string">
            <text:p>rtdOutRange</text:p>
          </table:table-cell>
          <table:table-cell table:formula="of:=IF((ISBLANK([$Предупреждения.$H76]))OR(ISBLANK([$Предупреждения.$I76]))OR(ISBLANK([$Предупреждения.M76]));&quot;&quot;;[$Предупреждения.M76])" office:value-type="string" office:string-value="ai18_MotorBearingDETemperature" calcext:value-type="string">
            <text:p>ai18_MotorBearingDETemperature</text:p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77]))OR(ISBLANK([$Предупреждения.I77]));&quot;&quot;;CONCATENATE(&quot;rtd&quot;;[$Предупреждения.H77]))" office:value-type="string" office:string-value="rtdEventMessGroupFlag3" calcext:value-type="string">
            <text:p>rtdEventMessGroupFlag3</text:p>
          </table:table-cell>
          <table:table-cell table:style-name="ce103" table:formula="of:=IF((ISBLANK([$Предупреждения.H77]))OR(ISBLANK([$Предупреждения.I77]));&quot;&quot;;[$Предупреждения.I77])" office:value-type="float" office:value="13" calcext:value-type="float">
            <text:p>13</text:p>
          </table:table-cell>
          <table:table-cell table:formula="of:=IF((ISBLANK([$Предупреждения.H77]))OR(ISBLANK([$Предупреждения.I77]));&quot;&quot;;[$Предупреждения.E77])" office:value-type="string" office:string-value="Motor_NDE_TempSignalFault" calcext:value-type="string">
            <text:p>Motor_NDE_TempSignalFault</text:p>
          </table:table-cell>
          <table:table-cell table:formula="of:=IF((ISBLANK([$Предупреждения.$H77]))OR(ISBLANK([$Предупреждения.$I77]));&quot;&quot;;[$Предупреждения.F77])" office:value-type="string" office:string-value="вне диапазона температура непривод.конца двигателя" calcext:value-type="string">
            <text:p>вне диапазона температура непривод.конца двигателя</text:p>
          </table:table-cell>
          <table:table-cell table:formula="of:=IF((ISBLANK([$Предупреждения.$H77]))OR(ISBLANK([$Предупреждения.$I77]));&quot;&quot;;[$Предупреждения.G77])" office:value-type="string" office:string-value="Сигнал вне допустимого диапазона: температура неприводного конца двигателя" calcext:value-type="string">
            <text:p>Сигнал вне допустимого диапазона: температура неприводного конца двигателя</text:p>
          </table:table-cell>
          <table:table-cell table:formula="of:=IF((ISBLANK([$Предупреждения.$H77]))OR(ISBLANK([$Предупреждения.$I77]));&quot;&quot;;[$Предупреждения.J77])" office:value-type="string" office:string-value="Вне диапазона : Температура NDE подшипника TE144 " calcext:value-type="string">
            <text:p>Вне диапазона : Температура NDE подшипника TE144 </text:p>
          </table:table-cell>
          <table:table-cell table:formula="of:=IF((ISBLANK([$Предупреждения.$H77]))OR(ISBLANK([$Предупреждения.$I77]))OR(ISBLANK([$Предупреждения.K77]));&quot;&quot;;[$Предупреждения.K77])">
            <text:p/>
          </table:table-cell>
          <table:table-cell table:formula="of:=IF((ISBLANK([$Предупреждения.$H77]))OR(ISBLANK([$Предупреждения.$I77]))OR(ISBLANK([$Предупреждения.L77]));&quot;&quot;;[$Предупреждения.L77])" office:value-type="string" office:string-value="rtdOutRange" calcext:value-type="string">
            <text:p>rtdOutRange</text:p>
          </table:table-cell>
          <table:table-cell table:formula="of:=IF((ISBLANK([$Предупреждения.$H77]))OR(ISBLANK([$Предупреждения.$I77]))OR(ISBLANK([$Предупреждения.M77]));&quot;&quot;;[$Предупреждения.M77])" office:value-type="string" office:string-value="ai19_MotorBearingNDETemperature" calcext:value-type="string">
            <text:p>ai19_MotorBearingNDETemperature</text:p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78]))OR(ISBLANK([$Предупреждения.I78]));&quot;&quot;;CONCATENATE(&quot;rtd&quot;;[$Предупреждения.H78]))" office:value-type="string" office:string-value="rtdEventMessGroupFlag3" calcext:value-type="string">
            <text:p>rtdEventMessGroupFlag3</text:p>
          </table:table-cell>
          <table:table-cell table:style-name="ce103" table:formula="of:=IF((ISBLANK([$Предупреждения.H78]))OR(ISBLANK([$Предупреждения.I78]));&quot;&quot;;[$Предупреждения.I78])" office:value-type="float" office:value="14" calcext:value-type="float">
            <text:p>14</text:p>
          </table:table-cell>
          <table:table-cell table:formula="of:=IF((ISBLANK([$Предупреждения.H78]))OR(ISBLANK([$Предупреждения.I78]));&quot;&quot;;[$Предупреждения.E78])" office:value-type="string" office:string-value="Num2InletTempSignalFault" calcext:value-type="string">
            <text:p>Num2InletTempSignalFault</text:p>
          </table:table-cell>
          <table:table-cell table:formula="of:=IF((ISBLANK([$Предупреждения.$H78]))OR(ISBLANK([$Предупреждения.$I78]));&quot;&quot;;[$Предупреждения.F78])" office:value-type="string" office:string-value="вне диапазона температура входа ступени 2" calcext:value-type="string">
            <text:p>вне диапазона температура входа ступени 2</text:p>
          </table:table-cell>
          <table:table-cell table:formula="of:=IF((ISBLANK([$Предупреждения.$H78]))OR(ISBLANK([$Предупреждения.$I78]));&quot;&quot;;[$Предупреждения.G78])" office:value-type="string" office:string-value="Сигнал вне допустимого диапазона: температура на входе ступени 2" calcext:value-type="string">
            <text:p>Сигнал вне допустимого диапазона: температура на входе ступени 2</text:p>
          </table:table-cell>
          <table:table-cell table:formula="of:=IF((ISBLANK([$Предупреждения.$H78]))OR(ISBLANK([$Предупреждения.$I78]));&quot;&quot;;[$Предупреждения.J78])" office:value-type="string" office:string-value="Вне диапазона : Температура воздуха на входе 2 ступени TE221 " calcext:value-type="string">
            <text:p>Вне диапазона : Температура воздуха на входе 2 ступени TE221 </text:p>
          </table:table-cell>
          <table:table-cell table:formula="of:=IF((ISBLANK([$Предупреждения.$H78]))OR(ISBLANK([$Предупреждения.$I78]))OR(ISBLANK([$Предупреждения.K78]));&quot;&quot;;[$Предупреждения.K78])">
            <text:p/>
          </table:table-cell>
          <table:table-cell table:formula="of:=IF((ISBLANK([$Предупреждения.$H78]))OR(ISBLANK([$Предупреждения.$I78]))OR(ISBLANK([$Предупреждения.L78]));&quot;&quot;;[$Предупреждения.L78])" office:value-type="string" office:string-value="rtdOutRange" calcext:value-type="string">
            <text:p>rtdOutRange</text:p>
          </table:table-cell>
          <table:table-cell table:formula="of:=IF((ISBLANK([$Предупреждения.$H78]))OR(ISBLANK([$Предупреждения.$I78]))OR(ISBLANK([$Предупреждения.M78]));&quot;&quot;;[$Предупреждения.M78])" office:value-type="string" office:string-value="ai20_Stage2InletTemperature" calcext:value-type="string">
            <text:p>ai20_Stage2InletTemperature</text:p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79]))OR(ISBLANK([$Предупреждения.I79]));&quot;&quot;;CONCATENATE(&quot;rtd&quot;;[$Предупреждения.H79]))">
            <text:p/>
          </table:table-cell>
          <table:table-cell table:style-name="ce103" table:formula="of:=IF((ISBLANK([$Предупреждения.H79]))OR(ISBLANK([$Предупреждения.I79]));&quot;&quot;;[$Предупреждения.I79])">
            <text:p/>
          </table:table-cell>
          <table:table-cell table:formula="of:=IF((ISBLANK([$Предупреждения.H79]))OR(ISBLANK([$Предупреждения.I79]));&quot;&quot;;[$Предупреждения.E79])">
            <text:p/>
          </table:table-cell>
          <table:table-cell table:formula="of:=IF((ISBLANK([$Предупреждения.$H79]))OR(ISBLANK([$Предупреждения.$I79]));&quot;&quot;;[$Предупреждения.F79])">
            <text:p/>
          </table:table-cell>
          <table:table-cell table:formula="of:=IF((ISBLANK([$Предупреждения.$H79]))OR(ISBLANK([$Предупреждения.$I79]));&quot;&quot;;[$Предупреждения.G79])">
            <text:p/>
          </table:table-cell>
          <table:table-cell table:formula="of:=IF((ISBLANK([$Предупреждения.$H79]))OR(ISBLANK([$Предупреждения.$I79]));&quot;&quot;;[$Предупреждения.J79])">
            <text:p/>
          </table:table-cell>
          <table:table-cell table:formula="of:=IF((ISBLANK([$Предупреждения.$H79]))OR(ISBLANK([$Предупреждения.$I79]))OR(ISBLANK([$Предупреждения.K79]));&quot;&quot;;[$Предупреждения.K79])">
            <text:p/>
          </table:table-cell>
          <table:table-cell table:formula="of:=IF((ISBLANK([$Предупреждения.$H79]))OR(ISBLANK([$Предупреждения.$I79]))OR(ISBLANK([$Предупреждения.L79]));&quot;&quot;;[$Предупреждения.L79])">
            <text:p/>
          </table:table-cell>
          <table:table-cell table:formula="of:=IF((ISBLANK([$Предупреждения.$H79]))OR(ISBLANK([$Предупреждения.$I79]))OR(ISBLANK([$Предупреждения.M79]));&quot;&quot;;[$Предупреждения.M79])">
            <text:p/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80]))OR(ISBLANK([$Предупреждения.I80]));&quot;&quot;;CONCATENATE(&quot;rtd&quot;;[$Предупреждения.H80]))">
            <text:p/>
          </table:table-cell>
          <table:table-cell table:style-name="ce103" table:formula="of:=IF((ISBLANK([$Предупреждения.H80]))OR(ISBLANK([$Предупреждения.I80]));&quot;&quot;;[$Предупреждения.I80])">
            <text:p/>
          </table:table-cell>
          <table:table-cell table:formula="of:=IF((ISBLANK([$Предупреждения.H80]))OR(ISBLANK([$Предупреждения.I80]));&quot;&quot;;[$Предупреждения.E80])">
            <text:p/>
          </table:table-cell>
          <table:table-cell table:formula="of:=IF((ISBLANK([$Предупреждения.$H80]))OR(ISBLANK([$Предупреждения.$I80]));&quot;&quot;;[$Предупреждения.F80])">
            <text:p/>
          </table:table-cell>
          <table:table-cell table:formula="of:=IF((ISBLANK([$Предупреждения.$H80]))OR(ISBLANK([$Предупреждения.$I80]));&quot;&quot;;[$Предупреждения.G80])">
            <text:p/>
          </table:table-cell>
          <table:table-cell table:formula="of:=IF((ISBLANK([$Предупреждения.$H80]))OR(ISBLANK([$Предупреждения.$I80]));&quot;&quot;;[$Предупреждения.J80])">
            <text:p/>
          </table:table-cell>
          <table:table-cell table:formula="of:=IF((ISBLANK([$Предупреждения.$H80]))OR(ISBLANK([$Предупреждения.$I80]))OR(ISBLANK([$Предупреждения.K80]));&quot;&quot;;[$Предупреждения.K80])">
            <text:p/>
          </table:table-cell>
          <table:table-cell table:formula="of:=IF((ISBLANK([$Предупреждения.$H80]))OR(ISBLANK([$Предупреждения.$I80]))OR(ISBLANK([$Предупреждения.L80]));&quot;&quot;;[$Предупреждения.L80])">
            <text:p/>
          </table:table-cell>
          <table:table-cell table:formula="of:=IF((ISBLANK([$Предупреждения.$H80]))OR(ISBLANK([$Предупреждения.$I80]))OR(ISBLANK([$Предупреждения.M80]));&quot;&quot;;[$Предупреждения.M80])">
            <text:p/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81]))OR(ISBLANK([$Предупреждения.I81]));&quot;&quot;;CONCATENATE(&quot;rtd&quot;;[$Предупреждения.H81]))" office:value-type="string" office:string-value="rtdEventMessGroupFlag3" calcext:value-type="string">
            <text:p>rtdEventMessGroupFlag3</text:p>
          </table:table-cell>
          <table:table-cell table:style-name="ce103" table:formula="of:=IF((ISBLANK([$Предупреждения.H81]))OR(ISBLANK([$Предупреждения.I81]));&quot;&quot;;[$Предупреждения.I81])" office:value-type="float" office:value="1" calcext:value-type="float">
            <text:p>1</text:p>
          </table:table-cell>
          <table:table-cell table:formula="of:=IF((ISBLANK([$Предупреждения.H81]))OR(ISBLANK([$Предупреждения.I81]));&quot;&quot;;[$Предупреждения.E81])" office:value-type="string" office:string-value="Num1OutTempSignalFault" calcext:value-type="string">
            <text:p>Num1OutTempSignalFault</text:p>
          </table:table-cell>
          <table:table-cell table:formula="of:=IF((ISBLANK([$Предупреждения.$H81]))OR(ISBLANK([$Предупреждения.$I81]));&quot;&quot;;[$Предупреждения.F81])" office:value-type="string" office:string-value="вне диапазона температура выхода ступени 1" calcext:value-type="string">
            <text:p>вне диапазона температура выхода ступени 1</text:p>
          </table:table-cell>
          <table:table-cell table:formula="of:=IF((ISBLANK([$Предупреждения.$H81]))OR(ISBLANK([$Предупреждения.$I81]));&quot;&quot;;[$Предупреждения.G81])" office:value-type="string" office:string-value="Сигнал вне допустимого диапазона: температура на выходе ступени 1" calcext:value-type="string">
            <text:p>Сигнал вне допустимого диапазона: температура на выходе ступени 1</text:p>
          </table:table-cell>
          <table:table-cell table:formula="of:=IF((ISBLANK([$Предупреждения.$H81]))OR(ISBLANK([$Предупреждения.$I81]));&quot;&quot;;[$Предупреждения.J81])" office:value-type="string" office:string-value="Вне диапазона : Температура воздуха на выходе 1 ступени TE212 " calcext:value-type="string">
            <text:p>Вне диапазона : Температура воздуха на выходе 1 ступени TE212 </text:p>
          </table:table-cell>
          <table:table-cell table:formula="of:=IF((ISBLANK([$Предупреждения.$H81]))OR(ISBLANK([$Предупреждения.$I81]))OR(ISBLANK([$Предупреждения.K81]));&quot;&quot;;[$Предупреждения.K81])">
            <text:p/>
          </table:table-cell>
          <table:table-cell table:formula="of:=IF((ISBLANK([$Предупреждения.$H81]))OR(ISBLANK([$Предупреждения.$I81]))OR(ISBLANK([$Предупреждения.L81]));&quot;&quot;;[$Предупреждения.L81])" office:value-type="string" office:string-value="rtdOutRange" calcext:value-type="string">
            <text:p>rtdOutRange</text:p>
          </table:table-cell>
          <table:table-cell table:formula="of:=IF((ISBLANK([$Предупреждения.$H81]))OR(ISBLANK([$Предупреждения.$I81]))OR(ISBLANK([$Предупреждения.M81]));&quot;&quot;;[$Предупреждения.M81])" office:value-type="string" office:string-value="ai21_N1OutletTemp" calcext:value-type="string">
            <text:p>ai21_N1OutletTemp</text:p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82]))OR(ISBLANK([$Предупреждения.I82]));&quot;&quot;;CONCATENATE(&quot;rtd&quot;;[$Предупреждения.H82]))" office:value-type="string" office:string-value="rtdEventMessGroupFlag3" calcext:value-type="string">
            <text:p>rtdEventMessGroupFlag3</text:p>
          </table:table-cell>
          <table:table-cell table:style-name="ce103" table:formula="of:=IF((ISBLANK([$Предупреждения.H82]))OR(ISBLANK([$Предупреждения.I82]));&quot;&quot;;[$Предупреждения.I82])" office:value-type="float" office:value="2" calcext:value-type="float">
            <text:p>2</text:p>
          </table:table-cell>
          <table:table-cell table:formula="of:=IF((ISBLANK([$Предупреждения.H82]))OR(ISBLANK([$Предупреждения.I82]));&quot;&quot;;[$Предупреждения.E82])" office:value-type="string" office:string-value="Num2OutTempSignalFault" calcext:value-type="string">
            <text:p>Num2OutTempSignalFault</text:p>
          </table:table-cell>
          <table:table-cell table:formula="of:=IF((ISBLANK([$Предупреждения.$H82]))OR(ISBLANK([$Предупреждения.$I82]));&quot;&quot;;[$Предупреждения.F82])" office:value-type="string" office:string-value="вне диапазона температура выхода ступени 2" calcext:value-type="string">
            <text:p>вне диапазона температура выхода ступени 2</text:p>
          </table:table-cell>
          <table:table-cell table:formula="of:=IF((ISBLANK([$Предупреждения.$H82]))OR(ISBLANK([$Предупреждения.$I82]));&quot;&quot;;[$Предупреждения.G82])" office:value-type="string" office:string-value="Сигнал вне допустимого диапазона: температура на выходе ступени 2" calcext:value-type="string">
            <text:p>Сигнал вне допустимого диапазона: температура на выходе ступени 2</text:p>
          </table:table-cell>
          <table:table-cell table:formula="of:=IF((ISBLANK([$Предупреждения.$H82]))OR(ISBLANK([$Предупреждения.$I82]));&quot;&quot;;[$Предупреждения.J82])" office:value-type="string" office:string-value="Вне диапазона : Температура воздуха на выходе 2 ступени TE222 " calcext:value-type="string">
            <text:p>Вне диапазона : Температура воздуха на выходе 2 ступени TE222 </text:p>
          </table:table-cell>
          <table:table-cell table:formula="of:=IF((ISBLANK([$Предупреждения.$H82]))OR(ISBLANK([$Предупреждения.$I82]))OR(ISBLANK([$Предупреждения.K82]));&quot;&quot;;[$Предупреждения.K82])">
            <text:p/>
          </table:table-cell>
          <table:table-cell table:formula="of:=IF((ISBLANK([$Предупреждения.$H82]))OR(ISBLANK([$Предупреждения.$I82]))OR(ISBLANK([$Предупреждения.L82]));&quot;&quot;;[$Предупреждения.L82])" office:value-type="string" office:string-value="rtdOutRange" calcext:value-type="string">
            <text:p>rtdOutRange</text:p>
          </table:table-cell>
          <table:table-cell table:formula="of:=IF((ISBLANK([$Предупреждения.$H82]))OR(ISBLANK([$Предупреждения.$I82]))OR(ISBLANK([$Предупреждения.M82]));&quot;&quot;;[$Предупреждения.M82])" office:value-type="string" office:string-value="ai22_N2OutletTemp" calcext:value-type="string">
            <text:p>ai22_N2OutletTemp</text:p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83]))OR(ISBLANK([$Предупреждения.I83]));&quot;&quot;;CONCATENATE(&quot;rtd&quot;;[$Предупреждения.H83]))" office:value-type="string" office:string-value="rtdEventMessGroupFlag3" calcext:value-type="string">
            <text:p>rtdEventMessGroupFlag3</text:p>
          </table:table-cell>
          <table:table-cell table:style-name="ce103" table:formula="of:=IF((ISBLANK([$Предупреждения.H83]))OR(ISBLANK([$Предупреждения.I83]));&quot;&quot;;[$Предупреждения.I83])" office:value-type="float" office:value="3" calcext:value-type="float">
            <text:p>3</text:p>
          </table:table-cell>
          <table:table-cell table:formula="of:=IF((ISBLANK([$Предупреждения.H83]))OR(ISBLANK([$Предупреждения.I83]));&quot;&quot;;[$Предупреждения.E83])" office:value-type="string" office:string-value="Num3OutTempSignalFault" calcext:value-type="string">
            <text:p>Num3OutTempSignalFault</text:p>
          </table:table-cell>
          <table:table-cell table:formula="of:=IF((ISBLANK([$Предупреждения.$H83]))OR(ISBLANK([$Предупреждения.$I83]));&quot;&quot;;[$Предупреждения.F83])" office:value-type="string" office:string-value="вне диапазона температура выхода ступени 3" calcext:value-type="string">
            <text:p>вне диапазона температура выхода ступени 3</text:p>
          </table:table-cell>
          <table:table-cell table:formula="of:=IF((ISBLANK([$Предупреждения.$H83]))OR(ISBLANK([$Предупреждения.$I83]));&quot;&quot;;[$Предупреждения.G83])" office:value-type="string" office:string-value="Сигнал вне допустимого диапазона: температура на выходе ступени 3" calcext:value-type="string">
            <text:p>Сигнал вне допустимого диапазона: температура на выходе ступени 3</text:p>
          </table:table-cell>
          <table:table-cell table:formula="of:=IF((ISBLANK([$Предупреждения.$H83]))OR(ISBLANK([$Предупреждения.$I83]));&quot;&quot;;[$Предупреждения.J83])" office:value-type="string" office:string-value="Вне диапазона : Температура воздуха на выходе 3 ступени TE232 " calcext:value-type="string">
            <text:p>Вне диапазона : Температура воздуха на выходе 3 ступени TE232 </text:p>
          </table:table-cell>
          <table:table-cell table:formula="of:=IF((ISBLANK([$Предупреждения.$H83]))OR(ISBLANK([$Предупреждения.$I83]))OR(ISBLANK([$Предупреждения.K83]));&quot;&quot;;[$Предупреждения.K83])">
            <text:p/>
          </table:table-cell>
          <table:table-cell table:formula="of:=IF((ISBLANK([$Предупреждения.$H83]))OR(ISBLANK([$Предупреждения.$I83]))OR(ISBLANK([$Предупреждения.L83]));&quot;&quot;;[$Предупреждения.L83])" office:value-type="string" office:string-value="rtdOutRange" calcext:value-type="string">
            <text:p>rtdOutRange</text:p>
          </table:table-cell>
          <table:table-cell table:formula="of:=IF((ISBLANK([$Предупреждения.$H83]))OR(ISBLANK([$Предупреждения.$I83]))OR(ISBLANK([$Предупреждения.M83]));&quot;&quot;;[$Предупреждения.M83])" office:value-type="string" office:string-value="ai23_N3OutletTemp" calcext:value-type="string">
            <text:p>ai23_N3OutletTemp</text:p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84]))OR(ISBLANK([$Предупреждения.I84]));&quot;&quot;;CONCATENATE(&quot;rtd&quot;;[$Предупреждения.H84]))" office:value-type="string" office:string-value="rtdEventMessGroupFlag3" calcext:value-type="string">
            <text:p>rtdEventMessGroupFlag3</text:p>
          </table:table-cell>
          <table:table-cell table:style-name="ce103" table:formula="of:=IF((ISBLANK([$Предупреждения.H84]))OR(ISBLANK([$Предупреждения.I84]));&quot;&quot;;[$Предупреждения.I84])" office:value-type="float" office:value="4" calcext:value-type="float">
            <text:p>4</text:p>
          </table:table-cell>
          <table:table-cell table:formula="of:=IF((ISBLANK([$Предупреждения.H84]))OR(ISBLANK([$Предупреждения.I84]));&quot;&quot;;[$Предупреждения.E84])" office:value-type="string" office:string-value="CoolingWaterInletTempSignalFault" calcext:value-type="string">
            <text:p>CoolingWaterInletTempSignalFault</text:p>
          </table:table-cell>
          <table:table-cell table:formula="of:=IF((ISBLANK([$Предупреждения.$H84]))OR(ISBLANK([$Предупреждения.$I84]));&quot;&quot;;[$Предупреждения.F84])" office:value-type="string" office:string-value="вне диапазона температура охлаждающей воды" calcext:value-type="string">
            <text:p>вне диапазона температура охлаждающей воды</text:p>
          </table:table-cell>
          <table:table-cell table:formula="of:=IF((ISBLANK([$Предупреждения.$H84]))OR(ISBLANK([$Предупреждения.$I84]));&quot;&quot;;[$Предупреждения.G84])" office:value-type="string" office:string-value="Сигнал вне допустимого диапазона: температура на подаче охлаждающей воды" calcext:value-type="string">
            <text:p>Сигнал вне допустимого диапазона: температура на подаче охлаждающей воды</text:p>
          </table:table-cell>
          <table:table-cell table:formula="of:=IF((ISBLANK([$Предупреждения.$H84]))OR(ISBLANK([$Предупреждения.$I84]));&quot;&quot;;[$Предупреждения.J84])" office:value-type="string" office:string-value="Вне диапазона : Температура охлаждающей воды на входе TE301 " calcext:value-type="string">
            <text:p>Вне диапазона : Температура охлаждающей воды на входе TE301 </text:p>
          </table:table-cell>
          <table:table-cell table:formula="of:=IF((ISBLANK([$Предупреждения.$H84]))OR(ISBLANK([$Предупреждения.$I84]))OR(ISBLANK([$Предупреждения.K84]));&quot;&quot;;[$Предупреждения.K84])">
            <text:p/>
          </table:table-cell>
          <table:table-cell table:formula="of:=IF((ISBLANK([$Предупреждения.$H84]))OR(ISBLANK([$Предупреждения.$I84]))OR(ISBLANK([$Предупреждения.L84]));&quot;&quot;;[$Предупреждения.L84])" office:value-type="string" office:string-value="rtdOutRange" calcext:value-type="string">
            <text:p>rtdOutRange</text:p>
          </table:table-cell>
          <table:table-cell table:formula="of:=IF((ISBLANK([$Предупреждения.$H84]))OR(ISBLANK([$Предупреждения.$I84]))OR(ISBLANK([$Предупреждения.M84]));&quot;&quot;;[$Предупреждения.M84])" office:value-type="string" office:string-value="ai24_CoolingWaterSupplyTemp" calcext:value-type="string">
            <text:p>ai24_CoolingWaterSupplyTemp</text:p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85]))OR(ISBLANK([$Предупреждения.I85]));&quot;&quot;;CONCATENATE(&quot;rtd&quot;;[$Предупреждения.H85]))" office:value-type="string" office:string-value="rtdEventMessGroupFlag3" calcext:value-type="string">
            <text:p>rtdEventMessGroupFlag3</text:p>
          </table:table-cell>
          <table:table-cell table:style-name="ce103" table:formula="of:=IF((ISBLANK([$Предупреждения.H85]))OR(ISBLANK([$Предупреждения.I85]));&quot;&quot;;[$Предупреждения.I85])" office:value-type="float" office:value="5" calcext:value-type="float">
            <text:p>5</text:p>
          </table:table-cell>
          <table:table-cell table:formula="of:=IF((ISBLANK([$Предупреждения.H85]))OR(ISBLANK([$Предупреждения.I85]));&quot;&quot;;[$Предупреждения.E85])" office:value-type="string" office:string-value="CoolingWaterOutletTempSignalFault" calcext:value-type="string">
            <text:p>CoolingWaterOutletTempSignalFault</text:p>
          </table:table-cell>
          <table:table-cell table:formula="of:=IF((ISBLANK([$Предупреждения.$H85]))OR(ISBLANK([$Предупреждения.$I85]));&quot;&quot;;[$Предупреждения.F85])" office:value-type="string" office:string-value="вне диапазона температура возвратной воды" calcext:value-type="string">
            <text:p>вне диапазона температура возвратной воды</text:p>
          </table:table-cell>
          <table:table-cell table:formula="of:=IF((ISBLANK([$Предупреждения.$H85]))OR(ISBLANK([$Предупреждения.$I85]));&quot;&quot;;[$Предупреждения.G85])" office:value-type="string" office:string-value="Сигнал вне допустимого диапазона: температура на возврате охлаждающей воды" calcext:value-type="string">
            <text:p>Сигнал вне допустимого диапазона: температура на возврате охлаждающей воды</text:p>
          </table:table-cell>
          <table:table-cell table:formula="of:=IF((ISBLANK([$Предупреждения.$H85]))OR(ISBLANK([$Предупреждения.$I85]));&quot;&quot;;[$Предупреждения.J85])" office:value-type="string" office:string-value="Вне диапазона : Температура охлаждающей воды на выходе TE302 " calcext:value-type="string">
            <text:p>Вне диапазона : Температура охлаждающей воды на выходе TE302 </text:p>
          </table:table-cell>
          <table:table-cell table:formula="of:=IF((ISBLANK([$Предупреждения.$H85]))OR(ISBLANK([$Предупреждения.$I85]))OR(ISBLANK([$Предупреждения.K85]));&quot;&quot;;[$Предупреждения.K85])">
            <text:p/>
          </table:table-cell>
          <table:table-cell table:formula="of:=IF((ISBLANK([$Предупреждения.$H85]))OR(ISBLANK([$Предупреждения.$I85]))OR(ISBLANK([$Предупреждения.L85]));&quot;&quot;;[$Предупреждения.L85])" office:value-type="string" office:string-value="rtdOutRange" calcext:value-type="string">
            <text:p>rtdOutRange</text:p>
          </table:table-cell>
          <table:table-cell table:formula="of:=IF((ISBLANK([$Предупреждения.$H85]))OR(ISBLANK([$Предупреждения.$I85]))OR(ISBLANK([$Предупреждения.M85]));&quot;&quot;;[$Предупреждения.M85])" office:value-type="string" office:string-value="ai25_CoolingWateReturnTemp" calcext:value-type="string">
            <text:p>ai25_CoolingWateReturnTemp</text:p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86]))OR(ISBLANK([$Предупреждения.I86]));&quot;&quot;;CONCATENATE(&quot;rtd&quot;;[$Предупреждения.H86]))">
            <text:p/>
          </table:table-cell>
          <table:table-cell table:style-name="ce103" table:formula="of:=IF((ISBLANK([$Предупреждения.H86]))OR(ISBLANK([$Предупреждения.I86]));&quot;&quot;;[$Предупреждения.I86])">
            <text:p/>
          </table:table-cell>
          <table:table-cell table:formula="of:=IF((ISBLANK([$Предупреждения.H86]))OR(ISBLANK([$Предупреждения.I86]));&quot;&quot;;[$Предупреждения.E86])">
            <text:p/>
          </table:table-cell>
          <table:table-cell table:formula="of:=IF((ISBLANK([$Предупреждения.$H86]))OR(ISBLANK([$Предупреждения.$I86]));&quot;&quot;;[$Предупреждения.F86])">
            <text:p/>
          </table:table-cell>
          <table:table-cell table:formula="of:=IF((ISBLANK([$Предупреждения.$H86]))OR(ISBLANK([$Предупреждения.$I86]));&quot;&quot;;[$Предупреждения.G86])">
            <text:p/>
          </table:table-cell>
          <table:table-cell table:formula="of:=IF((ISBLANK([$Предупреждения.$H86]))OR(ISBLANK([$Предупреждения.$I86]));&quot;&quot;;[$Предупреждения.J86])">
            <text:p/>
          </table:table-cell>
          <table:table-cell table:formula="of:=IF((ISBLANK([$Предупреждения.$H86]))OR(ISBLANK([$Предупреждения.$I86]))OR(ISBLANK([$Предупреждения.K86]));&quot;&quot;;[$Предупреждения.K86])">
            <text:p/>
          </table:table-cell>
          <table:table-cell table:formula="of:=IF((ISBLANK([$Предупреждения.$H86]))OR(ISBLANK([$Предупреждения.$I86]))OR(ISBLANK([$Предупреждения.L86]));&quot;&quot;;[$Предупреждения.L86])">
            <text:p/>
          </table:table-cell>
          <table:table-cell table:formula="of:=IF((ISBLANK([$Предупреждения.$H86]))OR(ISBLANK([$Предупреждения.$I86]))OR(ISBLANK([$Предупреждения.M86]));&quot;&quot;;[$Предупреждения.M86])">
            <text:p/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87]))OR(ISBLANK([$Предупреждения.I87]));&quot;&quot;;CONCATENATE(&quot;rtd&quot;;[$Предупреждения.H87]))">
            <text:p/>
          </table:table-cell>
          <table:table-cell table:style-name="ce103" table:formula="of:=IF((ISBLANK([$Предупреждения.H87]))OR(ISBLANK([$Предупреждения.I87]));&quot;&quot;;[$Предупреждения.I87])">
            <text:p/>
          </table:table-cell>
          <table:table-cell table:formula="of:=IF((ISBLANK([$Предупреждения.H87]))OR(ISBLANK([$Предупреждения.I87]));&quot;&quot;;[$Предупреждения.E87])">
            <text:p/>
          </table:table-cell>
          <table:table-cell table:formula="of:=IF((ISBLANK([$Предупреждения.$H87]))OR(ISBLANK([$Предупреждения.$I87]));&quot;&quot;;[$Предупреждения.F87])">
            <text:p/>
          </table:table-cell>
          <table:table-cell table:formula="of:=IF((ISBLANK([$Предупреждения.$H87]))OR(ISBLANK([$Предупреждения.$I87]));&quot;&quot;;[$Предупреждения.G87])">
            <text:p/>
          </table:table-cell>
          <table:table-cell table:formula="of:=IF((ISBLANK([$Предупреждения.$H87]))OR(ISBLANK([$Предупреждения.$I87]));&quot;&quot;;[$Предупреждения.J87])">
            <text:p/>
          </table:table-cell>
          <table:table-cell table:formula="of:=IF((ISBLANK([$Предупреждения.$H87]))OR(ISBLANK([$Предупреждения.$I87]))OR(ISBLANK([$Предупреждения.K87]));&quot;&quot;;[$Предупреждения.K87])">
            <text:p/>
          </table:table-cell>
          <table:table-cell table:formula="of:=IF((ISBLANK([$Предупреждения.$H87]))OR(ISBLANK([$Предупреждения.$I87]))OR(ISBLANK([$Предупреждения.L87]));&quot;&quot;;[$Предупреждения.L87])">
            <text:p/>
          </table:table-cell>
          <table:table-cell table:formula="of:=IF((ISBLANK([$Предупреждения.$H87]))OR(ISBLANK([$Предупреждения.$I87]))OR(ISBLANK([$Предупреждения.M87]));&quot;&quot;;[$Предупреждения.M87])">
            <text:p/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88]))OR(ISBLANK([$Предупреждения.I88]));&quot;&quot;;CONCATENATE(&quot;rtd&quot;;[$Предупреждения.H88]))">
            <text:p/>
          </table:table-cell>
          <table:table-cell table:style-name="ce103" table:formula="of:=IF((ISBLANK([$Предупреждения.H88]))OR(ISBLANK([$Предупреждения.I88]));&quot;&quot;;[$Предупреждения.I88])">
            <text:p/>
          </table:table-cell>
          <table:table-cell table:formula="of:=IF((ISBLANK([$Предупреждения.H88]))OR(ISBLANK([$Предупреждения.I88]));&quot;&quot;;[$Предупреждения.E88])">
            <text:p/>
          </table:table-cell>
          <table:table-cell table:formula="of:=IF((ISBLANK([$Предупреждения.$H88]))OR(ISBLANK([$Предупреждения.$I88]));&quot;&quot;;[$Предупреждения.F88])">
            <text:p/>
          </table:table-cell>
          <table:table-cell table:formula="of:=IF((ISBLANK([$Предупреждения.$H88]))OR(ISBLANK([$Предупреждения.$I88]));&quot;&quot;;[$Предупреждения.G88])">
            <text:p/>
          </table:table-cell>
          <table:table-cell table:formula="of:=IF((ISBLANK([$Предупреждения.$H88]))OR(ISBLANK([$Предупреждения.$I88]));&quot;&quot;;[$Предупреждения.J88])">
            <text:p/>
          </table:table-cell>
          <table:table-cell table:formula="of:=IF((ISBLANK([$Предупреждения.$H88]))OR(ISBLANK([$Предупреждения.$I88]))OR(ISBLANK([$Предупреждения.K88]));&quot;&quot;;[$Предупреждения.K88])">
            <text:p/>
          </table:table-cell>
          <table:table-cell table:formula="of:=IF((ISBLANK([$Предупреждения.$H88]))OR(ISBLANK([$Предупреждения.$I88]))OR(ISBLANK([$Предупреждения.L88]));&quot;&quot;;[$Предупреждения.L88])">
            <text:p/>
          </table:table-cell>
          <table:table-cell table:formula="of:=IF((ISBLANK([$Предупреждения.$H88]))OR(ISBLANK([$Предупреждения.$I88]))OR(ISBLANK([$Предупреждения.M88]));&quot;&quot;;[$Предупреждения.M88])">
            <text:p/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89]))OR(ISBLANK([$Предупреждения.I89]));&quot;&quot;;CONCATENATE(&quot;rtd&quot;;[$Предупреждения.H89]))">
            <text:p/>
          </table:table-cell>
          <table:table-cell table:style-name="ce103" table:formula="of:=IF((ISBLANK([$Предупреждения.H89]))OR(ISBLANK([$Предупреждения.I89]));&quot;&quot;;[$Предупреждения.I89])">
            <text:p/>
          </table:table-cell>
          <table:table-cell table:formula="of:=IF((ISBLANK([$Предупреждения.H89]))OR(ISBLANK([$Предупреждения.I89]));&quot;&quot;;[$Предупреждения.E89])">
            <text:p/>
          </table:table-cell>
          <table:table-cell table:formula="of:=IF((ISBLANK([$Предупреждения.$H89]))OR(ISBLANK([$Предупреждения.$I89]));&quot;&quot;;[$Предупреждения.F89])">
            <text:p/>
          </table:table-cell>
          <table:table-cell table:formula="of:=IF((ISBLANK([$Предупреждения.$H89]))OR(ISBLANK([$Предупреждения.$I89]));&quot;&quot;;[$Предупреждения.G89])">
            <text:p/>
          </table:table-cell>
          <table:table-cell table:formula="of:=IF((ISBLANK([$Предупреждения.$H89]))OR(ISBLANK([$Предупреждения.$I89]));&quot;&quot;;[$Предупреждения.J89])">
            <text:p/>
          </table:table-cell>
          <table:table-cell table:formula="of:=IF((ISBLANK([$Предупреждения.$H89]))OR(ISBLANK([$Предупреждения.$I89]))OR(ISBLANK([$Предупреждения.K89]));&quot;&quot;;[$Предупреждения.K89])">
            <text:p/>
          </table:table-cell>
          <table:table-cell table:formula="of:=IF((ISBLANK([$Предупреждения.$H89]))OR(ISBLANK([$Предупреждения.$I89]))OR(ISBLANK([$Предупреждения.L89]));&quot;&quot;;[$Предупреждения.L89])">
            <text:p/>
          </table:table-cell>
          <table:table-cell table:formula="of:=IF((ISBLANK([$Предупреждения.$H89]))OR(ISBLANK([$Предупреждения.$I89]))OR(ISBLANK([$Предупреждения.M89]));&quot;&quot;;[$Предупреждения.M89])">
            <text:p/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90]))OR(ISBLANK([$Предупреждения.I90]));&quot;&quot;;CONCATENATE(&quot;rtd&quot;;[$Предупреждения.H90]))">
            <text:p/>
          </table:table-cell>
          <table:table-cell table:style-name="ce103" table:formula="of:=IF((ISBLANK([$Предупреждения.H90]))OR(ISBLANK([$Предупреждения.I90]));&quot;&quot;;[$Предупреждения.I90])">
            <text:p/>
          </table:table-cell>
          <table:table-cell table:formula="of:=IF((ISBLANK([$Предупреждения.H90]))OR(ISBLANK([$Предупреждения.I90]));&quot;&quot;;[$Предупреждения.E90])">
            <text:p/>
          </table:table-cell>
          <table:table-cell table:formula="of:=IF((ISBLANK([$Предупреждения.$H90]))OR(ISBLANK([$Предупреждения.$I90]));&quot;&quot;;[$Предупреждения.F90])">
            <text:p/>
          </table:table-cell>
          <table:table-cell table:formula="of:=IF((ISBLANK([$Предупреждения.$H90]))OR(ISBLANK([$Предупреждения.$I90]));&quot;&quot;;[$Предупреждения.G90])">
            <text:p/>
          </table:table-cell>
          <table:table-cell table:formula="of:=IF((ISBLANK([$Предупреждения.$H90]))OR(ISBLANK([$Предупреждения.$I90]));&quot;&quot;;[$Предупреждения.J90])">
            <text:p/>
          </table:table-cell>
          <table:table-cell table:formula="of:=IF((ISBLANK([$Предупреждения.$H90]))OR(ISBLANK([$Предупреждения.$I90]))OR(ISBLANK([$Предупреждения.K90]));&quot;&quot;;[$Предупреждения.K90])">
            <text:p/>
          </table:table-cell>
          <table:table-cell table:formula="of:=IF((ISBLANK([$Предупреждения.$H90]))OR(ISBLANK([$Предупреждения.$I90]))OR(ISBLANK([$Предупреждения.L90]));&quot;&quot;;[$Предупреждения.L90])">
            <text:p/>
          </table:table-cell>
          <table:table-cell table:formula="of:=IF((ISBLANK([$Предупреждения.$H90]))OR(ISBLANK([$Предупреждения.$I90]))OR(ISBLANK([$Предупреждения.M90]));&quot;&quot;;[$Предупреждения.M90])">
            <text:p/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91]))OR(ISBLANK([$Предупреждения.I91]));&quot;&quot;;CONCATENATE(&quot;rtd&quot;;[$Предупреждения.H91]))">
            <text:p/>
          </table:table-cell>
          <table:table-cell table:style-name="ce103" table:formula="of:=IF((ISBLANK([$Предупреждения.H91]))OR(ISBLANK([$Предупреждения.I91]));&quot;&quot;;[$Предупреждения.I91])">
            <text:p/>
          </table:table-cell>
          <table:table-cell table:formula="of:=IF((ISBLANK([$Предупреждения.H91]))OR(ISBLANK([$Предупреждения.I91]));&quot;&quot;;[$Предупреждения.E91])">
            <text:p/>
          </table:table-cell>
          <table:table-cell table:formula="of:=IF((ISBLANK([$Предупреждения.$H91]))OR(ISBLANK([$Предупреждения.$I91]));&quot;&quot;;[$Предупреждения.F91])">
            <text:p/>
          </table:table-cell>
          <table:table-cell table:formula="of:=IF((ISBLANK([$Предупреждения.$H91]))OR(ISBLANK([$Предупреждения.$I91]));&quot;&quot;;[$Предупреждения.G91])">
            <text:p/>
          </table:table-cell>
          <table:table-cell table:formula="of:=IF((ISBLANK([$Предупреждения.$H91]))OR(ISBLANK([$Предупреждения.$I91]));&quot;&quot;;[$Предупреждения.J91])">
            <text:p/>
          </table:table-cell>
          <table:table-cell table:formula="of:=IF((ISBLANK([$Предупреждения.$H91]))OR(ISBLANK([$Предупреждения.$I91]))OR(ISBLANK([$Предупреждения.K91]));&quot;&quot;;[$Предупреждения.K91])">
            <text:p/>
          </table:table-cell>
          <table:table-cell table:formula="of:=IF((ISBLANK([$Предупреждения.$H91]))OR(ISBLANK([$Предупреждения.$I91]))OR(ISBLANK([$Предупреждения.L91]));&quot;&quot;;[$Предупреждения.L91])">
            <text:p/>
          </table:table-cell>
          <table:table-cell table:formula="of:=IF((ISBLANK([$Предупреждения.$H91]))OR(ISBLANK([$Предупреждения.$I91]))OR(ISBLANK([$Предупреждения.M91]));&quot;&quot;;[$Предупреждения.M91])">
            <text:p/>
          </table:table-cell>
          <table:table-cell table:number-columns-repeated="1015"/>
        </table:table-row>
        <table:table-row table:style-name="ro2">
          <table:table-cell table:style-name="ce103" table:formula="of:=IF((ISBLANK([$Предупреждения.H92]))OR(ISBLANK([$Предупреждения.I92]));&quot;&quot;;CONCATENATE(&quot;rtd&quot;;[$Предупреждения.H92]))">
            <text:p/>
          </table:table-cell>
          <table:table-cell table:style-name="ce103" table:formula="of:=IF((ISBLANK([$Предупреждения.H92]))OR(ISBLANK([$Предупреждения.I92]));&quot;&quot;;[$Предупреждения.I92])">
            <text:p/>
          </table:table-cell>
          <table:table-cell table:formula="of:=IF((ISBLANK([$Предупреждения.H92]))OR(ISBLANK([$Предупреждения.I92]));&quot;&quot;;[$Предупреждения.E92])">
            <text:p/>
          </table:table-cell>
          <table:table-cell table:formula="of:=IF((ISBLANK([$Предупреждения.$H92]))OR(ISBLANK([$Предупреждения.$I92]));&quot;&quot;;[$Предупреждения.F92])">
            <text:p/>
          </table:table-cell>
          <table:table-cell table:formula="of:=IF((ISBLANK([$Предупреждения.$H92]))OR(ISBLANK([$Предупреждения.$I92]));&quot;&quot;;[$Предупреждения.G92])">
            <text:p/>
          </table:table-cell>
          <table:table-cell table:formula="of:=IF((ISBLANK([$Предупреждения.$H92]))OR(ISBLANK([$Предупреждения.$I92]));&quot;&quot;;[$Предупреждения.J92])">
            <text:p/>
          </table:table-cell>
          <table:table-cell table:formula="of:=IF((ISBLANK([$Предупреждения.$H92]))OR(ISBLANK([$Предупреждения.$I92]))OR(ISBLANK([$Предупреждения.K92]));&quot;&quot;;[$Предупреждения.K92])">
            <text:p/>
          </table:table-cell>
          <table:table-cell table:formula="of:=IF((ISBLANK([$Предупреждения.$H92]))OR(ISBLANK([$Предупреждения.$I92]))OR(ISBLANK([$Предупреждения.L92]));&quot;&quot;;[$Предупреждения.L92])">
            <text:p/>
          </table:table-cell>
          <table:table-cell table:formula="of:=IF((ISBLANK([$Предупреждения.$H92]))OR(ISBLANK([$Предупреждения.$I92]))OR(ISBLANK([$Предупреждения.M92]));&quot;&quot;;[$Предупреждения.M92])">
            <text:p/>
          </table:table-cell>
          <table:table-cell table:number-columns-repeated="1015"/>
        </table:table-row>
        <table:table-row table:style-name="ro2">
          <table:table-cell/>
          <table:table-cell table:style-name="ce103"/>
          <table:table-cell table:formula="of:=IF((ISBLANK([$Предупреждения.H93]))OR(ISBLANK([$Предупреждения.I93]));&quot;&quot;;[$Предупреждения.E93])">
            <text:p/>
          </table:table-cell>
          <table:table-cell table:formula="of:=IF((ISBLANK([$Предупреждения.$H93]))OR(ISBLANK([$Предупреждения.$I93]));&quot;&quot;;[$Предупреждения.F93])">
            <text:p/>
          </table:table-cell>
          <table:table-cell table:formula="of:=IF((ISBLANK([$Предупреждения.$H93]))OR(ISBLANK([$Предупреждения.$I93]));&quot;&quot;;[$Предупреждения.G93])">
            <text:p/>
          </table:table-cell>
          <table:table-cell table:formula="of:=IF((ISBLANK([$Предупреждения.$H93]))OR(ISBLANK([$Предупреждения.$I93]));&quot;&quot;;[$Предупреждения.J93])">
            <text:p/>
          </table:table-cell>
          <table:table-cell table:formula="of:=IF((ISBLANK([$Предупреждения.$H93]))OR(ISBLANK([$Предупреждения.$I93]))OR(ISBLANK([$Предупреждения.K93]));&quot;&quot;;[$Предупреждения.K93])">
            <text:p/>
          </table:table-cell>
          <table:table-cell table:formula="of:=IF((ISBLANK([$Предупреждения.$H93]))OR(ISBLANK([$Предупреждения.$I93]))OR(ISBLANK([$Предупреждения.L93]));&quot;&quot;;[$Предупреждения.L93])">
            <text:p/>
          </table:table-cell>
          <table:table-cell table:formula="of:=IF((ISBLANK([$Предупреждения.$H93]))OR(ISBLANK([$Предупреждения.$I93]))OR(ISBLANK([$Предупреждения.M93]));&quot;&quot;;[$Предупреждения.M93])">
            <text:p/>
          </table:table-cell>
          <table:table-cell table:number-columns-repeated="1015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arms" table:style-name="ta1">
        <office:forms form:automatic-focus="false" form:apply-design-mode="false"/>
        <table:table-column table:style-name="co91" table:default-cell-style-name="ce80"/>
        <table:table-column table:style-name="co92" table:default-cell-style-name="ce80"/>
        <table:table-column table:style-name="co93" table:default-cell-style-name="ce80"/>
        <table:table-column table:style-name="co94" table:default-cell-style-name="ce80"/>
        <table:table-column table:style-name="co95" table:default-cell-style-name="ce80"/>
        <table:table-column table:style-name="co96" table:default-cell-style-name="ce80"/>
        <table:table-column table:style-name="co97" table:default-cell-style-name="ce80"/>
        <table:table-column table:style-name="co98" table:default-cell-style-name="ce80"/>
        <table:table-column table:style-name="co99" table:default-cell-style-name="ce80"/>
        <table:table-column table:style-name="co88" table:default-cell-style-name="ce80"/>
        <table:table-column table:style-name="co1" table:number-columns-repeated="2" table:default-cell-style-name="ce80"/>
        <table:table-column table:style-name="co89" table:default-cell-style-name="ce80"/>
        <table:table-column table:style-name="co90" table:default-cell-style-name="ce80"/>
        <table:table-column table:style-name="co1" table:number-columns-repeated="1010" table:default-cell-style-name="ce80"/>
        <table:table-row table:style-name="ro7">
          <table:table-cell office:value-type="string" calcext:value-type="string">
            <text:p>my version</text:p>
          </table:table-cell>
          <table:table-cell table:style-name="ce104" office:value-type="string" calcext:value-type="string">
            <text:p>Код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Описание</text:p>
          </table:table-cell>
          <table:table-cell office:value-type="string" calcext:value-type="string">
            <text:p>0-&gt;1</text:p>
          </table:table-cell>
          <table:table-cell office:value-type="string" calcext:value-type="string">
            <text:p>1-&gt;0</text:p>
          </table:table-cell>
          <table:table-cell office:value-type="string" calcext:value-type="string">
            <text:p>Поле</text:p>
          </table:table-cell>
          <table:table-cell office:value-type="string" calcext:value-type="string">
            <text:p>Объект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 calcext:value-type="string">
            <text:p>Слово аварий 1</text:p>
          </table:table-cell>
          <table:table-cell table:number-columns-repeated="1020"/>
        </table:table-row>
        <table:table-row table:style-name="ro2">
          <table:table-cell table:formula="of:=IF((ISBLANK([$Аварии.H3]))OR(ISBLANK([$Аварии.I3]));&quot;&quot;;CONCATENATE(&quot;rtd&quot;;[$Аварии.H3]))" office:value-type="string" office:string-value="rtdAlarmMessGroupFlag1" calcext:value-type="string">
            <text:p>rtdAlarmMessGroupFlag1</text:p>
          </table:table-cell>
          <table:table-cell table:formula="of:=IF((ISBLANK([$Аварии.$H3]))OR(ISBLANK([$Аварии.$I3]));&quot;&quot;;[$Аварии.I3])" office:value-type="float" office:value="8" calcext:value-type="float">
            <text:p>8</text:p>
          </table:table-cell>
          <table:table-cell table:formula="of:=IF((ISBLANK([$Аварии.$H3]))OR(ISBLANK([$Аварии.$I3]));&quot;&quot;;[$Аварии.E3])" office:value-type="string" office:string-value="SurgeAlarm" calcext:value-type="string">
            <text:p>SurgeAlarm</text:p>
          </table:table-cell>
          <table:table-cell table:formula="of:=IF((ISBLANK([$Аварии.$H3]))OR(ISBLANK([$Аварии.$I3]));&quot;&quot;;[$Аварии.F3])" office:value-type="string" office:string-value="помпаж" calcext:value-type="string">
            <text:p>помпаж</text:p>
          </table:table-cell>
          <table:table-cell table:formula="of:=IF((ISBLANK([$Аварии.$H3]))OR(ISBLANK([$Аварии.$I3]));&quot;&quot;;[$Аварии.G3])" office:value-type="string" office:string-value="Помпаж" calcext:value-type="string">
            <text:p>Помпаж</text:p>
          </table:table-cell>
          <table:table-cell table:formula="of:=IF((ISBLANK([$Аварии.$H3]))OR(ISBLANK([$Аварии.$I3]))OR(ISBLANK([$Аварии.J3]));&quot;&quot;;[$Аварии.J3])" office:value-type="string" office:string-value="Авария : Помпаж  " calcext:value-type="string">
            <text:p>Авария : Помпаж <text:s/></text:p>
          </table:table-cell>
          <table:table-cell table:formula="of:=IF((ISBLANK([$Аварии.$H3]))OR(ISBLANK([$Аварии.$I3]))OR(ISBLANK([$Аварии.K3]));&quot;&quot;;[$Аварии.K3])">
            <text:p/>
          </table:table-cell>
          <table:table-cell table:formula="of:=IF((ISBLANK([$Аварии.$H3]))OR(ISBLANK([$Аварии.$I3]))OR(ISBLANK([$Аварии.L3]));&quot;&quot;;[$Аварии.L3])">
            <text:p/>
          </table:table-cell>
          <table:table-cell table:formula="of:=IF((ISBLANK([$Аварии.$H3]))OR(ISBLANK([$Аварии.$I3]))OR(ISBLANK([$Аварии.M3]));&quot;&quot;;[$Аварии.M3])">
            <text:p/>
          </table:table-cell>
          <table:table-cell table:number-columns-repeated="1015"/>
        </table:table-row>
        <table:table-row table:style-name="ro2">
          <table:table-cell table:formula="of:=IF((ISBLANK([$Аварии.H4]))OR(ISBLANK([$Аварии.I4]));&quot;&quot;;CONCATENATE(&quot;rtd&quot;;[$Аварии.H4]))">
            <text:p/>
          </table:table-cell>
          <table:table-cell table:formula="of:=IF((ISBLANK([$Аварии.$H4]))OR(ISBLANK([$Аварии.$I4]));&quot;&quot;;[$Аварии.I4])">
            <text:p/>
          </table:table-cell>
          <table:table-cell table:formula="of:=IF((ISBLANK([$Аварии.$H4]))OR(ISBLANK([$Аварии.$I4]));&quot;&quot;;[$Аварии.E4])">
            <text:p/>
          </table:table-cell>
          <table:table-cell table:formula="of:=IF((ISBLANK([$Аварии.$H4]))OR(ISBLANK([$Аварии.$I4]));&quot;&quot;;[$Аварии.F4])">
            <text:p/>
          </table:table-cell>
          <table:table-cell table:formula="of:=IF((ISBLANK([$Аварии.$H4]))OR(ISBLANK([$Аварии.$I4]));&quot;&quot;;[$Аварии.G4])">
            <text:p/>
          </table:table-cell>
          <table:table-cell table:formula="of:=IF((ISBLANK([$Аварии.$H4]))OR(ISBLANK([$Аварии.$I4]))OR(ISBLANK([$Аварии.J4]));&quot;&quot;;[$Аварии.J4])">
            <text:p/>
          </table:table-cell>
          <table:table-cell table:formula="of:=IF((ISBLANK([$Аварии.$H4]))OR(ISBLANK([$Аварии.$I4]))OR(ISBLANK([$Аварии.K4]));&quot;&quot;;[$Аварии.K4])">
            <text:p/>
          </table:table-cell>
          <table:table-cell table:formula="of:=IF((ISBLANK([$Аварии.$H4]))OR(ISBLANK([$Аварии.$I4]))OR(ISBLANK([$Аварии.L4]));&quot;&quot;;[$Аварии.L4])">
            <text:p/>
          </table:table-cell>
          <table:table-cell table:formula="of:=IF((ISBLANK([$Аварии.$H4]))OR(ISBLANK([$Аварии.$I4]))OR(ISBLANK([$Аварии.M4]));&quot;&quot;;[$Аварии.M4])">
            <text:p/>
          </table:table-cell>
          <table:table-cell table:number-columns-repeated="1015"/>
        </table:table-row>
        <table:table-row table:style-name="ro2">
          <table:table-cell table:formula="of:=IF((ISBLANK([$Аварии.H5]))OR(ISBLANK([$Аварии.I5]));&quot;&quot;;CONCATENATE(&quot;rtd&quot;;[$Аварии.H5]))">
            <text:p/>
          </table:table-cell>
          <table:table-cell table:formula="of:=IF((ISBLANK([$Аварии.$H5]))OR(ISBLANK([$Аварии.$I5]));&quot;&quot;;[$Аварии.I5])">
            <text:p/>
          </table:table-cell>
          <table:table-cell table:formula="of:=IF((ISBLANK([$Аварии.$H5]))OR(ISBLANK([$Аварии.$I5]));&quot;&quot;;[$Аварии.E5])">
            <text:p/>
          </table:table-cell>
          <table:table-cell table:formula="of:=IF((ISBLANK([$Аварии.$H5]))OR(ISBLANK([$Аварии.$I5]));&quot;&quot;;[$Аварии.F5])">
            <text:p/>
          </table:table-cell>
          <table:table-cell table:formula="of:=IF((ISBLANK([$Аварии.$H5]))OR(ISBLANK([$Аварии.$I5]));&quot;&quot;;[$Аварии.G5])">
            <text:p/>
          </table:table-cell>
          <table:table-cell table:formula="of:=IF((ISBLANK([$Аварии.$H5]))OR(ISBLANK([$Аварии.$I5]))OR(ISBLANK([$Аварии.J5]));&quot;&quot;;[$Аварии.J5])">
            <text:p/>
          </table:table-cell>
          <table:table-cell table:formula="of:=IF((ISBLANK([$Аварии.$H5]))OR(ISBLANK([$Аварии.$I5]))OR(ISBLANK([$Аварии.K5]));&quot;&quot;;[$Аварии.K5])">
            <text:p/>
          </table:table-cell>
          <table:table-cell table:formula="of:=IF((ISBLANK([$Аварии.$H5]))OR(ISBLANK([$Аварии.$I5]))OR(ISBLANK([$Аварии.L5]));&quot;&quot;;[$Аварии.L5])">
            <text:p/>
          </table:table-cell>
          <table:table-cell table:formula="of:=IF((ISBLANK([$Аварии.$H5]))OR(ISBLANK([$Аварии.$I5]))OR(ISBLANK([$Аварии.M5]));&quot;&quot;;[$Аварии.M5])">
            <text:p/>
          </table:table-cell>
          <table:table-cell table:number-columns-repeated="1015"/>
        </table:table-row>
        <table:table-row table:style-name="ro2">
          <table:table-cell table:formula="of:=IF((ISBLANK([$Аварии.H6]))OR(ISBLANK([$Аварии.I6]));&quot;&quot;;CONCATENATE(&quot;rtd&quot;;[$Аварии.H6]))" office:value-type="string" office:string-value="rtdAlarmMessGroupFlag1" calcext:value-type="string">
            <text:p>rtdAlarmMessGroupFlag1</text:p>
          </table:table-cell>
          <table:table-cell table:formula="of:=IF((ISBLANK([$Аварии.$H6]))OR(ISBLANK([$Аварии.$I6]));&quot;&quot;;[$Аварии.I6])" office:value-type="float" office:value="0" calcext:value-type="float">
            <text:p>0</text:p>
          </table:table-cell>
          <table:table-cell table:formula="of:=IF((ISBLANK([$Аварии.$H6]))OR(ISBLANK([$Аварии.$I6]));&quot;&quot;;[$Аварии.E6])" office:value-type="string" office:string-value="OilSupplyPressureLowAlarm" calcext:value-type="string">
            <text:p>OilSupplyPressureLowAlarm</text:p>
          </table:table-cell>
          <table:table-cell table:formula="of:=IF((ISBLANK([$Аварии.$H6]))OR(ISBLANK([$Аварии.$I6]));&quot;&quot;;[$Аварии.F6])" office:value-type="string" office:string-value="давление масло аварийно низко" calcext:value-type="string">
            <text:p>давление масло аварийно низко</text:p>
          </table:table-cell>
          <table:table-cell table:formula="of:=IF((ISBLANK([$Аварии.$H6]))OR(ISBLANK([$Аварии.$I6]));&quot;&quot;;[$Аварии.G6])" office:value-type="string" office:string-value="Давление масло аварийно низко" calcext:value-type="string">
            <text:p>Давление масло аварийно низко</text:p>
          </table:table-cell>
          <table:table-cell table:formula="of:=IF((ISBLANK([$Аварии.$H6]))OR(ISBLANK([$Аварии.$I6]))OR(ISBLANK([$Аварии.J6]));&quot;&quot;;[$Аварии.J6])" office:value-type="string" office:string-value="Авария : Давление масла PT130 низкое" calcext:value-type="string">
            <text:p>Авария : Давление масла PT130 низкое</text:p>
          </table:table-cell>
          <table:table-cell table:formula="of:=IF((ISBLANK([$Аварии.$H6]))OR(ISBLANK([$Аварии.$I6]))OR(ISBLANK([$Аварии.K6]));&quot;&quot;;[$Аварии.K6])">
            <text:p/>
          </table:table-cell>
          <table:table-cell table:formula="of:=IF((ISBLANK([$Аварии.$H6]))OR(ISBLANK([$Аварии.$I6]))OR(ISBLANK([$Аварии.L6]));&quot;&quot;;[$Аварии.L6])" office:value-type="string" office:string-value="rtdAlarmExist" calcext:value-type="string">
            <text:p>rtdAlarmExist</text:p>
          </table:table-cell>
          <table:table-cell table:formula="of:=IF((ISBLANK([$Аварии.$H6]))OR(ISBLANK([$Аварии.$I6]))OR(ISBLANK([$Аварии.M6]));&quot;&quot;;[$Аварии.M6])" office:value-type="string" office:string-value="ai5_OilSupplyPressure" calcext:value-type="string">
            <text:p>ai5_OilSupplyPressure</text:p>
          </table:table-cell>
          <table:table-cell table:number-columns-repeated="1015"/>
        </table:table-row>
        <table:table-row table:style-name="ro2">
          <table:table-cell table:formula="of:=IF((ISBLANK([$Аварии.H7]))OR(ISBLANK([$Аварии.I7]));&quot;&quot;;CONCATENATE(&quot;rtd&quot;;[$Аварии.H7]))" office:value-type="string" office:string-value="rtdAlarmMessGroupFlag1" calcext:value-type="string">
            <text:p>rtdAlarmMessGroupFlag1</text:p>
          </table:table-cell>
          <table:table-cell table:formula="of:=IF((ISBLANK([$Аварии.$H7]))OR(ISBLANK([$Аварии.$I7]));&quot;&quot;;[$Аварии.I7])" office:value-type="float" office:value="1" calcext:value-type="float">
            <text:p>1</text:p>
          </table:table-cell>
          <table:table-cell table:formula="of:=IF((ISBLANK([$Аварии.$H7]))OR(ISBLANK([$Аварии.$I7]));&quot;&quot;;[$Аварии.E7])" office:value-type="string" office:string-value="VibStage1HighAlarm" calcext:value-type="string">
            <text:p>VibStage1HighAlarm</text:p>
          </table:table-cell>
          <table:table-cell table:formula="of:=IF((ISBLANK([$Аварии.$H7]))OR(ISBLANK([$Аварии.$I7]));&quot;&quot;;[$Аварии.F7])" office:value-type="string" office:string-value="вибрация ступени 1 аварийно высока" calcext:value-type="string">
            <text:p>вибрация ступени 1 аварийно высока</text:p>
          </table:table-cell>
          <table:table-cell table:formula="of:=IF((ISBLANK([$Аварии.$H7]))OR(ISBLANK([$Аварии.$I7]));&quot;&quot;;[$Аварии.G7])" office:value-type="string" office:string-value="Вибрация ступени 1 аварийно высока" calcext:value-type="string">
            <text:p>Вибрация ступени 1 аварийно высока</text:p>
          </table:table-cell>
          <table:table-cell table:formula="of:=IF((ISBLANK([$Аварии.$H7]))OR(ISBLANK([$Аварии.$I7]))OR(ISBLANK([$Аварии.J7]));&quot;&quot;;[$Аварии.J7])" office:value-type="string" office:string-value="Авария : Вибрация 1 ступени VT#1 " calcext:value-type="string">
            <text:p>Авария : Вибрация 1 ступени VT#1 </text:p>
          </table:table-cell>
          <table:table-cell table:formula="of:=IF((ISBLANK([$Аварии.$H7]))OR(ISBLANK([$Аварии.$I7]))OR(ISBLANK([$Аварии.K7]));&quot;&quot;;[$Аварии.K7])">
            <text:p/>
          </table:table-cell>
          <table:table-cell table:formula="of:=IF((ISBLANK([$Аварии.$H7]))OR(ISBLANK([$Аварии.$I7]))OR(ISBLANK([$Аварии.L7]));&quot;&quot;;[$Аварии.L7])" office:value-type="string" office:string-value="rtdAlarmExist" calcext:value-type="string">
            <text:p>rtdAlarmExist</text:p>
          </table:table-cell>
          <table:table-cell table:formula="of:=IF((ISBLANK([$Аварии.$H7]))OR(ISBLANK([$Аварии.$I7]))OR(ISBLANK([$Аварии.M7]));&quot;&quot;;[$Аварии.M7])" office:value-type="string" office:string-value="ai6_Stage1Vibration" calcext:value-type="string">
            <text:p>ai6_Stage1Vibration</text:p>
          </table:table-cell>
          <table:table-cell table:number-columns-repeated="1015"/>
        </table:table-row>
        <table:table-row table:style-name="ro2">
          <table:table-cell table:formula="of:=IF((ISBLANK([$Аварии.H8]))OR(ISBLANK([$Аварии.I8]));&quot;&quot;;CONCATENATE(&quot;rtd&quot;;[$Аварии.H8]))" office:value-type="string" office:string-value="rtdAlarmMessGroupFlag1" calcext:value-type="string">
            <text:p>rtdAlarmMessGroupFlag1</text:p>
          </table:table-cell>
          <table:table-cell table:formula="of:=IF((ISBLANK([$Аварии.$H8]))OR(ISBLANK([$Аварии.$I8]));&quot;&quot;;[$Аварии.I8])" office:value-type="float" office:value="2" calcext:value-type="float">
            <text:p>2</text:p>
          </table:table-cell>
          <table:table-cell table:formula="of:=IF((ISBLANK([$Аварии.$H8]))OR(ISBLANK([$Аварии.$I8]));&quot;&quot;;[$Аварии.E8])" office:value-type="string" office:string-value="VibStage2HighAlarm" calcext:value-type="string">
            <text:p>VibStage2HighAlarm</text:p>
          </table:table-cell>
          <table:table-cell table:formula="of:=IF((ISBLANK([$Аварии.$H8]))OR(ISBLANK([$Аварии.$I8]));&quot;&quot;;[$Аварии.F8])" office:value-type="string" office:string-value="вибрация ступени 2 аварийно высока" calcext:value-type="string">
            <text:p>вибрация ступени 2 аварийно высока</text:p>
          </table:table-cell>
          <table:table-cell table:formula="of:=IF((ISBLANK([$Аварии.$H8]))OR(ISBLANK([$Аварии.$I8]));&quot;&quot;;[$Аварии.G8])" office:value-type="string" office:string-value="Вибрация ступени 1 аварийно высока" calcext:value-type="string">
            <text:p>Вибрация ступени 1 аварийно высока</text:p>
          </table:table-cell>
          <table:table-cell table:formula="of:=IF((ISBLANK([$Аварии.$H8]))OR(ISBLANK([$Аварии.$I8]))OR(ISBLANK([$Аварии.J8]));&quot;&quot;;[$Аварии.J8])" office:value-type="string" office:string-value="Авария : Вибрация 2 ступени VT#2 " calcext:value-type="string">
            <text:p>Авария : Вибрация 2 ступени VT#2 </text:p>
          </table:table-cell>
          <table:table-cell table:formula="of:=IF((ISBLANK([$Аварии.$H8]))OR(ISBLANK([$Аварии.$I8]))OR(ISBLANK([$Аварии.K8]));&quot;&quot;;[$Аварии.K8])">
            <text:p/>
          </table:table-cell>
          <table:table-cell table:formula="of:=IF((ISBLANK([$Аварии.$H8]))OR(ISBLANK([$Аварии.$I8]))OR(ISBLANK([$Аварии.L8]));&quot;&quot;;[$Аварии.L8])" office:value-type="string" office:string-value="rtdAlarmExist" calcext:value-type="string">
            <text:p>rtdAlarmExist</text:p>
          </table:table-cell>
          <table:table-cell table:formula="of:=IF((ISBLANK([$Аварии.$H8]))OR(ISBLANK([$Аварии.$I8]))OR(ISBLANK([$Аварии.M8]));&quot;&quot;;[$Аварии.M8])" office:value-type="string" office:string-value="ai7_Stage2Vibration" calcext:value-type="string">
            <text:p>ai7_Stage2Vibration</text:p>
          </table:table-cell>
          <table:table-cell table:number-columns-repeated="1015"/>
        </table:table-row>
        <table:table-row table:style-name="ro2">
          <table:table-cell table:formula="of:=IF((ISBLANK([$Аварии.H9]))OR(ISBLANK([$Аварии.I9]));&quot;&quot;;CONCATENATE(&quot;rtd&quot;;[$Аварии.H9]))" office:value-type="string" office:string-value="rtdAlarmMessGroupFlag1" calcext:value-type="string">
            <text:p>rtdAlarmMessGroupFlag1</text:p>
          </table:table-cell>
          <table:table-cell table:formula="of:=IF((ISBLANK([$Аварии.$H9]))OR(ISBLANK([$Аварии.$I9]));&quot;&quot;;[$Аварии.I9])" office:value-type="float" office:value="3" calcext:value-type="float">
            <text:p>3</text:p>
          </table:table-cell>
          <table:table-cell table:formula="of:=IF((ISBLANK([$Аварии.$H9]))OR(ISBLANK([$Аварии.$I9]));&quot;&quot;;[$Аварии.E9])" office:value-type="string" office:string-value="VibStage3HighAlarm" calcext:value-type="string">
            <text:p>VibStage3HighAlarm</text:p>
          </table:table-cell>
          <table:table-cell table:formula="of:=IF((ISBLANK([$Аварии.$H9]))OR(ISBLANK([$Аварии.$I9]));&quot;&quot;;[$Аварии.F9])" office:value-type="string" office:string-value="вибрация ступени 3 аварийно высока" calcext:value-type="string">
            <text:p>вибрация ступени 3 аварийно высока</text:p>
          </table:table-cell>
          <table:table-cell table:formula="of:=IF((ISBLANK([$Аварии.$H9]))OR(ISBLANK([$Аварии.$I9]));&quot;&quot;;[$Аварии.G9])" office:value-type="string" office:string-value="Вибрация ступени 1 аварийно высока" calcext:value-type="string">
            <text:p>Вибрация ступени 1 аварийно высока</text:p>
          </table:table-cell>
          <table:table-cell table:formula="of:=IF((ISBLANK([$Аварии.$H9]))OR(ISBLANK([$Аварии.$I9]))OR(ISBLANK([$Аварии.J9]));&quot;&quot;;[$Аварии.J9])" office:value-type="string" office:string-value="Авария : Вибрация 3 ступени VT#3 " calcext:value-type="string">
            <text:p>Авария : Вибрация 3 ступени VT#3 </text:p>
          </table:table-cell>
          <table:table-cell table:formula="of:=IF((ISBLANK([$Аварии.$H9]))OR(ISBLANK([$Аварии.$I9]))OR(ISBLANK([$Аварии.K9]));&quot;&quot;;[$Аварии.K9])">
            <text:p/>
          </table:table-cell>
          <table:table-cell table:formula="of:=IF((ISBLANK([$Аварии.$H9]))OR(ISBLANK([$Аварии.$I9]))OR(ISBLANK([$Аварии.L9]));&quot;&quot;;[$Аварии.L9])" office:value-type="string" office:string-value="rtdAlarmExist" calcext:value-type="string">
            <text:p>rtdAlarmExist</text:p>
          </table:table-cell>
          <table:table-cell table:formula="of:=IF((ISBLANK([$Аварии.$H9]))OR(ISBLANK([$Аварии.$I9]))OR(ISBLANK([$Аварии.M9]));&quot;&quot;;[$Аварии.M9])" office:value-type="string" office:string-value="ai8_Stage3Vibration" calcext:value-type="string">
            <text:p>ai8_Stage3Vibration</text:p>
          </table:table-cell>
          <table:table-cell table:number-columns-repeated="1015"/>
        </table:table-row>
        <table:table-row table:style-name="ro2">
          <table:table-cell table:formula="of:=IF((ISBLANK([$Аварии.H10]))OR(ISBLANK([$Аварии.I10]));&quot;&quot;;CONCATENATE(&quot;rtd&quot;;[$Аварии.H10]))" office:value-type="string" office:string-value="rtdAlarmMessGroupFlag1" calcext:value-type="string">
            <text:p>rtdAlarmMessGroupFlag1</text:p>
          </table:table-cell>
          <table:table-cell table:formula="of:=IF((ISBLANK([$Аварии.$H10]))OR(ISBLANK([$Аварии.$I10]));&quot;&quot;;[$Аварии.I10])" office:value-type="float" office:value="5" calcext:value-type="float">
            <text:p>5</text:p>
          </table:table-cell>
          <table:table-cell table:formula="of:=IF((ISBLANK([$Аварии.$H10]))OR(ISBLANK([$Аварии.$I10]));&quot;&quot;;[$Аварии.E10])" office:value-type="string" office:string-value="MotorCurrentAlarm" calcext:value-type="string">
            <text:p>MotorCurrentAlarm</text:p>
          </table:table-cell>
          <table:table-cell table:formula="of:=IF((ISBLANK([$Аварии.$H10]))OR(ISBLANK([$Аварии.$I10]));&quot;&quot;;[$Аварии.F10])" office:value-type="string" office:string-value="ток двигателя аварийно высок" calcext:value-type="string">
            <text:p>ток двигателя аварийно высок</text:p>
          </table:table-cell>
          <table:table-cell table:formula="of:=IF((ISBLANK([$Аварии.$H10]))OR(ISBLANK([$Аварии.$I10]));&quot;&quot;;[$Аварии.G10])" office:value-type="string" office:string-value="Ток двигателя аварийно высок" calcext:value-type="string">
            <text:p>Ток двигателя аварийно высок</text:p>
          </table:table-cell>
          <table:table-cell table:formula="of:=IF((ISBLANK([$Аварии.$H10]))OR(ISBLANK([$Аварии.$I10]))OR(ISBLANK([$Аварии.J10]));&quot;&quot;;[$Аварии.J10])" office:value-type="string" office:string-value="Авария : Ток двигателя TD140 " calcext:value-type="string">
            <text:p>Авария : Ток двигателя TD140 </text:p>
          </table:table-cell>
          <table:table-cell table:formula="of:=IF((ISBLANK([$Аварии.$H10]))OR(ISBLANK([$Аварии.$I10]))OR(ISBLANK([$Аварии.K10]));&quot;&quot;;[$Аварии.K10])">
            <text:p/>
          </table:table-cell>
          <table:table-cell table:formula="of:=IF((ISBLANK([$Аварии.$H10]))OR(ISBLANK([$Аварии.$I10]))OR(ISBLANK([$Аварии.L10]));&quot;&quot;;[$Аварии.L10])" office:value-type="string" office:string-value="rtdAlarmExist" calcext:value-type="string">
            <text:p>rtdAlarmExist</text:p>
          </table:table-cell>
          <table:table-cell table:formula="of:=IF((ISBLANK([$Аварии.$H10]))OR(ISBLANK([$Аварии.$I10]))OR(ISBLANK([$Аварии.M10]));&quot;&quot;;[$Аварии.M10])" office:value-type="string" office:string-value="ai10_MotorCurrent" calcext:value-type="string">
            <text:p>ai10_MotorCurrent</text:p>
          </table:table-cell>
          <table:table-cell table:number-columns-repeated="1015"/>
        </table:table-row>
        <table:table-row table:style-name="ro2">
          <table:table-cell table:formula="of:=IF((ISBLANK([$Аварии.H11]))OR(ISBLANK([$Аварии.I11]));&quot;&quot;;CONCATENATE(&quot;rtd&quot;;[$Аварии.H11]))" office:value-type="string" office:string-value="rtdAlarmMessGroupFlag1" calcext:value-type="string">
            <text:p>rtdAlarmMessGroupFlag1</text:p>
          </table:table-cell>
          <table:table-cell table:formula="of:=IF((ISBLANK([$Аварии.$H11]))OR(ISBLANK([$Аварии.$I11]));&quot;&quot;;[$Аварии.I11])" office:value-type="float" office:value="6" calcext:value-type="float">
            <text:p>6</text:p>
          </table:table-cell>
          <table:table-cell table:formula="of:=IF((ISBLANK([$Аварии.$H11]))OR(ISBLANK([$Аварии.$I11]));&quot;&quot;;[$Аварии.E11])" office:value-type="string" office:string-value="OilSupplyTempHighAlarm" calcext:value-type="string">
            <text:p>OilSupplyTempHighAlarm</text:p>
          </table:table-cell>
          <table:table-cell table:formula="of:=IF((ISBLANK([$Аварии.$H11]))OR(ISBLANK([$Аварии.$I11]));&quot;&quot;;[$Аварии.F11])" office:value-type="string" office:string-value="температура масла аварийно высока" calcext:value-type="string">
            <text:p>температура масла аварийно высока</text:p>
          </table:table-cell>
          <table:table-cell table:formula="of:=IF((ISBLANK([$Аварии.$H11]))OR(ISBLANK([$Аварии.$I11]));&quot;&quot;;[$Аварии.G11])" office:value-type="string" office:string-value="Температура масла аварийно высока" calcext:value-type="string">
            <text:p>Температура масла аварийно высока</text:p>
          </table:table-cell>
          <table:table-cell table:formula="of:=IF((ISBLANK([$Аварии.$H11]))OR(ISBLANK([$Аварии.$I11]))OR(ISBLANK([$Аварии.J11]));&quot;&quot;;[$Аварии.J11])" office:value-type="string" office:string-value="Авария : Температура масла TE130 высокая" calcext:value-type="string">
            <text:p>Авария : Температура масла TE130 высокая</text:p>
          </table:table-cell>
          <table:table-cell table:formula="of:=IF((ISBLANK([$Аварии.$H11]))OR(ISBLANK([$Аварии.$I11]))OR(ISBLANK([$Аварии.K11]));&quot;&quot;;[$Аварии.K11])">
            <text:p/>
          </table:table-cell>
          <table:table-cell table:formula="of:=IF((ISBLANK([$Аварии.$H11]))OR(ISBLANK([$Аварии.$I11]))OR(ISBLANK([$Аварии.L11]));&quot;&quot;;[$Аварии.L11])" office:value-type="string" office:string-value="rtdAlarmExist" calcext:value-type="string">
            <text:p>rtdAlarmExist</text:p>
          </table:table-cell>
          <table:table-cell table:formula="of:=IF((ISBLANK([$Аварии.$H11]))OR(ISBLANK([$Аварии.$I11]))OR(ISBLANK([$Аварии.M11]));&quot;&quot;;[$Аварии.M11])" office:value-type="string" office:string-value="ai14_OilSupplyTemperature" calcext:value-type="string">
            <text:p>ai14_OilSupplyTemperature</text:p>
          </table:table-cell>
          <table:table-cell table:number-columns-repeated="1015"/>
        </table:table-row>
        <table:table-row table:style-name="ro2">
          <table:table-cell table:formula="of:=IF((ISBLANK([$Аварии.H12]))OR(ISBLANK([$Аварии.I12]));&quot;&quot;;CONCATENATE(&quot;rtd&quot;;[$Аварии.H12]))" office:value-type="string" office:string-value="rtdAlarmMessGroupFlag1" calcext:value-type="string">
            <text:p>rtdAlarmMessGroupFlag1</text:p>
          </table:table-cell>
          <table:table-cell table:formula="of:=IF((ISBLANK([$Аварии.$H12]))OR(ISBLANK([$Аварии.$I12]));&quot;&quot;;[$Аварии.I12])" office:value-type="float" office:value="7" calcext:value-type="float">
            <text:p>7</text:p>
          </table:table-cell>
          <table:table-cell table:formula="of:=IF((ISBLANK([$Аварии.$H12]))OR(ISBLANK([$Аварии.$I12]));&quot;&quot;;[$Аварии.E12])" office:value-type="string" office:string-value="Stage3InletTempHighAlarm" calcext:value-type="string">
            <text:p>Stage3InletTempHighAlarm</text:p>
          </table:table-cell>
          <table:table-cell table:formula="of:=IF((ISBLANK([$Аварии.$H12]))OR(ISBLANK([$Аварии.$I12]));&quot;&quot;;[$Аварии.F12])" office:value-type="string" office:string-value="температура входа ступени 3 аварийно высока" calcext:value-type="string">
            <text:p>температура входа ступени 3 аварийно высока</text:p>
          </table:table-cell>
          <table:table-cell table:formula="of:=IF((ISBLANK([$Аварии.$H12]))OR(ISBLANK([$Аварии.$I12]));&quot;&quot;;[$Аварии.G12])" office:value-type="string" office:string-value="Температура входа ступени 3 аварийно высока" calcext:value-type="string">
            <text:p>Температура входа ступени 3 аварийно высока</text:p>
          </table:table-cell>
          <table:table-cell table:formula="of:=IF((ISBLANK([$Аварии.$H12]))OR(ISBLANK([$Аварии.$I12]))OR(ISBLANK([$Аварии.J12]));&quot;&quot;;[$Аварии.J12])" office:value-type="string" office:string-value="Авария : Температура воздуха на входе 3 ступени TE231 высокая" calcext:value-type="string">
            <text:p>Авария : Температура воздуха на входе 3 ступени TE231 высокая</text:p>
          </table:table-cell>
          <table:table-cell table:formula="of:=IF((ISBLANK([$Аварии.$H12]))OR(ISBLANK([$Аварии.$I12]))OR(ISBLANK([$Аварии.K12]));&quot;&quot;;[$Аварии.K12])">
            <text:p/>
          </table:table-cell>
          <table:table-cell table:formula="of:=IF((ISBLANK([$Аварии.$H12]))OR(ISBLANK([$Аварии.$I12]))OR(ISBLANK([$Аварии.L12]));&quot;&quot;;[$Аварии.L12])" office:value-type="string" office:string-value="rtdAlarmExist" calcext:value-type="string">
            <text:p>rtdAlarmExist</text:p>
          </table:table-cell>
          <table:table-cell table:formula="of:=IF((ISBLANK([$Аварии.$H12]))OR(ISBLANK([$Аварии.$I12]))OR(ISBLANK([$Аварии.M12]));&quot;&quot;;[$Аварии.M12])" office:value-type="string" office:string-value="ai15_Stage3InletTemperature" calcext:value-type="string">
            <text:p>ai15_Stage3InletTemperature</text:p>
          </table:table-cell>
          <table:table-cell table:number-columns-repeated="1015"/>
        </table:table-row>
        <table:table-row table:style-name="ro2">
          <table:table-cell table:formula="of:=IF((ISBLANK([$Аварии.H13]))OR(ISBLANK([$Аварии.I13]));&quot;&quot;;CONCATENATE(&quot;rtd&quot;;[$Аварии.H13]))" office:value-type="string" office:string-value="rtdAlarmMessGroupFlag2" calcext:value-type="string">
            <text:p>rtdAlarmMessGroupFlag2</text:p>
          </table:table-cell>
          <table:table-cell table:formula="of:=IF((ISBLANK([$Аварии.$H13]))OR(ISBLANK([$Аварии.$I13]));&quot;&quot;;[$Аварии.I13])" office:value-type="float" office:value="9" calcext:value-type="float">
            <text:p>9</text:p>
          </table:table-cell>
          <table:table-cell table:formula="of:=IF((ISBLANK([$Аварии.$H13]))OR(ISBLANK([$Аварии.$I13]));&quot;&quot;;[$Аварии.E13])" office:value-type="string" office:string-value="MotorCoil_R_TempHighAlarm" calcext:value-type="string">
            <text:p>MotorCoil_R_TempHighAlarm</text:p>
          </table:table-cell>
          <table:table-cell table:formula="of:=IF((ISBLANK([$Аварии.$H13]))OR(ISBLANK([$Аварии.$I13]));&quot;&quot;;[$Аварии.F13])" office:value-type="string" office:string-value="температура обмотки Р двигателя аварийно высока" calcext:value-type="string">
            <text:p>температура обмотки Р двигателя аварийно высока</text:p>
          </table:table-cell>
          <table:table-cell table:formula="of:=IF((ISBLANK([$Аварии.$H13]))OR(ISBLANK([$Аварии.$I13]));&quot;&quot;;[$Аварии.G13])" office:value-type="string" office:string-value="Температура обмотки Р двигателя аварийно высока" calcext:value-type="string">
            <text:p>Температура обмотки Р двигателя аварийно высока</text:p>
          </table:table-cell>
          <table:table-cell table:formula="of:=IF((ISBLANK([$Аварии.$H13]))OR(ISBLANK([$Аварии.$I13]))OR(ISBLANK([$Аварии.J13]));&quot;&quot;;[$Аварии.J13])" office:value-type="string" office:string-value="Авария : Температура обмотки двигателя &quot;R&quot; TE140 высокая" calcext:value-type="string">
            <text:p>Авария : Температура обмотки двигателя "R" TE140 высокая</text:p>
          </table:table-cell>
          <table:table-cell table:formula="of:=IF((ISBLANK([$Аварии.$H13]))OR(ISBLANK([$Аварии.$I13]))OR(ISBLANK([$Аварии.K13]));&quot;&quot;;[$Аварии.K13])">
            <text:p/>
          </table:table-cell>
          <table:table-cell table:formula="of:=IF((ISBLANK([$Аварии.$H13]))OR(ISBLANK([$Аварии.$I13]))OR(ISBLANK([$Аварии.L13]));&quot;&quot;;[$Аварии.L13])" office:value-type="string" office:string-value="rtdAlarmExist" calcext:value-type="string">
            <text:p>rtdAlarmExist</text:p>
          </table:table-cell>
          <table:table-cell table:formula="of:=IF((ISBLANK([$Аварии.$H13]))OR(ISBLANK([$Аварии.$I13]))OR(ISBLANK([$Аварии.M13]));&quot;&quot;;[$Аварии.M13])" office:value-type="string" office:string-value="ai17_MotorWindingRTemperature" calcext:value-type="string">
            <text:p>ai17_MotorWindingRTemperature</text:p>
          </table:table-cell>
          <table:table-cell table:number-columns-repeated="1015"/>
        </table:table-row>
        <table:table-row table:style-name="ro2">
          <table:table-cell table:formula="of:=IF((ISBLANK([$Аварии.H14]))OR(ISBLANK([$Аварии.I14]));&quot;&quot;;CONCATENATE(&quot;rtd&quot;;[$Аварии.H14]))">
            <text:p/>
          </table:table-cell>
          <table:table-cell table:formula="of:=IF((ISBLANK([$Аварии.$H14]))OR(ISBLANK([$Аварии.$I14]));&quot;&quot;;[$Аварии.I14])">
            <text:p/>
          </table:table-cell>
          <table:table-cell table:formula="of:=IF((ISBLANK([$Аварии.$H14]))OR(ISBLANK([$Аварии.$I14]));&quot;&quot;;[$Аварии.E14])">
            <text:p/>
          </table:table-cell>
          <table:table-cell table:formula="of:=IF((ISBLANK([$Аварии.$H14]))OR(ISBLANK([$Аварии.$I14]));&quot;&quot;;[$Аварии.F14])">
            <text:p/>
          </table:table-cell>
          <table:table-cell table:formula="of:=IF((ISBLANK([$Аварии.$H14]))OR(ISBLANK([$Аварии.$I14]));&quot;&quot;;[$Аварии.G14])">
            <text:p/>
          </table:table-cell>
          <table:table-cell table:formula="of:=IF((ISBLANK([$Аварии.$H14]))OR(ISBLANK([$Аварии.$I14]))OR(ISBLANK([$Аварии.J14]));&quot;&quot;;[$Аварии.J14])">
            <text:p/>
          </table:table-cell>
          <table:table-cell table:formula="of:=IF((ISBLANK([$Аварии.$H14]))OR(ISBLANK([$Аварии.$I14]))OR(ISBLANK([$Аварии.K14]));&quot;&quot;;[$Аварии.K14])">
            <text:p/>
          </table:table-cell>
          <table:table-cell table:formula="of:=IF((ISBLANK([$Аварии.$H14]))OR(ISBLANK([$Аварии.$I14]))OR(ISBLANK([$Аварии.L14]));&quot;&quot;;[$Аварии.L14])">
            <text:p/>
          </table:table-cell>
          <table:table-cell table:formula="of:=IF((ISBLANK([$Аварии.$H14]))OR(ISBLANK([$Аварии.$I14]))OR(ISBLANK([$Аварии.M14]));&quot;&quot;;[$Аварии.M14])">
            <text:p/>
          </table:table-cell>
          <table:table-cell table:number-columns-repeated="1015"/>
        </table:table-row>
        <table:table-row table:style-name="ro2">
          <table:table-cell table:formula="of:=IF((ISBLANK([$Аварии.H15]))OR(ISBLANK([$Аварии.I15]));&quot;&quot;;CONCATENATE(&quot;rtd&quot;;[$Аварии.H15]))">
            <text:p/>
          </table:table-cell>
          <table:table-cell table:formula="of:=IF((ISBLANK([$Аварии.$H15]))OR(ISBLANK([$Аварии.$I15]));&quot;&quot;;[$Аварии.I15])">
            <text:p/>
          </table:table-cell>
          <table:table-cell table:formula="of:=IF((ISBLANK([$Аварии.$H15]))OR(ISBLANK([$Аварии.$I15]));&quot;&quot;;[$Аварии.E15])">
            <text:p/>
          </table:table-cell>
          <table:table-cell table:formula="of:=IF((ISBLANK([$Аварии.$H15]))OR(ISBLANK([$Аварии.$I15]));&quot;&quot;;[$Аварии.F15])">
            <text:p/>
          </table:table-cell>
          <table:table-cell table:formula="of:=IF((ISBLANK([$Аварии.$H15]))OR(ISBLANK([$Аварии.$I15]));&quot;&quot;;[$Аварии.G15])">
            <text:p/>
          </table:table-cell>
          <table:table-cell table:formula="of:=IF((ISBLANK([$Аварии.$H15]))OR(ISBLANK([$Аварии.$I15]))OR(ISBLANK([$Аварии.J15]));&quot;&quot;;[$Аварии.J15])">
            <text:p/>
          </table:table-cell>
          <table:table-cell table:formula="of:=IF((ISBLANK([$Аварии.$H15]))OR(ISBLANK([$Аварии.$I15]))OR(ISBLANK([$Аварии.K15]));&quot;&quot;;[$Аварии.K15])">
            <text:p/>
          </table:table-cell>
          <table:table-cell table:formula="of:=IF((ISBLANK([$Аварии.$H15]))OR(ISBLANK([$Аварии.$I15]))OR(ISBLANK([$Аварии.L15]));&quot;&quot;;[$Аварии.L15])">
            <text:p/>
          </table:table-cell>
          <table:table-cell table:formula="of:=IF((ISBLANK([$Аварии.$H15]))OR(ISBLANK([$Аварии.$I15]))OR(ISBLANK([$Аварии.M15]));&quot;&quot;;[$Аварии.M15])">
            <text:p/>
          </table:table-cell>
          <table:table-cell table:number-columns-repeated="1015"/>
        </table:table-row>
        <table:table-row table:style-name="ro2">
          <table:table-cell table:formula="of:=IF((ISBLANK([$Аварии.H16]))OR(ISBLANK([$Аварии.I16]));&quot;&quot;;CONCATENATE(&quot;rtd&quot;;[$Аварии.H16]))" office:value-type="string" office:string-value="rtdAlarmMessGroupFlag2" calcext:value-type="string">
            <text:p>rtdAlarmMessGroupFlag2</text:p>
          </table:table-cell>
          <table:table-cell table:formula="of:=IF((ISBLANK([$Аварии.$H16]))OR(ISBLANK([$Аварии.$I16]));&quot;&quot;;[$Аварии.I16])" office:value-type="float" office:value="12" calcext:value-type="float">
            <text:p>12</text:p>
          </table:table-cell>
          <table:table-cell table:formula="of:=IF((ISBLANK([$Аварии.$H16]))OR(ISBLANK([$Аварии.$I16]));&quot;&quot;;[$Аварии.E16])" office:value-type="string" office:string-value="Stage2InletTempHighAlarm" calcext:value-type="string">
            <text:p>Stage2InletTempHighAlarm</text:p>
          </table:table-cell>
          <table:table-cell table:formula="of:=IF((ISBLANK([$Аварии.$H16]))OR(ISBLANK([$Аварии.$I16]));&quot;&quot;;[$Аварии.F16])" office:value-type="string" office:string-value="температура входа ступени 2 аварийно высока" calcext:value-type="string">
            <text:p>температура входа ступени 2 аварийно высока</text:p>
          </table:table-cell>
          <table:table-cell table:formula="of:=IF((ISBLANK([$Аварии.$H16]))OR(ISBLANK([$Аварии.$I16]));&quot;&quot;;[$Аварии.G16])" office:value-type="string" office:string-value="Температура входа ступени 2 аварийно высока" calcext:value-type="string">
            <text:p>Температура входа ступени 2 аварийно высока</text:p>
          </table:table-cell>
          <table:table-cell table:formula="of:=IF((ISBLANK([$Аварии.$H16]))OR(ISBLANK([$Аварии.$I16]))OR(ISBLANK([$Аварии.J16]));&quot;&quot;;[$Аварии.J16])" office:value-type="string" office:string-value="Авария : Температура воздуха на входе 2 ступени TE221 высокая" calcext:value-type="string">
            <text:p>Авария : Температура воздуха на входе 2 ступени TE221 высокая</text:p>
          </table:table-cell>
          <table:table-cell table:formula="of:=IF((ISBLANK([$Аварии.$H16]))OR(ISBLANK([$Аварии.$I16]))OR(ISBLANK([$Аварии.K16]));&quot;&quot;;[$Аварии.K16])">
            <text:p/>
          </table:table-cell>
          <table:table-cell table:formula="of:=IF((ISBLANK([$Аварии.$H16]))OR(ISBLANK([$Аварии.$I16]))OR(ISBLANK([$Аварии.L16]));&quot;&quot;;[$Аварии.L16])" office:value-type="string" office:string-value="rtdAlarmExist" calcext:value-type="string">
            <text:p>rtdAlarmExist</text:p>
          </table:table-cell>
          <table:table-cell table:formula="of:=IF((ISBLANK([$Аварии.$H16]))OR(ISBLANK([$Аварии.$I16]))OR(ISBLANK([$Аварии.M16]));&quot;&quot;;[$Аварии.M16])" office:value-type="string" office:string-value="ai20_Stage2InletTemperature" calcext:value-type="string">
            <text:p>ai20_Stage2InletTemperature</text:p>
          </table:table-cell>
          <table:table-cell table:number-columns-repeated="1015"/>
        </table:table-row>
        <table:table-row table:style-name="ro2">
          <table:table-cell table:formula="of:=IF((ISBLANK([$Аварии.H17]))OR(ISBLANK([$Аварии.I17]));&quot;&quot;;CONCATENATE(&quot;rtd&quot;;[$Аварии.H17]))" office:value-type="string" office:string-value="rtdAlarmMessGroupFlag2" calcext:value-type="string">
            <text:p>rtdAlarmMessGroupFlag2</text:p>
          </table:table-cell>
          <table:table-cell table:formula="of:=IF((ISBLANK([$Аварии.$H17]))OR(ISBLANK([$Аварии.$I17]));&quot;&quot;;[$Аварии.I17])" office:value-type="float" office:value="14" calcext:value-type="float">
            <text:p>14</text:p>
          </table:table-cell>
          <table:table-cell table:formula="of:=IF((ISBLANK([$Аварии.$H17]))OR(ISBLANK([$Аварии.$I17]));&quot;&quot;;[$Аварии.E17])" office:value-type="string" office:string-value="MotorBearing_DE_TempHighAlarm" calcext:value-type="string">
            <text:p>MotorBearing_DE_TempHighAlarm</text:p>
          </table:table-cell>
          <table:table-cell table:formula="of:=IF((ISBLANK([$Аварии.$H17]))OR(ISBLANK([$Аварии.$I17]));&quot;&quot;;[$Аварии.F17])" office:value-type="string" office:string-value="температура подшипника на приводном конце аварийно высока" calcext:value-type="string">
            <text:p>температура подшипника на приводном конце аварийно высока</text:p>
          </table:table-cell>
          <table:table-cell table:formula="of:=IF((ISBLANK([$Аварии.$H17]))OR(ISBLANK([$Аварии.$I17]));&quot;&quot;;[$Аварии.G17])" office:value-type="string" office:string-value="Температура подшипника на приводном конце аварийно высока" calcext:value-type="string">
            <text:p>Температура подшипника на приводном конце аварийно высока</text:p>
          </table:table-cell>
          <table:table-cell table:formula="of:=IF((ISBLANK([$Аварии.$H17]))OR(ISBLANK([$Аварии.$I17]))OR(ISBLANK([$Аварии.J17]));&quot;&quot;;[$Аварии.J17])" office:value-type="string" office:string-value="Авария : Температура DE подшипника TE143 высокая" calcext:value-type="string">
            <text:p>Авария : Температура DE подшипника TE143 высокая</text:p>
          </table:table-cell>
          <table:table-cell table:formula="of:=IF((ISBLANK([$Аварии.$H17]))OR(ISBLANK([$Аварии.$I17]))OR(ISBLANK([$Аварии.K17]));&quot;&quot;;[$Аварии.K17])">
            <text:p/>
          </table:table-cell>
          <table:table-cell table:formula="of:=IF((ISBLANK([$Аварии.$H17]))OR(ISBLANK([$Аварии.$I17]))OR(ISBLANK([$Аварии.L17]));&quot;&quot;;[$Аварии.L17])" office:value-type="string" office:string-value="rtdAlarmExist" calcext:value-type="string">
            <text:p>rtdAlarmExist</text:p>
          </table:table-cell>
          <table:table-cell table:formula="of:=IF((ISBLANK([$Аварии.$H17]))OR(ISBLANK([$Аварии.$I17]))OR(ISBLANK([$Аварии.M17]));&quot;&quot;;[$Аварии.M17])" office:value-type="string" office:string-value="ai18_MotorBearingDETemperature" calcext:value-type="string">
            <text:p>ai18_MotorBearingDETemperature</text:p>
          </table:table-cell>
          <table:table-cell table:number-columns-repeated="1015"/>
        </table:table-row>
        <table:table-row table:style-name="ro2">
          <table:table-cell table:formula="of:=IF((ISBLANK([$Аварии.H18]))OR(ISBLANK([$Аварии.I18]));&quot;&quot;;CONCATENATE(&quot;rtd&quot;;[$Аварии.H18]))" office:value-type="string" office:string-value="rtdAlarmMessGroupFlag2" calcext:value-type="string">
            <text:p>rtdAlarmMessGroupFlag2</text:p>
          </table:table-cell>
          <table:table-cell table:formula="of:=IF((ISBLANK([$Аварии.$H18]))OR(ISBLANK([$Аварии.$I18]));&quot;&quot;;[$Аварии.I18])" office:value-type="float" office:value="15" calcext:value-type="float">
            <text:p>15</text:p>
          </table:table-cell>
          <table:table-cell table:formula="of:=IF((ISBLANK([$Аварии.$H18]))OR(ISBLANK([$Аварии.$I18]));&quot;&quot;;[$Аварии.E18])" office:value-type="string" office:string-value="MotorBearing_NDE_TempHighAlarm" calcext:value-type="string">
            <text:p>MotorBearing_NDE_TempHighAlarm</text:p>
          </table:table-cell>
          <table:table-cell table:formula="of:=IF((ISBLANK([$Аварии.$H18]))OR(ISBLANK([$Аварии.$I18]));&quot;&quot;;[$Аварии.F18])" office:value-type="string" office:string-value="температура подшипника на неприводном конце аварийно высока" calcext:value-type="string">
            <text:p>температура подшипника на неприводном конце аварийно высока</text:p>
          </table:table-cell>
          <table:table-cell table:formula="of:=IF((ISBLANK([$Аварии.$H18]))OR(ISBLANK([$Аварии.$I18]));&quot;&quot;;[$Аварии.G18])" office:value-type="string" office:string-value="Температура подшипника на неприводном конце аварийно высока" calcext:value-type="string">
            <text:p>Температура подшипника на неприводном конце аварийно высока</text:p>
          </table:table-cell>
          <table:table-cell table:formula="of:=IF((ISBLANK([$Аварии.$H18]))OR(ISBLANK([$Аварии.$I18]))OR(ISBLANK([$Аварии.J18]));&quot;&quot;;[$Аварии.J18])" office:value-type="string" office:string-value="Авария : Температура NDE подшипника TE144 высокая" calcext:value-type="string">
            <text:p>Авария : Температура NDE подшипника TE144 высокая</text:p>
          </table:table-cell>
          <table:table-cell table:formula="of:=IF((ISBLANK([$Аварии.$H18]))OR(ISBLANK([$Аварии.$I18]))OR(ISBLANK([$Аварии.K18]));&quot;&quot;;[$Аварии.K18])">
            <text:p/>
          </table:table-cell>
          <table:table-cell table:formula="of:=IF((ISBLANK([$Аварии.$H18]))OR(ISBLANK([$Аварии.$I18]))OR(ISBLANK([$Аварии.L18]));&quot;&quot;;[$Аварии.L18])" office:value-type="string" office:string-value="rtdAlarmExist" calcext:value-type="string">
            <text:p>rtdAlarmExist</text:p>
          </table:table-cell>
          <table:table-cell table:formula="of:=IF((ISBLANK([$Аварии.$H18]))OR(ISBLANK([$Аварии.$I18]))OR(ISBLANK([$Аварии.M18]));&quot;&quot;;[$Аварии.M18])" office:value-type="string" office:string-value="ai19_MotorBearingNDETemperature" calcext:value-type="string">
            <text:p>ai19_MotorBearingNDETemperature</text:p>
          </table:table-cell>
          <table:table-cell table:number-columns-repeated="1015"/>
        </table:table-row>
        <table:table-row table:style-name="ro2">
          <table:table-cell table:formula="of:=IF((ISBLANK([$Аварии.H19]))OR(ISBLANK([$Аварии.I19]));&quot;&quot;;CONCATENATE(&quot;rtd&quot;;[$Аварии.H19]))">
            <text:p/>
          </table:table-cell>
          <table:table-cell table:formula="of:=IF((ISBLANK([$Аварии.$H19]))OR(ISBLANK([$Аварии.$I19]));&quot;&quot;;[$Аварии.I19])">
            <text:p/>
          </table:table-cell>
          <table:table-cell table:formula="of:=IF((ISBLANK([$Аварии.$H19]))OR(ISBLANK([$Аварии.$I19]));&quot;&quot;;[$Аварии.E19])">
            <text:p/>
          </table:table-cell>
          <table:table-cell table:formula="of:=IF((ISBLANK([$Аварии.$H19]))OR(ISBLANK([$Аварии.$I19]));&quot;&quot;;[$Аварии.F19])">
            <text:p/>
          </table:table-cell>
          <table:table-cell table:formula="of:=IF((ISBLANK([$Аварии.$H19]))OR(ISBLANK([$Аварии.$I19]));&quot;&quot;;[$Аварии.G19])">
            <text:p/>
          </table:table-cell>
          <table:table-cell table:formula="of:=IF((ISBLANK([$Аварии.$H19]))OR(ISBLANK([$Аварии.$I19]))OR(ISBLANK([$Аварии.J19]));&quot;&quot;;[$Аварии.J19])">
            <text:p/>
          </table:table-cell>
          <table:table-cell table:formula="of:=IF((ISBLANK([$Аварии.$H19]))OR(ISBLANK([$Аварии.$I19]))OR(ISBLANK([$Аварии.K19]));&quot;&quot;;[$Аварии.K19])">
            <text:p/>
          </table:table-cell>
          <table:table-cell table:formula="of:=IF((ISBLANK([$Аварии.$H19]))OR(ISBLANK([$Аварии.$I19]))OR(ISBLANK([$Аварии.L19]));&quot;&quot;;[$Аварии.L19])">
            <text:p/>
          </table:table-cell>
          <table:table-cell table:formula="of:=IF((ISBLANK([$Аварии.$H19]))OR(ISBLANK([$Аварии.$I19]))OR(ISBLANK([$Аварии.M19]));&quot;&quot;;[$Аварии.M19])">
            <text:p/>
          </table:table-cell>
          <table:table-cell table:number-columns-repeated="1015"/>
        </table:table-row>
        <table:table-row table:style-name="ro2">
          <table:table-cell table:formula="of:=IF((ISBLANK([$Аварии.H20]))OR(ISBLANK([$Аварии.I20]));&quot;&quot;;CONCATENATE(&quot;rtd&quot;;[$Аварии.H20]))">
            <text:p/>
          </table:table-cell>
          <table:table-cell table:formula="of:=IF((ISBLANK([$Аварии.$H20]))OR(ISBLANK([$Аварии.$I20]));&quot;&quot;;[$Аварии.I20])">
            <text:p/>
          </table:table-cell>
          <table:table-cell table:formula="of:=IF((ISBLANK([$Аварии.$H20]))OR(ISBLANK([$Аварии.$I20]));&quot;&quot;;[$Аварии.E20])">
            <text:p/>
          </table:table-cell>
          <table:table-cell table:formula="of:=IF((ISBLANK([$Аварии.$H20]))OR(ISBLANK([$Аварии.$I20]));&quot;&quot;;[$Аварии.F20])">
            <text:p/>
          </table:table-cell>
          <table:table-cell table:formula="of:=IF((ISBLANK([$Аварии.$H20]))OR(ISBLANK([$Аварии.$I20]));&quot;&quot;;[$Аварии.G20])">
            <text:p/>
          </table:table-cell>
          <table:table-cell table:formula="of:=IF((ISBLANK([$Аварии.$H20]))OR(ISBLANK([$Аварии.$I20]))OR(ISBLANK([$Аварии.J20]));&quot;&quot;;[$Аварии.J20])">
            <text:p/>
          </table:table-cell>
          <table:table-cell table:formula="of:=IF((ISBLANK([$Аварии.$H20]))OR(ISBLANK([$Аварии.$I20]))OR(ISBLANK([$Аварии.K20]));&quot;&quot;;[$Аварии.K20])">
            <text:p/>
          </table:table-cell>
          <table:table-cell table:formula="of:=IF((ISBLANK([$Аварии.$H20]))OR(ISBLANK([$Аварии.$I20]))OR(ISBLANK([$Аварии.L20]));&quot;&quot;;[$Аварии.L20])">
            <text:p/>
          </table:table-cell>
          <table:table-cell table:formula="of:=IF((ISBLANK([$Аварии.$H20]))OR(ISBLANK([$Аварии.$I20]))OR(ISBLANK([$Аварии.M20]));&quot;&quot;;[$Аварии.M20])">
            <text:p/>
          </table:table-cell>
          <table:table-cell table:number-columns-repeated="1015"/>
        </table:table-row>
        <table:table-row table:style-name="ro2">
          <table:table-cell table:formula="of:=IF((ISBLANK([$Аварии.H21]))OR(ISBLANK([$Аварии.I21]));&quot;&quot;;CONCATENATE(&quot;rtd&quot;;[$Аварии.H21]))" office:value-type="string" office:string-value="rtdAlarmMessGroupFlag2" calcext:value-type="string">
            <text:p>rtdAlarmMessGroupFlag2</text:p>
          </table:table-cell>
          <table:table-cell table:formula="of:=IF((ISBLANK([$Аварии.$H21]))OR(ISBLANK([$Аварии.$I21]));&quot;&quot;;[$Аварии.I21])" office:value-type="float" office:value="4" calcext:value-type="float">
            <text:p>4</text:p>
          </table:table-cell>
          <table:table-cell table:formula="of:=IF((ISBLANK([$Аварии.$H21]))OR(ISBLANK([$Аварии.$I21]));&quot;&quot;;[$Аварии.E21])" office:value-type="string" office:string-value="RemStopCommand" calcext:value-type="string">
            <text:p>RemStopCommand</text:p>
          </table:table-cell>
          <table:table-cell table:formula="of:=IF((ISBLANK([$Аварии.$H21]))OR(ISBLANK([$Аварии.$I21]));&quot;&quot;;[$Аварии.F21])" office:value-type="string" office:string-value="дистанционная команда стоп" calcext:value-type="string">
            <text:p>дистанционная команда стоп</text:p>
          </table:table-cell>
          <table:table-cell table:formula="of:=IF((ISBLANK([$Аварии.$H21]))OR(ISBLANK([$Аварии.$I21]));&quot;&quot;;[$Аварии.G21])" office:value-type="string" office:string-value="Дистанционная команда стоп" calcext:value-type="string">
            <text:p>Дистанционная команда стоп</text:p>
          </table:table-cell>
          <table:table-cell table:formula="of:=IF((ISBLANK([$Аварии.$H21]))OR(ISBLANK([$Аварии.$I21]))OR(ISBLANK([$Аварии.J21]));&quot;&quot;;[$Аварии.J21])">
            <text:p/>
          </table:table-cell>
          <table:table-cell table:formula="of:=IF((ISBLANK([$Аварии.$H21]))OR(ISBLANK([$Аварии.$I21]))OR(ISBLANK([$Аварии.K21]));&quot;&quot;;[$Аварии.K21])">
            <text:p/>
          </table:table-cell>
          <table:table-cell table:formula="of:=IF((ISBLANK([$Аварии.$H21]))OR(ISBLANK([$Аварии.$I21]))OR(ISBLANK([$Аварии.L21]));&quot;&quot;;[$Аварии.L21])">
            <text:p/>
          </table:table-cell>
          <table:table-cell table:formula="of:=IF((ISBLANK([$Аварии.$H21]))OR(ISBLANK([$Аварии.$I21]))OR(ISBLANK([$Аварии.M21]));&quot;&quot;;[$Аварии.M21])">
            <text:p/>
          </table:table-cell>
          <table:table-cell table:number-columns-repeated="1015"/>
        </table:table-row>
        <table:table-row table:style-name="ro2">
          <table:table-cell table:formula="of:=IF((ISBLANK([$Аварии.H22]))OR(ISBLANK([$Аварии.I22]));&quot;&quot;;CONCATENATE(&quot;rtd&quot;;[$Аварии.H22]))" office:value-type="string" office:string-value="rtdAlarmMessGroupFlag2" calcext:value-type="string">
            <text:p>rtdAlarmMessGroupFlag2</text:p>
          </table:table-cell>
          <table:table-cell table:formula="of:=IF((ISBLANK([$Аварии.$H22]))OR(ISBLANK([$Аварии.$I22]));&quot;&quot;;[$Аварии.I22])" office:value-type="float" office:value="5" calcext:value-type="float">
            <text:p>5</text:p>
          </table:table-cell>
          <table:table-cell table:formula="of:=IF((ISBLANK([$Аварии.$H22]))OR(ISBLANK([$Аварии.$I22]));&quot;&quot;;[$Аварии.E22])" office:value-type="string" office:string-value="WasShutPowerOff" calcext:value-type="string">
            <text:p>WasShutPowerOff</text:p>
          </table:table-cell>
          <table:table-cell table:formula="of:=IF((ISBLANK([$Аварии.$H22]))OR(ISBLANK([$Аварии.$I22]));&quot;&quot;;[$Аварии.F22])" office:value-type="string" office:string-value="аварийное отключение питания" calcext:value-type="string">
            <text:p>аварийное отключение питания</text:p>
          </table:table-cell>
          <table:table-cell table:formula="of:=IF((ISBLANK([$Аварии.$H22]))OR(ISBLANK([$Аварии.$I22]));&quot;&quot;;[$Аварии.G22])" office:value-type="string" office:string-value="Аварийное отключение питания" calcext:value-type="string">
            <text:p>Аварийное отключение питания</text:p>
          </table:table-cell>
          <table:table-cell table:formula="of:=IF((ISBLANK([$Аварии.$H22]))OR(ISBLANK([$Аварии.$I22]))OR(ISBLANK([$Аварии.J22]));&quot;&quot;;[$Аварии.J22])">
            <text:p/>
          </table:table-cell>
          <table:table-cell table:formula="of:=IF((ISBLANK([$Аварии.$H22]))OR(ISBLANK([$Аварии.$I22]))OR(ISBLANK([$Аварии.K22]));&quot;&quot;;[$Аварии.K22])">
            <text:p/>
          </table:table-cell>
          <table:table-cell table:formula="of:=IF((ISBLANK([$Аварии.$H22]))OR(ISBLANK([$Аварии.$I22]))OR(ISBLANK([$Аварии.L22]));&quot;&quot;;[$Аварии.L22])">
            <text:p/>
          </table:table-cell>
          <table:table-cell table:formula="of:=IF((ISBLANK([$Аварии.$H22]))OR(ISBLANK([$Аварии.$I22]))OR(ISBLANK([$Аварии.M22]));&quot;&quot;;[$Аварии.M22])">
            <text:p/>
          </table:table-cell>
          <table:table-cell table:number-columns-repeated="1015"/>
        </table:table-row>
        <table:table-row table:style-name="ro2">
          <table:table-cell table:formula="of:=IF((ISBLANK([$Аварии.H23]))OR(ISBLANK([$Аварии.I23]));&quot;&quot;;CONCATENATE(&quot;rtd&quot;;[$Аварии.H23]))" office:value-type="string" office:string-value="rtdAlarmMessGroupFlag2" calcext:value-type="string">
            <text:p>rtdAlarmMessGroupFlag2</text:p>
          </table:table-cell>
          <table:table-cell table:formula="of:=IF((ISBLANK([$Аварии.$H23]))OR(ISBLANK([$Аварии.$I23]));&quot;&quot;;[$Аварии.I23])" office:value-type="float" office:value="6" calcext:value-type="float">
            <text:p>6</text:p>
          </table:table-cell>
          <table:table-cell table:formula="of:=IF((ISBLANK([$Аварии.$H23]))OR(ISBLANK([$Аварии.$I23]));&quot;&quot;;[$Аварии.E23])" office:value-type="string" office:string-value="MotorStartPanelOnResponse" calcext:value-type="string">
            <text:p>MotorStartPanelOnResponse</text:p>
          </table:table-cell>
          <table:table-cell table:formula="of:=IF((ISBLANK([$Аварии.$H23]))OR(ISBLANK([$Аварии.$I23]));&quot;&quot;;[$Аварии.F23])" office:value-type="string" office:string-value="панель управления двигателем на связи" calcext:value-type="string">
            <text:p>панель управления двигателем на связи</text:p>
          </table:table-cell>
          <table:table-cell table:formula="of:=IF((ISBLANK([$Аварии.$H23]))OR(ISBLANK([$Аварии.$I23]));&quot;&quot;;[$Аварии.G23])" office:value-type="string" office:string-value="Панель управления двигателем на связи" calcext:value-type="string">
            <text:p>Панель управления двигателем на связи</text:p>
          </table:table-cell>
          <table:table-cell table:formula="of:=IF((ISBLANK([$Аварии.$H23]))OR(ISBLANK([$Аварии.$I23]))OR(ISBLANK([$Аварии.J23]));&quot;&quot;;[$Аварии.J23])">
            <text:p/>
          </table:table-cell>
          <table:table-cell table:formula="of:=IF((ISBLANK([$Аварии.$H23]))OR(ISBLANK([$Аварии.$I23]))OR(ISBLANK([$Аварии.K23]));&quot;&quot;;[$Аварии.K23])">
            <text:p/>
          </table:table-cell>
          <table:table-cell table:formula="of:=IF((ISBLANK([$Аварии.$H23]))OR(ISBLANK([$Аварии.$I23]))OR(ISBLANK([$Аварии.L23]));&quot;&quot;;[$Аварии.L23])">
            <text:p/>
          </table:table-cell>
          <table:table-cell table:formula="of:=IF((ISBLANK([$Аварии.$H23]))OR(ISBLANK([$Аварии.$I23]))OR(ISBLANK([$Аварии.M23]));&quot;&quot;;[$Аварии.M23])">
            <text:p/>
          </table:table-cell>
          <table:table-cell table:number-columns-repeated="1015"/>
        </table:table-row>
        <table:table-row table:style-name="ro2">
          <table:table-cell table:formula="of:=IF((ISBLANK([$Аварии.H24]))OR(ISBLANK([$Аварии.I24]));&quot;&quot;;CONCATENATE(&quot;rtd&quot;;[$Аварии.H24]))" office:value-type="string" office:string-value="rtdAlarmMessGroupFlag2" calcext:value-type="string">
            <text:p>rtdAlarmMessGroupFlag2</text:p>
          </table:table-cell>
          <table:table-cell table:formula="of:=IF((ISBLANK([$Аварии.$H24]))OR(ISBLANK([$Аварии.$I24]));&quot;&quot;;[$Аварии.I24])" office:value-type="float" office:value="7" calcext:value-type="float">
            <text:p>7</text:p>
          </table:table-cell>
          <table:table-cell table:formula="of:=IF((ISBLANK([$Аварии.$H24]))OR(ISBLANK([$Аварии.$I24]));&quot;&quot;;[$Аварии.E24])" office:value-type="string" office:string-value="LocalStopCommand" calcext:value-type="string">
            <text:p>LocalStopCommand</text:p>
          </table:table-cell>
          <table:table-cell table:formula="of:=IF((ISBLANK([$Аварии.$H24]))OR(ISBLANK([$Аварии.$I24]));&quot;&quot;;[$Аварии.F24])" office:value-type="string" office:string-value="местная команда стоп" calcext:value-type="string">
            <text:p>местная команда стоп</text:p>
          </table:table-cell>
          <table:table-cell table:formula="of:=IF((ISBLANK([$Аварии.$H24]))OR(ISBLANK([$Аварии.$I24]));&quot;&quot;;[$Аварии.G24])" office:value-type="string" office:string-value="Местная команда стоп" calcext:value-type="string">
            <text:p>Местная команда стоп</text:p>
          </table:table-cell>
          <table:table-cell table:formula="of:=IF((ISBLANK([$Аварии.$H24]))OR(ISBLANK([$Аварии.$I24]))OR(ISBLANK([$Аварии.J24]));&quot;&quot;;[$Аварии.J24])">
            <text:p/>
          </table:table-cell>
          <table:table-cell table:formula="of:=IF((ISBLANK([$Аварии.$H24]))OR(ISBLANK([$Аварии.$I24]))OR(ISBLANK([$Аварии.K24]));&quot;&quot;;[$Аварии.K24])">
            <text:p/>
          </table:table-cell>
          <table:table-cell table:formula="of:=IF((ISBLANK([$Аварии.$H24]))OR(ISBLANK([$Аварии.$I24]))OR(ISBLANK([$Аварии.L24]));&quot;&quot;;[$Аварии.L24])">
            <text:p/>
          </table:table-cell>
          <table:table-cell table:formula="of:=IF((ISBLANK([$Аварии.$H24]))OR(ISBLANK([$Аварии.$I24]))OR(ISBLANK([$Аварии.M24]));&quot;&quot;;[$Аварии.M24])">
            <text:p/>
          </table:table-cell>
          <table:table-cell table:number-columns-repeated="1015"/>
        </table:table-row>
        <table:table-row table:style-name="ro2">
          <table:table-cell table:formula="of:=IF((ISBLANK([$Аварии.H25]))OR(ISBLANK([$Аварии.I25]));&quot;&quot;;CONCATENATE(&quot;rtd&quot;;[$Аварии.H25]))">
            <text:p/>
          </table:table-cell>
          <table:table-cell table:formula="of:=IF((ISBLANK([$Аварии.$H25]))OR(ISBLANK([$Аварии.$I25]));&quot;&quot;;[$Аварии.I25])">
            <text:p/>
          </table:table-cell>
          <table:table-cell table:formula="of:=IF((ISBLANK([$Аварии.$H25]))OR(ISBLANK([$Аварии.$I25]));&quot;&quot;;[$Аварии.E25])">
            <text:p/>
          </table:table-cell>
          <table:table-cell table:formula="of:=IF((ISBLANK([$Аварии.$H25]))OR(ISBLANK([$Аварии.$I25]));&quot;&quot;;[$Аварии.F25])">
            <text:p/>
          </table:table-cell>
          <table:table-cell table:formula="of:=IF((ISBLANK([$Аварии.$H25]))OR(ISBLANK([$Аварии.$I25]));&quot;&quot;;[$Аварии.G25])">
            <text:p/>
          </table:table-cell>
          <table:table-cell table:formula="of:=IF((ISBLANK([$Аварии.$H25]))OR(ISBLANK([$Аварии.$I25]))OR(ISBLANK([$Аварии.J25]));&quot;&quot;;[$Аварии.J25])">
            <text:p/>
          </table:table-cell>
          <table:table-cell table:formula="of:=IF((ISBLANK([$Аварии.$H25]))OR(ISBLANK([$Аварии.$I25]))OR(ISBLANK([$Аварии.K25]));&quot;&quot;;[$Аварии.K25])">
            <text:p/>
          </table:table-cell>
          <table:table-cell table:formula="of:=IF((ISBLANK([$Аварии.$H25]))OR(ISBLANK([$Аварии.$I25]))OR(ISBLANK([$Аварии.L25]));&quot;&quot;;[$Аварии.L25])">
            <text:p/>
          </table:table-cell>
          <table:table-cell table:formula="of:=IF((ISBLANK([$Аварии.$H25]))OR(ISBLANK([$Аварии.$I25]))OR(ISBLANK([$Аварии.M25]));&quot;&quot;;[$Аварии.M25])">
            <text:p/>
          </table:table-cell>
          <table:table-cell table:number-columns-repeated="1015"/>
        </table:table-row>
        <table:table-row table:style-name="ro2">
          <table:table-cell table:formula="of:=IF((ISBLANK([$Аварии.H26]))OR(ISBLANK([$Аварии.I26]));&quot;&quot;;CONCATENATE(&quot;rtd&quot;;[$Аварии.H26]))">
            <text:p/>
          </table:table-cell>
          <table:table-cell table:formula="of:=IF((ISBLANK([$Аварии.$H26]))OR(ISBLANK([$Аварии.$I26]));&quot;&quot;;[$Аварии.I26])">
            <text:p/>
          </table:table-cell>
          <table:table-cell table:formula="of:=IF((ISBLANK([$Аварии.$H26]))OR(ISBLANK([$Аварии.$I26]));&quot;&quot;;[$Аварии.E26])">
            <text:p/>
          </table:table-cell>
          <table:table-cell table:formula="of:=IF((ISBLANK([$Аварии.$H26]))OR(ISBLANK([$Аварии.$I26]));&quot;&quot;;[$Аварии.F26])">
            <text:p/>
          </table:table-cell>
          <table:table-cell table:formula="of:=IF((ISBLANK([$Аварии.$H26]))OR(ISBLANK([$Аварии.$I26]));&quot;&quot;;[$Аварии.G26])">
            <text:p/>
          </table:table-cell>
          <table:table-cell table:formula="of:=IF((ISBLANK([$Аварии.$H26]))OR(ISBLANK([$Аварии.$I26]))OR(ISBLANK([$Аварии.J26]));&quot;&quot;;[$Аварии.J26])">
            <text:p/>
          </table:table-cell>
          <table:table-cell table:formula="of:=IF((ISBLANK([$Аварии.$H26]))OR(ISBLANK([$Аварии.$I26]))OR(ISBLANK([$Аварии.K26]));&quot;&quot;;[$Аварии.K26])">
            <text:p/>
          </table:table-cell>
          <table:table-cell table:formula="of:=IF((ISBLANK([$Аварии.$H26]))OR(ISBLANK([$Аварии.$I26]))OR(ISBLANK([$Аварии.L26]));&quot;&quot;;[$Аварии.L26])">
            <text:p/>
          </table:table-cell>
          <table:table-cell table:formula="of:=IF((ISBLANK([$Аварии.$H26]))OR(ISBLANK([$Аварии.$I26]))OR(ISBLANK([$Аварии.M26]));&quot;&quot;;[$Аварии.M26])">
            <text:p/>
          </table:table-cell>
          <table:table-cell table:number-columns-repeated="1015"/>
        </table:table-row>
        <table:table-row table:style-name="ro2">
          <table:table-cell table:formula="of:=IF((ISBLANK([$Аварии.H27]))OR(ISBLANK([$Аварии.I27]));&quot;&quot;;CONCATENATE(&quot;rtd&quot;;[$Аварии.H27]))">
            <text:p/>
          </table:table-cell>
          <table:table-cell table:formula="of:=IF((ISBLANK([$Аварии.$H27]))OR(ISBLANK([$Аварии.$I27]));&quot;&quot;;[$Аварии.I27])">
            <text:p/>
          </table:table-cell>
          <table:table-cell table:formula="of:=IF((ISBLANK([$Аварии.$H27]))OR(ISBLANK([$Аварии.$I27]));&quot;&quot;;[$Аварии.E27])">
            <text:p/>
          </table:table-cell>
          <table:table-cell table:formula="of:=IF((ISBLANK([$Аварии.$H27]))OR(ISBLANK([$Аварии.$I27]));&quot;&quot;;[$Аварии.F27])">
            <text:p/>
          </table:table-cell>
          <table:table-cell table:formula="of:=IF((ISBLANK([$Аварии.$H27]))OR(ISBLANK([$Аварии.$I27]));&quot;&quot;;[$Аварии.G27])">
            <text:p/>
          </table:table-cell>
          <table:table-cell table:formula="of:=IF((ISBLANK([$Аварии.$H27]))OR(ISBLANK([$Аварии.$I27]))OR(ISBLANK([$Аварии.J27]));&quot;&quot;;[$Аварии.J27])">
            <text:p/>
          </table:table-cell>
          <table:table-cell table:formula="of:=IF((ISBLANK([$Аварии.$H27]))OR(ISBLANK([$Аварии.$I27]))OR(ISBLANK([$Аварии.K27]));&quot;&quot;;[$Аварии.K27])">
            <text:p/>
          </table:table-cell>
          <table:table-cell table:formula="of:=IF((ISBLANK([$Аварии.$H27]))OR(ISBLANK([$Аварии.$I27]))OR(ISBLANK([$Аварии.L27]));&quot;&quot;;[$Аварии.L27])">
            <text:p/>
          </table:table-cell>
          <table:table-cell table:formula="of:=IF((ISBLANK([$Аварии.$H27]))OR(ISBLANK([$Аварии.$I27]))OR(ISBLANK([$Аварии.M27]));&quot;&quot;;[$Аварии.M27])">
            <text:p/>
          </table:table-cell>
          <table:table-cell table:number-columns-repeated="1015"/>
        </table:table-row>
        <table:table-row table:style-name="ro2">
          <table:table-cell table:formula="of:=IF((ISBLANK([$Аварии.H28]))OR(ISBLANK([$Аварии.I28]));&quot;&quot;;CONCATENATE(&quot;rtd&quot;;[$Аварии.H28]))">
            <text:p/>
          </table:table-cell>
          <table:table-cell table:formula="of:=IF((ISBLANK([$Аварии.$H28]))OR(ISBLANK([$Аварии.$I28]));&quot;&quot;;[$Аварии.I28])">
            <text:p/>
          </table:table-cell>
          <table:table-cell table:formula="of:=IF((ISBLANK([$Аварии.$H28]))OR(ISBLANK([$Аварии.$I28]));&quot;&quot;;[$Аварии.E28])">
            <text:p/>
          </table:table-cell>
          <table:table-cell table:formula="of:=IF((ISBLANK([$Аварии.$H28]))OR(ISBLANK([$Аварии.$I28]));&quot;&quot;;[$Аварии.F28])">
            <text:p/>
          </table:table-cell>
          <table:table-cell table:formula="of:=IF((ISBLANK([$Аварии.$H28]))OR(ISBLANK([$Аварии.$I28]));&quot;&quot;;[$Аварии.G28])">
            <text:p/>
          </table:table-cell>
          <table:table-cell table:formula="of:=IF((ISBLANK([$Аварии.$H28]))OR(ISBLANK([$Аварии.$I28]))OR(ISBLANK([$Аварии.J28]));&quot;&quot;;[$Аварии.J28])">
            <text:p/>
          </table:table-cell>
          <table:table-cell table:formula="of:=IF((ISBLANK([$Аварии.$H28]))OR(ISBLANK([$Аварии.$I28]))OR(ISBLANK([$Аварии.K28]));&quot;&quot;;[$Аварии.K28])">
            <text:p/>
          </table:table-cell>
          <table:table-cell table:formula="of:=IF((ISBLANK([$Аварии.$H28]))OR(ISBLANK([$Аварии.$I28]))OR(ISBLANK([$Аварии.L28]));&quot;&quot;;[$Аварии.L28])">
            <text:p/>
          </table:table-cell>
          <table:table-cell table:formula="of:=IF((ISBLANK([$Аварии.$H28]))OR(ISBLANK([$Аварии.$I28]))OR(ISBLANK([$Аварии.M28]));&quot;&quot;;[$Аварии.M28])">
            <text:p/>
          </table:table-cell>
          <table:table-cell table:number-columns-repeated="1015"/>
        </table:table-row>
        <table:table-row table:style-name="ro2">
          <table:table-cell table:formula="of:=IF((ISBLANK([$Аварии.H29]))OR(ISBLANK([$Аварии.I29]));&quot;&quot;;CONCATENATE(&quot;rtd&quot;;[$Аварии.H29]))">
            <text:p/>
          </table:table-cell>
          <table:table-cell table:formula="of:=IF((ISBLANK([$Аварии.$H29]))OR(ISBLANK([$Аварии.$I29]));&quot;&quot;;[$Аварии.I29])">
            <text:p/>
          </table:table-cell>
          <table:table-cell table:formula="of:=IF((ISBLANK([$Аварии.$H29]))OR(ISBLANK([$Аварии.$I29]));&quot;&quot;;[$Аварии.E29])">
            <text:p/>
          </table:table-cell>
          <table:table-cell table:formula="of:=IF((ISBLANK([$Аварии.$H29]))OR(ISBLANK([$Аварии.$I29]));&quot;&quot;;[$Аварии.F29])">
            <text:p/>
          </table:table-cell>
          <table:table-cell table:formula="of:=IF((ISBLANK([$Аварии.$H29]))OR(ISBLANK([$Аварии.$I29]));&quot;&quot;;[$Аварии.G29])">
            <text:p/>
          </table:table-cell>
          <table:table-cell table:formula="of:=IF((ISBLANK([$Аварии.$H29]))OR(ISBLANK([$Аварии.$I29]))OR(ISBLANK([$Аварии.J29]));&quot;&quot;;[$Аварии.J29])">
            <text:p/>
          </table:table-cell>
          <table:table-cell table:formula="of:=IF((ISBLANK([$Аварии.$H29]))OR(ISBLANK([$Аварии.$I29]))OR(ISBLANK([$Аварии.K29]));&quot;&quot;;[$Аварии.K29])">
            <text:p/>
          </table:table-cell>
          <table:table-cell table:formula="of:=IF((ISBLANK([$Аварии.$H29]))OR(ISBLANK([$Аварии.$I29]))OR(ISBLANK([$Аварии.L29]));&quot;&quot;;[$Аварии.L29])">
            <text:p/>
          </table:table-cell>
          <table:table-cell table:formula="of:=IF((ISBLANK([$Аварии.$H29]))OR(ISBLANK([$Аварии.$I29]))OR(ISBLANK([$Аварии.M29]));&quot;&quot;;[$Аварии.M29])">
            <text:p/>
          </table:table-cell>
          <table:table-cell table:number-columns-repeated="1015"/>
        </table:table-row>
        <table:table-row table:style-name="ro2">
          <table:table-cell table:formula="of:=IF((ISBLANK([$Аварии.H30]))OR(ISBLANK([$Аварии.I30]));&quot;&quot;;CONCATENATE(&quot;rtd&quot;;[$Аварии.H30]))">
            <text:p/>
          </table:table-cell>
          <table:table-cell table:formula="of:=IF((ISBLANK([$Аварии.$H30]))OR(ISBLANK([$Аварии.$I30]));&quot;&quot;;[$Аварии.I30])">
            <text:p/>
          </table:table-cell>
          <table:table-cell table:formula="of:=IF((ISBLANK([$Аварии.$H30]))OR(ISBLANK([$Аварии.$I30]));&quot;&quot;;[$Аварии.E30])">
            <text:p/>
          </table:table-cell>
          <table:table-cell table:formula="of:=IF((ISBLANK([$Аварии.$H30]))OR(ISBLANK([$Аварии.$I30]));&quot;&quot;;[$Аварии.F30])">
            <text:p/>
          </table:table-cell>
          <table:table-cell table:formula="of:=IF((ISBLANK([$Аварии.$H30]))OR(ISBLANK([$Аварии.$I30]));&quot;&quot;;[$Аварии.G30])">
            <text:p/>
          </table:table-cell>
          <table:table-cell table:formula="of:=IF((ISBLANK([$Аварии.$H30]))OR(ISBLANK([$Аварии.$I30]))OR(ISBLANK([$Аварии.J30]));&quot;&quot;;[$Аварии.J30])">
            <text:p/>
          </table:table-cell>
          <table:table-cell table:formula="of:=IF((ISBLANK([$Аварии.$H30]))OR(ISBLANK([$Аварии.$I30]))OR(ISBLANK([$Аварии.K30]));&quot;&quot;;[$Аварии.K30])">
            <text:p/>
          </table:table-cell>
          <table:table-cell table:formula="of:=IF((ISBLANK([$Аварии.$H30]))OR(ISBLANK([$Аварии.$I30]))OR(ISBLANK([$Аварии.L30]));&quot;&quot;;[$Аварии.L30])">
            <text:p/>
          </table:table-cell>
          <table:table-cell table:formula="of:=IF((ISBLANK([$Аварии.$H30]))OR(ISBLANK([$Аварии.$I30]))OR(ISBLANK([$Аварии.M30]));&quot;&quot;;[$Аварии.M30])">
            <text:p/>
          </table:table-cell>
          <table:table-cell table:number-columns-repeated="1015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5" table:target-range-address="Маски.A1:Маски.K8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굴림" svg:font-family="굴림" style:font-family-generic="modern" style:font-pitch="fixed"/>
    <style:font-face style:name="굴림체" svg:font-family="굴림체" style:font-family-generic="modern" style:font-pitch="fixed"/>
    <style:font-face style:name="돋움" svg:font-family="돋움" style:font-family-generic="modern" style:font-pitch="fixed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0" loext:min-decimal-places="0" number:min-integer-digits="1"/>
      <number:text> </number:text>
    </number:number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8P0"/>
    </number:currency-style>
    <number:number-style style:name="N122P0" style:volatile="true">
      <number:text> </number:text>
      <number:number number:decimal-places="2" loext:min-decimal-places="2" number:min-integer-digits="1" number:grouping="true"/>
      <number:text>     </number:text>
    </number:number-style>
    <number:number-style style:name="N122P1" style:volatile="true">
      <number:text>-</number:text>
      <number:number number:decimal-places="2" loext:min-decimal-places="2" number:min-integer-digits="1" number:grouping="true"/>
      <number:text>     </number:text>
    </number:number-style>
    <number:number-style style:name="N122P2" style:volatile="true">
      <number:text>-</number:text>
      <number:number number:decimal-places="0" loext:min-decimal-places="0" number:min-integer-digits="0"/>
      <number:text>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4P0" style:volatile="true">
      <number:currency-symbol number:language="es" number:country="AR">$</number:currency-symbol>
      <number:number number:decimal-places="0" loext:min-decimal-places="0" number:min-integer-digits="0" number:grouping="true"/>
    </number:currency-style>
    <number:currency-style style:name="N124">
      <style:text-properties fo:color="#ff0000"/>
      <number:text>-</number:text>
      <number:currency-symbol number:language="es" number:country="AR">$</number:currency-symbol>
      <number:number number:decimal-places="0" loext:min-decimal-places="0" number:min-integer-digits="0" number:grouping="true"/>
      <style:map style:condition="value()&gt;=0" style:apply-style-name="N124P0"/>
    </number:currency-style>
    <number:number-style style:name="N128P0" style:volatile="true">
      <number:number number:decimal-places="2" loext:min-decimal-places="2" number:min-integer-digits="1" number:grouping="true" number:display-factor="1000"/>
    </number:number-style>
    <number:number-style style:name="N128P1" style:volatile="true">
      <number:number number:decimal-places="2" loext:min-decimal-places="2" number:min-integer-digits="1" number:grouping="true"/>
      <number:text>-</number:text>
    </number:number-style>
    <number:number-style style:name="N128P2" style:volatile="true">
      <number:text>-</number:text>
      <number:number number:decimal-places="0" loext:min-decimal-places="0" number:min-integer-digits="0" number:display-factor="1000"/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number number:decimal-places="0" loext:min-decimal-places="0" number:min-integer-digits="2"/>
    </number:number-style>
    <number:number-style style:name="N131P0" style:volatile="true">
      <number:number number:decimal-places="2" loext:min-decimal-places="2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date-style style:name="N132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number-style style:name="N133">
      <number:text>-</number:text>
      <number:number number:decimal-places="0" loext:min-decimal-places="0" number:min-integer-digits="7"/>
    </number:number-style>
    <number:currency-style style:name="N135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5P0"/>
    </number:currency-style>
    <number:date-style style:name="N136">
      <number:month/>
      <number:text>.</number:text>
      <number:day/>
      <number:text>.</number:text>
      <number:year number:style="long"/>
      <number:text> </number:text>
    </number:date-style>
    <number:number-style style:name="N140P0" style:volatile="true">
      <number:text> </number:text>
      <number:number number:decimal-places="2" loext:min-decimal-places="2" number:min-integer-digits="1" number:grouping="true"/>
      <number:text> kr </number:text>
    </number:number-style>
    <number:number-style style:name="N140P1" style:volatile="true">
      <number:text>-</number:text>
      <number:number number:decimal-places="2" loext:min-decimal-places="2" number:min-integer-digits="1" number:grouping="true"/>
      <number:text> kr </number:text>
    </number:number-style>
    <number:number-style style:name="N140P2" style:volatile="true">
      <number:text>-</number:text>
      <number:number number:decimal-places="0" loext:min-decimal-places="0" number:min-integer-digits="0"/>
      <number:text> kr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number number:decimal-places="3" loext:min-decimal-places="0" number:min-integer-digits="1" number:decimal-replacement="" number:grouping="true"/>
    </number:number-style>
    <number:number-style style:name="N145P0" style:volatile="true">
      <number:number number:decimal-places="0" loext:min-decimal-places="0" number:min-integer-digits="1" number:grouping="true"/>
      <number:text> р.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р. </number:text>
    </number:number-style>
    <number:number-style style:name="N145P2" style:volatile="true">
      <number:text> - р.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percentage-style style:name="N146">
      <number:number number:decimal-places="7" loext:min-decimal-places="7" number:min-integer-digits="1"/>
      <number:text>%</number:text>
    </number:percentage-style>
    <number:number-style style:name="N150P0" style:volatile="true">
      <number:text> $</number:text>
      <number:number number:decimal-places="0" loext:min-decimal-places="0" number:min-integer-digits="1" number:grouping="true" number:display-factor="1000"/>
    </number:number-style>
    <number:number-style style:name="N150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number:text> $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min-integer-digits="1"/>
      <number:text/>
    </number:number-style>
    <number:number-style style:name="N152P1" style:volatile="true"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=0" style:apply-style-name="N152P0"/>
      <style:map style:condition="value()&lt;0" style:apply-style-name="N152P1"/>
    </number:text-style>
    <number:currency-style style:name="N156P0" style:volatile="true">
      <number:text> </number:text>
      <number:currency-symbol number:language="ru" number:country="RU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P1" style:volatile="true">
      <number:text>-</number:text>
      <number:currency-symbol number:language="ru" number:country="RU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P2" style:volatile="true">
      <number:text> </number:text>
      <number:currency-symbol number:language="ru" number:country="RU">€</number:currency-symbol>
      <number:text> -</number:text>
      <number:number number:decimal-places="0" loext:min-decimal-places="0" number:min-integer-digits="0"/>
      <number:text> </number:text>
    </number:currency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currency-style style:name="N158P0" style:volatile="true">
      <number:number number:decimal-places="0" loext:min-decimal-places="0" number:min-integer-digits="1" number:grouping="true"/>
      <number:text> </number:text>
      <number:currency-symbol number:language="ru" number:country="RU">руб.</number:currency-symbol>
    </number:currency-style>
    <number:currency-style style:name="N15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уб.</number:currency-symbol>
      <style:map style:condition="value()&gt;=0" style:apply-style-name="N158P0"/>
    </number:currency-style>
    <number:currency-style style:name="N161P0" style:volatile="true">
      <number:number number:decimal-places="2" loext:min-decimal-places="2" number:min-integer-digits="1" number:grouping="true"/>
      <number:text> </number:text>
      <number:currency-symbol>руб</number:currency-symbol>
    </number:currency-style>
    <number:number-style style:name="N16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61">
      <number:text>-</number:text>
      <number:number number:decimal-places="0" loext:min-decimal-places="0" number:min-integer-digits="0"/>
      <number:text> </number:text>
      <style:map style:condition="value()&gt;0" style:apply-style-name="N161P0"/>
      <style:map style:condition="value()&lt;0" style:apply-style-name="N161P1"/>
    </number:number-style>
    <number:number-style style:name="N165P0" style:volatile="true">
      <number:number number:decimal-places="0" loext:min-decimal-places="0" number:min-integer-digits="1" number:grouping="true"/>
      <number:text> kr </number:text>
    </number:number-style>
    <number:number-style style:name="N165P1" style:volatile="true">
      <number:text>-</number:text>
      <number:number number:decimal-places="0" loext:min-decimal-places="0" number:min-integer-digits="1" number:grouping="true"/>
      <number:text> kr </number:text>
    </number:number-style>
    <number:number-style style:name="N165P2" style:volatile="true">
      <number:text> - kr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loext:min-decimal-places="2" number:min-integer-digits="1" number:display-factor="1000"/>
    </number:number-style>
    <number:number-style style:name="N167">
      <number:text>-</number:text>
      <number:number number:decimal-places="2" loext:min-decimal-places="2" number:min-integer-digits="1" number:display-factor="1000"/>
      <style:map style:condition="value()&gt;=0" style:apply-style-name="N167P0"/>
    </number:number-style>
    <number:currency-style style:name="N171P0" style:volatile="true">
      <number:text> </number:text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171P1" style:volatile="true">
      <number:text> </number:text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171P2" style:volatile="true">
      <number:text> </number:text>
      <number:currency-symbol number:language="en" number:country="US">$</number:currency-symbol>
      <number:text>-</number:text>
      <number:number number:decimal-places="0" loext:min-decimal-places="0" number:min-integer-digits="0"/>
      <number:text> </number:text>
    </number:currency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1" loext:min-decimal-places="1" number:min-integer-digits="1" number:grouping="true"/>
      <number:text>    </number:text>
    </number:number-style>
    <number:number-style style:name="N175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175P2" style:volatile="true">
      <number:text> -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text>£</number:text>
      <number:number number:decimal-places="0" loext:min-decimal-places="0" number:min-integer-digits="1" number:grouping="true"/>
    </number:number-style>
    <number:number-style style:name="N177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77P0"/>
    </number:number-style>
    <number:number-style style:name="N180P0" style:volatile="true">
      <number:number number:decimal-places="2" loext:min-decimal-places="2" number:min-integer-digits="1" number:grouping="true"/>
      <number:text> ₽ </number:text>
    </number:number-style>
    <number:number-style style:name="N180P1" style:volatile="true">
      <number:number number:decimal-places="2" loext:min-decimal-places="2" number:min-integer-digits="1" number:grouping="true"/>
      <number:text> ₽ </number:text>
    </number:number-style>
    <number:number-style style:name="N180P2" style:volatile="true">
      <number:text>-</number:text>
      <number:number number:decimal-places="0" loext:min-decimal-places="0" number:min-integer-digits="0"/>
      <number:text> ₽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0" loext:min-decimal-places="0" number:min-integer-digits="0" number:display-factor="1000"/>
    </number:number-style>
    <number:number-style style:name="N182">
      <number:text>-  </number:text>
      <style:map style:condition="value()&gt;=0" style:apply-style-name="N182P0"/>
    </number:number-style>
    <number:number-style style:name="N183">
      <number:number number:decimal-places="2" loext:min-decimal-places="2" number:min-integer-digits="1" number:grouping="true"/>
      <number:text>р.</number:text>
    </number:number-style>
    <number:number-style style:name="N185P0" style:volatile="true">
      <number:number number:decimal-places="3" loext:min-decimal-places="0" number:min-integer-digits="1" number:decimal-replacement=""/>
      <number:text>    </number:text>
    </number:number-style>
    <number:number-style style:name="N185">
      <number:text> -    </number:text>
      <style:map style:condition="value()&gt;=0" style:apply-style-name="N185P0"/>
    </number:number-style>
    <number:number-style style:name="N186">
      <number:text>$</number:text>
      <number:number number:decimal-places="0" loext:min-decimal-places="0" number:min-integer-digits="1" number:grouping="true"/>
    </number:number-style>
    <number:number-style style:name="N189P0" style:volatile="true">
      <number:number number:decimal-places="3" loext:min-decimal-places="3" number:min-integer-digits="1" number:grouping="true"/>
      <number:text>    </number:text>
    </number:number-style>
    <number:number-style style:name="N189P1" style:volatile="true">
      <number:number number:decimal-places="3" loext:min-decimal-places="3" number:min-integer-digits="1" number:grouping="true"/>
      <number:text>    </number:text>
    </number:number-style>
    <number:number-style style:name="N189P2" style:volatile="true">
      <number:text>-</number:text>
      <number:number number:decimal-places="0" loext:min-decimal-places="0" number:min-integer-digits="0"/>
      <number:text>   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currency-style style:name="N191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9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91P0"/>
    </number:currency-style>
    <number:number-style style:name="N193P0" style:volatile="true">
      <number:text>Истина</number:text>
    </number:number-style>
    <number:number-style style:name="N193P1" style:volatile="true">
      <number:text>Истина</number:text>
    </number:number-style>
    <number:number-style style:name="N193">
      <number:text>Ложь</number:text>
      <style:map style:condition="value()&gt;0" style:apply-style-name="N193P0"/>
      <style:map style:condition="value()&lt;0" style:apply-style-name="N193P1"/>
    </number:number-style>
    <number:number-style style:name="N197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97P1" style:volatile="true">
      <number:text>-€</number:text>
      <number:number number:decimal-places="0" loext:min-decimal-places="0" number:min-integer-digits="1" number:grouping="true"/>
      <number:text> </number:text>
    </number:number-style>
    <number:number-style style:name="N197P2" style:volatile="true">
      <number:text> €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">
      <number:number number:decimal-places="0" loext:min-decimal-places="0" number:min-integer-digits="0" number:grouping="true"/>
    </number:number-style>
    <number:number-style style:name="N200P0" style:volatile="true">
      <number:number number:decimal-places="2" loext:min-decimal-places="2" number:min-integer-digits="1" number:grouping="true"/>
      <number:text> р.</number:text>
    </number:number-style>
    <number:number-style style:name="N200">
      <style:text-properties fo:color="#ff0000"/>
      <number:text>-</number:text>
      <number:number number:decimal-places="2" loext:min-decimal-places="2" number:min-integer-digits="1" number:grouping="true"/>
      <number:text> р.</number:text>
      <style:map style:condition="value()&gt;=0" style:apply-style-name="N200P0"/>
    </number:number-style>
    <number:number-style style:name="N201">
      <number:number number:decimal-places="4" loext:min-decimal-places="4" number:min-integer-digits="1" number:grouping="true"/>
      <number:text>р.</number:text>
    </number:number-style>
    <number:number-style style:name="N205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205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8P0" style:volatile="true">
      <number:number number:decimal-places="0" loext:min-decimal-places="0" number:min-integer-digits="1" number:grouping="true"/>
      <number:text>    </number:text>
    </number:number-style>
    <number:number-style style:name="N20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08P2" style:volatile="true">
      <number:text>-</number:text>
      <number:number number:decimal-places="0" loext:min-decimal-places="0" number:min-integer-digits="0"/>
      <number:text>    </number:text>
    </number:number-style>
    <number:text-style style:name="N208" number:title="Особый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currency-style style:name="N209">
      <number:number number:decimal-places="0" loext:min-decimal-places="0" number:min-integer-digits="1" number:grouping="true"/>
      <number:text> </number:text>
      <number:currency-symbol number:language="ar" number:country="EG">€</number:currency-symbol>
    </number:currency-style>
    <number:number-style style:name="N210">
      <number:number number:decimal-places="11" loext:min-decimal-places="11" number:min-integer-digits="1"/>
    </number:number-style>
    <number:currency-style style:name="N211P0" style:volatile="true">
      <number:number number:decimal-places="0" loext:min-decimal-places="0" number:min-integer-digits="1" number:grouping="true"/>
      <number:text> </number:text>
      <number:currency-symbol number:language="ar" number:country="EG">€</number:currency-symbol>
    </number:currency-style>
    <number:currency-style style:name="N211">
      <number:text>-</number:text>
      <number:number number:decimal-places="0" loext:min-decimal-places="0" number:min-integer-digits="1" number:grouping="true"/>
      <number:text> </number:text>
      <number:currency-symbol number:language="ar" number:country="EG">€</number:currency-symbol>
      <style:map style:condition="value()&gt;=0" style:apply-style-name="N211P0"/>
    </number:currency-style>
    <number:number-style style:name="N214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21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14P2" style:volatile="true">
      <number:text>-</number:text>
      <number:number number:decimal-places="0" loext:min-decimal-places="0" number:min-integer-digits="0"/>
      <number:text>   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2" loext:min-decimal-places="2" number:min-integer-digits="1" number:grouping="true"/>
      <number:text> р. </number:text>
    </number:number-style>
    <number:number-style style:name="N218P1" style:volatile="true">
      <number:text>-</number:text>
      <number:number number:decimal-places="2" loext:min-decimal-places="2" number:min-integer-digits="1" number:grouping="true"/>
      <number:text> р. </number:text>
    </number:number-style>
    <number:number-style style:name="N218P2" style:volatile="true">
      <number:text>-</number:text>
      <number:number number:decimal-places="0" loext:min-decimal-places="0" number:min-integer-digits="0"/>
      <number:text> р.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">
      <number:number number:decimal-places="5" loext:min-decimal-places="5" number:min-integer-digits="1"/>
    </number:number-style>
    <number:number-style style:name="N223P0" style:volatile="true">
      <number:number number:decimal-places="0" loext:min-decimal-places="0" number:min-integer-digits="1" number:grouping="true"/>
      <number:text>р. </number:text>
    </number:number-style>
    <number:number-style style:name="N223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223P2" style:volatile="true">
      <number:text> -р.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25P0"/>
    </number:currency-style>
    <number:number-style style:name="N227P0" style:volatile="true">
      <number:number number:decimal-places="2" loext:min-decimal-places="2" number:min-integer-digits="1" number:grouping="true"/>
      <number:text> kr</number:text>
    </number:number-style>
    <number:number-style style:name="N227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227P0"/>
    </number:number-style>
    <number:percentage-style style:name="N228">
      <number:number number:decimal-places="4" loext:min-decimal-places="4" number:min-integer-digits="1"/>
      <number:text>%</number:text>
    </number:percentage-style>
    <number:number-style style:name="N229">
      <number:number number:decimal-places="0" loext:min-decimal-places="0" number:min-integer-digits="1" number:grouping="true"/>
      <number:text> </number:text>
    </number:number-style>
    <number:number-style style:name="N230P0" style:volatile="true">
      <number:number number:decimal-places="0" loext:min-decimal-places="0" number:min-integer-digits="1" number:grouping="true"/>
      <number:text> </number:text>
    </number:number-style>
    <number:number-style style:name="N23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30P2" style:volatile="true">
      <number:text> -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2P0" style:volatile="true">
      <number:number number:decimal-places="2" loext:min-decimal-places="2" number:min-integer-digits="1" number:grouping="true"/>
      <number:text>    </number:text>
    </number:number-style>
    <number:number-style style:name="N232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32P2" style:volatile="true">
      <number:text>-</number:text>
      <number:number number:decimal-places="0" loext:min-decimal-places="0" number:min-integer-digits="0"/>
      <number:text>   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date-style style:name="N233">
      <number:day/>
      <number:text> </number:text>
      <number:month number:style="long" number:textual="true"/>
      <number:text> </number:text>
      <number:year number:style="long"/>
      <number:text> г.</number:text>
    </number:date-style>
    <number:number-style style:name="N234">
      <number:number number:decimal-places="3" loext:min-decimal-places="3" number:min-integer-digits="1" number:grouping="true"/>
    </number:number-style>
    <number:number-style style:name="N2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36P0"/>
    </number:number-style>
    <number:number-style style:name="N237">
      <number:number number:decimal-places="2" loext:min-decimal-places="2" number:min-integer-digits="1"/>
      <number:text> </number:text>
    </number:number-style>
    <number:number-style style:name="N238P0" style:volatile="true">
      <number:number number:decimal-places="0" loext:min-decimal-places="0" number:min-integer-digits="1" number:grouping="true"/>
      <number:text>    </number:text>
    </number:number-style>
    <number:number-style style:name="N23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38P2" style:volatile="true">
      <number:text> -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0P0" style:volatile="true">
      <number:number number:decimal-places="3" loext:min-decimal-places="3" number:min-integer-digits="1" number:grouping="true"/>
      <number:text>    </number:text>
    </number:number-style>
    <number:number-style style:name="N240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240P2" style:volatile="true">
      <number:text> -   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1P0" style:volatile="true">
      <number:number number:decimal-places="2" loext:min-decimal-places="2" number:min-integer-digits="1" number:grouping="true"/>
      <number:text> </number:text>
    </number:number-style>
    <number:number-style style:name="N241">
      <number:text>(</number:text>
      <number:number number:decimal-places="2" loext:min-decimal-places="2" number:min-integer-digits="1" number:grouping="true"/>
      <number:text>)</number:text>
      <style:map style:condition="value()&gt;=0" style:apply-style-name="N241P0"/>
    </number:number-style>
    <number:number-style style:name="N242">
      <number:text>$</number:text>
      <number:number number:decimal-places="2" loext:min-decimal-places="2" number:min-integer-digits="1" number:grouping="true"/>
    </number:number-style>
    <number:number-style style:name="N244P0" style:volatile="true">
      <number:number number:decimal-places="2" loext:min-decimal-places="2" number:min-integer-digits="1" number:grouping="true"/>
      <number:text>     </number:text>
    </number:number-style>
    <number:number-style style:name="N244P1" style:volatile="true">
      <number:number number:decimal-places="2" loext:min-decimal-places="2" number:min-integer-digits="1" number:grouping="true"/>
      <number:text>     </number:text>
    </number:number-style>
    <number:number-style style:name="N244P2" style:volatile="true">
      <number:text>-</number:text>
      <number:number number:decimal-places="0" loext:min-decimal-places="0" number:min-integer-digits="0"/>
      <number:text>    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6P0" style:volatile="true">
      <number:text>Вкл</number:text>
    </number:number-style>
    <number:number-style style:name="N246P1" style:volatile="true">
      <number:text>Вкл</number:text>
    </number:number-style>
    <number:number-style style:name="N246">
      <number:text>Выкл</number:text>
      <style:map style:condition="value()&gt;0" style:apply-style-name="N246P0"/>
      <style:map style:condition="value()&lt;0" style:apply-style-name="N246P1"/>
    </number:number-style>
    <number:number-style style:name="N248P0" style:volatile="true">
      <number:text>£</number:text>
      <number:number number:decimal-places="2" loext:min-decimal-places="2" number:min-integer-digits="1" number:grouping="true"/>
    </number:number-style>
    <number:number-style style:name="N248">
      <number:text>-£</number:text>
      <number:number number:decimal-places="2" loext:min-decimal-places="2" number:min-integer-digits="1" number:grouping="true"/>
      <style:map style:condition="value()&gt;=0" style:apply-style-name="N248P0"/>
    </number:number-style>
    <number:number-style style:name="N250P0" style:volatile="true">
      <number:number number:decimal-places="0" loext:min-decimal-places="0" number:min-integer-digits="1" number:grouping="true"/>
      <number:text>    </number:text>
    </number:number-style>
    <number:number-style style:name="N250P1" style:volatile="true">
      <number:number number:decimal-places="0" loext:min-decimal-places="0" number:min-integer-digits="1" number:grouping="true"/>
      <number:text>    </number:text>
    </number:number-style>
    <number:number-style style:name="N250P2" style:volatile="true">
      <number:text>-   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2P0" style:volatile="true">
      <number:number number:decimal-places="0" loext:min-decimal-places="0" number:min-integer-digits="7"/>
      <number:text>    </number:text>
    </number:number-style>
    <number:number-style style:name="N252P1" style:volatile="true">
      <number:text> -    </number:text>
    </number:number-style>
    <number:text-style style:name="N252">
      <number:text-content/>
      <number:text> </number:text>
      <style:map style:condition="value()&gt;=0" style:apply-style-name="N252P0"/>
      <style:map style:condition="value()&lt;0" style:apply-style-name="N252P1"/>
    </number:text-style>
    <number:number-style style:name="N253P0" style:volatile="true">
      <number:number number:decimal-places="0" loext:min-decimal-places="0" number:min-integer-digits="1" number:grouping="true"/>
      <number:text>    </number:text>
    </number:number-style>
    <number:number-style style:name="N253P1" style:volatile="true">
      <number:number number:decimal-places="0" loext:min-decimal-places="0" number:min-integer-digits="1" number:grouping="true"/>
      <number:text>    </number:text>
    </number:number-style>
    <number:number-style style:name="N253P2" style:volatile="true">
      <number:text>-</number:text>
      <number:number number:decimal-places="0" loext:min-decimal-places="0" number:min-integer-digits="0"/>
      <number:text>   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">
      <number:number number:decimal-places="3" loext:min-decimal-places="0" number:min-integer-digits="1" number:decimal-replacement="" number:grouping="true" number:display-factor="1000"/>
    </number:number-style>
    <number:number-style style:name="N256P0" style:volatile="true">
      <number:number number:decimal-places="3" loext:min-decimal-places="3" number:min-integer-digits="1" number:grouping="true"/>
      <number:text> </number:text>
    </number:number-style>
    <number:number-style style:name="N256">
      <number:text>-</number:text>
      <number:number number:decimal-places="3" loext:min-decimal-places="3" number:min-integer-digits="1" number:grouping="true"/>
      <number:text> </number:text>
      <style:map style:condition="value()&gt;=0" style:apply-style-name="N256P0"/>
    </number:number-style>
    <number:number-style style:name="N257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258P0" style:volatile="true">
      <number:number number:decimal-places="2" loext:min-decimal-places="2" number:min-integer-digits="1" number:grouping="true"/>
      <number:text> </number:text>
    </number:number-style>
    <number:number-style style:name="N258">
      <number:text>-</number:text>
      <number:number number:decimal-places="2" loext:min-decimal-places="2" number:min-integer-digits="1" number:grouping="true"/>
      <number:text> </number:text>
      <style:map style:condition="value()&gt;=0" style:apply-style-name="N258P0"/>
    </number:number-style>
    <number:number-style style:name="N260P0" style:volatile="true">
      <number:number number:decimal-places="0" loext:min-decimal-places="0" number:min-integer-digits="1" number:grouping="true"/>
      <number:text> р.</number:text>
    </number:number-style>
    <number:number-style style:name="N260">
      <style:text-properties fo:color="#ff0000"/>
      <number:text>-</number:text>
      <number:number number:decimal-places="0" loext:min-decimal-places="0" number:min-integer-digits="1" number:grouping="true"/>
      <number:text> р.</number:text>
      <style:map style:condition="value()&gt;=0" style:apply-style-name="N260P0"/>
    </number:number-style>
    <number:number-style style:name="N261">
      <number:number number:decimal-places="0" loext:min-decimal-places="0" number:min-integer-digits="0"/>
    </number:number-style>
    <number:date-style style:name="N26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</number:date-style>
    <number:number-style style:name="N263P0" style:volatile="true">
      <number:number number:decimal-places="0" loext:min-decimal-places="0" number:min-integer-digits="0"/>
    </number:number-style>
    <number:number-style style:name="N263P1" style:volatile="true">
      <number:text> -    </number:text>
    </number:number-style>
    <number:text-style style:name="N263">
      <number:text-content/>
      <number:text> </number:text>
      <style:map style:condition="value()&gt;=0" style:apply-style-name="N263P0"/>
      <style:map style:condition="value()&lt;0" style:apply-style-name="N263P1"/>
    </number:text-style>
    <number:number-style style:name="N265P0" style:volatile="true">
      <number:number number:decimal-places="2" loext:min-decimal-places="2" number:min-integer-digits="1" number:grouping="true" number:display-factor="1000"/>
    </number:number-style>
    <number:number-style style:name="N265P1" style:volatile="true">
      <number:text>-</number:text>
      <number:number number:decimal-places="2" loext:min-decimal-places="2" number:min-integer-digits="1" number:grouping="true" number:display-factor="1000"/>
    </number:number-style>
    <number:number-style style:name="N265P2" style:volatile="true">
      <number:text>-</number:text>
      <number:number number:decimal-places="0" loext:min-decimal-places="0" number:min-integer-digits="0" number:display-factor="1000"/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percentage-style style:name="N266">
      <number:number number:decimal-places="3" loext:min-decimal-places="3" number:min-integer-digits="1"/>
      <number:text>%</number:text>
    </number:percentage-style>
    <number:number-style style:name="N2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6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67P0"/>
    </number:number-style>
    <number:date-style style:name="N268">
      <number:day/>
      <number:text>-</number:text>
      <number:month number:textual="true"/>
      <number:text>-</number:text>
      <number:year/>
    </number:date-style>
    <number:number-style style:name="N269">
      <number:number number:decimal-places="5" loext:min-decimal-places="5" number:min-integer-digits="1" number:grouping="true"/>
    </number:number-style>
    <number:currency-style style:name="N271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27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271P0"/>
    </number:currency-style>
    <number:number-style style:name="N273P0" style:volatile="true">
      <number:number number:decimal-places="0" loext:min-decimal-places="0" number:min-integer-digits="1" number:grouping="true"/>
      <number:text> ₽</number:text>
    </number:number-style>
    <number:number-style style:name="N273"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273P0"/>
    </number:number-style>
    <number:currency-style style:name="N275P0" style:volatile="true">
      <number:currency-symbol number:language="es" number:country="AR">$</number:currency-symbol>
      <number:number number:decimal-places="0" loext:min-decimal-places="0" number:min-integer-digits="1" number:grouping="true"/>
    </number:currency-style>
    <number:currency-style style:name="N275">
      <style:text-properties fo:color="#ff0000"/>
      <number:text>-</number:text>
      <number:currency-symbol number:language="es" number:country="AR">$</number:currency-symbol>
      <number:number number:decimal-places="0" loext:min-decimal-places="0" number:min-integer-digits="1" number:grouping="true"/>
      <style:map style:condition="value()&gt;=0" style:apply-style-name="N275P0"/>
    </number:currency-style>
    <number:number-style style:name="N276">
      <number:number number:decimal-places="0" loext:min-decimal-places="0" number:min-integer-digits="7"/>
    </number:number-style>
    <number:number-style style:name="N278P0" style:volatile="true">
      <number:number number:decimal-places="3" loext:min-decimal-places="3" number:min-integer-digits="1"/>
      <number:text> </number:text>
    </number:number-style>
    <number:number-style style:name="N278">
      <number:text>-</number:text>
      <number:number number:decimal-places="3" loext:min-decimal-places="3" number:min-integer-digits="1"/>
      <number:text> </number:text>
      <style:map style:condition="value()&gt;=0" style:apply-style-name="N278P0"/>
    </number:number-style>
    <number:number-style style:name="N281P0" style:volatile="true">
      <number:text> </number:text>
      <number:number number:decimal-places="5" loext:min-decimal-places="5" number:min-integer-digits="1" number:grouping="true"/>
      <number:text>    </number:text>
    </number:number-style>
    <number:number-style style:name="N281P1" style:volatile="true">
      <number:text>-</number:text>
      <number:number number:decimal-places="5" loext:min-decimal-places="5" number:min-integer-digits="1" number:grouping="true"/>
      <number:text>    </number:text>
    </number:number-style>
    <number:number-style style:name="N281P2" style:volatile="true">
      <number:text>-</number:text>
      <number:number number:decimal-places="0" loext:min-decimal-places="0" number:min-integer-digits="0"/>
      <number:text>    </number:text>
    </number:number-style>
    <number:text-style style:name="N281"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83P0" style:volatile="true">
      <number:number number:decimal-places="2" loext:min-decimal-places="2" number:min-integer-digits="1" number:grouping="true"/>
      <number:text> €</number:text>
    </number:number-style>
    <number:number-style style:name="N28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83P0"/>
    </number:number-style>
    <number:number-style style:name="N285P0" style:volatile="true">
      <number:text>On</number:text>
    </number:number-style>
    <number:number-style style:name="N285P1" style:volatile="true">
      <number:text>On</number:text>
    </number:number-style>
    <number:number-style style:name="N285">
      <number:text>Off</number:text>
      <style:map style:condition="value()&gt;0" style:apply-style-name="N285P0"/>
      <style:map style:condition="value()&lt;0" style:apply-style-name="N285P1"/>
    </number:number-style>
    <number:currency-style style:name="N287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287P1" style:volatile="true">
      <number:text>-</number:text>
      <number:number number:decimal-places="0" loext:min-decimal-places="0" number:min-integer-digits="0"/>
      <number:text> </number:text>
    </number:number-style>
    <number:text-style style:name="N287">
      <number:text-content/>
      <number:text> </number:text>
      <style:map style:condition="value()&gt;=0" style:apply-style-name="N287P0"/>
      <style:map style:condition="value()&lt;0" style:apply-style-name="N287P1"/>
    </number:text-style>
    <number:number-style style:name="N291P0" style:volatile="true">
      <number:text> fl </number:text>
      <number:number number:decimal-places="2" loext:min-decimal-places="2" number:min-integer-digits="1" number:grouping="true" number:display-factor="1000"/>
    </number:number-style>
    <number:number-style style:name="N291P1" style:volatile="true">
      <number:text> fl </number:text>
      <number:number number:decimal-places="2" loext:min-decimal-places="2" number:min-integer-digits="1" number:grouping="true"/>
      <number:text>-</number:text>
    </number:number-style>
    <number:number-style style:name="N291P2" style:volatile="true">
      <number:text> fl -</number:text>
      <number:number number:decimal-places="0" loext:min-decimal-places="0" number:min-integer-digits="0" number:display-factor="1000"/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4P0" style:volatile="true">
      <number:number number:decimal-places="4" loext:min-decimal-places="4" number:min-integer-digits="1" number:grouping="true"/>
      <number:text>    </number:text>
    </number:number-style>
    <number:number-style style:name="N294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294P2" style:volatile="true">
      <number:text>-</number:text>
      <number:number number:decimal-places="0" loext:min-decimal-places="0" number:min-integer-digits="0"/>
      <number:text>   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currency-style style:name="N295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295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295P0"/>
    </number:currency-style>
    <number:number-style style:name="N297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97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97P2" style:volatile="true">
      <number:text> $-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300P0" style:volatile="true">
      <number:number number:decimal-places="2" loext:min-decimal-places="2" number:min-integer-digits="1" number:grouping="true"/>
      <number:text>р. </number:text>
    </number:number-style>
    <number:number-style style:name="N300P1" style:volatile="true">
      <number:number number:decimal-places="2" loext:min-decimal-places="2" number:min-integer-digits="1" number:grouping="true"/>
      <number:text>р. </number:text>
    </number:number-style>
    <number:number-style style:name="N300P2" style:volatile="true">
      <number:text>-</number:text>
      <number:number number:decimal-places="0" loext:min-decimal-places="0" number:min-integer-digits="0"/>
      <number:text>р.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">
      <number:number number:decimal-places="0" loext:min-decimal-places="0" number:min-integer-digits="1" number:grouping="true"/>
      <number:text>р.</number:text>
    </number:number-style>
    <number:number-style style:name="N304P0" style:volatile="true">
      <number:number number:decimal-places="0" loext:min-decimal-places="0" number:min-integer-digits="1" number:grouping="true" number:display-factor="1000"/>
    </number:number-style>
    <number:number-style style:name="N304P1" style:volatile="true">
      <number:number number:decimal-places="0" loext:min-decimal-places="0" number:min-integer-digits="1" number:grouping="true"/>
      <number:text>-</number:text>
    </number:number-style>
    <number:number-style style:name="N304P2" style:volatile="true">
      <number:text> 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5">
      <number:number number:decimal-places="0" loext:min-decimal-places="0" number:min-integer-digits="1">
        <number:embedded-text number:position="3"> </number:embedded-text>
      </number:number>
    </number:number-style>
    <number:number-style style:name="N306P0" style:volatile="true">
      <number:number number:decimal-places="0" loext:min-decimal-places="0" number:min-integer-digits="1" number:grouping="true"/>
      <number:text>р.</number:text>
    </number:number-style>
    <number:number-style style:name="N306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306P0"/>
    </number:number-style>
    <number:number-style style:name="N309P0" style:volatile="true">
      <number:text> €</number:text>
      <number:number number:decimal-places="0" loext:min-decimal-places="0" number:min-integer-digits="1" number:grouping="true" number:display-factor="1000"/>
    </number:number-style>
    <number:number-style style:name="N309P1" style:volatile="true">
      <number:text>-€</number:text>
      <number:number number:decimal-places="0" loext:min-decimal-places="0" number:min-integer-digits="1" number:grouping="true" number:display-factor="1000"/>
    </number:number-style>
    <number:number-style style:name="N309P2" style:volatile="true">
      <number:text> €-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0">
      <number:number number:decimal-places="3" loext:min-decimal-places="3" number:min-integer-digits="1"/>
    </number:number-style>
    <number:currency-style style:name="N311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31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311">
      <number:text>-</number:text>
      <number:number number:decimal-places="0" loext:min-decimal-places="0" number:min-integer-digits="0"/>
      <number:text> </number:text>
      <style:map style:condition="value()&gt;0" style:apply-style-name="N311P0"/>
      <style:map style:condition="value()&lt;0" style:apply-style-name="N311P1"/>
    </number:number-style>
    <number:number-style style:name="N312">
      <number:fraction number:min-integer-digits="0" number:min-numerator-digits="3" loext:max-numerator-digits="3" number:min-denominator-digits="3" loext:max-denominator-value="999"/>
    </number:number-style>
    <number:number-style style:name="N313">
      <number:number number:decimal-places="0" loext:min-decimal-places="0" number:min-integer-digits="8"/>
    </number:number-style>
    <number:currency-style style:name="N314">
      <number:number number:decimal-places="1" loext:min-decimal-places="1" number:min-integer-digits="1" number:grouping="true"/>
      <number:text> </number:text>
      <number:currency-symbol number:language="ar" number:country="SA">€</number:currency-symbol>
    </number:currency-style>
    <number:number-style style:name="N316P0" style:volatile="true">
      <number:number number:decimal-places="0" loext:min-decimal-places="0" number:min-integer-digits="0"/>
      <number:text>    </number:text>
    </number:number-style>
    <number:number-style style:name="N316">
      <number:text> -    </number:text>
      <style:map style:condition="value()&gt;=0" style:apply-style-name="N316P0"/>
    </number:number-style>
    <number:number-style style:name="N317P0" style:volatile="true">
      <number:number number:decimal-places="2" loext:min-decimal-places="2" number:min-integer-digits="1" number:grouping="true"/>
      <number:text>р.</number:text>
    </number:number-style>
    <number:number-style style:name="N317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317P0"/>
    </number:number-style>
    <number:number-style style:name="N318P0" style:volatile="true">
      <number:number number:decimal-places="3" loext:min-decimal-places="3" number:min-integer-digits="1" number:grouping="true"/>
      <number:text>    </number:text>
    </number:number-style>
    <number:number-style style:name="N318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318P2" style:volatile="true">
      <number:text>-</number:text>
      <number:number number:decimal-places="0" loext:min-decimal-places="0" number:min-integer-digits="0"/>
      <number:text>   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0P0" style:volatile="true">
      <number:text>€</number:text>
      <number:number number:decimal-places="2" loext:min-decimal-places="2" number:min-integer-digits="1" number:grouping="true"/>
    </number:number-style>
    <number:number-style style:name="N320">
      <number:text>-€</number:text>
      <number:number number:decimal-places="2" loext:min-decimal-places="2" number:min-integer-digits="1" number:grouping="true"/>
      <style:map style:condition="value()&gt;=0" style:apply-style-name="N320P0"/>
    </number:number-style>
    <number:number-style style:name="N322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32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22P2" style:volatile="true">
      <number:text> -    </number:text>
    </number:number-style>
    <number:text-style style:name="N322">
      <number:text-content/>
      <number:text> </number:text>
      <style:map style:condition="value()&gt;0" style:apply-style-name="N322P0"/>
      <style:map style:condition="value()&lt;0" style:apply-style-name="N322P1"/>
      <style:map style:condition="value()=0" style:apply-style-name="N322P2"/>
    </number:text-style>
    <number:number-style style:name="N324P0" style:volatile="true">
      <number:text> </number:text>
      <number:number number:decimal-places="0" loext:min-decimal-places="0" number:min-integer-digits="1" number:grouping="true"/>
      <number:text> kr </number:text>
    </number:number-style>
    <number:number-style style:name="N324P1" style:volatile="true">
      <number:text>-</number:text>
      <number:number number:decimal-places="0" loext:min-decimal-places="0" number:min-integer-digits="1" number:grouping="true"/>
      <number:text> kr </number:text>
    </number:number-style>
    <number:number-style style:name="N324P2" style:volatile="true">
      <number:text> - kr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date-style style:name="N32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326">
      <number:number number:decimal-places="5" loext:min-decimal-places="5" number:min-integer-digits="1"/>
      <number:text>%</number:text>
    </number:percentage-style>
    <number:currency-style style:name="N327">
      <number:number number:decimal-places="1" loext:min-decimal-places="1" number:min-integer-digits="1" number:grouping="true"/>
      <number:text> </number:text>
      <number:currency-symbol number:language="ar" number:country="EG">€</number:currency-symbol>
    </number:currency-style>
    <number:currency-style style:name="N328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32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number-style style:name="N329P1" style:volatile="true">
      <number:text> -    </number:text>
    </number:number-style>
    <number:text-style style:name="N329">
      <number:text-content/>
      <number:text> </number:text>
      <style:map style:condition="value()&gt;=0" style:apply-style-name="N329P0"/>
      <style:map style:condition="value()&lt;0" style:apply-style-name="N329P1"/>
    </number:text-style>
    <number:number-style style:name="N330P0" style:volatile="true">
      <number:number number:decimal-places="2" loext:min-decimal-places="2" number:min-integer-digits="1" number:grouping="true" number:display-factor="1000"/>
    </number:number-style>
    <number:number-style style:name="N33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330P0"/>
    </number:number-style>
    <number:number-style style:name="N332P0" style:volatile="true">
      <number:number number:decimal-places="0" loext:min-decimal-places="0" number:min-integer-digits="1" number:grouping="true"/>
      <number:text> </number:text>
    </number:number-style>
    <number:number-style style:name="N33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332P2" style:volatile="true">
      <number:text> - </number:text>
    </number:number-style>
    <number:text-style style:name="N332">
      <number:text-content/>
      <number:text> </number:text>
      <style:map style:condition="value()&gt;0" style:apply-style-name="N332P0"/>
      <style:map style:condition="value()&lt;0" style:apply-style-name="N332P1"/>
      <style:map style:condition="value()=0" style:apply-style-name="N332P2"/>
    </number:text-style>
    <number:number-style style:name="N336P0" style:volatile="true">
      <number:number number:decimal-places="2" loext:min-decimal-places="2" number:min-integer-digits="1" number:grouping="true"/>
      <number:text>       </number:text>
    </number:number-style>
    <number:number-style style:name="N336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336P2" style:volatile="true">
      <number:text>-</number:text>
      <number:number number:decimal-places="0" loext:min-decimal-places="0" number:min-integer-digits="0"/>
      <number:text>      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date-style style:name="N337">
      <number:day number:style="long"/>
      <number:text>-</number:text>
      <number:month number:textual="true"/>
      <number:text>-</number:text>
      <number:year/>
    </number:date-style>
    <number:currency-style style:name="N341P0" style:volatile="true">
      <number:text> </number:text>
      <number:number number:decimal-places="0" loext:min-decimal-places="0" number:min-integer-digits="1" number:grouping="true"/>
      <number:currency-symbol number:language="ru" number:country="RU">р.</number:currency-symbol>
      <number:text> </number:text>
    </number:currency-style>
    <number:currency-style style:name="N341P1" style:volatile="true">
      <number:text>-</number:text>
      <number:number number:decimal-places="0" loext:min-decimal-places="0" number:min-integer-digits="1" number:grouping="true"/>
      <number:currency-symbol number:language="ru" number:country="RU">р.</number:currency-symbol>
      <number:text> </number:text>
    </number:currency-style>
    <number:currency-style style:name="N341P2" style:volatile="true">
      <number:text>-</number:text>
      <number:number number:decimal-places="0" loext:min-decimal-places="0" number:min-integer-digits="0"/>
      <number:currency-symbol number:language="ru" number:country="RU">р.</number:currency-symbol>
      <number:text> </number:text>
    </number:currency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4P0" style:volatile="true">
      <number:text> </number:text>
      <number:number number:decimal-places="2" loext:min-decimal-places="2" number:min-integer-digits="1" number:grouping="true"/>
      <number:text>р. </number:text>
    </number:number-style>
    <number:number-style style:name="N344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344P2" style:volatile="true">
      <number:text>-</number:text>
      <number:number number:decimal-places="0" loext:min-decimal-places="0" number:min-integer-digits="0"/>
      <number:text>р.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5P0" style:volatile="true">
      <number:text> -    </number:text>
    </number:number-style>
    <number:text-style style:name="N345">
      <number:text-content/>
      <number:text> </number:text>
      <style:map style:condition="value()&lt;=1.79769313486232E+308" style:apply-style-name="N345P0"/>
    </number:text-style>
    <number:number-style style:name="N346P0" style:volatile="true">
      <number:number number:decimal-places="0" loext:min-decimal-places="0" number:min-integer-digits="1" number:grouping="true" number:display-factor="1000"/>
    </number:number-style>
    <number:number-style style:name="N346">
      <number:text>(</number:text>
      <number:number number:decimal-places="0" loext:min-decimal-places="0" number:min-integer-digits="1" number:grouping="true"/>
      <number:text>)</number:text>
      <style:map style:condition="value()&gt;=0" style:apply-style-name="N346P0"/>
    </number:number-style>
    <number:date-style style:name="N347">
      <number:month number:textual="true"/>
      <number:text>-</number:text>
      <number:year/>
    </number:date-style>
    <number:number-style style:name="N349P0" style:volatile="true">
      <number:text>True</number:text>
    </number:number-style>
    <number:number-style style:name="N349P1" style:volatile="true">
      <number:text>True</number:text>
    </number:number-style>
    <number:number-style style:name="N349">
      <number:text>False</number:text>
      <style:map style:condition="value()&gt;0" style:apply-style-name="N349P0"/>
      <style:map style:condition="value()&lt;0" style:apply-style-name="N349P1"/>
    </number:number-style>
    <number:currency-style style:name="N351P0" style:volatile="true">
      <number:number number:decimal-places="1" loext:min-decimal-places="1" number:min-integer-digits="1" number:grouping="true"/>
      <number:text> </number:text>
      <number:currency-symbol number:language="ru" number:country="RU">руб.</number:currency-symbol>
    </number:currency-style>
    <number:currency-style style:name="N351">
      <number:text>-</number:text>
      <number:number number:decimal-places="1" loext:min-decimal-places="1" number:min-integer-digits="1" number:grouping="true"/>
      <number:text> </number:text>
      <number:currency-symbol number:language="ru" number:country="RU">руб.</number:currency-symbol>
      <style:map style:condition="value()&gt;=0" style:apply-style-name="N351P0"/>
    </number:currency-style>
    <number:number-style style:name="N352">
      <number:number number:decimal-places="1" loext:min-decimal-places="1" number:min-integer-digits="1" number:grouping="true"/>
      <number:text>р.</number:text>
    </number:number-style>
    <number:number-style style:name="N353P0" style:volatile="true">
      <number:number number:decimal-places="2" loext:min-decimal-places="2" number:min-integer-digits="1" number:grouping="true"/>
      <number:text> </number:text>
    </number:number-style>
    <number:number-style style:name="N35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353P2" style:volatile="true">
      <number:text>-</number:text>
      <number:number number:decimal-places="0" loext:min-decimal-places="0" number:min-integer-digits="0"/>
      <number:text>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5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355P0"/>
    </number:number-style>
    <number:number-style style:name="N359P0" style:volatile="true">
      <number:text> £</number:text>
      <number:number number:decimal-places="2" loext:min-decimal-places="2" number:min-integer-digits="1" number:grouping="true" number:display-factor="1000"/>
    </number:number-style>
    <number:number-style style:name="N359P1" style:volatile="true">
      <number:text>-£</number:text>
      <number:number number:decimal-places="2" loext:min-decimal-places="2" number:min-integer-digits="1" number:grouping="true" number:display-factor="1000"/>
    </number:number-style>
    <number:number-style style:name="N359P2" style:volatile="true">
      <number:text> £-</number:text>
      <number:number number:decimal-places="0" loext:min-decimal-places="0" number:min-integer-digits="0" number:display-factor="1000"/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3P0" style:volatile="true">
      <number:text> €</number:text>
      <number:number number:decimal-places="2" loext:min-decimal-places="2" number:min-integer-digits="1" number:grouping="true" number:display-factor="1000"/>
    </number:number-style>
    <number:number-style style:name="N363P1" style:volatile="true">
      <number:text>-€</number:text>
      <number:number number:decimal-places="2" loext:min-decimal-places="2" number:min-integer-digits="1" number:grouping="true" number:display-factor="1000"/>
    </number:number-style>
    <number:number-style style:name="N363P2" style:volatile="true">
      <number:text> €-</number:text>
      <number:number number:decimal-places="0" loext:min-decimal-places="0" number:min-integer-digits="0" number:display-factor="1000"/>
    </number:number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number-style style:name="N36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6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364P0"/>
    </number:number-style>
    <number:number-style style:name="N365P0" style:volatile="true">
      <number:number number:decimal-places="2" loext:min-decimal-places="2" number:min-integer-digits="1" number:grouping="true"/>
      <number:text>р. </number:text>
    </number:number-style>
    <number:number-style style:name="N365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365P2" style:volatile="true">
      <number:text>-</number:text>
      <number:number number:decimal-places="0" loext:min-decimal-places="0" number:min-integer-digits="0"/>
      <number:text>р. </number:text>
    </number:number-style>
    <number:text-style style:name="N365">
      <number:text-content/>
      <number:text> </number:text>
      <style:map style:condition="value()&gt;0" style:apply-style-name="N365P0"/>
      <style:map style:condition="value()&lt;0" style:apply-style-name="N365P1"/>
      <style:map style:condition="value()=0" style:apply-style-name="N365P2"/>
    </number:text-style>
    <number:currency-style style:name="N367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367P1" style:volatile="true">
      <number:text>- </number:text>
    </number:number-style>
    <number:text-style style:name="N367">
      <number:text-content/>
      <number:text> </number:text>
      <style:map style:condition="value()&gt;=0" style:apply-style-name="N367P0"/>
      <style:map style:condition="value()&lt;0" style:apply-style-name="N367P1"/>
    </number:text-style>
    <number:number-style style:name="N368">
      <number:number number:min-integer-digits="1"/>
      <number:text> </number:text>
    </number:number-style>
    <number:currency-style style:name="N370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370">
      <style:text-properties fo:color="#ff0000"/>
      <number:text>-</number:text>
      <number:currency-symbol number:language="es" number:country="AR">$</number:currency-symbol>
      <number:number number:decimal-places="2" loext:min-decimal-places="2" number:min-integer-digits="1" number:grouping="true"/>
      <style:map style:condition="value()&gt;=0" style:apply-style-name="N370P0"/>
    </number:currency-style>
    <number:number-style style:name="N374P0" style:volatile="true">
      <number:text> </number:text>
      <number:number number:decimal-places="0" loext:min-decimal-places="0" number:min-integer-digits="1" number:grouping="true"/>
      <number:text>     </number:text>
    </number:number-style>
    <number:number-style style:name="N374P1" style:volatile="true">
      <number:text>-</number:text>
      <number:number number:decimal-places="0" loext:min-decimal-places="0" number:min-integer-digits="1" number:grouping="true"/>
      <number:text>     </number:text>
    </number:number-style>
    <number:number-style style:name="N374P2" style:volatile="true">
      <number:text> -     </number:text>
    </number:number-style>
    <number:text-style style:name="N374">
      <number:text-content/>
      <number:text> </number:text>
      <style:map style:condition="value()&gt;0" style:apply-style-name="N374P0"/>
      <style:map style:condition="value()&lt;0" style:apply-style-name="N374P1"/>
      <style:map style:condition="value()=0" style:apply-style-name="N374P2"/>
    </number:text-style>
    <number:number-style style:name="N378P0" style:volatile="true">
      <number:text> fl </number:text>
      <number:number number:decimal-places="0" loext:min-decimal-places="0" number:min-integer-digits="1" number:grouping="true" number:display-factor="1000"/>
    </number:number-style>
    <number:number-style style:name="N378P1" style:volatile="true">
      <number:text> fl </number:text>
      <number:number number:decimal-places="0" loext:min-decimal-places="0" number:min-integer-digits="1" number:grouping="true"/>
      <number:text>-</number:text>
    </number:number-style>
    <number:number-style style:name="N378P2" style:volatile="true">
      <number:text> fl - </number:text>
    </number:number-style>
    <number:text-style style:name="N378">
      <number:text-content/>
      <number:text> </number:text>
      <style:map style:condition="value()&gt;0" style:apply-style-name="N378P0"/>
      <style:map style:condition="value()&lt;0" style:apply-style-name="N378P1"/>
      <style:map style:condition="value()=0" style:apply-style-name="N378P2"/>
    </number:text-style>
    <number:currency-style style:name="N379">
      <number:currency-symbol number:language="ru" number:country="RU">€</number:currency-symbol>
      <number:text> </number:text>
      <number:number number:decimal-places="2" loext:min-decimal-places="2" number:min-integer-digits="1" number:grouping="true"/>
    </number:currency-style>
    <number:currency-style style:name="N380">
      <number:currency-symbol number:language="en" number:country="US">$</number:currency-symbol>
      <number:number number:decimal-places="0" loext:min-decimal-places="0" number:min-integer-digits="1" number:grouping="true"/>
    </number:currency-style>
    <number:number-style style:name="N382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38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382P0"/>
    </number:number-style>
    <number:number-style style:name="N383P0" style:volatile="true">
      <number:number number:decimal-places="2" loext:min-decimal-places="2" number:min-integer-digits="1"/>
    </number:number-style>
    <number:number-style style:name="N383">
      <style:text-properties fo:color="#ff0000"/>
      <number:number number:decimal-places="2" loext:min-decimal-places="2" number:min-integer-digits="1"/>
      <style:map style:condition="value()&gt;=0" style:apply-style-name="N383P0"/>
    </number:number-style>
    <number:currency-style style:name="N385P0" style:volatile="true">
      <number:number number:decimal-places="0" loext:min-decimal-places="0" number:min-integer-digits="1" number:grouping="true"/>
      <number:currency-symbol number:language="ru" number:country="RU">р.</number:currency-symbol>
      <number:text> </number:text>
    </number:currency-style>
    <number:currency-style style:name="N385P1" style:volatile="true">
      <number:text>-</number:text>
      <number:number number:decimal-places="0" loext:min-decimal-places="0" number:min-integer-digits="1" number:grouping="true"/>
      <number:currency-symbol number:language="ru" number:country="RU">р.</number:currency-symbol>
      <number:text> </number:text>
    </number:currency-style>
    <number:currency-style style:name="N385P2" style:volatile="true">
      <number:text>-</number:text>
      <number:number number:decimal-places="0" loext:min-decimal-places="0" number:min-integer-digits="0"/>
      <number:currency-symbol number:language="ru" number:country="RU">р.</number:currency-symbol>
      <number:text> </number:text>
    </number:currency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percentage-style style:name="N386">
      <number:number number:decimal-places="1" loext:min-decimal-places="1" number:min-integer-digits="1"/>
      <number:text>%</number:text>
    </number:percentage-style>
    <number:currency-style style:name="N38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387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387P0"/>
    </number:currency-style>
    <number:number-style style:name="N388P0" style:volatile="true">
      <number:number number:decimal-places="0" loext:min-decimal-places="0" number:min-integer-digits="1" number:grouping="true"/>
      <number:text>р.</number:text>
    </number:number-style>
    <number:number-style style:name="N388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388P0"/>
    </number:number-style>
    <number:number-style style:name="N390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39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390P0"/>
    </number:number-style>
    <number:number-style style:name="N392P0" style:volatile="true">
      <number:number number:decimal-places="2" loext:min-decimal-places="2" number:min-integer-digits="1" number:grouping="true"/>
      <number:text> ₽</number:text>
    </number:number-style>
    <number:number-style style:name="N392">
      <style:text-properties fo:color="#ff0000"/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392P0"/>
    </number:number-style>
    <number:number-style style:name="N393P0" style:volatile="true">
      <number:number number:decimal-places="3" loext:min-decimal-places="0" number:min-integer-digits="1" number:decimal-replacement="" number:grouping="true" number:display-factor="1000"/>
    </number:number-style>
    <number:number-style style:name="N393">
      <number:text>-  </number:text>
      <style:map style:condition="value()&gt;=0" style:apply-style-name="N393P0"/>
    </number:number-style>
    <number:time-style style:name="N394">
      <number:hours number:style="long"/>
      <number:text>.</number:text>
      <number:minutes number:style="long"/>
    </number:time-style>
    <number:number-style style:name="N396P0" style:volatile="true">
      <number:number number:decimal-places="3" loext:min-decimal-places="0" number:min-integer-digits="1" number:decimal-replacement="" number:grouping="true"/>
      <number:text>    </number:text>
    </number:number-style>
    <number:number-style style:name="N39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96">
      <number:text> -    </number:text>
      <style:map style:condition="value()&gt;0" style:apply-style-name="N396P0"/>
      <style:map style:condition="value()&lt;0" style:apply-style-name="N396P1"/>
    </number:number-style>
    <number:currency-style style:name="N397P0" style:volatile="true">
      <number:number number:decimal-places="1" loext:min-decimal-places="1" number:min-integer-digits="1" number:grouping="true"/>
      <number:text> </number:text>
      <number:currency-symbol number:language="ru" number:country="RU">руб.</number:currency-symbol>
    </number:currency-style>
    <number:currency-style style:name="N397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ru" number:country="RU">руб.</number:currency-symbol>
      <style:map style:condition="value()&gt;=0" style:apply-style-name="N397P0"/>
    </number:currency-style>
    <number:number-style style:name="N398P0" style:volatile="true">
      <number:number number:decimal-places="2" loext:min-decimal-places="2" number:min-integer-digits="1" number:grouping="true" number:display-factor="1000"/>
    </number:number-style>
    <number:number-style style:name="N398">
      <number:text>-</number:text>
      <number:number number:decimal-places="2" loext:min-decimal-places="2" number:min-integer-digits="1" number:grouping="true" number:display-factor="1000"/>
      <style:map style:condition="value()&gt;=0" style:apply-style-name="N398P0"/>
    </number:number-style>
    <number:number-style style:name="N402P0" style:volatile="true">
      <number:text> $</number:text>
      <number:number number:decimal-places="2" loext:min-decimal-places="2" number:min-integer-digits="1" number:grouping="true" number:display-factor="1000"/>
    </number:number-style>
    <number:number-style style:name="N402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402P2" style:volatile="true">
      <number:text> $-</number:text>
      <number:number number:decimal-places="0" loext:min-decimal-places="0" number:min-integer-digits="0" number:display-factor="1000"/>
    </number:number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number-style style:name="N404P0" style:volatile="true">
      <number:text>Да</number:text>
    </number:number-style>
    <number:number-style style:name="N404P1" style:volatile="true">
      <number:text>Да</number:text>
    </number:number-style>
    <number:number-style style:name="N404">
      <number:text>Нет</number:text>
      <style:map style:condition="value()&gt;0" style:apply-style-name="N404P0"/>
      <style:map style:condition="value()&lt;0" style:apply-style-name="N404P1"/>
    </number:number-style>
    <number:number-style style:name="N405P0" style:volatile="true">
      <number:number number:decimal-places="0" loext:min-decimal-places="0" number:min-integer-digits="1" number:grouping="true" number:display-factor="1000"/>
    </number:number-style>
    <number:number-style style:name="N40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405P0"/>
    </number:number-style>
    <number:number-style style:name="N407P0" style:volatile="true">
      <number:number number:decimal-places="0" loext:min-decimal-places="0" number:min-integer-digits="1" number:grouping="true"/>
      <number:text> €</number:text>
    </number:number-style>
    <number:number-style style:name="N40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407P0"/>
    </number:number-style>
    <number:number-style style:name="N409P0" style:volatile="true">
      <number:text> </number:text>
      <number:number number:decimal-places="0" loext:min-decimal-places="0" number:min-integer-digits="1" number:grouping="true"/>
      <number:text> р. </number:text>
    </number:number-style>
    <number:number-style style:name="N409P1" style:volatile="true">
      <number:text>-</number:text>
      <number:number number:decimal-places="0" loext:min-decimal-places="0" number:min-integer-digits="1" number:grouping="true"/>
      <number:text> р. </number:text>
    </number:number-style>
    <number:number-style style:name="N409P2" style:volatile="true">
      <number:text> - р. </number:text>
    </number:number-style>
    <number:text-style style:name="N409">
      <number:text-content/>
      <number:text> </number:text>
      <style:map style:condition="value()&gt;0" style:apply-style-name="N409P0"/>
      <style:map style:condition="value()&lt;0" style:apply-style-name="N409P1"/>
      <style:map style:condition="value()=0" style:apply-style-name="N409P2"/>
    </number:text-style>
    <number:date-style style:name="N410">
      <number:day number:style="long"/>
      <number:text>-</number:text>
      <number:month number:textual="true"/>
    </number:date-style>
    <number:number-style style:name="N411P0" style:volatile="true">
      <number:number number:decimal-places="2" loext:min-decimal-places="2" number:min-integer-digits="1" number:grouping="true"/>
      <number:text>р.</number:text>
    </number:number-style>
    <number:number-style style:name="N411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411P0"/>
    </number:number-style>
    <number:number-style style:name="N412P0" style:volatile="true">
      <number:text>€</number:text>
      <number:number number:decimal-places="2" loext:min-decimal-places="2" number:min-integer-digits="1" number:grouping="true"/>
    </number:number-style>
    <number:number-style style:name="N412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412P0"/>
    </number:number-style>
    <number:number-style style:name="N414P0" style:volatile="true">
      <number:text>Yes</number:text>
    </number:number-style>
    <number:number-style style:name="N414P1" style:volatile="true">
      <number:text>Yes</number:text>
    </number:number-style>
    <number:number-style style:name="N414">
      <number:text>No</number:text>
      <style:map style:condition="value()&gt;0" style:apply-style-name="N414P0"/>
      <style:map style:condition="value()&lt;0" style:apply-style-name="N414P1"/>
    </number:number-style>
    <number:number-style style:name="N416P0" style:volatile="true">
      <number:number number:decimal-places="3" loext:min-decimal-places="0" number:min-integer-digits="1" number:decimal-replacement="" number:grouping="true"/>
      <number:text>    </number:text>
    </number:number-style>
    <number:number-style style:name="N416P1" style:volatile="true">
      <number:text/>
    </number:number-style>
    <number:number-style style:name="N416P2" style:volatile="true">
      <number:text> -   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currency-style style:name="N417">
      <number:currency-symbol number:language="en" number:country="AU">$</number:currency-symbol>
      <number:number number:decimal-places="3" loext:min-decimal-places="3" number:min-integer-digits="1" number:grouping="true"/>
    </number:currency-style>
    <number:currency-style style:name="N419P0" style:volatile="true">
      <number:number number:decimal-places="2" loext:min-decimal-places="2" number:min-integer-digits="0" number:grouping="true"/>
      <number:currency-symbol number:language="ru" number:country="RU">р.</number:currency-symbol>
    </number:currency-style>
    <number:currency-style style:name="N419">
      <style:text-properties fo:color="#ff0000"/>
      <number:text>-</number:text>
      <number:number number:decimal-places="2" loext:min-decimal-places="2" number:min-integer-digits="0" number:grouping="true"/>
      <number:currency-symbol number:language="ru" number:country="RU">р.</number:currency-symbol>
      <style:map style:condition="value()&gt;=0" style:apply-style-name="N419P0"/>
    </number:currency-style>
    <number:currency-style style:name="N421P0" style:volatile="true">
      <number:currency-symbol>€</number:currency-symbol>
      <number:text> </number:text>
      <number:number number:decimal-places="0" loext:min-decimal-places="0" number:min-integer-digits="3" number:grouping="true" number:display-factor="1000"/>
    </number:currency-style>
    <number:currency-style style:name="N421">
      <style:text-properties fo:color="#ff0000"/>
      <number:text>(</number:text>
      <number:currency-symbol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421P0"/>
    </number:currency-style>
    <number:time-style style:name="N422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423">
      <number:month/>
      <number:text>/</number:text>
      <number:day/>
      <number:text>/</number:text>
      <number:year/>
    </number:date-style>
    <number:number-style style:name="N42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426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426P2" style:volatile="true">
      <number:text> $-</number:text>
      <number:number number:decimal-places="0" loext:min-decimal-places="0" number:min-integer-digits="0"/>
      <number:text>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number-style style:name="N428P0" style:volatile="true">
      <number:text> </number:text>
      <number:number number:decimal-places="0" loext:min-decimal-places="0" number:min-integer-digits="1" number:grouping="true"/>
      <number:text>р. </number:text>
    </number:number-style>
    <number:number-style style:name="N428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428P2" style:volatile="true">
      <number:text> -р.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time-style style:name="N429">
      <number:hours number:style="long"/>
      <number:text>.</number:text>
      <number:minutes number:style="long"/>
      <number:text>.</number:text>
      <number:seconds number:style="long"/>
    </number:time-style>
    <number:currency-style style:name="N433P0" style:volatile="true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433P1" style:volatile="true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433P2" style:volatile="true">
      <number:currency-symbol number:language="en" number:country="US">$</number:currency-symbol>
      <number:text>-</number:text>
      <number:number number:decimal-places="0" loext:min-decimal-places="0" number:min-integer-digits="0"/>
      <number:text> </number:text>
    </number:currency-style>
    <number:text-style style:name="N433">
      <number:text-content/>
      <number:text> </number:text>
      <style:map style:condition="value()&gt;0" style:apply-style-name="N433P0"/>
      <style:map style:condition="value()&lt;0" style:apply-style-name="N433P1"/>
      <style:map style:condition="value()=0" style:apply-style-name="N433P2"/>
    </number:text-style>
    <number:currency-style style:name="N435P0" style:volatile="true">
      <number:currency-symbol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435">
      <style:text-properties fo:color="#ff0000"/>
      <number:text>(</number:text>
      <number:currency-symbol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435P0"/>
    </number:currency-style>
    <number:percentage-style style:name="N436">
      <number:number number:decimal-places="3" loext:min-decimal-places="3" number:min-integer-digits="1"/>
      <number:text>% </number:text>
    </number:percentage-style>
    <number:number-style style:name="N437P0" style:volatile="true">
      <number:number number:min-integer-digits="1"/>
      <number:text/>
    </number:number-style>
    <number:number-style style:name="N437">
      <number:text>-</number:text>
      <style:map style:condition="value()&gt;=0" style:apply-style-name="N437P0"/>
    </number:number-style>
    <number:number-style style:name="N439P0" style:volatile="true">
      <number:number number:decimal-places="2" loext:min-decimal-places="2" number:min-integer-digits="1" number:grouping="true"/>
      <number:text> </number:text>
    </number:number-style>
    <number:number-style style:name="N439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439P2" style:volatile="true">
      <number:text>-</number:text>
      <number:number number:decimal-places="0" loext:min-decimal-places="0" number:min-integer-digits="0"/>
      <number:text> </number:text>
    </number:number-style>
    <number:text-style style:name="N439">
      <number:text-content/>
      <number:text> </number:text>
      <style:map style:condition="value()&gt;0" style:apply-style-name="N439P0"/>
      <style:map style:condition="value()&lt;0" style:apply-style-name="N439P1"/>
      <style:map style:condition="value()=0" style:apply-style-name="N439P2"/>
    </number:text-style>
    <number:currency-style style:name="N440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44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440">
      <number:number number:min-integer-digits="1"/>
      <number:text/>
      <style:map style:condition="value()&gt;0" style:apply-style-name="N440P0"/>
      <style:map style:condition="value()&lt;0" style:apply-style-name="N440P1"/>
    </number:number-style>
    <number:number-style style:name="N4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442">
      <number:number number:decimal-places="4" loext:min-decimal-places="4" number:min-integer-digits="1" number:grouping="true"/>
      <number:text>   </number:text>
    </number:number-style>
    <number:number-style style:name="N443">
      <number:fraction number:min-integer-digits="0" number:min-numerator-digits="2" loext:max-numerator-digits="2" number:min-denominator-digits="2" loext:max-denominator-value="99"/>
      <number:text> </number:text>
    </number:number-style>
    <number:number-style style:name="N444">
      <number:text>31-5</number:text>
    </number:number-style>
    <number:number-style style:name="N445">
      <number:number number:decimal-places="12" loext:min-decimal-places="12" number:min-integer-digits="1"/>
    </number:number-style>
    <number:number-style style:name="N446">
      <number:fraction number:min-integer-digits="0" number:min-numerator-digits="3" loext:max-numerator-digits="3" number:min-denominator-digits="3" loext:max-denominator-value="999"/>
      <number:text> </number:text>
    </number:number-style>
    <number:percentage-style style:name="N448P0" style:volatile="true">
      <number:number number:decimal-places="2" loext:min-decimal-places="2" number:min-integer-digits="1" number:grouping="true"/>
      <number:text>%</number:text>
    </number:percentage-style>
    <number:percentage-style style:name="N448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448P0"/>
    </number:percentage-style>
    <number:number-style style:name="N45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450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450P2" style:volatile="true">
      <number:text>-</number:text>
      <number:number number:decimal-places="0" loext:min-decimal-places="0" number:min-integer-digits="0"/>
      <number:text> </number:text>
    </number:number-style>
    <number:text-style style:name="N450">
      <number:text-content/>
      <number:text> </number:text>
      <style:map style:condition="value()&gt;0" style:apply-style-name="N450P0"/>
      <style:map style:condition="value()&lt;0" style:apply-style-name="N450P1"/>
      <style:map style:condition="value()=0" style:apply-style-name="N450P2"/>
    </number:text-style>
    <number:date-style style:name="N451">
      <number:text>B2</number:text>
      <number:day number:style="long"/>
      <number:text>.</number:text>
      <number:month number:style="long"/>
      <number:text>.</number:text>
      <number:year number:style="long"/>
    </number:date-style>
    <number:currency-style style:name="N453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number-style style:name="N45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453">
      <number:text>-</number:text>
      <number:number number:decimal-places="0" loext:min-decimal-places="0" number:min-integer-digits="0"/>
      <number:text> </number:text>
      <style:map style:condition="value()&gt;0" style:apply-style-name="N453P0"/>
      <style:map style:condition="value()&lt;0" style:apply-style-name="N453P1"/>
    </number:number-style>
    <number:number-style style:name="N454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454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454P2" style:volatile="true">
      <number:text>-</number:text>
      <number:number number:decimal-places="0" loext:min-decimal-places="0" number:min-integer-digits="0"/>
      <number:text>    </number:text>
    </number:number-style>
    <number:text-style style:name="N454">
      <number:text-content/>
      <number:text> </number:text>
      <style:map style:condition="value()&gt;0" style:apply-style-name="N454P0"/>
      <style:map style:condition="value()&lt;0" style:apply-style-name="N454P1"/>
      <style:map style:condition="value()=0" style:apply-style-name="N454P2"/>
    </number:text-style>
    <number:number-style style:name="N455P0" style:volatile="true">
      <number:number number:decimal-places="3" loext:min-decimal-places="3" number:min-integer-digits="1"/>
    </number:number-style>
    <number:number-style style:name="N455">
      <style:text-properties fo:color="#ff0000"/>
      <number:text>-</number:text>
      <number:number number:decimal-places="3" loext:min-decimal-places="3" number:min-integer-digits="1"/>
      <style:map style:condition="value()&gt;=0" style:apply-style-name="N455P0"/>
    </number:number-style>
    <number:currency-style style:name="N459P0" style:volatile="true">
      <number:number number:decimal-places="2" loext:min-decimal-places="2" number:min-integer-digits="1" number:grouping="true"/>
      <number:text> </number:text>
      <number:currency-symbol>USD</number:currency-symbol>
      <number:text> </number:text>
    </number:currency-style>
    <number:currency-style style:name="N459P1" style:volatile="true">
      <number:text>-</number:text>
      <number:number number:decimal-places="2" loext:min-decimal-places="2" number:min-integer-digits="1" number:grouping="true"/>
      <number:text> </number:text>
      <number:currency-symbol>USD</number:currency-symbol>
      <number:text> </number:text>
    </number:currency-style>
    <number:currency-style style:name="N459P2" style:volatile="true">
      <number:text>-</number:text>
      <number:number number:decimal-places="0" loext:min-decimal-places="0" number:min-integer-digits="0"/>
      <number:text> </number:text>
      <number:currency-symbol>USD</number:currency-symbol>
      <number:text> </number:text>
    </number:currency-style>
    <number:text-style style:name="N459">
      <number:text-content/>
      <number:text> </number:text>
      <style:map style:condition="value()&gt;0" style:apply-style-name="N459P0"/>
      <style:map style:condition="value()&lt;0" style:apply-style-name="N459P1"/>
      <style:map style:condition="value()=0" style:apply-style-name="N459P2"/>
    </number:text-style>
    <number:number-style style:name="N460P0" style:volatile="true">
      <number:number number:decimal-places="2" loext:min-decimal-places="2" number:min-integer-digits="1"/>
    </number:number-style>
    <number:number-style style:name="N460">
      <style:text-properties fo:color="#ff0000"/>
      <number:text>-</number:text>
      <number:number number:decimal-places="2" loext:min-decimal-places="2" number:min-integer-digits="1"/>
      <style:map style:condition="value()&gt;=0" style:apply-style-name="N460P0"/>
    </number:number-style>
    <number:currency-style style:name="N462P0" style:volatile="true">
      <number:number number:decimal-places="2" loext:min-decimal-places="2" number:min-integer-digits="1" number:grouping="true"/>
      <number:currency-symbol number:language="ru" number:country="RU">руб.</number:currency-symbol>
    </number:currency-style>
    <number:currency-style style:name="N462">
      <style:text-properties fo:color="#ff0000"/>
      <number:text>-</number:text>
      <number:number number:decimal-places="2" loext:min-decimal-places="2" number:min-integer-digits="1" number:grouping="true"/>
      <number:currency-symbol number:language="ru" number:country="RU">руб.</number:currency-symbol>
      <style:map style:condition="value()&gt;=0" style:apply-style-name="N462P0"/>
    </number:currency-style>
    <number:number-style style:name="N464P0" style:volatile="true">
      <number:number number:decimal-places="1" loext:min-decimal-places="1" number:min-integer-digits="1"/>
      <number:text> </number:text>
    </number:number-style>
    <number:number-style style:name="N464">
      <number:text>-</number:text>
      <number:number number:decimal-places="1" loext:min-decimal-places="1" number:min-integer-digits="1"/>
      <number:text> </number:text>
      <style:map style:condition="value()&gt;=0" style:apply-style-name="N464P0"/>
    </number:number-style>
    <number:number-style style:name="N466P0" style:volatile="true">
      <number:text>fl </number:text>
      <number:number number:decimal-places="2" loext:min-decimal-places="2" number:min-integer-digits="1" number:grouping="true" number:display-factor="1000"/>
    </number:number-style>
    <number:number-style style:name="N466">
      <number:text>fl </number:text>
      <number:number number:decimal-places="2" loext:min-decimal-places="2" number:min-integer-digits="1" number:grouping="true"/>
      <number:text>-</number:text>
      <style:map style:condition="value()&gt;=0" style:apply-style-name="N466P0"/>
    </number:number-style>
    <number:number-style style:name="N467P0" style:volatile="true">
      <number:number number:decimal-places="2" loext:min-decimal-places="2" number:min-integer-digits="1" number:grouping="true"/>
      <number:text> </number:text>
    </number:number-style>
    <number:number-style style:name="N467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467P0"/>
    </number:number-style>
    <number:number-style style:name="N468P0" style:volatile="true">
      <number:number number:decimal-places="0" loext:min-decimal-places="0" number:min-integer-digits="1" number:grouping="true"/>
      <number:text> </number:text>
    </number:number-style>
    <number:number-style style:name="N468">
      <number:text>(</number:text>
      <number:number number:decimal-places="0" loext:min-decimal-places="0" number:min-integer-digits="1" number:grouping="true"/>
      <number:text>)</number:text>
      <style:map style:condition="value()&gt;=0" style:apply-style-name="N468P0"/>
    </number:number-style>
    <number:number-style style:name="N469P0" style:volatile="true">
      <number:number number:decimal-places="2" loext:min-decimal-places="2" number:min-integer-digits="1" number:grouping="true"/>
      <number:text> р.</number:text>
    </number:number-style>
    <number:number-style style:name="N469">
      <number:text>-</number:text>
      <number:number number:decimal-places="2" loext:min-decimal-places="2" number:min-integer-digits="1" number:grouping="true"/>
      <number:text> р.</number:text>
      <style:map style:condition="value()&gt;=0" style:apply-style-name="N469P0"/>
    </number:number-style>
    <number:number-style style:name="N470P0" style:volatile="true">
      <number:text>£</number:text>
      <number:number number:decimal-places="0" loext:min-decimal-places="0" number:min-integer-digits="1" number:grouping="true"/>
    </number:number-style>
    <number:number-style style:name="N470">
      <number:text>-£</number:text>
      <number:number number:decimal-places="0" loext:min-decimal-places="0" number:min-integer-digits="1" number:grouping="true"/>
      <style:map style:condition="value()&gt;=0" style:apply-style-name="N470P0"/>
    </number:number-style>
    <number:number-style style:name="N472P0" style:volatile="true">
      <number:number number:min-integer-digits="1"/>
      <number:text/>
    </number:number-style>
    <number:number-style style:name="N472P1" style:volatile="true">
      <number:text>-</number:text>
    </number:number-style>
    <number:text-style style:name="N472">
      <number:text-content/>
      <style:map style:condition="value()&gt;=0" style:apply-style-name="N472P0"/>
      <style:map style:condition="value()&lt;0" style:apply-style-name="N472P1"/>
    </number:text-style>
    <number:currency-style style:name="N473P0" style:volatile="true">
      <number:number number:decimal-places="0" loext:min-decimal-places="0" number:min-integer-digits="1" number:grouping="true"/>
      <number:text> </number:text>
      <number:currency-symbol number:language="ru" number:country="RU">руб.</number:currency-symbol>
    </number:currency-style>
    <number:currency-style style:name="N473">
      <number:text>-</number:text>
      <number:number number:decimal-places="0" loext:min-decimal-places="0" number:min-integer-digits="1" number:grouping="true"/>
      <number:text> </number:text>
      <number:currency-symbol number:language="ru" number:country="RU">руб.</number:currency-symbol>
      <style:map style:condition="value()&gt;=0" style:apply-style-name="N473P0"/>
    </number:currency-style>
    <number:currency-style style:name="N47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text-style style:name="N474">
      <number:text-content/>
      <number:text> </number:text>
      <style:map style:condition="value()&lt;=1.79769313486232E+308" style:apply-style-name="N474P0"/>
    </number:text-style>
    <number:currency-style style:name="N475">
      <number:number number:decimal-places="2" loext:min-decimal-places="2" number:min-integer-digits="1" number:grouping="true"/>
      <number:text> </number:text>
      <number:currency-symbol>USD</number:currency-symbol>
    </number:currency-style>
    <number:number-style style:name="N476P0" style:volatile="true">
      <number:number number:decimal-places="0" loext:min-decimal-places="0" number:min-integer-digits="1" number:grouping="true"/>
      <number:text> </number:text>
    </number:number-style>
    <number:number-style style:name="N47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476P0"/>
    </number:number-style>
    <number:percentage-style style:name="N477">
      <number:number number:decimal-places="6" loext:min-decimal-places="6" number:min-integer-digits="1"/>
      <number:text>%</number:text>
    </number:percentage-style>
    <number:number-style style:name="N480P0" style:volatile="true">
      <number:number number:decimal-places="2" loext:min-decimal-places="2" number:min-integer-digits="1" number:grouping="true"/>
      <number:text> € </number:text>
    </number:number-style>
    <number:number-style style:name="N480P1" style:volatile="true">
      <number:number number:decimal-places="2" loext:min-decimal-places="2" number:min-integer-digits="1" number:grouping="true"/>
      <number:text> € </number:text>
    </number:number-style>
    <number:number-style style:name="N480P2" style:volatile="true">
      <number:text>-</number:text>
      <number:number number:decimal-places="0" loext:min-decimal-places="0" number:min-integer-digits="0"/>
      <number:text> €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number-style style:name="N481">
      <number:number number:decimal-places="1" loext:min-decimal-places="1" number:min-integer-digits="0"/>
    </number:number-style>
    <number:number-style style:name="N483P0" style:volatile="true">
      <number:text> </number:text>
      <number:number number:decimal-places="1" loext:min-decimal-places="1" number:min-integer-digits="1" number:grouping="true"/>
      <number:text>    </number:text>
    </number:number-style>
    <number:number-style style:name="N483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483P2" style:volatile="true">
      <number:text>-</number:text>
      <number:number number:decimal-places="0" loext:min-decimal-places="0" number:min-integer-digits="0"/>
      <number:text>    </number:text>
    </number:number-style>
    <number:text-style style:name="N483">
      <number:text-content/>
      <number:text> </number:text>
      <style:map style:condition="value()&gt;0" style:apply-style-name="N483P0"/>
      <style:map style:condition="value()&lt;0" style:apply-style-name="N483P1"/>
      <style:map style:condition="value()=0" style:apply-style-name="N483P2"/>
    </number:text-style>
    <number:number-style style:name="N484">
      <number:number number:decimal-places="2" loext:min-decimal-places="2" number:min-integer-digits="1"/>
      <number:text>%</number:text>
    </number:number-style>
    <number:number-style style:name="N485">
      <number:number number:decimal-places="2" loext:min-decimal-places="2" number:min-integer-digits="1" number:grouping="true"/>
      <number:text>   </number:text>
    </number:number-style>
    <number:number-style style:name="N487P0" style:volatile="true">
      <number:text>€</number:text>
      <number:number number:decimal-places="0" loext:min-decimal-places="0" number:min-integer-digits="1" number:grouping="true"/>
    </number:number-style>
    <number:number-style style:name="N487">
      <number:text>-€</number:text>
      <number:number number:decimal-places="0" loext:min-decimal-places="0" number:min-integer-digits="1" number:grouping="true"/>
      <style:map style:condition="value()&gt;=0" style:apply-style-name="N487P0"/>
    </number:number-style>
    <number:number-style style:name="N488P0" style:volatile="true">
      <number:number number:decimal-places="0" loext:min-decimal-places="0" number:min-integer-digits="1" number:grouping="true"/>
      <number:text> ₽</number:text>
    </number:number-style>
    <number:number-style style:name="N488">
      <style:text-properties fo:color="#ff0000"/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488P0"/>
    </number:number-style>
    <number:currency-style style:name="N489">
      <number:number number:decimal-places="2" loext:min-decimal-places="2" number:min-integer-digits="1" number:grouping="true"/>
      <number:text> </number:text>
      <number:currency-symbol number:language="ar" number:country="EG">€</number:currency-symbol>
    </number:currency-style>
    <number:number-style style:name="N490">
      <number:number number:decimal-places="0" loext:min-decimal-places="0" number:min-integer-digits="1" number:grouping="true"/>
      <number:text>,   </number:text>
    </number:number-style>
    <number:number-style style:name="N491P0" style:volatile="true">
      <number:number number:decimal-places="2" loext:min-decimal-places="2" number:min-integer-digits="1" number:grouping="true"/>
      <number:text>    </number:text>
    </number:number-style>
    <number:number-style style:name="N491P1" style:volatile="true">
      <number:number number:decimal-places="2" loext:min-decimal-places="2" number:min-integer-digits="1" number:grouping="true"/>
      <number:text>    </number:text>
    </number:number-style>
    <number:number-style style:name="N491P2" style:volatile="true">
      <number:text>-</number:text>
      <number:number number:decimal-places="0" loext:min-decimal-places="0" number:min-integer-digits="0"/>
      <number:text>    </number:text>
    </number:number-style>
    <number:text-style style:name="N491">
      <number:text-content/>
      <number:text> </number:text>
      <style:map style:condition="value()&gt;0" style:apply-style-name="N491P0"/>
      <style:map style:condition="value()&lt;0" style:apply-style-name="N491P1"/>
      <style:map style:condition="value()=0" style:apply-style-name="N491P2"/>
    </number:text-style>
    <number:number-style style:name="N492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49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492P0"/>
    </number:number-style>
    <number:currency-style style:name="N493">
      <number:number number:decimal-places="0" loext:min-decimal-places="0" number:min-integer-digits="1" number:grouping="true"/>
      <number:text> </number:text>
      <number:currency-symbol>USD</number:currency-symbol>
    </number:currency-style>
    <number:date-style style:name="N494">
      <number:day number:style="long"/>
      <number:month number:style="long"/>
      <number:year number:style="long"/>
    </number:date-style>
    <number:number-style style:name="N497P0" style:volatile="true">
      <number:number number:decimal-places="0" loext:min-decimal-places="0" number:min-integer-digits="1" number:grouping="true"/>
      <number:text>     </number:text>
    </number:number-style>
    <number:number-style style:name="N497P1" style:volatile="true">
      <number:number number:decimal-places="0" loext:min-decimal-places="0" number:min-integer-digits="1" number:grouping="true"/>
      <number:text>     </number:text>
    </number:number-style>
    <number:number-style style:name="N497P2" style:volatile="true">
      <number:text>-     </number:text>
    </number:number-style>
    <number:text-style style:name="N497">
      <number:text-content/>
      <number:text> </number:text>
      <style:map style:condition="value()&gt;0" style:apply-style-name="N497P0"/>
      <style:map style:condition="value()&lt;0" style:apply-style-name="N497P1"/>
      <style:map style:condition="value()=0" style:apply-style-name="N497P2"/>
    </number:text-style>
    <number:number-style style:name="N498">
      <number:number number:decimal-places="4" loext:min-decimal-places="4" number:min-integer-digits="1"/>
    </number:number-style>
    <number:number-style style:name="N499P0" style:volatile="true">
      <number:number number:decimal-places="2" loext:min-decimal-places="2" number:min-integer-digits="1" number:grouping="true"/>
      <number:text>    </number:text>
    </number:number-style>
    <number:number-style style:name="N49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499P2" style:volatile="true">
      <number:text>-</number:text>
      <number:number number:decimal-places="0" loext:min-decimal-places="0" number:min-integer-digits="0"/>
      <number:text>    </number:text>
    </number:number-style>
    <number:text-style style:name="N499">
      <number:text-content/>
      <number:text> </number:text>
      <style:map style:condition="value()&gt;0" style:apply-style-name="N499P0"/>
      <style:map style:condition="value()&lt;0" style:apply-style-name="N499P1"/>
      <style:map style:condition="value()=0" style:apply-style-name="N499P2"/>
    </number:text-style>
    <number:number-style style:name="N501P0" style:volatile="true">
      <number:number number:decimal-places="0" loext:min-decimal-places="0" number:min-integer-digits="1" number:grouping="true" number:display-factor="1000"/>
    </number:number-style>
    <number:number-style style:name="N501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501P2" style:volatile="true">
      <number:text> - </number:text>
    </number:number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date-style style:name="N502">
      <number:month number:style="long" number:textual="true"/>
      <number:text> </number:text>
      <number:day/>
      <number:text>, </number:text>
      <number:year number:style="long"/>
    </number:date-style>
    <number:number-style style:name="N503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50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503P0"/>
    </number:number-style>
    <number:number-style style:name="N504P0" style:volatile="true">
      <number:number number:decimal-places="0" loext:min-decimal-places="0" number:min-integer-digits="1" number:grouping="true" number:display-factor="1000"/>
    </number:number-style>
    <number:number-style style:name="N504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504P2" style:volatile="true">
      <number:text> - </number:text>
    </number:number-style>
    <number:text-style style:name="N504">
      <number:text-content/>
      <number:text> </number:text>
      <style:map style:condition="value()&gt;0" style:apply-style-name="N504P0"/>
      <style:map style:condition="value()&lt;0" style:apply-style-name="N504P1"/>
      <style:map style:condition="value()=0" style:apply-style-name="N504P2"/>
    </number:text-style>
    <number:number-style style:name="N505P0" style:volatile="true">
      <number:text>$</number:text>
      <number:number number:decimal-places="2" loext:min-decimal-places="2" number:min-integer-digits="1" number:grouping="true"/>
    </number:number-style>
    <number:number-style style:name="N505">
      <style:text-properties fo:color="#ff0000"/>
      <number:text>$</number:text>
      <number:number number:decimal-places="2" loext:min-decimal-places="2" number:min-integer-digits="1" number:grouping="true"/>
      <style:map style:condition="value()&gt;=0" style:apply-style-name="N505P0"/>
    </number:number-style>
    <number:number-style style:name="N506P0" style:volatile="true">
      <number:number number:decimal-places="2" loext:min-decimal-places="2" number:min-integer-digits="1" number:grouping="true" number:display-factor="1000"/>
    </number:number-style>
    <number:number-style style:name="N50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506P2" style:volatile="true">
      <number:text>-</number:text>
      <number:number number:decimal-places="0" loext:min-decimal-places="0" number:min-integer-digits="0" number:display-factor="1000"/>
    </number:number-style>
    <number:text-style style:name="N506">
      <number:text-content/>
      <number:text> </number:text>
      <style:map style:condition="value()&gt;0" style:apply-style-name="N506P0"/>
      <style:map style:condition="value()&lt;0" style:apply-style-name="N506P1"/>
      <style:map style:condition="value()=0" style:apply-style-name="N506P2"/>
    </number:text-style>
    <number:number-style style:name="N507P0" style:volatile="true">
      <number:text/>
    </number:number-style>
    <number:number-style style:name="N507P1" style:volatile="true">
      <number:text/>
    </number:number-style>
    <number:number-style style:name="N507P2" style:volatile="true">
      <number:text/>
    </number:number-style>
    <number:text-style style:name="N507">
      <number:text/>
      <style:map style:condition="value()&gt;0" style:apply-style-name="N507P0"/>
      <style:map style:condition="value()&lt;0" style:apply-style-name="N507P1"/>
      <style:map style:condition="value()=0" style:apply-style-name="N507P2"/>
    </number:text-style>
    <number:currency-style style:name="N508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number-style style:name="N511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511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511P2" style:volatile="true">
      <number:text>-</number:text>
      <number:number number:decimal-places="0" loext:min-decimal-places="0" number:min-integer-digits="0"/>
      <number:text> €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2">
      <number:number number:decimal-places="0" loext:min-decimal-places="0" number:min-integer-digits="1" number:grouping="true"/>
      <number:text>   </number:text>
    </number:number-style>
    <number:number-style style:name="N514P0" style:volatile="true">
      <number:number number:decimal-places="0" loext:min-decimal-places="0" number:min-integer-digits="1" number:grouping="true"/>
      <number:text> kr</number:text>
    </number:number-style>
    <number:number-style style:name="N514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514P0"/>
    </number:number-style>
    <number:date-style style:name="N516P0" style:volatile="true">
      <number:day number:style="long"/>
      <number:text> </number:text>
      <number:month number:style="long" number:textual="true"/>
      <number:text> </number:text>
      <number:year number:style="long"/>
      <number:text> г.</number:text>
    </number:date-style>
    <number:text-style style:name="N516">
      <number:text-content/>
      <style:map style:condition="value()&lt;=1.79769313486232E+308" style:apply-style-name="N516P0"/>
    </number:text-style>
    <number:number-style style:name="N517P0" style:volatile="true">
      <number:text>€</number:text>
      <number:number number:decimal-places="0" loext:min-decimal-places="0" number:min-integer-digits="1" number:grouping="true"/>
    </number:number-style>
    <number:number-style style:name="N517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517P0"/>
    </number:number-style>
    <number:number-style style:name="N518P0" style:volatile="true">
      <number:number number:decimal-places="0" loext:min-decimal-places="0" number:min-integer-digits="1" number:grouping="true"/>
      <number:text> kr</number:text>
    </number:number-style>
    <number:number-style style:name="N5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518P0"/>
    </number:number-style>
    <number:number-style style:name="N520P0" style:volatile="true">
      <number:text> </number:text>
      <number:number number:decimal-places="2" loext:min-decimal-places="2" number:min-integer-digits="1" number:grouping="true"/>
      <number:text> р. </number:text>
    </number:number-style>
    <number:number-style style:name="N520P1" style:volatile="true">
      <number:text>-</number:text>
      <number:number number:decimal-places="2" loext:min-decimal-places="2" number:min-integer-digits="1" number:grouping="true"/>
      <number:text> р. </number:text>
    </number:number-style>
    <number:number-style style:name="N520P2" style:volatile="true">
      <number:text>-</number:text>
      <number:number number:decimal-places="0" loext:min-decimal-places="0" number:min-integer-digits="0"/>
      <number:text> р.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number number:decimal-places="0" loext:min-decimal-places="0" number:min-integer-digits="1" number:grouping="true"/>
      <number:text> ₽ </number:text>
    </number:number-style>
    <number:number-style style:name="N523P1" style:volatile="true">
      <number:number number:decimal-places="0" loext:min-decimal-places="0" number:min-integer-digits="1" number:grouping="true"/>
      <number:text> ₽ </number:text>
    </number:number-style>
    <number:number-style style:name="N523P2" style:volatile="true">
      <number:text>- ₽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currency-style style:name="N525P0" style:volatile="true">
      <number:number number:decimal-places="1" loext:min-decimal-places="1" number:min-integer-digits="1" number:grouping="true"/>
      <number:text> </number:text>
      <number:currency-symbol number:language="de" number:country="DE">€</number:currency-symbol>
    </number:currency-style>
    <number:currency-style style:name="N525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de" number:country="DE">€</number:currency-symbol>
      <style:map style:condition="value()&gt;=0" style:apply-style-name="N525P0"/>
    </number:currency-style>
    <number:number-style style:name="N526P0" style:volatile="true">
      <number:number number:decimal-places="2" loext:min-decimal-places="2" number:min-integer-digits="1" number:grouping="true"/>
      <number:text> kr</number:text>
    </number:number-style>
    <number:number-style style:name="N526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526P0"/>
    </number:number-style>
    <number:number-style style:name="N528P0" style:volatile="true">
      <number:text> </number:text>
      <number:number number:decimal-places="4" loext:min-decimal-places="4" number:min-integer-digits="1" number:grouping="true"/>
      <number:text>    </number:text>
    </number:number-style>
    <number:number-style style:name="N528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528P2" style:volatile="true">
      <number:text>-</number:text>
      <number:number number:decimal-places="0" loext:min-decimal-places="0" number:min-integer-digits="0"/>
      <number:text>    </number:text>
    </number:number-style>
    <number:text-style style:name="N528">
      <number:text-content/>
      <number:text> </number:text>
      <style:map style:condition="value()&gt;0" style:apply-style-name="N528P0"/>
      <style:map style:condition="value()&lt;0" style:apply-style-name="N528P1"/>
      <style:map style:condition="value()=0" style:apply-style-name="N528P2"/>
    </number:text-style>
    <number:currency-style style:name="N529">
      <number:currency-symbol number:language="en" number:country="AU">$</number:currency-symbol>
      <number:number number:decimal-places="1" loext:min-decimal-places="1" number:min-integer-digits="1" number:grouping="true"/>
    </number:currency-style>
    <number:number-style style:name="N530P0" style:volatile="true">
      <number:number number:decimal-places="2" loext:min-decimal-places="2" number:min-integer-digits="1" number:grouping="true"/>
      <number:text> ₽</number:text>
    </number:number-style>
    <number:number-style style:name="N530"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530P0"/>
    </number:number-style>
    <number:percentage-style style:name="N531">
      <number:number number:decimal-places="2" loext:min-decimal-places="2" number:min-integer-digits="1"/>
      <number:text>% </number:text>
    </number:percentage-style>
    <number:number-style style:name="N532P0" style:volatile="true">
      <number:number number:decimal-places="2" loext:min-decimal-places="2" number:min-integer-digits="1" number:grouping="true"/>
      <number:text> € </number:text>
    </number:number-style>
    <number:number-style style:name="N532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532P2" style:volatile="true">
      <number:text>-</number:text>
      <number:number number:decimal-places="0" loext:min-decimal-places="0" number:min-integer-digits="0"/>
      <number:text> €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date-style style:name="N533">
      <number:month number:textual="true"/>
      <number:text>.</number:text>
      <number:year number:style="long"/>
    </number:date-style>
    <number:number-style style:name="N534P0" style:volatile="true">
      <number:number number:decimal-places="0" loext:min-decimal-places="0" number:min-integer-digits="1"/>
      <number:text> </number:text>
    </number:number-style>
    <number:number-style style:name="N534">
      <number:text>-</number:text>
      <number:number number:decimal-places="0" loext:min-decimal-places="0" number:min-integer-digits="1"/>
      <number:text> </number:text>
      <style:map style:condition="value()&gt;=0" style:apply-style-name="N534P0"/>
    </number:number-style>
    <number:currency-style style:name="N538P0" style:volatile="true">
      <number:currency-symbol>€</number:currency-symbol>
      <number:text> </number:text>
      <number:number number:decimal-places="2" loext:min-decimal-places="2" number:min-integer-digits="1" number:grouping="true" number:display-factor="1000"/>
    </number:currency-style>
    <number:currency-style style:name="N538P1" style:volatile="true">
      <number:currency-symbol>€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538P2" style:volatile="true">
      <number:currency-symbol>€</number:currency-symbol>
      <number:text> -</number:text>
      <number:number number:decimal-places="0" loext:min-decimal-places="0" number:min-integer-digits="0" number:display-factor="1000"/>
    </number:currency-style>
    <number:text-style style:name="N538">
      <number:text-content/>
      <number:text> </number:text>
      <style:map style:condition="value()&gt;0" style:apply-style-name="N538P0"/>
      <style:map style:condition="value()&lt;0" style:apply-style-name="N538P1"/>
      <style:map style:condition="value()=0" style:apply-style-name="N538P2"/>
    </number:text-style>
    <number:currency-style style:name="N540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540P1" style:volatile="true">
      <number:text>-# ""</number:text>
    </number:number-style>
    <number:number-style style:name="N540">
      <number:text>@ "</number:text>
      <style:map style:condition="value()&gt;0" style:apply-style-name="N540P0"/>
      <style:map style:condition="value()&lt;0" style:apply-style-name="N540P1"/>
    </number:number-style>
    <number:number-style style:name="N542P0" style:volatile="true">
      <number:number number:decimal-places="0" loext:min-decimal-places="0" number:min-integer-digits="7"/>
      <number:text>    </number:text>
    </number:number-style>
    <number:number-style style:name="N542P1" style:volatile="true">
      <number:text>-</number:text>
      <number:number number:decimal-places="0" loext:min-decimal-places="0" number:min-integer-digits="1"/>
      <number:text>    </number:text>
    </number:number-style>
    <number:number-style style:name="N542P2" style:volatile="true">
      <number:text> -    </number:text>
    </number:number-style>
    <number:text-style style:name="N542">
      <number:text-content/>
      <number:text> </number:text>
      <style:map style:condition="value()&gt;0" style:apply-style-name="N542P0"/>
      <style:map style:condition="value()&lt;0" style:apply-style-name="N542P1"/>
      <style:map style:condition="value()=0" style:apply-style-name="N542P2"/>
    </number:text-style>
    <number:number-style style:name="N543P0" style:volatile="true">
      <number:number number:decimal-places="2" loext:min-decimal-places="2" number:min-integer-digits="1"/>
      <number:text> </number:text>
    </number:number-style>
    <number:number-style style:name="N543">
      <number:text>-</number:text>
      <number:number number:decimal-places="2" loext:min-decimal-places="2" number:min-integer-digits="1"/>
      <number:text> </number:text>
      <style:map style:condition="value()&gt;=0" style:apply-style-name="N543P0"/>
    </number:number-style>
    <number:date-style style:name="N544">
      <number:day number:style="long"/>
      <number:text> </number:text>
      <number:month number:textual="true"/>
      <number:text> </number:text>
      <number:year/>
    </number:date-style>
    <number:number-style style:name="N545">
      <number:number number:decimal-places="0" loext:min-decimal-places="0" number:min-integer-digits="3"/>
    </number:number-style>
    <number:number-style style:name="N546P0" style:volatile="true">
      <number:number number:decimal-places="0" loext:min-decimal-places="0" number:min-integer-digits="1" number:grouping="true"/>
      <number:text> €</number:text>
    </number:number-style>
    <number:number-style style:name="N54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546P0"/>
    </number:number-style>
    <number:number-style style:name="N547">
      <number:number number:decimal-places="9" loext:min-decimal-places="9" number:min-integer-digits="1"/>
    </number:number-style>
    <number:currency-style style:name="N548">
      <number:currency-symbol number:language="en" number:country="AU">$</number:currency-symbol>
      <number:number number:decimal-places="0" loext:min-decimal-places="0" number:min-integer-digits="1" number:grouping="true"/>
    </number:currency-style>
    <number:number-style style:name="N549P0" style:volatile="true">
      <number:text>£</number:text>
      <number:number number:decimal-places="2" loext:min-decimal-places="2" number:min-integer-digits="1" number:grouping="true"/>
    </number:number-style>
    <number:number-style style:name="N549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549P0"/>
    </number:number-style>
    <number:number-style style:name="N551P0" style:volatile="true">
      <number:text>fl </number:text>
      <number:number number:decimal-places="0" loext:min-decimal-places="0" number:min-integer-digits="1" number:grouping="true" number:display-factor="1000"/>
    </number:number-style>
    <number:number-style style:name="N551">
      <number:text>fl </number:text>
      <number:number number:decimal-places="0" loext:min-decimal-places="0" number:min-integer-digits="1" number:grouping="true"/>
      <number:text>-</number:text>
      <style:map style:condition="value()&gt;=0" style:apply-style-name="N551P0"/>
    </number:number-style>
    <number:number-style style:name="N552P0" style:volatile="true">
      <number:number number:decimal-places="0" loext:min-decimal-places="0" number:min-integer-digits="1" number:grouping="true"/>
      <number:text>     </number:text>
    </number:number-style>
    <number:number-style style:name="N552P1" style:volatile="true">
      <number:text>-</number:text>
      <number:number number:decimal-places="0" loext:min-decimal-places="0" number:min-integer-digits="1" number:grouping="true"/>
      <number:text>     </number:text>
    </number:number-style>
    <number:number-style style:name="N552P2" style:volatile="true">
      <number:text> -     </number:text>
    </number:number-style>
    <number:text-style style:name="N552">
      <number:text-content/>
      <number:text> </number:text>
      <style:map style:condition="value()&gt;0" style:apply-style-name="N552P0"/>
      <style:map style:condition="value()&lt;0" style:apply-style-name="N552P1"/>
      <style:map style:condition="value()=0" style:apply-style-name="N552P2"/>
    </number:text-style>
    <number:number-style style:name="N553P0" style:volatile="true">
      <number:number number:decimal-places="0" loext:min-decimal-places="0" number:min-integer-digits="1" number:grouping="true"/>
    </number:number-style>
    <number:number-style style:name="N553">
      <style:text-properties fo:color="#ff0000"/>
      <number:number number:decimal-places="0" loext:min-decimal-places="0" number:min-integer-digits="1" number:grouping="true"/>
      <style:map style:condition="value()&gt;=0" style:apply-style-name="N553P0"/>
    </number:number-style>
    <number:number-style style:name="N554P0" style:volatile="true">
      <number:number number:decimal-places="3" loext:min-decimal-places="0" number:min-integer-digits="1" number:decimal-replacement="" number:grouping="true"/>
      <number:text>    </number:text>
    </number:number-style>
    <number:number-style style:name="N554">
      <number:text> -    </number:text>
      <style:map style:condition="value()&gt;=0" style:apply-style-name="N554P0"/>
    </number:number-style>
    <number:number-style style:name="N555P0" style:volatile="true">
      <number:number number:decimal-places="2" loext:min-decimal-places="2" number:min-integer-digits="1" number:grouping="true"/>
      <number:text>    </number:text>
    </number:number-style>
    <number:number-style style:name="N55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555P2" style:volatile="true">
      <number:text> -    </number:text>
    </number:number-style>
    <number:text-style style:name="N555">
      <number:text-content/>
      <number:text> </number:text>
      <style:map style:condition="value()&gt;0" style:apply-style-name="N555P0"/>
      <style:map style:condition="value()&lt;0" style:apply-style-name="N555P1"/>
      <style:map style:condition="value()=0" style:apply-style-name="N555P2"/>
    </number:text-style>
    <number:currency-style style:name="N557P0" style:volatile="true">
      <number:currency-symbol number:language="en" number:country="IE">€</number:currency-symbol>
      <number:number number:decimal-places="0" loext:min-decimal-places="0" number:min-integer-digits="1" number:grouping="true"/>
    </number:currency-style>
    <number:currency-style style:name="N557">
      <number:text>-</number:text>
      <number:currency-symbol number:language="en" number:country="IE">€</number:currency-symbol>
      <number:number number:decimal-places="0" loext:min-decimal-places="0" number:min-integer-digits="1" number:grouping="true"/>
      <style:map style:condition="value()&gt;=0" style:apply-style-name="N557P0"/>
    </number:currency-style>
    <number:number-style style:name="N559P0" style:volatile="true">
      <number:number number:decimal-places="2" loext:min-decimal-places="2" number:min-integer-digits="1" number:grouping="true"/>
      <number:text> kr </number:text>
    </number:number-style>
    <number:number-style style:name="N559P1" style:volatile="true">
      <number:text>-</number:text>
      <number:number number:decimal-places="2" loext:min-decimal-places="2" number:min-integer-digits="1" number:grouping="true"/>
      <number:text> kr </number:text>
    </number:number-style>
    <number:number-style style:name="N559P2" style:volatile="true">
      <number:text>-</number:text>
      <number:number number:decimal-places="0" loext:min-decimal-places="0" number:min-integer-digits="0"/>
      <number:text> kr </number:text>
    </number:number-style>
    <number:text-style style:name="N559">
      <number:text-content/>
      <number:text> </number:text>
      <style:map style:condition="value()&gt;0" style:apply-style-name="N559P0"/>
      <style:map style:condition="value()&lt;0" style:apply-style-name="N559P1"/>
      <style:map style:condition="value()=0" style:apply-style-name="N559P2"/>
    </number:text-style>
    <number:date-style style:name="N560P0" style:volatile="true">
      <number:day number:style="long"/>
      <number:text>.</number:text>
      <number:month number:style="long"/>
      <number:text>.</number:text>
      <number:year/>
    </number:date-style>
    <number:text-style style:name="N560">
      <number:text-content/>
      <style:map style:condition="value()&lt;=1.79769313486232E+308" style:apply-style-name="N560P0"/>
    </number:text-style>
    <number:date-style style:name="N561">
      <number:text>B2</number:text>
      <number:day number:style="long"/>
      <number:text>.</number:text>
      <number:month number:textual="true"/>
    </number:date-style>
    <number:number-style style:name="N562">
      <number:number number:decimal-places="6" loext:min-decimal-places="6" number:min-integer-digits="1"/>
    </number:number-style>
    <number:number-style style:name="N563">
      <number:number number:decimal-places="7" loext:min-decimal-places="7" number:min-integer-digits="1"/>
    </number:number-style>
    <number:number-style style:name="N565P0" style:volatile="true">
      <number:number number:decimal-places="2" loext:min-decimal-places="2" number:min-integer-digits="1" number:grouping="true"/>
      <number:text> </number:text>
    </number:number-style>
    <number:number-style style:name="N565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565P2" style:volatile="true">
      <number:text>-</number:text>
      <number:number number:decimal-places="0" loext:min-decimal-places="0" number:min-integer-digits="0"/>
      <number:text>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6P0" style:volatile="true">
      <number:number number:decimal-places="1" loext:min-decimal-places="1" number:min-integer-digits="1" number:grouping="true"/>
      <number:text>    </number:text>
    </number:number-style>
    <number:number-style style:name="N566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566P2" style:volatile="true">
      <number:text>-</number:text>
      <number:number number:decimal-places="0" loext:min-decimal-places="0" number:min-integer-digits="0"/>
      <number:text>    </number:text>
    </number:number-style>
    <number:text-style style:name="N566">
      <number:text-content/>
      <number:text> </number:text>
      <style:map style:condition="value()&gt;0" style:apply-style-name="N566P0"/>
      <style:map style:condition="value()&lt;0" style:apply-style-name="N566P1"/>
      <style:map style:condition="value()=0" style:apply-style-name="N566P2"/>
    </number:text-style>
    <number:number-style style:name="N567">
      <number:number number:decimal-places="1" loext:min-decimal-places="1" number:min-integer-digits="1"/>
      <number:text> недели</number:text>
    </number:number-style>
    <number:number-style style:name="N568P0" style:volatile="true">
      <number:number number:decimal-places="0" loext:min-decimal-places="0" number:min-integer-digits="1" number:grouping="true"/>
      <number:text> </number:text>
    </number:number-style>
    <number:number-style style:name="N568">
      <number:text>-</number:text>
      <number:number number:decimal-places="0" loext:min-decimal-places="0" number:min-integer-digits="1" number:grouping="true"/>
      <number:text> </number:text>
      <style:map style:condition="value()&gt;=0" style:apply-style-name="N568P0"/>
    </number:number-style>
    <number:date-style style:name="N569">
      <number:day number:style="long"/>
      <number:text> </number:text>
      <number:month number:style="long" number:textual="true"/>
      <number:text> </number:text>
      <number:year number:style="long"/>
      <number:text> </number:text>
      <number:hours/>
      <number:text>:</number:text>
      <number:minutes number:style="long"/>
    </number:date-style>
    <number:number-style style:name="N570P0" style:volatile="true">
      <number:number number:decimal-places="2" loext:min-decimal-places="2" number:min-integer-digits="1" number:grouping="true"/>
      <number:text>     </number:text>
    </number:number-style>
    <number:number-style style:name="N570P1" style:volatile="true">
      <number:text>-</number:text>
      <number:number number:decimal-places="2" loext:min-decimal-places="2" number:min-integer-digits="1" number:grouping="true"/>
      <number:text>     </number:text>
    </number:number-style>
    <number:number-style style:name="N570P2" style:volatile="true">
      <number:text>-</number:text>
      <number:number number:decimal-places="0" loext:min-decimal-places="0" number:min-integer-digits="0"/>
      <number:text>     </number:text>
    </number:number-style>
    <number:text-style style:name="N570">
      <number:text-content/>
      <number:text> </number:text>
      <style:map style:condition="value()&gt;0" style:apply-style-name="N570P0"/>
      <style:map style:condition="value()&lt;0" style:apply-style-name="N570P1"/>
      <style:map style:condition="value()=0" style:apply-style-name="N570P2"/>
    </number:text-style>
    <number:currency-style style:name="N57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57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571P0"/>
    </number:currency-style>
    <number:date-style style:name="N572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currency-style style:name="N573">
      <number:currency-symbol>€</number:currency-symbol>
      <number:text> </number:text>
      <number:number number:decimal-places="1" loext:min-decimal-places="1" number:min-integer-digits="1" number:grouping="true"/>
    </number:currency-style>
    <number:number-style style:name="N574P0" style:volatile="true">
      <number:number number:decimal-places="2" loext:min-decimal-places="2" number:min-integer-digits="1" number:grouping="true" number:display-factor="1000"/>
    </number:number-style>
    <number:number-style style:name="N574">
      <number:text>(</number:text>
      <number:number number:decimal-places="2" loext:min-decimal-places="2" number:min-integer-digits="1" number:grouping="true"/>
      <number:text>)</number:text>
      <style:map style:condition="value()&gt;=0" style:apply-style-name="N574P0"/>
    </number:number-style>
    <number:currency-style style:name="N575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575"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575P0"/>
    </number:currency-style>
    <number:currency-style style:name="N576">
      <number:number number:decimal-places="0" loext:min-decimal-places="0" number:min-integer-digits="1" number:grouping="true"/>
      <number:text> </number:text>
      <number:currency-symbol>RUR</number:currency-symbol>
    </number:currency-style>
    <number:number-style style:name="N577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57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577P2" style:volatile="true">
      <number:text> - </number:text>
    </number:number-style>
    <number:text-style style:name="N577">
      <number:text-content/>
      <number:text> </number:text>
      <style:map style:condition="value()&gt;0" style:apply-style-name="N577P0"/>
      <style:map style:condition="value()&lt;0" style:apply-style-name="N577P1"/>
      <style:map style:condition="value()=0" style:apply-style-name="N577P2"/>
    </number:text-style>
    <number:number-style style:name="N578">
      <number:number number:decimal-places="2" loext:min-decimal-places="2" number:min-integer-digits="0"/>
    </number:number-style>
    <number:number-style style:name="N582P0" style:volatile="true">
      <number:text> £</number:text>
      <number:number number:decimal-places="0" loext:min-decimal-places="0" number:min-integer-digits="1" number:grouping="true" number:display-factor="1000"/>
    </number:number-style>
    <number:number-style style:name="N582P1" style:volatile="true">
      <number:text>-£</number:text>
      <number:number number:decimal-places="0" loext:min-decimal-places="0" number:min-integer-digits="1" number:grouping="true" number:display-factor="1000"/>
    </number:number-style>
    <number:number-style style:name="N582P2" style:volatile="true">
      <number:text> £- </number:text>
    </number:number-style>
    <number:text-style style:name="N582">
      <number:text-content/>
      <number:text> </number:text>
      <style:map style:condition="value()&gt;0" style:apply-style-name="N582P0"/>
      <style:map style:condition="value()&lt;0" style:apply-style-name="N582P1"/>
      <style:map style:condition="value()=0" style:apply-style-name="N582P2"/>
    </number:text-style>
    <number:time-style style:name="N583">
      <number:hours/>
      <number:text>.</number:text>
      <number:minutes number:style="long"/>
      <number:text> </number:text>
      <number:am-pm/>
    </number:time-style>
    <number:number-style style:name="N584P0" style:volatile="true">
      <number:number number:decimal-places="3" loext:min-decimal-places="0" number:min-integer-digits="1" number:decimal-replacement="" number:grouping="true"/>
    </number:number-style>
    <number:number-style style:name="N584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584P2" style:volatile="true">
      <number:text> -    </number:text>
    </number:number-style>
    <number:text-style style:name="N584">
      <number:text-content/>
      <number:text> </number:text>
      <style:map style:condition="value()&gt;0" style:apply-style-name="N584P0"/>
      <style:map style:condition="value()&lt;0" style:apply-style-name="N584P1"/>
      <style:map style:condition="value()=0" style:apply-style-name="N584P2"/>
    </number:text-style>
    <number:currency-style style:name="N586P0" style:volatile="true">
      <number:number number:decimal-places="3" loext:min-decimal-places="3" number:min-integer-digits="1" number:grouping="true"/>
      <number:text> </number:text>
      <number:currency-symbol number:language="ru" number:country="RU">руб.</number:currency-symbol>
    </number:currency-style>
    <number:currency-style style:name="N586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ru" number:country="RU">руб.</number:currency-symbol>
      <style:map style:condition="value()&gt;=0" style:apply-style-name="N586P0"/>
    </number:currency-style>
    <number:currency-style style:name="N587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587P1" style:volatile="true">
      <number:text>-# ""</number:text>
    </number:number-style>
    <number:number-style style:name="N587">
      <number:text>"@ </number:text>
      <style:map style:condition="value()&gt;0" style:apply-style-name="N587P0"/>
      <style:map style:condition="value()&lt;0" style:apply-style-name="N587P1"/>
    </number:number-style>
    <number:currency-style style:name="N588">
      <number:currency-symbol number:language="en" number:country="AU">$</number:currency-symbol>
      <number:number number:decimal-places="2" loext:min-decimal-places="2" number:min-integer-digits="1" number:grouping="true"/>
    </number:currency-style>
    <number:number-style style:name="N589">
      <number:number number:decimal-places="0" loext:min-decimal-places="0" number:min-integer-digits="0">
        <number:embedded-text number:position="3">.</number:embedded-text>
      </number:number>
    </number:number-style>
    <number:number-style style:name="N591P0" style:volatile="true">
      <number:number number:decimal-places="0" loext:min-decimal-places="0" number:min-integer-digits="1" number:grouping="true"/>
      <number:text> </number:text>
    </number:number-style>
    <number:number-style style:name="N591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591P2" style:volatile="true">
      <number:text>-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currency-style style:name="N593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593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593P0"/>
    </number:currency-style>
    <number:currency-style style:name="N594P0" style:volatile="true">
      <number:currency-symbol>€</number:currency-symbol>
      <number:text> </number:text>
      <number:number number:decimal-places="2" loext:min-decimal-places="2" number:min-integer-digits="1" number:grouping="true" number:display-factor="1000"/>
    </number:currency-style>
    <number:currency-style style:name="N594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594P0"/>
    </number:currency-style>
    <number:number-style style:name="N595">
      <number:number number:decimal-places="1" loext:min-decimal-places="0" number:min-integer-digits="1" number:decimal-replacement="" number:grouping="true"/>
    </number:number-style>
    <number:number-style style:name="N596P0" style:volatile="true">
      <number:number number:decimal-places="2" loext:min-decimal-places="2" number:min-integer-digits="1" number:grouping="true"/>
      <number:text> €</number:text>
    </number:number-style>
    <number:number-style style:name="N59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596P0"/>
    </number:number-style>
    <number:currency-style style:name="N59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59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597P0"/>
    </number:currency-style>
    <number:date-style style:name="N598">
      <number:day/>
      <number:text>-</number:text>
      <number:month number:textual="true"/>
    </number:date-style>
    <number:number-style style:name="N599">
      <number:number number:decimal-places="3" loext:min-decimal-places="0" number:min-integer-digits="1" number:decimal-replacement="" number:grouping="true" number:display-factor="1000000"/>
    </number:number-style>
    <number:currency-style style:name="N600">
      <number:currency-symbol>€</number:currency-symbol>
      <number:text> </number:text>
      <number:number number:decimal-places="4" loext:min-decimal-places="4" number:min-integer-digits="1" number:grouping="true"/>
    </number:currency-style>
    <number:number-style style:name="N602P0" style:volatile="true">
      <number:number number:decimal-places="0" loext:min-decimal-places="0" number:min-integer-digits="1"/>
      <number:text>    </number:text>
    </number:number-style>
    <number:number-style style:name="N602">
      <number:text> -    </number:text>
      <style:map style:condition="value()&gt;=0" style:apply-style-name="N602P0"/>
    </number:number-style>
    <number:number-style style:name="N603P0" style:volatile="true">
      <number:number number:decimal-places="3" loext:min-decimal-places="0" number:min-integer-digits="1" number:decimal-replacement="" number:grouping="true"/>
      <number:text>    </number:text>
    </number:number-style>
    <number:number-style style:name="N603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603P2" style:volatile="true">
      <number:text> -    </number:text>
    </number:number-style>
    <number:text-style style:name="N603">
      <number:text-content/>
      <number:text> </number:text>
      <style:map style:condition="value()&gt;0" style:apply-style-name="N603P0"/>
      <style:map style:condition="value()&lt;0" style:apply-style-name="N603P1"/>
      <style:map style:condition="value()=0" style:apply-style-name="N603P2"/>
    </number:text-style>
    <number:number-style style:name="N60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60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604P2" style:volatile="true">
      <number:text>-</number:text>
      <number:number number:decimal-places="0" loext:min-decimal-places="0" number:min-integer-digits="0"/>
      <number:text> </number:text>
    </number:number-style>
    <number:text-style style:name="N604">
      <number:text-content/>
      <number:text> </number:text>
      <style:map style:condition="value()&gt;0" style:apply-style-name="N604P0"/>
      <style:map style:condition="value()&lt;0" style:apply-style-name="N604P1"/>
      <style:map style:condition="value()=0" style:apply-style-name="N604P2"/>
    </number:text-style>
    <number:date-style style:name="N605">
      <number:day/>
      <number:text>-</number:text>
      <number:month number:textual="true"/>
      <number:text>-</number:text>
      <number:year number:style="long"/>
    </number:date-style>
    <number:number-style style:name="N606">
      <number:number number:decimal-places="1" loext:min-decimal-places="1" number:min-integer-digits="1" number:grouping="true"/>
    </number:number-style>
    <number:currency-style style:name="N607P0" style:volatile="true">
      <number:number number:decimal-places="1" loext:min-decimal-places="1" number:min-integer-digits="1" number:grouping="true"/>
      <number:text> </number:text>
      <number:currency-symbol number:language="ar" number:country="EG">€</number:currency-symbol>
    </number:currency-style>
    <number:currency-style style:name="N607">
      <number:text>-</number:text>
      <number:number number:decimal-places="1" loext:min-decimal-places="1" number:min-integer-digits="1" number:grouping="true"/>
      <number:text> </number:text>
      <number:currency-symbol number:language="ar" number:country="EG">€</number:currency-symbol>
      <style:map style:condition="value()&gt;=0" style:apply-style-name="N607P0"/>
    </number:currency-style>
    <number:number-style style:name="N608">
      <number:number number:decimal-places="0" loext:min-decimal-places="0" number:min-integer-digits="1" number:display-factor="1000"/>
    </number:number-style>
    <number:number-style style:name="N609P0" style:volatile="true">
      <number:text>-</number:text>
    </number:number-style>
    <number:text-style style:name="N609">
      <number:text-content/>
      <style:map style:condition="value()&lt;=1.79769313486232E+308" style:apply-style-name="N609P0"/>
    </number:text-style>
    <number:number-style style:name="N610">
      <number:number number:decimal-places="2" loext:min-decimal-places="0" number:min-integer-digits="1" number:decimal-replacement="" number:grouping="true" number:display-factor="1000"/>
    </number:number-style>
    <number:number-style style:name="N612P0" style:volatile="true">
      <number:number number:decimal-places="5" loext:min-decimal-places="5" number:min-integer-digits="1" number:grouping="true"/>
      <number:text>    </number:text>
    </number:number-style>
    <number:number-style style:name="N612P1" style:volatile="true">
      <number:text>-</number:text>
      <number:number number:decimal-places="5" loext:min-decimal-places="5" number:min-integer-digits="1" number:grouping="true"/>
      <number:text>    </number:text>
    </number:number-style>
    <number:number-style style:name="N612P2" style:volatile="true">
      <number:text>-</number:text>
      <number:number number:decimal-places="0" loext:min-decimal-places="0" number:min-integer-digits="0"/>
      <number:text>    </number:text>
    </number:number-style>
    <number:text-style style:name="N612">
      <number:text-content/>
      <number:text> </number:text>
      <style:map style:condition="value()&gt;0" style:apply-style-name="N612P0"/>
      <style:map style:condition="value()&lt;0" style:apply-style-name="N612P1"/>
      <style:map style:condition="value()=0" style:apply-style-name="N612P2"/>
    </number:text-style>
    <number:number-style style:name="N613P0" style:volatile="true">
      <number:number number:decimal-places="0" loext:min-decimal-places="0" number:min-integer-digits="1" number:grouping="true"/>
      <number:text> р.</number:text>
    </number:number-style>
    <number:number-style style:name="N613">
      <number:text>-</number:text>
      <number:number number:decimal-places="0" loext:min-decimal-places="0" number:min-integer-digits="1" number:grouping="true"/>
      <number:text> р.</number:text>
      <style:map style:condition="value()&gt;=0" style:apply-style-name="N613P0"/>
    </number:number-style>
    <number:number-style style:name="N614">
      <number:number number:decimal-places="0" loext:min-decimal-places="0" number:min-integer-digits="6"/>
    </number:number-style>
    <number:date-style style:name="N615">
      <number:month number:textual="true"/>
      <number:text>-</number:text>
      <number:year number:style="long"/>
    </number:date-style>
    <number:number-style style:name="N616">
      <number:number number:decimal-places="4" loext:min-decimal-places="4" number:min-integer-digits="1"/>
      <number:text> </number:text>
    </number:number-style>
    <number:number-style style:name="N617P0" style:volatile="true">
      <number:number number:decimal-places="4" loext:min-decimal-places="4" number:min-integer-digits="1"/>
      <number:text> </number:text>
    </number:number-style>
    <number:number-style style:name="N617">
      <number:text>-</number:text>
      <number:number number:decimal-places="4" loext:min-decimal-places="4" number:min-integer-digits="1"/>
      <number:text> </number:text>
      <style:map style:condition="value()&gt;=0" style:apply-style-name="N617P0"/>
    </number:number-style>
    <number:number-style style:name="N621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621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621P2" style:volatile="true">
      <number:text> - € </number:text>
    </number:number-style>
    <number:text-style style:name="N621">
      <number:text-content/>
      <number:text> </number:text>
      <style:map style:condition="value()&gt;0" style:apply-style-name="N621P0"/>
      <style:map style:condition="value()&lt;0" style:apply-style-name="N621P1"/>
      <style:map style:condition="value()=0" style:apply-style-name="N621P2"/>
    </number:text-style>
    <number:currency-style style:name="N623P0" style:volatile="true">
      <number:currency-symbol number:language="ru" number:country="RU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623">
      <style:text-properties fo:color="#ff0000"/>
      <number:text>(</number:text>
      <number:currency-symbol number:language="ru" number:country="RU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623P0"/>
    </number:currency-style>
    <number:number-style style:name="N624P0" style:volatile="true">
      <number:text>$</number:text>
      <number:number number:decimal-places="2" loext:min-decimal-places="2" number:min-integer-digits="1" number:grouping="true"/>
    </number:number-style>
    <number:number-style style:name="N624">
      <number:text>$</number:text>
      <number:number number:decimal-places="2" loext:min-decimal-places="2" number:min-integer-digits="1" number:grouping="true"/>
      <style:map style:condition="value()&gt;=0" style:apply-style-name="N624P0"/>
    </number:number-style>
    <number:number-style style:name="N626P0" style:volatile="true">
      <number:number number:decimal-places="0" loext:min-decimal-places="0" number:min-integer-digits="1" number:grouping="true"/>
      <number:text> € </number:text>
    </number:number-style>
    <number:number-style style:name="N62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626P2" style:volatile="true">
      <number:text> - € </number:text>
    </number:number-style>
    <number:text-style style:name="N626">
      <number:text-content/>
      <number:text> </number:text>
      <style:map style:condition="value()&gt;0" style:apply-style-name="N626P0"/>
      <style:map style:condition="value()&lt;0" style:apply-style-name="N626P1"/>
      <style:map style:condition="value()=0" style:apply-style-name="N626P2"/>
    </number:text-style>
    <number:currency-style style:name="N628P0" style:volatile="true">
      <number:currency-symbol number:language="ru" number:country="RU"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628">
      <style:text-properties fo:color="#ff0000"/>
      <number:text>(</number:text>
      <number:currency-symbol number:language="ru" number:country="RU"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628P0"/>
    </number:currency-style>
    <number:currency-style style:name="N629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629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629P2" style:volatile="true">
      <number:text>-</number:text>
      <number:number number:decimal-places="0" loext:min-decimal-places="0" number:min-integer-digits="0"/>
      <number:text>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0P0" style:volatile="true">
      <number:number number:decimal-places="0" loext:min-decimal-places="0" number:min-integer-digits="1"/>
    </number:number-style>
    <number:number-style style:name="N630">
      <style:text-properties fo:color="#ff0000"/>
      <number:text>-</number:text>
      <number:number number:decimal-places="0" loext:min-decimal-places="0" number:min-integer-digits="1"/>
      <style:map style:condition="value()&gt;=0" style:apply-style-name="N630P0"/>
    </number:number-style>
    <number:number-style style:name="N632P0" style:volatile="true">
      <number:number number:decimal-places="3" loext:min-decimal-places="3" number:min-integer-digits="1"/>
      <number:text> шт</number:text>
    </number:number-style>
    <number:number-style style:name="N632">
      <style:text-properties fo:color="#ff0000"/>
      <number:text>-</number:text>
      <number:number number:decimal-places="3" loext:min-decimal-places="3" number:min-integer-digits="1"/>
      <number:text> шт</number:text>
      <style:map style:condition="value()&gt;=0" style:apply-style-name="N632P0"/>
    </number:number-style>
    <number:number-style style:name="N633">
      <number:number number:decimal-places="10" loext:min-decimal-places="10" number:min-integer-digits="1"/>
    </number:number-style>
    <number:number-style style:name="N634">
      <number:number number:decimal-places="4" loext:min-decimal-places="4" number:min-integer-digits="1" number:grouping="true"/>
    </number:number-style>
    <number:number-style style:name="N636P0" style:volatile="true">
      <number:text> </number:text>
      <number:number number:decimal-places="3" loext:min-decimal-places="3" number:min-integer-digits="1" number:grouping="true"/>
      <number:text>    </number:text>
    </number:number-style>
    <number:number-style style:name="N636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636P2" style:volatile="true">
      <number:text>-</number:text>
      <number:number number:decimal-places="0" loext:min-decimal-places="0" number:min-integer-digits="0"/>
      <number:text>    </number:text>
    </number:number-style>
    <number:text-style style:name="N636">
      <number:text-content/>
      <number:text> </number:text>
      <style:map style:condition="value()&gt;0" style:apply-style-name="N636P0"/>
      <style:map style:condition="value()&lt;0" style:apply-style-name="N636P1"/>
      <style:map style:condition="value()=0" style:apply-style-name="N636P2"/>
    </number:text-style>
    <number:number-style style:name="N637">
      <number:number number:decimal-places="2" loext:min-decimal-places="0" number:min-integer-digits="1" number:decimal-replacement="" number:grouping="true"/>
    </number:number-style>
    <number:number-style style:name="N638P0" style:volatile="true">
      <number:number number:decimal-places="2" loext:min-decimal-places="2" number:min-integer-digits="1" number:grouping="true"/>
      <number:text> р. </number:text>
    </number:number-style>
    <number:number-style style:name="N638P1" style:volatile="true">
      <number:number number:decimal-places="2" loext:min-decimal-places="2" number:min-integer-digits="1" number:grouping="true"/>
      <number:text> р. </number:text>
    </number:number-style>
    <number:number-style style:name="N638P2" style:volatile="true">
      <number:text>-</number:text>
      <number:number number:decimal-places="0" loext:min-decimal-places="0" number:min-integer-digits="0"/>
      <number:text> р. </number:text>
    </number:number-style>
    <number:text-style style:name="N638">
      <number:text-content/>
      <number:text> </number:text>
      <style:map style:condition="value()&gt;0" style:apply-style-name="N638P0"/>
      <style:map style:condition="value()&lt;0" style:apply-style-name="N638P1"/>
      <style:map style:condition="value()=0" style:apply-style-name="N638P2"/>
    </number:text-style>
    <number:currency-style style:name="N639">
      <number:currency-symbol>€</number:currency-symbol>
      <number:text> </number:text>
      <number:number number:decimal-places="2" loext:min-decimal-places="2" number:min-integer-digits="1" number:grouping="true"/>
    </number:currency-style>
    <number:currency-style style:name="N640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number-style style:name="N642P0" style:volatile="true">
      <number:number number:decimal-places="0" loext:min-decimal-places="0" number:min-integer-digits="1" number:grouping="true"/>
      <number:text> р. </number:text>
    </number:number-style>
    <number:number-style style:name="N642P1" style:volatile="true">
      <number:number number:decimal-places="0" loext:min-decimal-places="0" number:min-integer-digits="1" number:grouping="true"/>
      <number:text> р. </number:text>
    </number:number-style>
    <number:number-style style:name="N642P2" style:volatile="true">
      <number:text>- р. </number:text>
    </number:number-style>
    <number:text-style style:name="N642">
      <number:text-content/>
      <number:text> </number:text>
      <style:map style:condition="value()&gt;0" style:apply-style-name="N642P0"/>
      <style:map style:condition="value()&lt;0" style:apply-style-name="N642P1"/>
      <style:map style:condition="value()=0" style:apply-style-name="N642P2"/>
    </number:text-style>
    <number:number-style style:name="N644P0" style:volatile="true">
      <number:number number:decimal-places="0" loext:min-decimal-places="0" number:min-integer-digits="1" number:grouping="true"/>
      <number:text>р. </number:text>
    </number:number-style>
    <number:number-style style:name="N644P1" style:volatile="true">
      <number:number number:decimal-places="0" loext:min-decimal-places="0" number:min-integer-digits="1" number:grouping="true"/>
      <number:text>р. </number:text>
    </number:number-style>
    <number:number-style style:name="N644P2" style:volatile="true">
      <number:text>-р. </number:text>
    </number:number-style>
    <number:text-style style:name="N644">
      <number:text-content/>
      <number:text> </number:text>
      <style:map style:condition="value()&gt;0" style:apply-style-name="N644P0"/>
      <style:map style:condition="value()&lt;0" style:apply-style-name="N644P1"/>
      <style:map style:condition="value()=0" style:apply-style-name="N644P2"/>
    </number:text-style>
    <number:number-style style:name="N645">
      <number:number number:decimal-places="8" loext:min-decimal-places="8" number:min-integer-digits="1"/>
    </number:number-style>
    <number:number-style style:name="N649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649P1" style:volatile="true">
      <number:text>-€</number:text>
      <number:number number:decimal-places="2" loext:min-decimal-places="2" number:min-integer-digits="1" number:grouping="true"/>
      <number:text> </number:text>
    </number:number-style>
    <number:number-style style:name="N649P2" style:volatile="true">
      <number:text> €-</number:text>
      <number:number number:decimal-places="0" loext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0">
      <number:number number:decimal-places="6" loext:min-decimal-places="6" number:min-integer-digits="1" number:grouping="true"/>
    </number:number-style>
    <number:currency-style style:name="N652P0" style:volatile="true">
      <number:number number:decimal-places="0" loext:min-decimal-places="0" number:min-integer-digits="1" number:grouping="true"/>
      <number:text> </number:text>
      <number:currency-symbol>руб</number:currency-symbol>
    </number:currency-style>
    <number:number-style style:name="N65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652">
      <number:text>-</number:text>
      <number:number number:decimal-places="0" loext:min-decimal-places="0" number:min-integer-digits="0"/>
      <number:text> </number:text>
      <style:map style:condition="value()&gt;0" style:apply-style-name="N652P0"/>
      <style:map style:condition="value()&lt;0" style:apply-style-name="N652P1"/>
    </number:number-style>
    <number:text-style style:name="N653P0" style:volatile="true">
      <number:text-content/>
    </number:text-style>
    <number:number-style style:name="N653">
      <number:text>-</number:text>
      <style:map style:condition="value()&gt;=0" style:apply-style-name="N653P0"/>
    </number:number-style>
    <number:number-style style:name="N655P0" style:volatile="true">
      <number:number number:decimal-places="3" loext:min-decimal-places="3" number:min-integer-digits="1" number:grouping="true" number:display-factor="1000"/>
    </number:number-style>
    <number:number-style style:name="N655">
      <number:text>-</number:text>
      <number:number number:decimal-places="3" loext:min-decimal-places="3" number:min-integer-digits="1" number:grouping="true" number:display-factor="1000"/>
      <style:map style:condition="value()&gt;=0" style:apply-style-name="N655P0"/>
    </number:number-style>
    <number:number-style style:name="N656P0" style:volatile="true">
      <number:number number:decimal-places="0" loext:min-decimal-places="0" number:min-integer-digits="1"/>
      <number:text>    </number:text>
    </number:number-style>
    <number:number-style style:name="N656P1" style:volatile="true">
      <number:text>-</number:text>
      <number:number number:decimal-places="0" loext:min-decimal-places="0" number:min-integer-digits="1"/>
      <number:text>    </number:text>
    </number:number-style>
    <number:number-style style:name="N656P2" style:volatile="true">
      <number:text> -    </number:text>
    </number:number-style>
    <number:text-style style:name="N656">
      <number:text-content/>
      <number:text> </number:text>
      <style:map style:condition="value()&gt;0" style:apply-style-name="N656P0"/>
      <style:map style:condition="value()&lt;0" style:apply-style-name="N656P1"/>
      <style:map style:condition="value()=0" style:apply-style-name="N656P2"/>
    </number:text-style>
    <number:currency-style style:name="N657">
      <number:currency-symbol>€</number:currency-symbol>
      <number:text> </number:text>
      <number:number number:decimal-places="3" loext:min-decimal-places="3" number:min-integer-digits="1" number:grouping="true"/>
    </number:currency-style>
    <number:time-style style:name="N658">
      <number:minutes number:style="long"/>
      <number:text>:</number:text>
      <number:seconds number:style="long"/>
      <number:text>,</number:text>
    </number:time-style>
    <number:number-style style:name="N659">
      <number:number number:decimal-places="13" loext:min-decimal-places="13" number:min-integer-digits="1"/>
    </number:number-style>
    <number:number-style style:name="N660">
      <number:number number:decimal-places="14" loext:min-decimal-places="14" number:min-integer-digits="1"/>
    </number:number-style>
    <number:number-style style:name="N661">
      <number:number number:decimal-places="15" loext:min-decimal-places="15" number:min-integer-digits="1"/>
    </number:number-style>
    <number:number-style style:name="N662">
      <number:number number:decimal-places="16" loext:min-decimal-places="16" number:min-integer-digits="1"/>
    </number:number-style>
    <number:number-style style:name="N663">
      <number:number number:decimal-places="17" loext:min-decimal-places="17" number:min-integer-digits="1"/>
    </number:number-style>
    <number:number-style style:name="N664">
      <number:number number:decimal-places="18" loext:min-decimal-places="18" number:min-integer-digits="1"/>
    </number:number-style>
    <number:number-style style:name="N665">
      <number:number number:decimal-places="19" loext:min-decimal-places="19" number:min-integer-digits="1"/>
    </number:number-style>
    <number:number-style style:name="N666">
      <number:number number:decimal-places="20" loext:min-decimal-places="20" number:min-integer-digits="1"/>
    </number:number-style>
    <number:number-style style:name="N667P0" style:volatile="true">
      <number:number number:decimal-places="0" loext:min-decimal-places="0" number:min-integer-digits="1" number:grouping="true"/>
      <number:text>    </number:text>
    </number:number-style>
    <number:number-style style:name="N66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667P2" style:volatile="true">
      <number:number number:decimal-places="0" loext:min-decimal-places="0" number:min-integer-digits="0"/>
      <number:text>    </number:text>
    </number:number-style>
    <number:text-style style:name="N667" number:title="Особый">
      <number:text-content/>
      <number:text> </number:text>
      <style:map style:condition="value()&gt;0" style:apply-style-name="N667P0"/>
      <style:map style:condition="value()&lt;0" style:apply-style-name="N667P1"/>
      <style:map style:condition="value()=0" style:apply-style-name="N667P2"/>
    </number:text-style>
    <number:number-style style:name="N668P0" style:volatile="true">
      <number:number number:decimal-places="0" loext:min-decimal-places="0" number:min-integer-digits="1" number:grouping="true"/>
      <number:text>    </number:text>
    </number:number-style>
    <number:number-style style:name="N66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668P2" style:volatile="true">
      <number:number number:decimal-places="0" loext:min-decimal-places="0" number:min-integer-digits="0"/>
    </number:number-style>
    <number:text-style style:name="N668" number:title="Особый">
      <number:text-content/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P0" style:volatile="true">
      <number:number number:decimal-places="0" loext:min-decimal-places="0" number:min-integer-digits="0"/>
    </number:number-style>
    <number:text-style style:name="N669" number:title="Особый">
      <number:text-content/>
      <style:map style:condition="value()&lt;=1.79769313486232E+308" style:apply-style-name="N669P0"/>
    </number:text-style>
    <number:number-style style:name="N672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672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672P2" style:volatile="true">
      <loext:fill-character> </loext:fill-character>
      <number:text>-   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675P1" style:volatile="true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675P2" style:volatile="true">
      <loext:fill-character> </loext:fill-character>
      <number:text>-р.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8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678P1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678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678">
      <number:text-content/>
      <number:text> </number:text>
      <style:map style:condition="value()&gt;0" style:apply-style-name="N678P0"/>
      <style:map style:condition="value()&lt;0" style:apply-style-name="N678P1"/>
      <style:map style:condition="value()=0" style:apply-style-name="N678P2"/>
    </number:text-style>
    <number:number-style style:name="N681P0" style:volatile="true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681P1" style:volatile="true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681P2" style:volatile="true"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3P0" style:volatile="true">
      <number:number number:decimal-places="0" loext:min-decimal-places="0" number:min-integer-digits="1" number:grouping="true"/>
      <number:text> Lari</number:text>
    </number:number-style>
    <number:number-style style:name="N683">
      <number:text>-</number:text>
      <number:number number:decimal-places="0" loext:min-decimal-places="0" number:min-integer-digits="1" number:grouping="true"/>
      <number:text> Lari</number:text>
      <style:map style:condition="value()&gt;=0" style:apply-style-name="N683P0"/>
    </number:number-style>
    <number:number-style style:name="N684P0" style:volatile="true">
      <number:number number:decimal-places="0" loext:min-decimal-places="0" number:min-integer-digits="1" number:grouping="true"/>
      <number:text> Lari</number:text>
    </number:number-style>
    <number:number-style style:name="N684">
      <style:text-properties fo:color="#ff0000"/>
      <number:text>-</number:text>
      <number:number number:decimal-places="0" loext:min-decimal-places="0" number:min-integer-digits="1" number:grouping="true"/>
      <number:text> Lari</number:text>
      <style:map style:condition="value()&gt;=0" style:apply-style-name="N684P0"/>
    </number:number-style>
    <number:number-style style:name="N686P0" style:volatile="true">
      <number:number number:decimal-places="2" loext:min-decimal-places="2" number:min-integer-digits="1" number:grouping="true"/>
      <number:text> Lari</number:text>
    </number:number-style>
    <number:number-style style:name="N686">
      <number:text>-</number:text>
      <number:number number:decimal-places="2" loext:min-decimal-places="2" number:min-integer-digits="1" number:grouping="true"/>
      <number:text> Lari</number:text>
      <style:map style:condition="value()&gt;=0" style:apply-style-name="N686P0"/>
    </number:number-style>
    <number:number-style style:name="N687P0" style:volatile="true">
      <number:number number:decimal-places="2" loext:min-decimal-places="2" number:min-integer-digits="1" number:grouping="true"/>
      <number:text> Lari</number:text>
    </number:number-style>
    <number:number-style style:name="N687">
      <style:text-properties fo:color="#ff0000"/>
      <number:text>-</number:text>
      <number:number number:decimal-places="2" loext:min-decimal-places="2" number:min-integer-digits="1" number:grouping="true"/>
      <number:text> Lari</number:text>
      <style:map style:condition="value()&gt;=0" style:apply-style-name="N687P0"/>
    </number:number-style>
    <number:number-style style:name="N691P0" style:volatile="true">
      <number:text> </number:text>
      <number:number number:decimal-places="0" loext:min-decimal-places="0" number:min-integer-digits="1" number:grouping="true"/>
      <number:text> Lari </number:text>
    </number:number-style>
    <number:number-style style:name="N691P1" style:volatile="true">
      <number:text>-</number:text>
      <number:number number:decimal-places="0" loext:min-decimal-places="0" number:min-integer-digits="1" number:grouping="true"/>
      <number:text> Lari </number:text>
    </number:number-style>
    <number:number-style style:name="N691P2" style:volatile="true">
      <number:text> - Lari </number:text>
    </number:number-style>
    <number:text-style style:name="N691">
      <number:text-content/>
      <number:text> </number:text>
      <style:map style:condition="value()&gt;0" style:apply-style-name="N691P0"/>
      <style:map style:condition="value()&lt;0" style:apply-style-name="N691P1"/>
      <style:map style:condition="value()=0" style:apply-style-name="N691P2"/>
    </number:text-style>
    <number:number-style style:name="N695P0" style:volatile="true">
      <number:text> </number:text>
      <number:number number:decimal-places="0" loext:min-decimal-places="0" number:min-integer-digits="1" number:grouping="true"/>
      <number:text>        </number:text>
    </number:number-style>
    <number:number-style style:name="N695P1" style:volatile="true">
      <number:text>-</number:text>
      <number:number number:decimal-places="0" loext:min-decimal-places="0" number:min-integer-digits="1" number:grouping="true"/>
      <number:text>        </number:text>
    </number:number-style>
    <number:number-style style:name="N695P2" style:volatile="true">
      <number:text> -       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9P0" style:volatile="true">
      <number:text> </number:text>
      <number:number number:decimal-places="2" loext:min-decimal-places="2" number:min-integer-digits="1" number:grouping="true"/>
      <number:text> Lari </number:text>
    </number:number-style>
    <number:number-style style:name="N699P1" style:volatile="true">
      <number:text>-</number:text>
      <number:number number:decimal-places="2" loext:min-decimal-places="2" number:min-integer-digits="1" number:grouping="true"/>
      <number:text> Lari </number:text>
    </number:number-style>
    <number:number-style style:name="N699P2" style:volatile="true">
      <number:text>-</number:text>
      <number:number number:decimal-places="0" loext:min-decimal-places="0" number:min-integer-digits="0"/>
      <number:text> Lari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3P0" style:volatile="true">
      <number:text> </number:text>
      <number:number number:decimal-places="2" loext:min-decimal-places="2" number:min-integer-digits="1" number:grouping="true"/>
      <number:text>        </number:text>
    </number:number-style>
    <number:number-style style:name="N703P1" style:volatile="true">
      <number:text>-</number:text>
      <number:number number:decimal-places="2" loext:min-decimal-places="2" number:min-integer-digits="1" number:grouping="true"/>
      <number:text>        </number:text>
    </number:number-style>
    <number:number-style style:name="N703P2" style:volatile="true">
      <number:text>-</number:text>
      <number:number number:decimal-places="0" loext:min-decimal-places="0" number:min-integer-digits="0"/>
      <number:text>        </number:text>
    </number:number-style>
    <number:text-style style:name="N703">
      <number:text-content/>
      <number:text> </number:text>
      <style:map style:condition="value()&gt;0" style:apply-style-name="N703P0"/>
      <style:map style:condition="value()&lt;0" style:apply-style-name="N703P1"/>
      <style:map style:condition="value()=0" style:apply-style-name="N703P2"/>
    </number:text-style>
    <number:number-style style:name="N70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0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07P2" style:volatile="true">
      <loext:text> </loext:text>
      <loext:fill-character> </loext:fill-character>
      <number:text>-    </number:text>
    </number:number-style>
    <number:text-style style:name="N707">
      <number:text> </number:text>
      <number:text-content/>
      <number:text> </number:text>
      <style:map style:condition="value()&gt;0" style:apply-style-name="N707P0"/>
      <style:map style:condition="value()&lt;0" style:apply-style-name="N707P1"/>
      <style:map style:condition="value()=0" style:apply-style-name="N707P2"/>
    </number:text-style>
    <number:number-style style:name="N711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711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711P2" style:volatile="true">
      <loext:text> </loext:text>
      <loext:fill-character> </loext:fill-character>
      <number:text>-р. </number:text>
    </number:number-style>
    <number:text-style style:name="N711">
      <number:text> </number:text>
      <number:text-content/>
      <number:text> </number:text>
      <style:map style:condition="value()&gt;0" style:apply-style-name="N711P0"/>
      <style:map style:condition="value()&lt;0" style:apply-style-name="N711P1"/>
      <style:map style:condition="value()=0" style:apply-style-name="N711P2"/>
    </number:text-style>
    <number:number-style style:name="N71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71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71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15">
      <number:text> </number:text>
      <number:text-content/>
      <number:text> </number:text>
      <style:map style:condition="value()&gt;0" style:apply-style-name="N715P0"/>
      <style:map style:condition="value()&lt;0" style:apply-style-name="N715P1"/>
      <style:map style:condition="value()=0" style:apply-style-name="N715P2"/>
    </number:text-style>
    <number:number-style style:name="N719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719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719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719">
      <number:text> </number:text>
      <number:text-content/>
      <number:text> </number:text>
      <style:map style:condition="value()&gt;0" style:apply-style-name="N719P0"/>
      <style:map style:condition="value()&lt;0" style:apply-style-name="N719P1"/>
      <style:map style:condition="value()=0" style:apply-style-name="N719P2"/>
    </number:text-style>
    <number:number-style style:name="N720P0" style:volatile="true">
      <number:text>-</number:text>
      <number:number number:decimal-places="0" loext:min-decimal-places="0" number:min-integer-digits="0"/>
      <number:text>    </number:text>
    </number:number-style>
    <number:text-style style:name="N720" number:title="Особый">
      <number:text-content/>
      <number:text> </number:text>
      <style:map style:condition="value()&lt;=1.79769313486232E+308" style:apply-style-name="N720P0"/>
    </number:text-style>
    <number:text-style style:name="N721" number:title="Особый">
      <number:text-content/>
      <number:text> </number:text>
    </number:text-style>
    <number:number-style style:name="N722" number:title="Особый">
      <number:number number:decimal-places="0" loext:min-decimal-places="0" number:min-integer-digits="0"/>
      <number:text> </number:text>
    </number:number-style>
    <number:date-style style:name="N723">
      <number:day number:style="long"/>
      <number:text>.</number:text>
      <number:month number:textual="true"/>
      <number:text>.</number:text>
      <number:year/>
    </number:date-style>
    <number:date-style style:name="N724">
      <number:month number:textual="true"/>
      <number:text>.</number:text>
      <number:year/>
    </number:date-style>
    <number:time-style style:name="N725">
      <number:hours/>
      <number:text>:</number:text>
      <number:minutes number:style="long"/>
      <number:text> </number:text>
      <number:am-pm/>
    </number:time-style>
    <number:time-style style:name="N72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727">
      <number:hours/>
      <number:text>:</number:text>
      <number:minutes number:style="long"/>
    </number:time-style>
    <number:time-style style:name="N728">
      <number:hours/>
      <number:text>:</number:text>
      <number:minutes number:style="long"/>
      <number:text>:</number:text>
      <number:seconds number:style="long"/>
    </number:time-style>
    <number:date-style style:name="N72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730P0" style:volatile="true">
      <number:number number:decimal-places="0" loext:min-decimal-places="0" number:min-integer-digits="1" number:grouping="true"/>
      <number:text>   </number:text>
    </number:number-style>
    <number:number-style style:name="N73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730P0"/>
    </number:number-style>
    <number:number-style style:name="N731P0" style:volatile="true">
      <number:number number:decimal-places="0" loext:min-decimal-places="0" number:min-integer-digits="1" number:grouping="true"/>
      <number:text>   </number:text>
    </number:number-style>
    <number:number-style style:name="N73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731P0"/>
    </number:number-style>
    <number:number-style style:name="N732P0" style:volatile="true">
      <number:number number:decimal-places="2" loext:min-decimal-places="2" number:min-integer-digits="1" number:grouping="true"/>
      <number:text>   </number:text>
    </number:number-style>
    <number:number-style style:name="N73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732P0"/>
    </number:number-style>
    <number:number-style style:name="N733P0" style:volatile="true">
      <number:number number:decimal-places="2" loext:min-decimal-places="2" number:min-integer-digits="1" number:grouping="true"/>
      <number:text>   </number:text>
    </number:number-style>
    <number:number-style style:name="N73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733P0"/>
    </number:number-style>
    <number:number-style style:name="N736P0" style:volatile="true"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736P1" style:volatile="true"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736P2" style:volatile="true">
      <loext:fill-character> </loext:fill-character>
      <number:text>-     </number:text>
    </number:number-style>
    <number:text-style style:name="N736">
      <number:text-content/>
      <number:text> </number:text>
      <style:map style:condition="value()&gt;0" style:apply-style-name="N736P0"/>
      <style:map style:condition="value()&lt;0" style:apply-style-name="N736P1"/>
      <style:map style:condition="value()=0" style:apply-style-name="N736P2"/>
    </number:text-style>
    <number:number-style style:name="N739P0" style:volatile="true"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739P1" style:volatile="true"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739P2" style:volatile="true">
      <loext:fill-character> </loext:fill-character>
      <number:text>- р. </number:text>
    </number:number-style>
    <number:text-style style:name="N739">
      <number:text-content/>
      <number:text> </number:text>
      <style:map style:condition="value()&gt;0" style:apply-style-name="N739P0"/>
      <style:map style:condition="value()&lt;0" style:apply-style-name="N739P1"/>
      <style:map style:condition="value()=0" style:apply-style-name="N739P2"/>
    </number:text-style>
    <number:number-style style:name="N742P0" style:volatile="true"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742P1" style:volatile="true"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742P2" style:volatile="true"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742"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number-style style:name="N745P0" style:volatile="true"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745P1" style:volatile="true"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745P2" style:volatile="true">
      <loext:fill-character> </loext:fill-character>
      <number:text>-</number:text>
      <number:number number:decimal-places="0" loext:min-decimal-places="0" number:min-integer-digits="0"/>
      <number:text> р. </number:text>
    </number:number-style>
    <number:text-style style:name="N745">
      <number:text-content/>
      <number:text> </number:text>
      <style:map style:condition="value()&gt;0" style:apply-style-name="N745P0"/>
      <style:map style:condition="value()&lt;0" style:apply-style-name="N745P1"/>
      <style:map style:condition="value()=0" style:apply-style-name="N745P2"/>
    </number:text-style>
    <number:number-style style:name="N7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74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749P2" style:volatile="true">
      <loext:fill-character> </loext:fill-character>
      <number:text>- </number:text>
    </number:number-style>
    <number:text-style style:name="N749">
      <number:text-content/>
      <number:text> </number:text>
      <style:map style:condition="value()&gt;0" style:apply-style-name="N749P0"/>
      <style:map style:condition="value()&lt;0" style:apply-style-name="N749P1"/>
      <style:map style:condition="value()=0" style:apply-style-name="N749P2"/>
    </number:text-style>
    <number:number-style style:name="N75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75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75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753">
      <number:text-content/>
      <number:text> </number:text>
      <style:map style:condition="value()&gt;0" style:apply-style-name="N753P0"/>
      <style:map style:condition="value()&lt;0" style:apply-style-name="N753P1"/>
      <style:map style:condition="value()=0" style:apply-style-name="N753P2"/>
    </number:text-style>
    <number:number-style style:name="N755P0" style:volatile="true"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755P1" style:volatile="true"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755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55">
      <number:text-content/>
      <number:text> </number:text>
      <style:map style:condition="value()&gt;0" style:apply-style-name="N755P0"/>
      <style:map style:condition="value()&lt;0" style:apply-style-name="N755P1"/>
      <style:map style:condition="value()=0" style:apply-style-name="N755P2"/>
    </number:text-style>
    <number:number-style style:name="N758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758P1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758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758">
      <number:text-content/>
      <number:text> </number:text>
      <style:map style:condition="value()&gt;0" style:apply-style-name="N758P0"/>
      <style:map style:condition="value()&lt;0" style:apply-style-name="N758P1"/>
      <style:map style:condition="value()=0" style:apply-style-name="N758P2"/>
    </number:text-style>
    <number:number-style style:name="N761P0" style:volatile="true"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761P1" style:volatile="true"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761P2" style:volatile="true">
      <loext:fill-character> </loext:fill-character>
      <number:text>- ₽ </number:text>
    </number:number-style>
    <number:text-style style:name="N761">
      <number:text-content/>
      <number:text> </number:text>
      <style:map style:condition="value()&gt;0" style:apply-style-name="N761P0"/>
      <style:map style:condition="value()&lt;0" style:apply-style-name="N761P1"/>
      <style:map style:condition="value()=0" style:apply-style-name="N761P2"/>
    </number:text-style>
    <number:number-style style:name="N764P0" style:volatile="true"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764P1" style:volatile="true"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764P2" style:volatile="true"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764">
      <number:text-content/>
      <number:text> </number:text>
      <style:map style:condition="value()&gt;0" style:apply-style-name="N764P0"/>
      <style:map style:condition="value()&lt;0" style:apply-style-name="N764P1"/>
      <style:map style:condition="value()=0" style:apply-style-name="N764P2"/>
    </number:text-style>
    <number:number-style style:name="N765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65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65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65">
      <number:text-content/>
      <number:text> </number:text>
      <style:map style:condition="value()&gt;0" style:apply-style-name="N765P0"/>
      <style:map style:condition="value()&lt;0" style:apply-style-name="N765P1"/>
      <style:map style:condition="value()=0" style:apply-style-name="N765P2"/>
    </number:text-style>
    <number:number-style style:name="N766">
      <number:number number:decimal-places="1" loext:min-decimal-places="1" number:min-integer-digits="0" number:grouping="true"/>
    </number:number-style>
    <number:number-style style:name="N768P0" style:volatile="true"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768P1" style:volatile="true"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768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68">
      <number:text-content/>
      <number:text> </number:text>
      <style:map style:condition="value()&gt;0" style:apply-style-name="N768P0"/>
      <style:map style:condition="value()&lt;0" style:apply-style-name="N768P1"/>
      <style:map style:condition="value()=0" style:apply-style-name="N768P2"/>
    </number:text-style>
    <number:currency-style style:name="N769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76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769P0"/>
    </number:currency-style>
    <number:currency-style style:name="N770P0" style:volatile="true">
      <number:number number:decimal-places="0" loext:min-decimal-places="0" number:min-integer-digits="1" number:grouping="true"/>
      <number:text> </number:text>
      <number:currency-symbol>USD</number:currency-symbol>
    </number:currency-style>
    <number:currency-style style:name="N77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>USD</number:currency-symbol>
      <style:map style:condition="value()&gt;=0" style:apply-style-name="N770P0"/>
    </number:currency-style>
    <number:number-style style:name="N771P0" style:volatile="true">
      <number:number number:decimal-places="0" loext:min-decimal-places="0" number:min-integer-digits="1" number:grouping="true"/>
    </number:number-style>
    <number:number-style style:name="N771">
      <number:number number:decimal-places="0" loext:min-decimal-places="0" number:min-integer-digits="1" number:grouping="true"/>
      <style:map style:condition="value()&gt;=0" style:apply-style-name="N771P0"/>
    </number:number-style>
    <number:number-style style:name="N772P0" style:volatile="true">
      <number:number number:decimal-places="0" loext:min-decimal-places="0" number:min-integer-digits="1"/>
    </number:number-style>
    <number:number-style style:name="N772">
      <number:number number:decimal-places="0" loext:min-decimal-places="0" number:min-integer-digits="1"/>
      <style:map style:condition="value()&gt;=0" style:apply-style-name="N772P0"/>
    </number:number-style>
    <number:currency-style style:name="N773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773P1" style:volatile="true">
      <number:text>-# ""</number:text>
    </number:number-style>
    <number:number-style style:name="N773">
      <number:text>"@ </number:text>
      <style:map style:condition="value()&lt;=0" style:apply-style-name="N773P0"/>
      <style:map style:condition="value()&lt;0" style:apply-style-name="N773P1"/>
    </number:number-style>
    <number:currency-style style:name="N775P0" style:volatile="true">
      <number:currency-symbol number:language="en" number:country="IE">€</number:currency-symbol>
      <number:number number:decimal-places="2" loext:min-decimal-places="0" number:min-integer-digits="1" number:decimal-replacement="--" number:grouping="true"/>
    </number:currency-style>
    <number:currency-style style:name="N775">
      <style:text-properties fo:color="#ff0000"/>
      <number:text>-</number:text>
      <number:currency-symbol number:language="en" number:country="IE">€</number:currency-symbol>
      <number:number number:decimal-places="2" loext:min-decimal-places="0" number:min-integer-digits="1" number:decimal-replacement="--" number:grouping="true"/>
      <style:map style:condition="value()&gt;=0" style:apply-style-name="N775P0"/>
    </number:currency-style>
    <number:currency-style style:name="N777P0" style:volatile="true">
      <number:currency-symbol number:language="en" number:country="IE">€ </number:currency-symbol>
      <number:number number:decimal-places="0" loext:min-decimal-places="0" number:min-integer-digits="1" number:grouping="true"/>
    </number:currency-style>
    <number:currency-style style:name="N777">
      <style:text-properties fo:color="#ff0000"/>
      <number:text>-</number:text>
      <number:currency-symbol number:language="en" number:country="IE">€ </number:currency-symbol>
      <number:number number:decimal-places="0" loext:min-decimal-places="0" number:min-integer-digits="1" number:grouping="true"/>
      <style:map style:condition="value()&gt;=0" style:apply-style-name="N777P0"/>
    </number:currency-style>
    <number:number-style style:name="N77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77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77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78">
      <number:text-content/>
      <number:text> </number:text>
      <style:map style:condition="value()&gt;0" style:apply-style-name="N778P0"/>
      <style:map style:condition="value()&lt;0" style:apply-style-name="N778P1"/>
      <style:map style:condition="value()=0" style:apply-style-name="N778P2"/>
    </number:text-style>
    <number:number-style style:name="N782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782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782P2" style:volatile="true">
      <loext:text> </loext:text>
      <loext:fill-character> </loext:fill-character>
      <number:text>-     </number:text>
    </number:number-style>
    <number:text-style style:name="N782">
      <number:text-content/>
      <number:text> </number:text>
      <style:map style:condition="value()&gt;0" style:apply-style-name="N782P0"/>
      <style:map style:condition="value()&lt;0" style:apply-style-name="N782P1"/>
      <style:map style:condition="value()=0" style:apply-style-name="N782P2"/>
    </number:text-style>
    <number:number-style style:name="N786P0" style:volatile="true">
      <loext:text> </loext:text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786P1" style:volatile="true">
      <loext:text>-</loext:text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786P2" style:volatile="true">
      <loext:text> </loext:text>
      <loext:fill-character> </loext:fill-character>
      <number:text>- р. </number:text>
    </number:number-style>
    <number:text-style style:name="N786">
      <number:text-content/>
      <number:text> </number:text>
      <style:map style:condition="value()&gt;0" style:apply-style-name="N786P0"/>
      <style:map style:condition="value()&lt;0" style:apply-style-name="N786P1"/>
      <style:map style:condition="value()=0" style:apply-style-name="N786P2"/>
    </number:text-style>
    <number:number-style style:name="N790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790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79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790">
      <number:text-content/>
      <number:text> </number:text>
      <style:map style:condition="value()&gt;0" style:apply-style-name="N790P0"/>
      <style:map style:condition="value()&lt;0" style:apply-style-name="N790P1"/>
      <style:map style:condition="value()=0" style:apply-style-name="N790P2"/>
    </number:text-style>
    <number:number-style style:name="N794P0" style:volatile="true">
      <loext:text> </loext:text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794P1" style:volatile="true">
      <loext:text>-</loext:text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794P2" style:volatile="true">
      <loext:text> </loext:text>
      <loext:fill-character> </loext:fill-character>
      <number:text>-</number:text>
      <number:number number:decimal-places="0" loext:min-decimal-places="0" number:min-integer-digits="0"/>
      <number:text> р. </number:text>
    </number:number-style>
    <number:text-style style:name="N794">
      <number:text-content/>
      <number:text> </number:text>
      <style:map style:condition="value()&gt;0" style:apply-style-name="N794P0"/>
      <style:map style:condition="value()&lt;0" style:apply-style-name="N794P1"/>
      <style:map style:condition="value()=0" style:apply-style-name="N794P2"/>
    </number:text-style>
    <number:number-style style:name="N795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795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795P2" style:volatile="true">
      <loext:text> </loext:text>
      <loext:fill-character> </loext:fill-character>
      <number:text>-р. </number:text>
    </number:number-style>
    <number:text-style style:name="N795">
      <number:text-content/>
      <number:text> </number:text>
      <style:map style:condition="value()&gt;0" style:apply-style-name="N795P0"/>
      <style:map style:condition="value()&lt;0" style:apply-style-name="N795P1"/>
      <style:map style:condition="value()=0" style:apply-style-name="N795P2"/>
    </number:text-style>
    <number:number-style style:name="N79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9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96P2" style:volatile="true">
      <loext:text> </loext:text>
      <loext:fill-character> </loext:fill-character>
      <number:text>-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number-style style:name="N797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797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797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797">
      <number:text-content/>
      <number:text> </number:text>
      <style:map style:condition="value()&gt;0" style:apply-style-name="N797P0"/>
      <style:map style:condition="value()&lt;0" style:apply-style-name="N797P1"/>
      <style:map style:condition="value()=0" style:apply-style-name="N797P2"/>
    </number:text-style>
    <number:number-style style:name="N80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0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801P2" style:volatile="true">
      <loext:text> $</loext:text>
      <loext:fill-character> </loext:fill-character>
      <number:text>- </number:text>
    </number:number-style>
    <number:text-style style:name="N801">
      <number:text-content/>
      <number:text> </number:text>
      <style:map style:condition="value()&gt;0" style:apply-style-name="N801P0"/>
      <style:map style:condition="value()&lt;0" style:apply-style-name="N801P1"/>
      <style:map style:condition="value()=0" style:apply-style-name="N801P2"/>
    </number:text-style>
    <number:number-style style:name="N80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0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805P2" style:volatile="true">
      <loext:text> </loext:text>
      <loext:fill-character> </loext:fill-character>
      <number:text>- </number:text>
    </number:number-style>
    <number:text-style style:name="N805">
      <number:text-content/>
      <number:text> </number:text>
      <style:map style:condition="value()&gt;0" style:apply-style-name="N805P0"/>
      <style:map style:condition="value()&lt;0" style:apply-style-name="N805P1"/>
      <style:map style:condition="value()=0" style:apply-style-name="N805P2"/>
    </number:text-style>
    <number:number-style style:name="N80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0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80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09">
      <number:text-content/>
      <number:text> </number:text>
      <style:map style:condition="value()&gt;0" style:apply-style-name="N809P0"/>
      <style:map style:condition="value()&lt;0" style:apply-style-name="N809P1"/>
      <style:map style:condition="value()=0" style:apply-style-name="N809P2"/>
    </number:text-style>
    <number:number-style style:name="N81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8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13">
      <number:text-content/>
      <number:text> </number:text>
      <style:map style:condition="value()&gt;0" style:apply-style-name="N813P0"/>
      <style:map style:condition="value()&lt;0" style:apply-style-name="N813P1"/>
      <style:map style:condition="value()=0" style:apply-style-name="N813P2"/>
    </number:text-style>
    <number:number-style style:name="N816P0" style:volatile="true">
      <loext:text> 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816P1" style:volatile="true">
      <loext:text>-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81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816">
      <number:text-content/>
      <number:text> </number:text>
      <style:map style:condition="value()&gt;0" style:apply-style-name="N816P0"/>
      <style:map style:condition="value()&lt;0" style:apply-style-name="N816P1"/>
      <style:map style:condition="value()=0" style:apply-style-name="N816P2"/>
    </number:text-style>
    <number:number-style style:name="N82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82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82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820">
      <number:text-content/>
      <number:text> </number:text>
      <style:map style:condition="value()&gt;0" style:apply-style-name="N820P0"/>
      <style:map style:condition="value()&lt;0" style:apply-style-name="N820P1"/>
      <style:map style:condition="value()=0" style:apply-style-name="N820P2"/>
    </number:text-style>
    <number:number-style style:name="N824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824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824P2" style:volatile="true">
      <loext:text> </loext:text>
      <loext:fill-character> </loext:fill-character>
      <number:text>- ₽ </number:text>
    </number:number-style>
    <number:text-style style:name="N824">
      <number:text-content/>
      <number:text> </number:text>
      <style:map style:condition="value()&gt;0" style:apply-style-name="N824P0"/>
      <style:map style:condition="value()&lt;0" style:apply-style-name="N824P1"/>
      <style:map style:condition="value()=0" style:apply-style-name="N824P2"/>
    </number:text-style>
    <number:number-style style:name="N828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828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8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828">
      <number:text-content/>
      <number:text> </number:text>
      <style:map style:condition="value()&gt;0" style:apply-style-name="N828P0"/>
      <style:map style:condition="value()&lt;0" style:apply-style-name="N828P1"/>
      <style:map style:condition="value()=0" style:apply-style-name="N828P2"/>
    </number:text-style>
    <number:number-style style:name="N82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82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8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829">
      <number:text-content/>
      <number:text> </number:text>
      <style:map style:condition="value()&gt;0" style:apply-style-name="N829P0"/>
      <style:map style:condition="value()&lt;0" style:apply-style-name="N829P1"/>
      <style:map style:condition="value()=0" style:apply-style-name="N829P2"/>
    </number:text-style>
    <number:number-style style:name="N8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0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0P2" style:volatile="true">
      <loext:fill-character> </loext:fill-character>
      <number:text>- </number:text>
    </number:number-style>
    <number:text-style style:name="N830">
      <number:text-content/>
      <number:text> </number:text>
      <style:map style:condition="value()&gt;0" style:apply-style-name="N830P0"/>
      <style:map style:condition="value()&lt;0" style:apply-style-name="N830P1"/>
      <style:map style:condition="value()=0" style:apply-style-name="N830P2"/>
    </number:text-style>
    <number:number-style style:name="N83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31P1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3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31">
      <number:text-content/>
      <number:text> </number:text>
      <style:map style:condition="value()&gt;0" style:apply-style-name="N831P0"/>
      <style:map style:condition="value()&lt;0" style:apply-style-name="N831P1"/>
      <style:map style:condition="value()=0" style:apply-style-name="N831P2"/>
    </number:text-style>
    <number:number-style style:name="N832">
      <number:number number:decimal-places="0" loext:min-decimal-places="0" number:min-integer-digits="9"/>
    </number:number-style>
    <number:number-style style:name="N8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4P2" style:volatile="true">
      <loext:text> </loext:text>
      <loext:fill-character> </loext:fill-character>
      <number:text>- </number:text>
    </number:number-style>
    <number:text-style style:name="N834">
      <number:text> </number:text>
      <number:text-content/>
      <number:text> </number:text>
      <style:map style:condition="value()&gt;0" style:apply-style-name="N834P0"/>
      <style:map style:condition="value()&lt;0" style:apply-style-name="N834P1"/>
      <style:map style:condition="value()=0" style:apply-style-name="N834P2"/>
    </number:text-style>
    <number:number-style style:name="N835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835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835P2" style:volatile="true">
      <loext:text> </loext:text>
      <loext:fill-character> </loext:fill-character>
      <number:text>- ₽ </number:text>
    </number:number-style>
    <number:text-style style:name="N835">
      <number:text> </number:text>
      <number:text-content/>
      <number:text> </number:text>
      <style:map style:condition="value()&gt;0" style:apply-style-name="N835P0"/>
      <style:map style:condition="value()&lt;0" style:apply-style-name="N835P1"/>
      <style:map style:condition="value()=0" style:apply-style-name="N835P2"/>
    </number:text-style>
    <number:number-style style:name="N8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3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37">
      <number:text> </number:text>
      <number:text-content/>
      <number:text> </number:text>
      <style:map style:condition="value()&gt;0" style:apply-style-name="N837P0"/>
      <style:map style:condition="value()&lt;0" style:apply-style-name="N837P1"/>
      <style:map style:condition="value()=0" style:apply-style-name="N837P2"/>
    </number:text-style>
    <number:number-style style:name="N838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838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838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838">
      <number:text> </number:text>
      <number:text-content/>
      <number:text> </number:text>
      <style:map style:condition="value()&gt;0" style:apply-style-name="N838P0"/>
      <style:map style:condition="value()&lt;0" style:apply-style-name="N838P1"/>
      <style:map style:condition="value()=0" style:apply-style-name="N838P2"/>
    </number:text-style>
    <number:number-style style:name="N8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839P2" style:volatile="true">
      <loext:text> $</loext:text>
      <loext:fill-character> </loext:fill-character>
      <number:text>- </number:text>
    </number:number-style>
    <number:text-style style:name="N839">
      <number:text> </number:text>
      <number:text-content/>
      <number:text> </number:text>
      <style:map style:condition="value()&gt;0" style:apply-style-name="N839P0"/>
      <style:map style:condition="value()&lt;0" style:apply-style-name="N839P1"/>
      <style:map style:condition="value()=0" style:apply-style-name="N839P2"/>
    </number:text-style>
    <number:number-style style:name="N84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4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840P2" style:volatile="true">
      <loext:text> </loext:text>
      <loext:fill-character> </loext:fill-character>
      <number:text>- </number:text>
    </number:number-style>
    <number:text-style style:name="N840">
      <number:text> </number:text>
      <number:text-content/>
      <number:text> </number:text>
      <style:map style:condition="value()&gt;0" style:apply-style-name="N840P0"/>
      <style:map style:condition="value()&lt;0" style:apply-style-name="N840P1"/>
      <style:map style:condition="value()=0" style:apply-style-name="N840P2"/>
    </number:text-style>
    <number:number-style style:name="N84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4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84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41">
      <number:text> </number:text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number-style style:name="N8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4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8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42">
      <number:text> </number:text>
      <number:text-content/>
      <number:text> </number:text>
      <style:map style:condition="value()&gt;0" style:apply-style-name="N842P0"/>
      <style:map style:condition="value()&lt;0" style:apply-style-name="N842P1"/>
      <style:map style:condition="value()=0" style:apply-style-name="N842P2"/>
    </number:text-style>
    <number:currency-style style:name="N844P0" style:volatile="true">
      <number:number number:decimal-places="2" loext:min-decimal-places="2" number:min-integer-digits="1" number:grouping="true"/>
      <number:text> </number:text>
      <number:currency-symbol>GEL</number:currency-symbol>
    </number:currency-style>
    <number:currency-style style:name="N84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GEL</number:currency-symbol>
      <style:map style:condition="value()&gt;=0" style:apply-style-name="N844P0"/>
    </number:currency-style>
    <number:number-style style:name="N845">
      <number:number number:decimal-places="0" loext:min-decimal-places="0" number:min-integer-digits="1"/>
      <number:text>  </number:text>
    </number:number-style>
    <number:number-style style:name="N846">
      <number:number number:decimal-places="0" loext:min-decimal-places="0" number:min-integer-digits="11"/>
    </number:number-style>
    <number:number-style style:name="N847">
      <number:number number:decimal-places="0" loext:min-decimal-places="0" number:min-integer-digits="1"/>
      <number:text> гр</number:text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number:text> </number:text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number:text>-</number:text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number:text> -    </number:text>
    </number:number-style>
    <number:text-style style:name="N10129" number:language="ru" number:country="R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number:text> </number:text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number:text>-</number:text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number:text> -р. </number:text>
    </number:number-style>
    <number:text-style style:name="N10133" number:language="ru" number:country="R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number:text> </number:text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number:text>-</number:text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number:text> </number:text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number:text>-</number:text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ru" number:country="RU">
      <number:minutes number:style="long"/>
      <number:text>:</number:text>
      <number:seconds number:style="long"/>
    </number:time-style>
    <number:time-style style:name="N10143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ru" number:country="RU">
      <number:minutes number:style="long"/>
      <number:text>:</number:text>
      <number:seconds number:style="long" number:decimal-places="1"/>
    </number:time-style>
    <number:number-style style:name="N10145" number:language="ru" number:country="RU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46" number:language="ru" number:country="RU">
      <number:month number:textual="true"/>
      <number:text> </number:text>
      <number:day number:style="long"/>
    </number:date-style>
    <number:currency-style style:name="N10147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48P0" style:volatile="true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48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48P0"/>
    </number:currency-style>
    <number:number-style style:name="N10151P0" style:volatile="true" number:language="ru" number:country="RU">
      <number:number number:decimal-places="0" loext:min-decimal-places="0" number:min-integer-digits="1" number:grouping="true"/>
      <number:text>    </number:text>
    </number:number-style>
    <number:number-style style:name="N10151P1" style:volatile="true" number:language="ru" number:country="RU">
      <number:number number:decimal-places="0" loext:min-decimal-places="0" number:min-integer-digits="1" number:grouping="true"/>
      <number:text>    </number:text>
    </number:number-style>
    <number:number-style style:name="N10151P2" style:volatile="true" number:language="ru" number:country="RU">
      <number:text>-    </number:text>
    </number:number-style>
    <number:text-style style:name="N10151" number:language="ru" number:country="RU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4P0" style:volatile="true" number:language="ru" number:country="RU">
      <number:number number:decimal-places="0" loext:min-decimal-places="0" number:min-integer-digits="1" number:grouping="true"/>
      <number:text>р. </number:text>
    </number:number-style>
    <number:number-style style:name="N10154P1" style:volatile="true" number:language="ru" number:country="RU">
      <number:number number:decimal-places="0" loext:min-decimal-places="0" number:min-integer-digits="1" number:grouping="true"/>
      <number:text>р. </number:text>
    </number:number-style>
    <number:number-style style:name="N10154P2" style:volatile="true" number:language="ru" number:country="RU">
      <number:text>-р. </number:text>
    </number:number-style>
    <number:text-style style:name="N10154" number:language="ru" number:country="RU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6P0" style:volatile="true" number:language="ru" number:country="RU">
      <number:number number:decimal-places="2" loext:min-decimal-places="2" number:min-integer-digits="1" number:grouping="true"/>
      <number:text>    </number:text>
    </number:number-style>
    <number:number-style style:name="N10156P1" style:volatile="true" number:language="ru" number:country="RU">
      <number:number number:decimal-places="2" loext:min-decimal-places="2" number:min-integer-digits="1" number:grouping="true"/>
      <number:text>    </number:text>
    </number:number-style>
    <number:number-style style:name="N10156P2" style:volatile="true" number:language="ru" number:country="RU">
      <number:text>-</number:text>
      <number:number number:decimal-places="0" loext:min-decimal-places="0" number:min-integer-digits="0"/>
      <number:text>    </number:text>
    </number:number-style>
    <number:text-style style:name="N10156" number:language="ru" number:country="RU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ru" number:country="RU">
      <number:number number:decimal-places="2" loext:min-decimal-places="2" number:min-integer-digits="1" number:grouping="true"/>
      <number:text>р. </number:text>
    </number:number-style>
    <number:number-style style:name="N10158P1" style:volatile="true" number:language="ru" number:country="RU">
      <number:number number:decimal-places="2" loext:min-decimal-places="2" number:min-integer-digits="1" number:grouping="true"/>
      <number:text>р. </number:text>
    </number:number-style>
    <number:number-style style:name="N10158P2" style:volatile="true" number:language="ru" number:country="RU">
      <number:text>-</number:text>
      <number:number number:decimal-places="0" loext:min-decimal-places="0" number:min-integer-digits="0"/>
      <number:text>р. </number:text>
    </number:number-style>
    <number:text-style style:name="N10158" number:language="ru" number:country="RU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61P0" style:volatile="true" number:language="ru" number:country="RU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61P1" style:volatile="true" number:language="ru" number:country="RU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61P2" style:volatile="true" number:language="ru" number:country="RU">
      <loext:fill-character> </loext:fill-character>
      <number:text>-    </number:text>
    </number:number-style>
    <number:text-style style:name="N10161" number:language="ru" number:country="RU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4P0" style:volatile="true" number:language="ru" number:country="RU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64P1" style:volatile="true" number:language="ru" number:country="RU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64P2" style:volatile="true" number:language="ru" number:country="RU">
      <loext:fill-character> </loext:fill-character>
      <number:text>-р. </number:text>
    </number:number-style>
    <number:text-style style:name="N10164" number:language="ru" number:country="RU"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number-style style:name="N10167P0" style:volatile="true" number:language="ru" number:country="RU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67P1" style:volatile="true" number:language="ru" number:country="RU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67P2" style:volatile="true" number:language="ru" number:country="RU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67" number:language="ru" number:country="RU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0P0" style:volatile="true" number:language="ru" number:country="RU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70P1" style:volatile="true" number:language="ru" number:country="RU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70P2" style:volatile="true" number:language="ru" number:country="RU"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70" number:language="ru" number:country="RU"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time-style style:name="N10171" number:language="ru" number:country="RU">
      <number:minutes number:style="long"/>
      <number:text>:</number:text>
      <number:seconds number:style="long"/>
      <number:text>,</number:text>
    </number:time-style>
    <number:number-style style:name="N10175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75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75P2" style:volatile="true" number:language="ru" number:country="RU">
      <loext:text> </loext:text>
      <loext:fill-character> </loext:fill-character>
      <number:text>-    </number:text>
    </number:number-style>
    <number:text-style style:name="N10175" number:language="ru" number:country="RU">
      <number:text-content/>
      <number:text> </number:text>
      <style:map style:condition="value()&gt;0" style:apply-style-name="N10175P0"/>
      <style:map style:condition="value()&lt;0" style:apply-style-name="N10175P1"/>
      <style:map style:condition="value()=0" style:apply-style-name="N10175P2"/>
    </number:text-style>
    <number:number-style style:name="N1017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7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79P2" style:volatile="true" number:language="ru" number:country="RU">
      <loext:text> </loext:text>
      <loext:fill-character> </loext:fill-character>
      <number:text>-р. </number:text>
    </number:number-style>
    <number:text-style style:name="N10179" number:language="ru" number:country="RU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83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83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83" number:language="ru" number:country="RU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8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8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87" number:language="ru" number:country="RU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88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88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88P2" style:volatile="true" number:language="ru" number:country="RU">
      <loext:text> </loext:text>
      <loext:fill-character> </loext:fill-character>
      <number:text>-    </number:text>
    </number:number-style>
    <number:text-style style:name="N10188" number:language="ru" number:country="RU">
      <number:text> </number:text>
      <number:text-content/>
      <number:text> </number:text>
      <style:map style:condition="value()&gt;0" style:apply-style-name="N10188P0"/>
      <style:map style:condition="value()&lt;0" style:apply-style-name="N10188P1"/>
      <style:map style:condition="value()=0" style:apply-style-name="N10188P2"/>
    </number:text-style>
    <number:number-style style:name="N1018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8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89P2" style:volatile="true" number:language="ru" number:country="RU">
      <loext:text> </loext:text>
      <loext:fill-character> </loext:fill-character>
      <number:text>-р. </number:text>
    </number:number-style>
    <number:text-style style:name="N10189" number:language="ru" number:country="RU">
      <number:text> </number:text>
      <number:text-content/>
      <number:text> </number:text>
      <style:map style:condition="value()&gt;0" style:apply-style-name="N10189P0"/>
      <style:map style:condition="value()&lt;0" style:apply-style-name="N10189P1"/>
      <style:map style:condition="value()=0" style:apply-style-name="N10189P2"/>
    </number:text-style>
    <number:number-style style:name="N10190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90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90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90" number:language="ru" number:country="RU">
      <number:text> </number:text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9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9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91" number:language="ru" number:country="RU">
      <number:text> </number:text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date-style style:name="N20121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20121" number:language="en" number:country="US">
      <number:text-content/>
      <style:map style:condition="value()&lt;=1.79769313486232E+308" style:apply-style-name="N20121P0"/>
    </number:text-style>
    <number:date-style style:name="N20122" number:language="en" number:country="US">
      <number:day number:style="long"/>
      <number:text> </number:text>
      <number:month number:style="long" number:textual="true"/>
      <number:text>, 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2-19T17:56:24.001000000</meta:creation-date>
    <meta:editing-duration>P2DT1H49M23S</meta:editing-duration>
    <meta:editing-cycles>236</meta:editing-cycles>
    <meta:generator>LibreOffice/6.4.7.2$Linux_X86_64 LibreOffice_project/40$Build-2</meta:generator>
    <dc:date>2026-06-26T06:50:48.801819926</dc:date>
    <dc:creator>Dmitry  Egorov</dc:creator>
    <meta:document-statistic meta:table-count="9" meta:cell-count="5666" meta:object-count="0"/>
  </office:meta>
</office:document-meta>
</file>