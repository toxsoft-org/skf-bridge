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7.108cm"/>
    </style:style>
    <style:style style:name="co15" style:family="table-column">
      <style:table-column-properties fo:break-before="auto" style:column-width="12.183cm"/>
    </style:style>
    <style:style style:name="co16" style:family="table-column">
      <style:table-column-properties fo:break-before="auto" style:column-width="12.497cm"/>
    </style:style>
    <style:style style:name="co17" style:family="table-column">
      <style:table-column-properties fo:break-before="auto" style:column-width="5.131cm"/>
    </style:style>
    <style:style style:name="co18" style:family="table-column">
      <style:table-column-properties fo:break-before="auto" style:column-width="3.925cm"/>
    </style:style>
    <style:style style:name="co19" style:family="table-column">
      <style:table-column-properties fo:break-before="auto" style:column-width="3.353cm"/>
    </style:style>
    <style:style style:name="co20" style:family="table-column">
      <style:table-column-properties fo:break-before="auto" style:column-width="5.475cm"/>
    </style:style>
    <style:style style:name="co10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5.761cm"/>
    </style:style>
    <style:style style:name="co23" style:family="table-column">
      <style:table-column-properties fo:break-before="auto" style:column-width="6.708cm"/>
    </style:style>
    <style:style style:name="co24" style:family="table-column">
      <style:table-column-properties fo:break-before="auto" style:column-width="10.234cm"/>
    </style:style>
    <style:style style:name="co25" style:family="table-column">
      <style:table-column-properties fo:break-before="auto" style:column-width="14.018cm"/>
    </style:style>
    <style:style style:name="co26" style:family="table-column">
      <style:table-column-properties fo:break-before="auto" style:column-width="6.477cm"/>
    </style:style>
    <style:style style:name="co27" style:family="table-column">
      <style:table-column-properties fo:break-before="auto" style:column-width="2.034cm"/>
    </style:style>
    <style:style style:name="co28" style:family="table-column">
      <style:table-column-properties fo:break-before="auto" style:column-width="5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3d3d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e0ffff"/>
    </style:style>
    <style:style style:name="ce20" style:family="table-cell" style:parent-style-name="Default">
      <style:table-cell-properties fo:background-color="transparent"/>
      <style:text-properties fo:color="#999999"/>
    </style:style>
    <style:style style:name="ce21" style:family="table-cell" style:parent-style-name="Default">
      <style:text-properties fo:color="#999999"/>
    </style:style>
    <style:style style:name="ce9" style:family="table-cell" style:parent-style-name="Default">
      <style:table-cell-properties fo:background-color="#d3d3d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transparent"/>
      <style:text-properties fo:color="#999999"/>
    </style:style>
    <style:style style:name="ce22" style:family="table-cell" style:parent-style-name="Default">
      <style:text-properties fo:color="#999999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rnings" table:style-name="ta1">
        <table:table-column table:style-name="co22" table:default-cell-style-name="ce10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1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17" office:value-type="string" calcext:value-type="string">
            <text:p>Поле</text:p>
          </table:table-cell>
          <table:table-cell table:style-name="ce17" office:value-type="string" calcext:value-type="string">
            <text:p>Объект</text:p>
          </table:table-cell>
          <table:table-cell table:number-columns-repeated="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предупреждений 1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10" office:value-type="string" calcext:value-type="string">
            <text:p>Предпомпаж</text:p>
          </table:table-cell>
          <table:table-cell office:value-type="string" calcext:value-type="string">
            <text:p>Предупреждение : Предпомпаж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Предупреждение : Уровень масла <text:s/>низ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Предупреждение : Нет протока воды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Предупреждение : Перепад давления на воздушном фильтре <text:s/>высо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Предупреждение : Перепад давления масла на маслофильтре <text:s/>PD120 высокий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Предупреждение : Перегрузка маслонасоса <text:s/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Предупреждение : Перегрузка вентилятор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Предупреждение : Давление масла PT130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Предупреждение : Вибрация 1 ступени VT#1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Предупреждение : Вибрация 2 ступени VT#2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Предупреждение : Вибрация 3 ступени VT#3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Предупреждение : Давление воды PT301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Предупреждение : Ток двигателя TD240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Предупреждение : Температура масла TE13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Предупреждение : Температура воздуха на входе 3 ступени TE23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предупреждений 2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Предупреждение : Температура масла в маслобаке TE101 низ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Предупреждение : Температура обмотки двигателя "R" TE14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Предупреждение : Температура воздуха на входе 2 ступени TE22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Предупреждение : Температура DE подшипника TE143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Предупреждение : Температура NDE подшипника TE144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ходе TE30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ыходе TE302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5_CoolingWaterReturn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Предупреждение : Вибрация DE подшипника VT#5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Предупреждение : Вибрация NDE подшипника VT#6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Предупреждение : сработала защита вентилятор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едупреждение : проверьте графики вибрации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Предупреждение : Ошибка сигнала термосопротивлени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Предупреждение : Ошибка аналогового сигнала <text:s/></text:p>
          </table:table-cell>
          <table:table-cell table:number-columns-repeated="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провождения 1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3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Обслуживание : смажьте соединени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Обслуживание : требуется замена смазки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Обслуживание : заменить масло в подшипниках двигател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Обслуживание : ввести смазку в подшипники двигател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Обслуживание : проверить электрику направляющего аппарат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Обслуживание : проверить сборку продувочного клапана <text:s/></text:p>
          </table:table-cell>
          <table:table-cell table:number-columns-repeated="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1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office:value-type="string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_IGVPosi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office:value-type="string" calcext:value-type="string">
            <text:p>Вне диапазона : Положение продувочного клапана BO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_BOVPosi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office:value-type="string" calcext:value-type="string">
            <text:p>Смещение сигнала : Вибрация 1 ступени VT#1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office:value-type="string" calcext:value-type="string">
            <text:p>Смещение сигнала : Вибрация 2 ступени VT#2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office:value-type="string" calcext:value-type="string">
            <text:p>Смещение сигнала : Вибрация 3 ступени VT#3 </text:p>
          </table:table-cell>
          <table:table-cell table:number-columns-repeated="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2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office:value-type="string" calcext:value-type="string">
            <text:p>Вне диапазона : Давление на напоре PT26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3_System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office:value-type="string" calcext:value-type="string">
            <text:p>Вне диапазона : Давление 3 ступени PT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4_Stage3Discharge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office:value-type="string" calcext:value-type="string">
            <text:p>Вне диапазона : Давление масла PT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office:value-type="string" calcext:value-type="string">
            <text:p>Вне диапазона : Вибрация 1 ступени VT#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office:value-type="string" calcext:value-type="string">
            <text:p>Вне диапазона : Вибрация 2 ступени VT#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office:value-type="string" calcext:value-type="string">
            <text:p>Вне диапазона : Вибрация 3 ступени VT#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office:value-type="string" calcext:value-type="string">
            <text:p>Вне диапазона : Перепад давления масла на маслофильтре <text:s/>PD12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office:value-type="string" calcext:value-type="string">
            <text:p>Вне диапазона : Ток двигателя TD2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office:value-type="string" calcext:value-type="string">
            <text:p>Вне диапазона : Давление воды PT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3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office:value-type="string" calcext:value-type="string">
            <text:p>Вне диапазона : Температура масла TE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office:value-type="string" calcext:value-type="string">
            <text:p>Вне диапазона : Температура воздуха на входе 3 ступени TE23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office:value-type="string" calcext:value-type="string">
            <text:p>Вне диапазона : Температура масла в маслобаке TE1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office:value-type="string" calcext:value-type="string">
            <text:p>Вне диапазона : Температура обмотки двигателя "R" TE1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office:value-type="string" calcext:value-type="string">
            <text:p>Вне диапазона : Температура DE подшипника TE14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office:value-type="string" calcext:value-type="string">
            <text:p>Вне диапазона : Температура NDE подшипника TE144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office:value-type="string" calcext:value-type="string">
            <text:p>Вне диапазона : Температура воздуха на входе 2 ступени TE22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office:value-type="string" calcext:value-type="string">
            <text:p>Вне диапазона : Температура воздуха на выходе 1 ступени TE21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1_N1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office:value-type="string" calcext:value-type="string">
            <text:p>Вне диапазона : Температура воздуха на выходе 2 ступени TE22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2_N2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office:value-type="string" calcext:value-type="string">
            <text:p>Вне диапазона : Температура воздуха на выходе 3 ступени TE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3_N3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office:value-type="string" calcext:value-type="string">
            <text:p>Вне диапазона : Температура охлаждающей воды на входе TE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office:value-type="string" calcext:value-type="string">
            <text:p>Вне диапазона : Температура охлаждающей воды на выходе TE30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5_CoolingWaterReturnTemp</text:p>
          </table:table-cell>
          <table:table-cell table:number-columns-repeated="5"/>
        </table:table-row>
      </table:table>
      <table:table table:name="Alarms" table:style-name="ta1">
        <table:table-column table:style-name="co13" table:default-cell-style-name="ce10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1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17" office:value-type="string" calcext:value-type="string">
            <text:p>Поле</text:p>
          </table:table-cell>
          <table:table-cell table:style-name="ce17" office:value-type="string" calcext:value-type="string">
            <text:p>Объект</text:p>
          </table:table-cell>
          <table:table-cell table:number-columns-repeated="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аварий 1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Авария : Давление масла PT130 низ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1 ступени VT#1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2 ступени VT#2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3 ступени VT#3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Авария : Ток двигателя TD240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Авария : Температура масла TE13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Авария : Температура воздуха на входе 3 ступени TE23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аварий 2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3">температура обмотки Р двигателя аварийно </text:span>высока</text:p>
          </table:table-cell>
          <table:table-cell office:value-type="string" calcext:value-type="string">
            <text:p><text:span text:style-name="T3">Температура обмотки Р двигателя аварийно </text:span>высока</text:p>
          </table:table-cell>
          <table:table-cell office:value-type="string" calcext:value-type="string">
            <text:p>Авария : Температура обмотки двигателя "R" TE14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3">температура обмотки С двигателя аварийно </text:span>высока</text:p>
          </table:table-cell>
          <table:table-cell office:value-type="string" calcext:value-type="string">
            <text:p><text:span text:style-name="T3">Температура обмотки С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3">температура обмотки Т двигателя аварийно </text:span>высока</text:p>
          </table:table-cell>
          <table:table-cell office:value-type="string" calcext:value-type="string">
            <text:p><text:span text:style-name="T3">Температура обмотки Т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Авария : Температура воздуха на входе 2 ступени TE22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3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3">Температура подшипника на приводном конце аварийно </text:span>высока</text:p>
          </table:table-cell>
          <table:table-cell office:value-type="string" calcext:value-type="string">
            <text:p>Авария : Температура DE подшипника TE143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3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3">Температура подшипника на неприводном конце аварийно</text:span> высока</text:p>
          </table:table-cell>
          <table:table-cell office:value-type="string" calcext:value-type="string">
            <text:p>Авария : Температура NDE подшипника TE144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office:value-type="string" calcext:value-type="string">
            <text:p>Авария : Вибрация DE подшипника VT#5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office:value-type="string" calcext:value-type="string">
            <text:p>Авария : Вибрация NDE подшипника VT#6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rtdAlarmMessGroupFlag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RemStopCommand</text:p>
          </table:table-cell>
          <table:table-cell table:style-name="ce22" office:value-type="string" calcext:value-type="string">
            <text:p>дистанционная команда стоп</text:p>
          </table:table-cell>
          <table:table-cell table:style-name="ce22" office:value-type="string" calcext:value-type="string">
            <text:p>Дистанционная команда стоп</text:p>
          </table:table-cell>
          <table:table-cell office:value-type="string" calcext:value-type="string">
            <text:p>Дистанционная команда стоп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rtdAlarmMessGroupFlag2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WasShutPowerOff</text:p>
          </table:table-cell>
          <table:table-cell table:style-name="ce22" office:value-type="string" calcext:value-type="string">
            <text:p>аварийное отключение питания</text:p>
          </table:table-cell>
          <table:table-cell table:style-name="ce22" office:value-type="string" calcext:value-type="string">
            <text:p>Аварийное отключение питания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rtdAlarmMessGroupFlag2</text:p>
          </table:table-cell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MotorStartPanelOnResponse</text:p>
          </table:table-cell>
          <table:table-cell table:style-name="ce22" office:value-type="string" calcext:value-type="string">
            <text:p>панель управления двигателем на связи</text:p>
          </table:table-cell>
          <table:table-cell table:style-name="ce22" office:value-type="string" calcext:value-type="string">
            <text:p>Панель управления двигателем на связи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rtdAlarmMessGroupFlag2</text:p>
          </table:table-cell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LocalStopCommand</text:p>
          </table:table-cell>
          <table:table-cell table:style-name="ce22" office:value-type="string" calcext:value-type="string">
            <text:p>местная команда стоп</text:p>
          </table:table-cell>
          <table:table-cell table:style-name="ce22" office:value-type="string" calcext:value-type="string">
            <text:p>Местная команда стоп</text:p>
          </table:table-cell>
          <table:table-cell office:value-type="string" calcext:value-type="string">
            <text:p>Местная команда стоп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5-20T10:17:49.930053724</dc:date>
    <meta:editing-duration>P8DT1H49M55S</meta:editing-duration>
    <meta:editing-cycles>162</meta:editing-cycles>
    <meta:generator>LibreOffice/6.4.7.2$Linux_X86_64 LibreOffice_project/40$Build-2</meta:generator>
    <dc:creator>Dmitry  Egorov</dc:creator>
    <meta:document-statistic meta:table-count="2" meta:cell-count="705" meta:object-count="0"/>
  </office:meta>
</office:document-meta>
</file>