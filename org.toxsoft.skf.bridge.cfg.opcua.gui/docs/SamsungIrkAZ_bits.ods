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2.425cm"/>
    </style:style>
    <style:style style:name="co3" style:family="table-column">
      <style:table-column-properties fo:break-before="auto" style:column-width="6.708cm"/>
    </style:style>
    <style:style style:name="co4" style:family="table-column">
      <style:table-column-properties fo:break-before="auto" style:column-width="10.234cm"/>
    </style:style>
    <style:style style:name="co5" style:family="table-column">
      <style:table-column-properties fo:break-before="auto" style:column-width="14.018cm"/>
    </style:style>
    <style:style style:name="co6" style:family="table-column">
      <style:table-column-properties fo:break-before="auto" style:column-width="6.477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5.98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7.006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7.108cm"/>
    </style:style>
    <style:style style:name="co15" style:family="table-column">
      <style:table-column-properties fo:break-before="auto" style:column-width="12.183cm"/>
    </style:style>
    <style:style style:name="co16" style:family="table-column">
      <style:table-column-properties fo:break-before="auto" style:column-width="12.497cm"/>
    </style:style>
    <style:style style:name="co17" style:family="table-column">
      <style:table-column-properties fo:break-before="auto" style:column-width="5.131cm"/>
    </style:style>
    <style:style style:name="co18" style:family="table-column">
      <style:table-column-properties fo:break-before="auto" style:column-width="3.925cm"/>
    </style:style>
    <style:style style:name="co19" style:family="table-column">
      <style:table-column-properties fo:break-before="auto" style:column-width="3.353cm"/>
    </style:style>
    <style:style style:name="co20" style:family="table-column">
      <style:table-column-properties fo:break-before="auto" style:column-width="5.475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3d3d3"/>
    </style:style>
    <style:style style:name="ce2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0ffff"/>
    </style:style>
    <style:style style:name="ce8" style:family="table-cell" style:parent-style-name="Default">
      <style:table-cell-properties fo:background-color="transparent"/>
      <style:text-properties fo:color="#999999"/>
    </style:style>
    <style:style style:name="ce12" style:family="table-cell" style:parent-style-name="Default">
      <style:text-properties fo:color="#9999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arnings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style-name="ce11" office:value-type="string" calcext:value-type="string">
            <text:p>Поле</text:p>
          </table:table-cell>
          <table:table-cell table:style-name="ce11" office:value-type="string" calcext:value-type="string">
            <text:p>Объект</text:p>
          </table:table-cell>
          <table:table-cell table:number-columns-repeated="5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предупреждений 1</text:p>
          </table:table-cell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23" office:value-type="string" calcext:value-type="string">
            <text:p>Предпомпаж</text:p>
          </table:table-cell>
          <table:table-cell office:value-type="string" calcext:value-type="string">
            <text:p>Предупреждение : Предпомпаж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Предупреждение : Уровень масла <text:s/>низкий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Предупреждение : Нет протока воды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Предупреждение : Перепад давления на воздушном фильтре <text:s/>высокий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Предупреждение : Перепад давления масла на маслофильтре <text:s/>PD120 высокий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9_OilFilterDiffPress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Предупреждение : Перегрузка маслонасоса <text:s/>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tdWarningMessGroupFlag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Предупреждение : Перегрузка вентилятора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Предупреждение : Давление масла PT130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Предупреждение : Вибрация 1 ступени VT#1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Предупреждение : Вибрация 2 ступени VT#2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Предупреждение : Вибрация 3 ступени VT#3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office:value-type="string" calcext:value-type="string">
            <text:p>Предупреждение : Давление воды PT301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1_CoolingWaterSupplyPress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Предупреждение : Ток двигателя TD240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Предупреждение : Температура масла TE13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Предупреждение : Температура воздуха на входе 3 ступени TE23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предупреждений 2</text:p>
          </table:table-cell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Предупреждение : Температура масла в маслобаке TE101 низ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6_OilReservoir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Предупреждение : Температура обмотки двигателя "R" TE14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Предупреждение : Температура воздуха на входе 2 ступени TE22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Предупреждение : Температура DE подшипника TE143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Предупреждение : Температура NDE подшипника TE144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ходе TE30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4_CoolingWaterSupplyTem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ыходе TE302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5_CoolingWateReturnTem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Предупреждение : Вибрация DE подшипника VT#5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2_MotorBearingDE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office:value-type="string" calcext:value-type="string">
            <text:p>Предупреждение : Вибрация NDE подшипника VT#6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3_MotorBearingNDE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Предупреждение : сработала защита вентилятора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едупреждение : проверьте графики вибрации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office:value-type="string" calcext:value-type="string">
            <text:p>Предупреждение : Ошибка сигнала термосопротивления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office:value-type="string" calcext:value-type="string">
            <text:p>Предупреждение : Ошибка аналогового сигнала <text:s/></text:p>
          </table:table-cell>
          <table:table-cell table:number-columns-repeated="8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сопровождения 1</text:p>
          </table:table-cell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Обслуживание : смажьте соединения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Обслуживание : требуется замена смазки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Обслуживание : заменить масло в подшипниках двигателя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Обслуживание : ввести смазку в подшипники двигателя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Обслуживание : проверить электрику направляющего аппарата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MaintenanceGroupFl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Обслуживание : проверить сборку продувочного клапана <text:s/></text:p>
          </table:table-cell>
          <table:table-cell table:number-columns-repeated="8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ремонта 1</text:p>
          </table:table-cell>
          <table:table-cell table:style-name="ce9"/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office:value-type="string" calcext:value-type="string">
            <text:p>Вне диапазона : Положение направляющего аппарата IG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_IGVPosition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office:value-type="string" calcext:value-type="string">
            <text:p>Вне диапазона : Положение продувочного клапана BO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_BOVPosition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office:value-type="string" calcext:value-type="string">
            <text:p>Смещение сигнала : Вибрация 1 ступени VT#1 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dEventMessGroupFlag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office:value-type="string" calcext:value-type="string">
            <text:p>Смещение сигнала : Вибрация 2 ступени VT#2 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dEventMessGroupFlag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office:value-type="string" calcext:value-type="string">
            <text:p>Смещение сигнала : Вибрация 3 ступени VT#3 </text:p>
          </table:table-cell>
          <table:table-cell table:number-columns-repeated="8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ремонта 2</text:p>
          </table:table-cell>
          <table:table-cell table:style-name="ce9"/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office:value-type="string" calcext:value-type="string">
            <text:p>Вне диапазона : Давление на напоре PT26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3_SystemPress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office:value-type="string" calcext:value-type="string">
            <text:p>Вне диапазона : Давление 3 ступени PT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4_Stage3DischargePress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office:value-type="string" calcext:value-type="string">
            <text:p>Вне диапазона : Давление масла PT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office:value-type="string" calcext:value-type="string">
            <text:p>Вне диапазона : Вибрация 1 ступени VT#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office:value-type="string" calcext:value-type="string">
            <text:p>Вне диапазона : Вибрация 2 ступени VT#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office:value-type="string" calcext:value-type="string">
            <text:p>Вне диапазона : Вибрация 3 ступени VT#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office:value-type="string" calcext:value-type="string">
            <text:p>Вне диапазона : Перепад давления масла на маслофильтре <text:s/>PD12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9_OilFilterDiffPress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office:value-type="string" calcext:value-type="string">
            <text:p>Вне диапазона : Ток двигателя TD2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office:value-type="string" calcext:value-type="string">
            <text:p>Вне диапазона : Давление воды PT3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1_CoolingWaterSupplyPress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number-columns-repeated="9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ремонта 3</text:p>
          </table:table-cell>
          <table:table-cell table:style-name="ce9"/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office:value-type="string" calcext:value-type="string">
            <text:p>Вне диапазона : Температура масла TE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office:value-type="string" calcext:value-type="string">
            <text:p>Вне диапазона : Температура воздуха на входе 3 ступени TE23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office:value-type="string" calcext:value-type="string">
            <text:p>Вне диапазона : Температура масла в маслобаке TE1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6_OilReservoir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office:value-type="string" calcext:value-type="string">
            <text:p>Вне диапазона : Температура обмотки двигателя "R" TE1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office:value-type="string" calcext:value-type="string">
            <text:p>Вне диапазона : Температура DE подшипника TE14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office:value-type="string" calcext:value-type="string">
            <text:p>Вне диапазона : Температура NDE подшипника TE144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office:value-type="string" calcext:value-type="string">
            <text:p>Вне диапазона : Температура воздуха на входе 2 ступени TE22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office:value-type="string" calcext:value-type="string">
            <text:p>Вне диапазона : Температура воздуха на выходе 1 ступени TE21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1_N1OutletTemp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office:value-type="string" calcext:value-type="string">
            <text:p>Вне диапазона : Температура воздуха на выходе 2 ступени TE22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2_N2OutletTemp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office:value-type="string" calcext:value-type="string">
            <text:p>Вне диапазона : Температура воздуха на выходе 3 ступени TE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3_N3OutletTemp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office:value-type="string" calcext:value-type="string">
            <text:p>Вне диапазона : Температура охлаждающей воды на входе TE3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4_CoolingWaterSupplyTemp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rtdEventMessGroupFlag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office:value-type="string" calcext:value-type="string">
            <text:p>Вне диапазона : Температура охлаждающей воды на выходе TE30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5_CoolingWateReturnTemp</text:p>
          </table:table-cell>
          <table:table-cell table:number-columns-repeated="5"/>
        </table:table-row>
      </table:table>
      <table:table table:name="Alarms" table:style-name="ta1">
        <table:table-column table:style-name="co13" table:default-cell-style-name="ce23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style-name="ce11" office:value-type="string" calcext:value-type="string">
            <text:p>Поле</text:p>
          </table:table-cell>
          <table:table-cell table:style-name="ce11" office:value-type="string" calcext:value-type="string">
            <text:p>Объект</text:p>
          </table:table-cell>
          <table:table-cell table:number-columns-repeated="5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аварий 1</text:p>
          </table:table-cell>
          <table:table-cell table:style-name="ce9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Авария : Давление масла PT130 низкое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1 ступени VT#1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2 ступени VT#2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3 ступени VT#3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Авария : Ток двигателя TD240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Авария : Температура масла TE13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Авария : Температура воздуха на входе 3 ступени TE23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Слово аварий 2</text:p>
          </table:table-cell>
          <table:table-cell table:style-name="ce9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1">температура обмотки Р двигателя аварийно </text:span>высока</text:p>
          </table:table-cell>
          <table:table-cell office:value-type="string" calcext:value-type="string">
            <text:p><text:span text:style-name="T1">Температура обмотки Р двигателя аварийно </text:span>высока</text:p>
          </table:table-cell>
          <table:table-cell office:value-type="string" calcext:value-type="string">
            <text:p>Авария : Температура обмотки двигателя "R" TE14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1">температура обмотки С двигателя аварийно </text:span>высока</text:p>
          </table:table-cell>
          <table:table-cell office:value-type="string" calcext:value-type="string">
            <text:p><text:span text:style-name="T1">Температура обмотки С двигателя аварийно </text:span>высока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1">температура обмотки Т двигателя аварийно </text:span>высока</text:p>
          </table:table-cell>
          <table:table-cell office:value-type="string" calcext:value-type="string">
            <text:p><text:span text:style-name="T1">Температура обмотки Т двигателя аварийно </text:span>высока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Авария : Температура воздуха на входе 2 ступени TE22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1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1">Температура подшипника на приводном конце аварийно </text:span>высока</text:p>
          </table:table-cell>
          <table:table-cell office:value-type="string" calcext:value-type="string">
            <text:p>Авария : Температура DE подшипника TE143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1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1">Температура подшипника на неприводном конце аварийно</text:span> высока</text:p>
          </table:table-cell>
          <table:table-cell office:value-type="string" calcext:value-type="string">
            <text:p>Авария : Температура NDE подшипника TE144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1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1">Вибрация подшипника на приводном конце аварийно</text:span> высока</text:p>
          </table:table-cell>
          <table:table-cell office:value-type="string" calcext:value-type="string">
            <text:p>Авария : Вибрация DE подшипника VT#5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2_MotorBearingDEVib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dAlarm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1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1">Вибрация подшипника на неприводном конце аварийно</text:span> высока</text:p>
          </table:table-cell>
          <table:table-cell office:value-type="string" calcext:value-type="string">
            <text:p>Авария : Вибрация NDE подшипника VT#6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3_MotorBearingNDEVibration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rtdAlarmMessGroupFlag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emStopCommand</text:p>
          </table:table-cell>
          <table:table-cell table:style-name="ce12" office:value-type="string" calcext:value-type="string">
            <text:p>дистанционная команда стоп</text:p>
          </table:table-cell>
          <table:table-cell table:style-name="ce12" office:value-type="string" calcext:value-type="string">
            <text:p>Дистанционная команда стоп</text:p>
          </table:table-cell>
          <table:table-cell office:value-type="string" calcext:value-type="string">
            <text:p>Дистанционная команда стоп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>
            <text:p>rtdAlarmMessGroupFlag2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WasShutPowerOff</text:p>
          </table:table-cell>
          <table:table-cell table:style-name="ce12" office:value-type="string" calcext:value-type="string">
            <text:p>аварийное отключение питания</text:p>
          </table:table-cell>
          <table:table-cell table:style-name="ce12" office:value-type="string" calcext:value-type="string">
            <text:p>Аварийное отключение питания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rtdAlarmMessGroupFlag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otorStartPanelOnResponse</text:p>
          </table:table-cell>
          <table:table-cell table:style-name="ce12" office:value-type="string" calcext:value-type="string">
            <text:p>панель управления двигателем на связи</text:p>
          </table:table-cell>
          <table:table-cell table:style-name="ce12" office:value-type="string" calcext:value-type="string">
            <text:p>Панель управления двигателем на связи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rtdAlarmMessGroupFlag2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LocalStopCommand</text:p>
          </table:table-cell>
          <table:table-cell table:style-name="ce12" office:value-type="string" calcext:value-type="string">
            <text:p>местная команда стоп</text:p>
          </table:table-cell>
          <table:table-cell table:style-name="ce12" office:value-type="string" calcext:value-type="string">
            <text:p>Местная команда стоп</text:p>
          </table:table-cell>
          <table:table-cell office:value-type="string" calcext:value-type="string">
            <text:p>Местная команда стоп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Николаевич Синько</meta:initial-creator>
    <meta:creation-date>2023-06-29T19:57:16.968000000</meta:creation-date>
    <dc:date>2026-05-18T16:39:28.763974862</dc:date>
    <meta:editing-duration>P8DT1H46M30S</meta:editing-duration>
    <meta:editing-cycles>160</meta:editing-cycles>
    <meta:generator>LibreOffice/6.4.7.2$Linux_X86_64 LibreOffice_project/40$Build-2</meta:generator>
    <dc:creator>Dmitry  Egorov</dc:creator>
    <meta:document-statistic meta:table-count="2" meta:cell-count="705" meta:object-count="0"/>
  </office:meta>
</office:document-meta>
</file>